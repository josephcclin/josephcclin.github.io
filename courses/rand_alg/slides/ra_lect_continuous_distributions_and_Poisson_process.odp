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C000000426D154D00E0CD7E17.png" manifest:media-type="image/png"/>
  <manifest:file-entry manifest:full-path="Pictures/10000001000001050000001BAFBDF6FBD65B5723.png" manifest:media-type="image/png"/>
  <manifest:file-entry manifest:full-path="Pictures/10004A9400000FCD0000041EC350C91E1E90EF5A.svg" manifest:media-type="image/svg+xml"/>
  <manifest:file-entry manifest:full-path="Pictures/100010580000879200001508D21A14F0A9096EB5.svg" manifest:media-type="image/svg+xml"/>
  <manifest:file-entry manifest:full-path="Pictures/10000001000001760000003E4BA9AFD0A9C6F4DC.png" manifest:media-type="image/png"/>
  <manifest:file-entry manifest:full-path="Pictures/100071150000172D000001BC0A825619F9D49EBB.svg" manifest:media-type="image/svg+xml"/>
  <manifest:file-entry manifest:full-path="Pictures/100000010000016700000167600951F1F521DA8F.png" manifest:media-type="image/png"/>
  <manifest:file-entry manifest:full-path="Pictures/1000742500001BD20000017A6FC6E6BC0BC1EBD5.svg" manifest:media-type="image/svg+xml"/>
  <manifest:file-entry manifest:full-path="Pictures/100050B000000E20000003519E3AC5123E5BD6BD.svg" manifest:media-type="image/svg+xml"/>
  <manifest:file-entry manifest:full-path="Pictures/1000000100000056000000179810E34ACD04F7C4.png" manifest:media-type="image/png"/>
  <manifest:file-entry manifest:full-path="Pictures/10000001000003600000019CCB15BAA0BB8EC4B2.png" manifest:media-type="image/png"/>
  <manifest:file-entry manifest:full-path="Pictures/10005577000010E000000375B43B17937FDD1AC1.svg" manifest:media-type="image/svg+xml"/>
  <manifest:file-entry manifest:full-path="Pictures/100000010000070300000117604DE60537B27434.png" manifest:media-type="image/png"/>
  <manifest:file-entry manifest:full-path="Pictures/100000010000013200000050E28C07E4771F3BFB.png" manifest:media-type="image/png"/>
  <manifest:file-entry manifest:full-path="Pictures/10000001000001680000001D2A2971C3F3ADA28C.png" manifest:media-type="image/png"/>
  <manifest:file-entry manifest:full-path="Pictures/100010A7000004730000012EAE2FE3CC8E090867.svg" manifest:media-type="image/svg+xml"/>
  <manifest:file-entry manifest:full-path="Pictures/10000001000001D6000000450D3B703062521A48.png" manifest:media-type="image/png"/>
  <manifest:file-entry manifest:full-path="Pictures/10005203000010B60000015F6C64AEC6F9E79C59.svg" manifest:media-type="image/svg+xml"/>
  <manifest:file-entry manifest:full-path="Pictures/10003DB700000D810000015F9CBCE9B7BC7BB22E.svg" manifest:media-type="image/svg+xml"/>
  <manifest:file-entry manifest:full-path="Pictures/100000010000010A0000001BD3F5423D6BF2AD93.png" manifest:media-type="image/png"/>
  <manifest:file-entry manifest:full-path="Pictures/100028F8000008FB00000139CC6622DA931A299E.svg" manifest:media-type="image/svg+xml"/>
  <manifest:file-entry manifest:full-path="Pictures/10000001000000AE00000018BF391ECD346C79D8.png" manifest:media-type="image/png"/>
  <manifest:file-entry manifest:full-path="Pictures/10005DDC00000DC10000015FE49A613886E6FB59.svg" manifest:media-type="image/svg+xml"/>
  <manifest:file-entry manifest:full-path="Pictures/100050520000129C0000017A935002CDA1FC3A21.svg" manifest:media-type="image/svg+xml"/>
  <manifest:file-entry manifest:full-path="Pictures/100026750000087400000194D31375C18F8F5F6A.svg" manifest:media-type="image/svg+xml"/>
  <manifest:file-entry manifest:full-path="Pictures/10006CD600000B91000005506E0AA3EFECB30526.svg" manifest:media-type="image/svg+xml"/>
  <manifest:file-entry manifest:full-path="Pictures/10000001000000FD00000022F45E6350AB11D0F3.png" manifest:media-type="image/png"/>
  <manifest:file-entry manifest:full-path="Pictures/10000001000001AA00000093ACEFE48345550F6A.png" manifest:media-type="image/png"/>
  <manifest:file-entry manifest:full-path="Pictures/10000001000000E000000067C0B390C6982266FC.png" manifest:media-type="image/png"/>
  <manifest:file-entry manifest:full-path="Pictures/1000974A00001FCD000001BCE5C2913ADBCECF5E.svg" manifest:media-type="image/svg+xml"/>
  <manifest:file-entry manifest:full-path="Pictures/1000973600001A450000036FD7D683B84977DC9C.svg" manifest:media-type="image/svg+xml"/>
  <manifest:file-entry manifest:full-path="Pictures/10000001000008E900000401549FADA00E209804.png" manifest:media-type="image/png"/>
  <manifest:file-entry manifest:full-path="Pictures/10000001000002AF0000001FFFEF3F251290006D.png" manifest:media-type="image/png"/>
  <manifest:file-entry manifest:full-path="Pictures/1000000100000147000000435B6E7C5C51F978EE.png" manifest:media-type="image/png"/>
  <manifest:file-entry manifest:full-path="Pictures/100105E300001B8B00000CE8116C5C0162C527C5.svg" manifest:media-type="image/svg+xml"/>
  <manifest:file-entry manifest:full-path="Pictures/100000010000012C0000003EC6AE95918DA9BA75.png" manifest:media-type="image/png"/>
  <manifest:file-entry manifest:full-path="Pictures/100000010000021B0000001FCFAFF759E1B53D1B.png" manifest:media-type="image/png"/>
  <manifest:file-entry manifest:full-path="Pictures/1000562E00000D2F0000017A49919DB838686F1A.svg" manifest:media-type="image/svg+xml"/>
  <manifest:file-entry manifest:full-path="Pictures/100000010000011100000040F4FE97CE2675F7FC.png" manifest:media-type="image/png"/>
  <manifest:file-entry manifest:full-path="Pictures/10001D77000004C4000001A43A55212582C90589.svg" manifest:media-type="image/svg+xml"/>
  <manifest:file-entry manifest:full-path="Pictures/100000010000021A0000001D7C78CB2C7FE30993.png" manifest:media-type="image/png"/>
  <manifest:file-entry manifest:full-path="Pictures/10005B74000010A700000337B444AC0ED3767F66.svg" manifest:media-type="image/svg+xml"/>
  <manifest:file-entry manifest:full-path="Pictures/100190A1000012890000129201FE03910674E1EB.svg" manifest:media-type="image/svg+xml"/>
  <manifest:file-entry manifest:full-path="Pictures/10000001000001420000003E7237B5D547847EAA.png" manifest:media-type="image/png"/>
  <manifest:file-entry manifest:full-path="Pictures/1000B5B200001608000007969946885380D2374C.svg" manifest:media-type="image/svg+xml"/>
  <manifest:file-entry manifest:full-path="Pictures/10000001000001EB0000001D5BA1011B19A4458F.png" manifest:media-type="image/png"/>
  <manifest:file-entry manifest:full-path="Pictures/1000462500000F80000003399A359486799486EC.svg" manifest:media-type="image/svg+xml"/>
  <manifest:file-entry manifest:full-path="Pictures/1000DB1000000E85000007095369933F64B7B0A7.svg" manifest:media-type="image/svg+xml"/>
  <manifest:file-entry manifest:full-path="Pictures/100020F8000009160000014DFDC863AC0D5F6123.svg" manifest:media-type="image/svg+xml"/>
  <manifest:file-entry manifest:full-path="Pictures/10004E6F00000D14000001BC4BBA8897CC092C67.svg" manifest:media-type="image/svg+xml"/>
  <manifest:file-entry manifest:full-path="Pictures/1001300D000015F300000AB6A0093998112BF5C3.svg" manifest:media-type="image/svg+xml"/>
  <manifest:file-entry manifest:full-path="Pictures/10000001000000B000000019D04DE31AD66C2274.png" manifest:media-type="image/png"/>
  <manifest:file-entry manifest:full-path="Pictures/10000001000001430000001B4211BFF267D5DE4E.png" manifest:media-type="image/png"/>
  <manifest:file-entry manifest:full-path="Pictures/100074760000134E0000033747D91F61CD7866BE.svg" manifest:media-type="image/svg+xml"/>
  <manifest:file-entry manifest:full-path="Pictures/10008633000017F30000034A6D88BFD27C74BFB5.svg" manifest:media-type="image/svg+xml"/>
  <manifest:file-entry manifest:full-path="Pictures/1000876F00001F2E000001F24987436C1C3B476C.svg" manifest:media-type="image/svg+xml"/>
  <manifest:file-entry manifest:full-path="Pictures/10000001000001CF00000040F4C864CECEBC48EB.png" manifest:media-type="image/png"/>
  <manifest:file-entry manifest:full-path="Pictures/100079C1000019660000017A3CD3DDCD8FA84614.svg" manifest:media-type="image/svg+xml"/>
  <manifest:file-entry manifest:full-path="Pictures/100045A000000A7A0000017AD50BEC5811AC26A3.svg" manifest:media-type="image/svg+xml"/>
  <manifest:file-entry manifest:full-path="Pictures/10000001000000CB0000001D5AB727A324B1D1EE.png" manifest:media-type="image/png"/>
  <manifest:file-entry manifest:full-path="Pictures/1000937B00001BE000000194C8EA1FF61307F18C.svg" manifest:media-type="image/svg+xml"/>
  <manifest:file-entry manifest:full-path="Pictures/10000001000000FF0000001D7B0A5F945D87E0A8.png" manifest:media-type="image/png"/>
  <manifest:file-entry manifest:full-path="Pictures/1000000100000267000000226D78F969111AE21A.png" manifest:media-type="image/png"/>
  <manifest:file-entry manifest:full-path="Pictures/10000001000002C20000001D9E00DBD263653092.png" manifest:media-type="image/png"/>
  <manifest:file-entry manifest:full-path="Pictures/1000A9710000238200000194B3FBAB23F095ABEF.svg" manifest:media-type="image/svg+xml"/>
  <manifest:file-entry manifest:full-path="Pictures/100000010000025B000000268EA7CC10A95CAA53.png" manifest:media-type="image/png"/>
  <manifest:file-entry manifest:full-path="Pictures/100000010000011900000088BF6685C5F6C44BF2.png" manifest:media-type="image/png"/>
  <manifest:file-entry manifest:full-path="Pictures/1004249D00002CA00000154AB75EE655135E93A2.svg" manifest:media-type="image/svg+xml"/>
  <manifest:file-entry manifest:full-path="Pictures/10000001000001C000000022992AA1DDDC3ADF06.png" manifest:media-type="image/png"/>
  <manifest:file-entry manifest:full-path="Pictures/100080B8000017CD00000337D28D0FEA3A6B25F1.svg" manifest:media-type="image/svg+xml"/>
  <manifest:file-entry manifest:full-path="Pictures/10000001000001590000003EC65D21505D95F169.png" manifest:media-type="image/png"/>
  <manifest:file-entry manifest:full-path="Pictures/10000001000001CD0000003EA0604F2433BAC5D2.png" manifest:media-type="image/png"/>
  <manifest:file-entry manifest:full-path="Pictures/10000EC900000319000002E7A211E40C596092AE.svg" manifest:media-type="image/svg+xml"/>
  <manifest:file-entry manifest:full-path="Pictures/100000010000003C000000384F198161AE28C4BD.png" manifest:media-type="image/png"/>
  <manifest:file-entry manifest:full-path="Pictures/100006E1000000AF0000009F125258D9ED598202.svg" manifest:media-type="image/svg+xml"/>
  <manifest:file-entry manifest:full-path="Pictures/10009FE400001D1E000003962F43BE92E5B116E7.svg" manifest:media-type="image/svg+xml"/>
  <manifest:file-entry manifest:full-path="Pictures/100000010000000D0000000C29135911E38AB636.png" manifest:media-type="image/png"/>
  <manifest:file-entry manifest:full-path="Pictures/100005D700000092000000F83795F20A1F607BC6.svg" manifest:media-type="image/svg+xml"/>
  <manifest:file-entry manifest:full-path="Pictures/100000010000000B000000134D0DDA78F6984A5C.png" manifest:media-type="image/png"/>
  <manifest:file-entry manifest:full-path="Pictures/1000033100000093000000EA5795EF8A37F00334.svg" manifest:media-type="image/svg+xml"/>
  <manifest:file-entry manifest:full-path="Pictures/100000010000000B00000012247D6B5F55568087.png" manifest:media-type="image/png"/>
  <manifest:file-entry manifest:full-path="Pictures/10008EB90000124D0000050B284E2E128A3DCDAB.svg" manifest:media-type="image/svg+xml"/>
  <manifest:file-entry manifest:full-path="Pictures/1000000100000162000000624907EB73DEB292AB.png" manifest:media-type="image/png"/>
  <manifest:file-entry manifest:full-path="Pictures/10000001000001010000001C22563F6D501773A5.png" manifest:media-type="image/png"/>
  <manifest:file-entry manifest:full-path="Pictures/10008264000011CE000004F10D503B321AE467A2.svg" manifest:media-type="image/svg+xml"/>
  <manifest:file-entry manifest:full-path="Pictures/100000010000015900000060AB443D05AA3AD472.png" manifest:media-type="image/png"/>
  <manifest:file-entry manifest:full-path="Pictures/10007D79000018470000039609F440179F9F216A.svg" manifest:media-type="image/svg+xml"/>
  <manifest:file-entry manifest:full-path="Pictures/10000001000002330000004581DC9A3516356EAC.png" manifest:media-type="image/png"/>
  <manifest:file-entry manifest:full-path="Pictures/10005C270000177C0000030264DD5A93AE06E7D0.svg" manifest:media-type="image/svg+xml"/>
  <manifest:file-entry manifest:full-path="Pictures/10000001000001C60000003A9A924324C9942D26.png" manifest:media-type="image/png"/>
  <manifest:file-entry manifest:full-path="Pictures/10000001000003CA0000031B82844C55EC89F850.png" manifest:media-type="image/png"/>
  <manifest:file-entry manifest:full-path="Pictures/10000001000003D00000030983B755FCA23E14B4.png" manifest:media-type="image/png"/>
  <manifest:file-entry manifest:full-path="Pictures/1000000100000215000000FA06282F912B46421F.png" manifest:media-type="image/png"/>
  <manifest:file-entry manifest:full-path="Pictures/10000000000001E1000000602DD713FE193946CE.png" manifest:media-type="image/png"/>
  <manifest:file-entry manifest:full-path="Pictures/100000000000025000000060E7B2099DD49A1270.png" manifest:media-type="image/png"/>
  <manifest:file-entry manifest:full-path="Pictures/100042EE000010010000033985596E8248BF27F7.svg" manifest:media-type="image/svg+xml"/>
  <manifest:file-entry manifest:full-path="Pictures/10000001000001360000003E011D1CA20C1994A5.png" manifest:media-type="image/png"/>
  <manifest:file-entry manifest:full-path="Pictures/10004F3F000011DA00000339F98E45CE211097A7.svg" manifest:media-type="image/svg+xml"/>
  <manifest:file-entry manifest:full-path="Pictures/10004ADA00001454000002E8E2B437AF975EED93.svg" manifest:media-type="image/svg+xml"/>
  <manifest:file-entry manifest:full-path="Pictures/100000010000018900000038D88743BC6C8FC419.png" manifest:media-type="image/png"/>
  <manifest:file-entry manifest:full-path="Pictures/10004C01000014E40000015FBE12EC57F83BB9F3.svg" manifest:media-type="image/svg+xml"/>
  <manifest:file-entry manifest:full-path="Pictures/100000010000018F0000001F5261068CB2076194.png" manifest:media-type="image/png"/>
  <manifest:file-entry manifest:full-path="Pictures/10000001000001940000001B73371817ADD038EE.png" manifest:media-type="image/png"/>
  <manifest:file-entry manifest:full-path="Pictures/100000010000005C000000208F94DA00A017FF73.png" manifest:media-type="image/png"/>
  <manifest:file-entry manifest:full-path="Pictures/10001E1A00000359000003C5AA4DA2E2AF4E6911.svg" manifest:media-type="image/svg+xml"/>
  <manifest:file-entry manifest:full-path="Pictures/100000010000004100000049C206EF33F16F7BBE.png" manifest:media-type="image/png"/>
  <manifest:file-entry manifest:full-path="Pictures/100021FE000004F3000003C5E420CDA2A74949F8.svg" manifest:media-type="image/svg+xml"/>
  <manifest:file-entry manifest:full-path="Pictures/100000010000006000000049FB66147D04D03EEF.png" manifest:media-type="image/png"/>
  <manifest:file-entry manifest:full-path="Pictures/10000000000003E8000004953964B5B584655374.png" manifest:media-type="image/png"/>
  <manifest:file-entry manifest:full-path="Pictures/10011D92000024190000081ABD98C798B26ABB55.svg" manifest:media-type="image/svg+xml"/>
  <manifest:file-entry manifest:full-path="Pictures/10003BAE00000D2E000003057153C13B800EAD50.svg" manifest:media-type="image/svg+xml"/>
  <manifest:file-entry manifest:full-path="Pictures/10000001000000FF0000003AF67D8538EADE7833.png" manifest:media-type="image/png"/>
  <manifest:file-entry manifest:full-path="Pictures/10003F8500000D11000003055580C953249E5672.svg" manifest:media-type="image/svg+xml"/>
  <manifest:file-entry manifest:full-path="Pictures/10000001000000FD0000003AD5DAEDF3FB1C2466.png" manifest:media-type="image/png"/>
  <manifest:file-entry manifest:full-path="Pictures/10007FDC00001C3E000002EAA11B16479CF41409.svg" manifest:media-type="image/svg+xml"/>
  <manifest:file-entry manifest:full-path="Pictures/10000001000002220000003820AB74E35C91A7C4.png" manifest:media-type="image/png"/>
  <manifest:file-entry manifest:full-path="Pictures/10004A1A0000145F0000017A0CF4DCEAE070F040.svg" manifest:media-type="image/svg+xml"/>
  <manifest:file-entry manifest:full-path="Pictures/100000010000018A0000001D694075CBEF42059A.png" manifest:media-type="image/png"/>
  <manifest:file-entry manifest:full-path="Pictures/10006C030000158E0000032737BEB43B54B9B990.svg" manifest:media-type="image/svg+xml"/>
  <manifest:file-entry manifest:full-path="Pictures/10000001000001A10000003D077A0F8126BD1609.png" manifest:media-type="image/png"/>
  <manifest:file-entry manifest:full-path="Pictures/10009AC400001952000003ED44C6A8BC0DC2EA8D.svg" manifest:media-type="image/svg+xml"/>
  <manifest:file-entry manifest:full-path="Pictures/10000001000001EA0000004CF7E70E4AC7FB1CCA.png" manifest:media-type="image/png"/>
  <manifest:file-entry manifest:full-path="Pictures/100048990000139500000194B12DDDCA4F71A73B.svg" manifest:media-type="image/svg+xml"/>
  <manifest:file-entry manifest:full-path="Pictures/100000010000017B0000001FEFDE6E0C4535D121.png" manifest:media-type="image/png"/>
  <manifest:file-entry manifest:full-path="Pictures/10004A51000014A300000194F9A28EAF4653EDAC.svg" manifest:media-type="image/svg+xml"/>
  <manifest:file-entry manifest:full-path="Pictures/10000001000002BB0000009DFC8E32EEA42F78A3.png" manifest:media-type="image/png"/>
  <manifest:file-entry manifest:full-path="Pictures/1000B26B000024780000017A2A5417A430C8D1E8.svg" manifest:media-type="image/svg+xml"/>
  <manifest:file-entry manifest:full-path="Pictures/1000000100000831000004A579B0CE54A1BE1BB1.png" manifest:media-type="image/png"/>
  <manifest:file-entry manifest:full-path="Pictures/10000001000008350000027B9F6F2326200229DC.png" manifest:media-type="image/png"/>
  <manifest:file-entry manifest:full-path="Pictures/10002E040000094E0000017AA421B3FCADEA379C.svg" manifest:media-type="image/svg+xml"/>
  <manifest:file-entry manifest:full-path="Pictures/1000461C00000F230000017A0F2D19933C097CB6.svg" manifest:media-type="image/svg+xml"/>
  <manifest:file-entry manifest:full-path="Pictures/10000001000001250000001D298C14615EE5CD44.png" manifest:media-type="image/png"/>
  <manifest:file-entry manifest:full-path="Pictures/10017AA600001BE7000010D1611FD8761B31DF21.svg" manifest:media-type="image/svg+xml"/>
  <manifest:file-entry manifest:full-path="Pictures/100000010000021C0000014569974C963E5628D9.png" manifest:media-type="image/png"/>
  <manifest:file-entry manifest:full-path="Pictures/10003E9400000D450000017618DD219B699B0EE2.svg" manifest:media-type="image/svg+xml"/>
  <manifest:file-entry manifest:full-path="Pictures/10007CA00000161D000003409C97119BCA70A1D8.svg" manifest:media-type="image/svg+xml"/>
  <manifest:file-entry manifest:full-path="Pictures/10000001000001AC0000003FA0E3F472B4990C76.png" manifest:media-type="image/png"/>
  <manifest:file-entry manifest:full-path="Pictures/100138DB00002B15000008828A41AD0ECA88929D.svg" manifest:media-type="image/svg+xml"/>
  <manifest:file-entry manifest:full-path="Pictures/1000000100000342000000A53E41F47EA9D42B95.png" manifest:media-type="image/png"/>
  <manifest:file-entry manifest:full-path="Pictures/1001A78A000030B3000009C2AFCACF0E83C8B536.svg" manifest:media-type="image/svg+xml"/>
  <manifest:file-entry manifest:full-path="Pictures/10000001000003AE000000BD5238F5FB03487C2B.png" manifest:media-type="image/png"/>
  <manifest:file-entry manifest:full-path="Pictures/1000E0F000002F92000001952785552BE982D74D.svg" manifest:media-type="image/svg+xml"/>
  <manifest:file-entry manifest:full-path="Pictures/10000001000003990000001F47BF107CBBCA3E5E.png" manifest:media-type="image/png"/>
  <manifest:file-entry manifest:full-path="Pictures/10014BCF00003193000004F7B3502ED36910DBDE.svg" manifest:media-type="image/svg+xml"/>
  <manifest:file-entry manifest:full-path="Pictures/10000001000003BF000000602EC01028D4D05C60.png" manifest:media-type="image/png"/>
  <manifest:file-entry manifest:full-path="Pictures/10000001000001A9000000CF18AA3E7D86607152.png" manifest:media-type="image/png"/>
  <manifest:file-entry manifest:full-path="Pictures/10000001000000A40000001F2C967E8BB8918568.png" manifest:media-type="image/png"/>
  <manifest:file-entry manifest:full-path="Pictures/100025D7000009AB0000017AC8E8B7151F8AA987.svg" manifest:media-type="image/svg+xml"/>
  <manifest:file-entry manifest:full-path="Pictures/10000001000000BB0000001DCE4DBE3E6EAE3335.png" manifest:media-type="image/png"/>
  <manifest:file-entry manifest:full-path="Pictures/1000426100000B09000003056230BD13B6590275.svg" manifest:media-type="image/svg+xml"/>
  <manifest:file-entry manifest:full-path="Pictures/10000001000000D60000003A541529D64E580B8B.png" manifest:media-type="image/png"/>
  <manifest:file-entry manifest:full-path="Pictures/100051B700000DDD0000035A50F5DB3C7B683C6E.svg" manifest:media-type="image/svg+xml"/>
  <manifest:file-entry manifest:full-path="Pictures/100000010000010C00000041B790A83856519177.png" manifest:media-type="image/png"/>
  <manifest:file-entry manifest:full-path="Pictures/1000710D00001458000002F14CD9BD7B89E29585.svg" manifest:media-type="image/svg+xml"/>
  <manifest:file-entry manifest:full-path="Pictures/100000010000018A000000397D8B16DFDC4A3BD5.png" manifest:media-type="image/png"/>
  <manifest:file-entry manifest:full-path="Pictures/10009DEF00001B0A0000035A70EE60369841B6E3.svg" manifest:media-type="image/svg+xml"/>
  <manifest:file-entry manifest:full-path="Pictures/100000010000020B0000004111486F160BF3FEFF.png" manifest:media-type="image/png"/>
  <manifest:file-entry manifest:full-path="Pictures/10013492000014AA00000A9E499832A90CD5D1C6.svg" manifest:media-type="image/svg+xml"/>
  <manifest:file-entry manifest:full-path="Pictures/1000000100000190000000CD98FC52903ECB07BA.png" manifest:media-type="image/png"/>
  <manifest:file-entry manifest:full-path="Pictures/10000001000000B40000001D6571D5E2AED322E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adornments="標準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dash" draw:stroke-dash="Long_20_Dot" svg:stroke-width="0.05cm" svg:stroke-color="#ffffff" draw:marker-start-width="0.28cm" draw:marker-end-width="0.28cm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529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47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9" style:family="graphic" style:parent-style-name="無填入也無線條的物件">
      <style:graphic-properties draw:stroke="solid" svg:stroke-width="0.08cm" svg:stroke-color="#b2b2b2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35cm" draw:marker-start="Concave_20_short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Concave_20_short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7091" draw:textarea-horizontal-align="center" draw:textarea-vertical-align="middle"/>
    </style:style>
    <style:style style:name="gr17" style:family="graphic" style:parent-style-name="standard">
      <style:graphic-properties svg:stroke-width="0.05cm" svg:stroke-color="#ffffff" draw:marker-start-width="0.28cm" draw:marker-end-width="0.28cm" draw:fill="solid" draw:fill-color="#729fc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8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.45cm" fo:min-width="0cm"/>
    </style:style>
    <style:style style:name="gr19" style:family="graphic" style:parent-style-name="standard">
      <style:graphic-properties svg:stroke-width="0.05cm" svg:stroke-color="#eeeeee" draw:marker-start-width="0.28cm" draw:marker-end-width="0.28cm" draw:fill="solid" draw:fill-color="#b3cac7" draw:textarea-horizontal-align="justify" draw:textarea-vertical-align="middle" draw:auto-grow-height="false" fo:min-height="0.439cm" fo:min-width="10.051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1.1cm" fo:min-width="0.25cm" fo:padding-top="0.15cm" fo:padding-bottom="0.15cm" fo:padding-left="0.275cm" fo:padding-right="0.275cm"/>
    </style:style>
    <style:style style:name="gr22" style:family="graphic" style:parent-style-name="standard">
      <style:graphic-properties svg:stroke-color="#ffffff" draw:fill="solid" draw:fill-color="#cccccc" draw:textarea-horizontal-align="justify" draw:textarea-vertical-align="middle" draw:auto-grow-height="false" fo:min-height="0.351cm" fo:min-width="1.501cm" fo:wrap-option="no-wrap"/>
    </style:style>
    <style:style style:name="gr23" style:family="graphic" style:parent-style-name="standard">
      <style:graphic-properties draw:stroke="none" draw:stroke-dash="Dot" svg:stroke-width="0.05cm" svg:stroke-color="#cccccc" draw:marker-start-width="0.28cm" draw:marker-end-width="0.28cm" draw:fill="none" draw:fill-color="#ffffff" draw:auto-grow-height="true" draw:auto-grow-width="false" fo:max-height="0cm" fo:min-height="2.499cm" fo:padding-top="0.15cm" fo:padding-bottom="0.15cm" fo:padding-left="0.275cm" fo:padding-right="0.275cm"/>
      <style:paragraph-properties style:writing-mode="lr-tb"/>
    </style:style>
    <style:style style:name="gr24" style:family="graphic" style:parent-style-name="無填入也無線條的物件">
      <style:graphic-properties draw:stroke="none" draw:stroke-dash="Dot" svg:stroke-width="0.05cm" svg:stroke-color="#ccccc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26" style:family="graphic" style:parent-style-name="standard">
      <style:graphic-properties draw:stroke="solid" draw:stroke-dash="Dot" svg:stroke-width="0.1cm" svg:stroke-color="#5983b0" draw:marker-start-width="0.35cm" draw:marker-end-width="0.35cm" draw:fill="solid" draw:fill-color="#5983b0" draw:auto-grow-height="true" draw:auto-grow-width="false" fo:max-height="0cm" fo:min-height="1.407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15cm" fo:min-width="8.1cm" fo:padding-top="0.175cm" fo:padding-bottom="0.175cm" fo:padding-left="0.3cm" fo:padding-right="0.3cm"/>
    </style:style>
    <style:style style:name="gr28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1.45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0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0.051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draw:textarea-vertical-align="middle" fo:min-height="1.255cm"/>
      <style:paragraph-properties style:writing-mode="lr-tb"/>
    </style:style>
    <style:style style:name="gr35" style:family="graphic" style:parent-style-name="standard">
      <style:graphic-properties svg:stroke-width="0.1cm" svg:stroke-color="#ff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0.6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5cm" svg:stroke-color="#ff8000" draw:marker-start-width="0.28cm" draw:marker-end-width="0.28cm" draw:fill="none" draw:textarea-horizontal-align="justify" draw:textarea-vertical-align="middle" draw:auto-grow-height="false" fo:min-height="2.154cm" fo:min-width="5.3cm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Long_20_Dash" svg:stroke-width="0.05cm" svg:stroke-color="#ff8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40" style:family="graphic" style:parent-style-name="無填入也無線條的物件">
      <style:graphic-properties draw:stroke="solid" svg:stroke-width="0.02cm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42" style:family="graphic" style:parent-style-name="standard">
      <style:graphic-properties draw:stroke="dash" draw:stroke-dash="Long_20_Dash" svg:stroke-width="0.05cm" draw:marker-start-width="0.28cm" draw:marker-end-width="0.28cm" draw:fill="none" draw:textarea-horizontal-align="justify" draw:textarea-vertical-align="middle" draw:auto-grow-height="false" fo:min-height="5.55cm" fo:min-width="10.9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r8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3" style:family="paragraph">
      <loext:graphic-properties draw:fill-color="#ffffff"/>
      <style:paragraph-properties style:writing-mode="lr-tb"/>
      <style:text-properties style:font-size-asian="24pt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 style:font-name="Liberation Serif1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style:font-name="Liberation Serif1"/>
    </style:style>
    <style:style style:name="P16" style:family="paragraph">
      <style:paragraph-properties fo:margin-left="0cm" fo:margin-right="0cm" fo:margin-top="0cm" fo:margin-bottom="0.405cm" fo:text-indent="0cm"/>
    </style:style>
    <style:style style:name="P17" style:family="paragraph">
      <loext:graphic-properties draw:fill="solid" draw:fill-color="#007091"/>
      <style:paragraph-properties fo:text-align="center"/>
    </style:style>
    <style:style style:name="P18" style:family="paragraph">
      <loext:graphic-properties draw:fill="solid" draw:fill-color="#729fcf"/>
      <style:paragraph-properties fo:text-align="center"/>
    </style:style>
    <style:style style:name="P19" style:family="paragraph">
      <loext:graphic-properties draw:fill="solid" draw:fill-color="#b3cac7"/>
      <style:paragraph-properties fo:text-align="center"/>
    </style:style>
    <style:style style:name="P20" style:family="paragraph">
      <loext:graphic-properties draw:fill="solid" draw:fill-color="#b4c7dc"/>
      <style:paragraph-properties fo:text-align="center"/>
    </style:style>
    <style:style style:name="P21" style:family="paragraph">
      <loext:graphic-properties draw:fill="solid" draw:fill-color="#cccccc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8000" loext:opacity="100%" style:font-name="Liberation Serif1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color="#999999" loext:opacity="100%" style:font-name="Liberation Serif1"/>
    </style:style>
    <style:style style:name="P25" style:family="paragraph">
      <style:paragraph-properties fo:margin-left="0cm" fo:margin-right="0cm" fo:margin-top="0cm" fo:margin-bottom="0.324cm" fo:text-indent="0cm"/>
    </style:style>
    <style:style style:name="P26" style:family="paragraph">
      <loext:graphic-properties draw:fill="solid" draw:fill-color="#5983b0"/>
      <style:paragraph-properties style:writing-mode="lr-tb"/>
      <style:text-properties fo:color="#ffffff" loext:opacity="100%" style:font-name="Liberation Serif" fo:font-size="18pt" style:font-size-asian="24pt" style:font-size-complex="24pt"/>
    </style:style>
    <style:style style:name="P27" style:family="paragraph">
      <style:paragraph-properties style:writing-mode="lr-tb"/>
      <style:text-properties style:font-name="Liberation Serif1" fo:font-size="24pt" style:font-size-asian="24pt" style:font-size-complex="24pt"/>
    </style:style>
    <style:style style:name="P28" style:family="paragraph">
      <loext:graphic-properties draw:fill="none" draw:fill-color="#ffffff"/>
      <style:paragraph-properties style:writing-mode="lr-tb"/>
      <style:text-properties fo:color="#999999" loext:opacity="100%" style:font-name="Liberation Serif1" fo:font-size="18pt" style:font-size-asian="24pt" style:font-size-complex="24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solid" draw:fill-color="#0000ff"/>
      <style:paragraph-properties fo:text-align="center"/>
    </style:style>
    <style:style style:name="P31" style:family="paragraph">
      <style:paragraph-properties style:writing-mode="lr-tb"/>
      <style:text-properties fo:font-style="normal" style:font-style-asian="normal" style:font-style-complex="normal"/>
    </style:style>
    <style:style style:name="P32" style:family="paragraph">
      <loext:graphic-properties draw:fill="none"/>
      <style:paragraph-properties fo:text-align="center" style:writing-mode="lr-tb"/>
      <style:text-properties fo:font-size="16pt"/>
    </style:style>
    <style:style style:name="P33" style:family="paragraph">
      <loext:graphic-properties draw:fill="none"/>
      <style:paragraph-properties style:writing-mode="lr-tb"/>
      <style:text-properties fo:color="#ff8000" loext:opacity="100%" fo:font-size="16pt"/>
    </style:style>
    <style:style style:name="P34" style:family="paragraph">
      <style:paragraph-properties style:writing-mode="lr-tb"/>
      <style:text-properties fo:font-size="36pt" style:font-size-asian="26pt" style:font-size-complex="26pt"/>
    </style:style>
    <style:style style:name="P35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font-name="Liberation Serif2" style:font-name-asian="Liberation Serif2" style:font-name-complex="Liberation Serif2"/>
    </style:style>
    <style:style style:name="T4" style:family="text">
      <style:text-properties style:font-name="Liberation Serif1" style:font-name-asian="Liberation Serif2" style:font-name-complex="Liberation Serif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2" fo:font-style="italic" style:font-name-asian="Liberation Serif2" style:font-style-asian="italic" style:font-name-complex="Liberation Serif2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2pt" style:font-size-complex="22pt"/>
    </style:style>
    <style:style style:name="T14" style:family="text">
      <style:text-properties fo:font-size="24pt" fo:font-style="italic" style:text-underline-style="none" style:font-size-asian="22pt" style:font-style-asian="italic" style:font-size-complex="22pt" style:font-style-complex="italic"/>
    </style:style>
    <style:style style:name="T15" style:family="text">
      <style:text-properties fo:font-size="24pt" fo:font-style="italic" style:font-size-asian="22pt" style:font-style-asian="italic" style:font-size-complex="22pt" style:font-style-complex="italic"/>
    </style:style>
    <style:style style:name="T16" style:family="text">
      <style:text-properties fo:color="#2a6099" loext:opacity="100%" fo:font-size="24pt" style:font-size-asian="22pt" style:font-size-complex="22pt"/>
    </style:style>
    <style:style style:name="T17" style:family="text">
      <style:text-properties fo:font-size="24pt" fo:font-style="normal" style:font-size-asian="22pt" style:font-style-asian="normal" style:font-size-complex="22pt" style:font-style-complex="normal"/>
    </style:style>
    <style:style style:name="T18" style:family="text">
      <style:text-properties style:font-name="Liberation Serif1" fo:font-size="22pt" style:font-size-asian="28pt" style:font-size-complex="28pt"/>
    </style:style>
    <style:style style:name="T19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-15% 75%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name-complex="Liberation Serif2" style:font-size-complex="22pt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2" style:font-size-asian="22pt" style:font-name-complex="Liberation Serif2" style:font-size-complex="22pt" style:text-emphasize="none" style:font-relief="none" style:text-overline-style="none" style:text-overline-color="font-color"/>
    </style:style>
    <style:style style:name="T25" style:family="text">
      <style:text-properties style:font-name="Liberation Serif1" fo:font-size="24pt" fo:font-style="italic" style:font-name-asian="Liberation Serif2" style:font-size-asian="22pt" style:font-style-asian="italic" style:font-name-complex="Liberation Serif2" style:font-size-complex="22pt" style:font-style-complex="italic"/>
    </style:style>
    <style:style style:name="T26" style:family="text">
      <style:text-properties style:text-position="-15% 75%" style:font-name="Liberation Serif1" fo:font-size="24pt" fo:font-style="italic" style:font-name-asian="Liberation Serif2" style:font-size-asian="22pt" style:font-style-asian="italic" style:font-name-complex="Liberation Serif2" style:font-size-complex="22pt" style:font-style-complex="italic"/>
    </style:style>
    <style:style style:name="T27" style:family="text">
      <style:text-properties style:font-name="Liberation Serif1" fo:font-size="24pt" style:font-name-asian="Liberation Serif2" style:font-size-asian="22pt" style:font-name-complex="Liberation Serif2" style:font-size-complex="22pt"/>
    </style:style>
    <style:style style:name="T28" style:family="text">
      <style:text-properties style:font-name="Liberation Serif2" fo:font-size="24pt" style:font-name-asian="Liberation Serif2" style:font-size-asian="22pt" style:font-name-complex="Liberation Serif2" style:font-size-complex="22pt"/>
    </style:style>
    <style:style style:name="T29" style:family="text">
      <style:text-properties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style:font-name="Liberation Serif2" fo:font-size="24pt" fo:font-style="italic" style:font-name-asian="Liberation Serif2" style:font-size-asian="22pt" style:font-style-asian="italic" style:font-name-complex="Liberation Serif2" style:font-size-complex="22pt" style:font-style-complex="italic"/>
    </style:style>
    <style:style style:name="T31" style:family="text">
      <style:text-properties fo:color="#666666" loext:opacity="100%" style:font-name="Liberation Serif1" fo:font-size="15pt" style:font-size-asian="20pt" style:font-size-complex="20pt"/>
    </style:style>
    <style:style style:name="T32" style:family="text">
      <style:text-properties fo:color="#808080" loext:opacity="100%" style:font-name="Liberation Serif1" fo:font-size="20pt" style:font-size-asian="26pt" style:font-size-complex="26pt"/>
    </style:style>
    <style:style style:name="T33" style:family="text">
      <style:text-properties fo:font-size="36pt" style:font-size-asian="24pt" style:font-size-complex="24pt"/>
    </style:style>
    <style:style style:name="T34" style:family="text">
      <style:text-properties fo:color="#ffff00" loext:opacity="100%" fo:font-size="36pt" style:font-size-asian="24pt" style:font-size-complex="24pt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solid" style:text-underline-width="auto" style:text-underline-color="font-color" fo:font-weight="bold" style:letter-kerning="true" style:font-name-asian="Liberation Serif1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name-complex="Liberation Serif2" style:font-size-complex="22pt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4pt" fo:font-style="italic" fo:text-shadow="none" style:text-underline-style="none" fo:font-weight="normal" style:letter-kerning="true" style:font-name-asian="Liberation Serif2" style:font-size-asian="22pt" style:font-style-asian="italic" style:font-name-complex="Liberation Serif2" style:font-size-complex="22pt" style:font-style-complex="italic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fo:font-weight="normal" style:letter-kerning="true" style:font-name-asian="Liberation Serif2" style:font-size-asian="22pt" style:font-style-asian="italic" style:font-name-complex="Liberation Serif2" style:font-size-complex="22pt" style:font-style-complex="italic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name-complex="Liberation Serif2" style:font-size-complex="22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bold" style:letter-kerning="true" style:font-name-asian="Liberation Serif2" style:font-size-asian="22pt" style:font-style-asian="normal" style:font-weight-asian="bold" style:font-name-complex="Liberation Serif2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bold" style:letter-kerning="true" style:font-name-asian="Liberation Serif1" style:font-size-asian="22pt" style:font-style-asian="italic" style:font-weight-asian="bold" style:font-name-complex="Liberation Serif2" style:font-size-complex="22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4pt" fo:font-style="normal" fo:text-shadow="none" style:text-underline-style="none" fo:font-weight="bold" style:letter-kerning="true" style:font-name-asian="Liberation Serif2" style:font-size-asian="22pt" style:font-style-asian="normal" style:font-weight-asian="bold" style:font-name-complex="Liberation Serif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2" style:font-size-complex="2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4pt" fo:font-style="italic" fo:text-shadow="none" style:text-underline-style="none" fo:font-weight="bold" style:letter-kerning="true" style:font-name-asian="Liberation Serif2" style:font-size-asian="22pt" style:font-style-asian="italic" style:font-weight-asian="bold" style:font-name-complex="Liberation Serif2" style:font-size-complex="22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Liberation Serif2" fo:font-size="24pt" fo:font-style="normal" fo:font-weight="bold" style:font-name-asian="Liberation Serif2" style:font-size-asian="22pt" style:font-style-asian="normal" style:font-weight-asian="bold" style:font-name-complex="Liberation Serif2" style:font-size-complex="22pt" style:font-style-complex="normal" style:font-weight-complex="bold"/>
    </style:style>
    <style:style style:name="T48" style:family="text">
      <style:text-properties style:font-name="Liberation Serif2" fo:font-size="24pt" fo:font-style="normal" style:font-name-asian="Liberation Serif2" style:font-size-asian="22pt" style:font-style-asian="normal" style:font-name-complex="Liberation Serif2" style:font-size-complex="22pt" style:font-style-complex="normal"/>
    </style:style>
    <style:style style:name="T49" style:family="text">
      <style:text-properties fo:font-size="22pt" style:font-size-asian="20pt" style:font-size-complex="20pt"/>
    </style:style>
    <style:style style:name="T50" style:family="text">
      <style:text-properties fo:font-size="22pt" fo:font-style="italic" style:font-size-asian="20pt" style:font-style-asian="italic" style:font-size-complex="20pt" style:font-style-complex="italic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6pt" style:font-size-complex="16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2" fo:font-size="20pt" fo:font-style="italic" fo:text-shadow="none" style:text-underline-style="none" fo:font-weight="normal" style:letter-kerning="true" style:font-name-asian="Liberation Serif2" style:font-size-asian="18pt" style:font-style-asian="italic" style:font-name-complex="Liberation Serif2" style:font-size-complex="18pt" style:font-style-complex="italic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0pt" fo:font-style="italic" fo:text-shadow="none" style:text-underline-style="none" fo:font-weight="normal" style:letter-kerning="true" style:font-name-asian="Liberation Serif2" style:font-size-asian="18pt" style:font-style-asian="italic" style:font-name-complex="Liberation Serif2" style:font-size-complex="18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6pt" fo:font-style="normal" fo:text-shadow="none" style:text-underline-style="none" fo:font-weight="normal" style:letter-kerning="true" style:font-name-asian="Liberation Serif2" style:font-size-asian="24pt" style:font-style-asian="normal" style:font-name-complex="Liberation Serif2" style:font-size-complex="24pt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text-position="-16% 75%" style:font-name="Liberation Serif2" fo:font-size="22pt" fo:font-style="normal" fo:text-shadow="none" style:text-underline-style="none" fo:font-weight="normal" style:letter-kerning="true" style:font-name-asian="Liberation Serif2" style:font-size-asian="20pt" style:font-style-asian="normal" style:font-name-complex="Liberation Serif2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ff8000" loext:opacity="100%" style:font-name="Liberation Serif1"/>
    </style:style>
    <style:style style:name="T57" style:family="text">
      <style:text-properties fo:color="#ff8000" loext:opacity="100%" style:font-name="Liberation Serif1" fo:font-size="10pt" style:font-size-asian="10pt" style:font-size-complex="10pt"/>
    </style:style>
    <style:style style:name="T58" style:family="text">
      <style:text-properties fo:font-size="20pt" style:font-size-asian="18pt" style:font-size-complex="18pt"/>
    </style:style>
    <style:style style:name="T59" style:family="text">
      <style:text-properties fo:color="#5983b0" loext:opacity="10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0" style:family="text">
      <style:text-properties fo:color="#5983b0" loext:opacity="100%" style:text-outline="false" style:text-line-through-style="none" style:text-line-through-type="none" style:font-name="Liberation Serif1" fo:font-size="24pt" fo:font-style="italic" fo:text-shadow="none" style:text-underline-style="none" fo:font-weight="bold" style:letter-kerning="true" style:font-name-asian="Liberation Serif1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999999" loext:opacity="100%" style:font-name="Liberation Serif1" fo:font-size="16pt" style:font-size-asian="22pt" style:font-size-complex="22pt"/>
    </style:style>
    <style:style style:name="T62" style:family="text">
      <style:text-properties fo:color="#999999" loext:opacity="100%" style:font-name="Liberation Serif1" fo:font-size="16pt" style:font-name-asian="Liberation Serif2" style:font-size-asian="22pt" style:font-name-complex="Liberation Serif2" style:font-size-complex="22pt"/>
    </style:style>
    <style:style style:name="T63" style:family="text">
      <style:text-properties style:use-window-font-color="true" loext:opacity="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erif1" style:font-size-asian="18pt" style:font-size-complex="18pt" style:text-emphasize="none" style:font-relief="none" style:text-overline-style="none" style:text-overline-color="font-color"/>
    </style:style>
    <style:style style:name="T64" style:family="text">
      <style:text-properties fo:color="#ff4000" loext:opacity="100%" style:text-outline="false" style:text-line-through-style="none" style:text-line-through-type="none" style:font-name="Liberation Serif1" fo:font-size="20pt" fo:font-style="normal" fo:text-shadow="none" style:text-underline-style="none" fo:font-weight="bold" style:letter-kerning="true" style:font-name-asian="Liberation Serif1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0pt" fo:font-style="italic" style:font-size-asian="18pt" style:font-style-asian="italic" style:font-size-complex="18pt" style:font-style-complex="italic"/>
    </style:style>
    <style:style style:name="T66" style:family="text">
      <style:text-properties style:font-name="Liberation Serif2" fo:font-size="20pt" style:font-name-asian="Liberation Serif2" style:font-size-asian="18pt" style:font-name-complex="Liberation Serif2" style:font-size-complex="18pt"/>
    </style:style>
    <style:style style:name="T67" style:family="text">
      <style:text-properties style:font-name="Liberation Serif1" fo:font-size="20pt" style:font-name-asian="Liberation Serif2" style:font-size-asian="18pt" style:font-name-complex="Liberation Serif2" style:font-size-complex="18pt"/>
    </style:style>
    <style:style style:name="T68" style:family="text">
      <style:text-properties style:font-name="Liberation Serif2" fo:font-size="20pt" fo:font-style="italic" style:font-name-asian="Liberation Serif2" style:font-size-asian="18pt" style:font-style-asian="italic" style:font-name-complex="Liberation Serif2" style:font-size-complex="18pt" style:font-style-complex="italic"/>
    </style:style>
    <style:style style:name="T69" style:family="text">
      <style:text-properties fo:font-size="20pt" fo:font-style="normal" style:font-size-asian="18pt" style:font-style-asian="normal" style:font-size-complex="18pt" style:font-style-complex="normal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text-position="-8% 58%" style:font-name="Liberation Serif1" fo:font-size="20pt" fo:font-style="normal" fo:text-shadow="none" style:text-underline-style="none" fo:font-weight="normal" style:letter-kerning="true" style:font-name-asian="Liberation Serif1" style:font-size-asian="18pt" style:font-size-complex="18pt" style:text-emphasize="none" style:font-relief="none" style:text-overline-style="none" style:text-overline-color="font-color"/>
    </style:style>
    <style:style style:name="T72" style:family="text">
      <style:text-properties style:text-position="-8% 58%" fo:font-size="20pt" style:font-size-asian="18pt" style:font-size-complex="18pt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color="#ffffff" loext:opacity="100%" style:font-name="Liberation Serif" fo:font-size="18pt" style:font-size-asian="24pt" style:font-size-complex="24pt"/>
    </style:style>
    <style:style style:name="T75" style:family="text">
      <style:text-properties fo:color="#ffffff" loext:opacity="100%" style:font-name="Liberation Serif" fo:font-size="18pt" fo:font-weight="bold" style:font-size-asian="24pt" style:font-weight-asian="bold" style:font-size-complex="24pt" style:font-weight-complex="bold"/>
    </style:style>
    <style:style style:name="T76" style:family="text">
      <style:text-properties fo:font-size="32pt" style:font-size-asian="22pt" style:font-size-complex="22pt"/>
    </style:style>
    <style:style style:name="T77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solid" style:text-underline-width="auto" style:text-underline-color="font-color" fo:font-weight="bold" style:letter-kerning="true" style:font-name-asian="Liberation Serif1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Serif1" fo:font-size="24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2" style:font-size-asian="24pt" style:font-name-complex="Liberation Serif2" style:font-size-complex="24pt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2" style:font-size-asian="24pt" style:font-style-asian="italic" style:font-name-complex="Liberation Serif2" style:font-size-complex="24pt" style:font-style-complex="italic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2" style:font-size-asian="24pt" style:font-style-asian="normal" style:font-name-complex="Liberation Serif2" style:font-size-complex="24pt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Liberation Serif2" fo:font-size="24pt" fo:font-style="normal" style:font-name-asian="Liberation Serif2" style:font-size-asian="24pt" style:font-style-asian="normal" style:font-name-complex="Liberation Serif2" style:font-size-complex="24pt" style:font-style-complex="normal"/>
    </style:style>
    <style:style style:name="T86" style:family="text">
      <style:text-properties style:font-name="Liberation Serif1" fo:font-size="24pt" fo:font-style="normal" style:font-name-asian="Liberation Serif2" style:font-size-asian="24pt" style:font-style-asian="normal" style:font-name-complex="Liberation Serif2" style:font-size-complex="24pt" style:font-style-complex="normal"/>
    </style:style>
    <style:style style:name="T87" style:family="text">
      <style:text-properties style:font-name="Liberation Serif1" fo:font-size="24pt" fo:font-style="italic" style:font-name-asian="Liberation Serif2" style:font-size-asian="24pt" style:font-style-asian="italic" style:font-name-complex="Liberation Serif2" style:font-size-complex="24pt" style:font-style-complex="italic"/>
    </style:style>
    <style:style style:name="T88" style:family="text">
      <style:text-properties fo:color="#999999" loext:opacity="100%" style:font-name="Liberation Serif1" fo:font-size="18pt" style:font-size-asian="24pt" style:font-size-complex="24pt"/>
    </style:style>
    <style:style style:name="T89" style:family="text">
      <style:text-properties fo:color="#999999" loext:opacity="100%" style:font-name="Liberation Serif1" fo:font-size="18pt" fo:font-style="italic" style:font-size-asian="24pt" style:font-style-asian="italic" style:font-size-complex="24pt" style:font-style-complex="italic"/>
    </style:style>
    <style:style style:name="T90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solid" style:text-underline-width="auto" style:text-underline-color="font-color" fo:font-weight="bold" style:letter-kerning="true" style:font-name-asian="Liberation Serif1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style:text-outline="false" style:text-line-through-style="none" style:text-line-through-type="none" style:font-name="Liberation Serif1" fo:font-size="22pt" fo:font-style="italic" fo:text-shadow="none" style:text-underline-style="none" fo:font-weight="normal" style:letter-kerning="true" style:font-name-asian="Liberation Serif1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normal" style:letter-kerning="true" style:font-name-asian="Liberation Serif2" style:font-size-asian="20pt" style:font-name-complex="Liberation Serif2" style:font-size-complex="20pt" style:text-emphasize="none" style:font-relief="none" style:text-overline-style="none" style:text-overline-color="font-color"/>
    </style:style>
    <style:style style:name="T94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2" style:font-size-asian="20pt" style:font-name-complex="Liberation Serif2" style:font-size-complex="20pt" style:text-emphasize="none" style:font-relief="none" style:text-overline-style="none" style:text-overline-color="font-color"/>
    </style:style>
    <style:style style:name="T95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bold" style:letter-kerning="true" style:font-name-asian="Liberation Serif1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6" style:family="text">
      <style:text-properties fo:font-size="22pt" fo:font-style="normal" style:font-size-asian="20pt" style:font-style-asian="normal" style:font-size-complex="20pt" style:font-style-complex="normal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-8% 58%" style:font-name="Liberation Serif1" fo:font-size="22pt" fo:font-style="normal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98" style:family="text">
      <style:text-properties style:text-position="-8% 58%" fo:font-size="22pt" style:font-size-asian="20pt" style:font-size-complex="20pt"/>
    </style:style>
    <style:style style:name="T99" style:family="text">
      <style:text-properties style:font-name="Liberation Serif2" fo:font-size="22pt" style:font-name-asian="Liberation Serif2" style:font-size-asian="20pt" style:font-name-complex="Liberation Serif2" style:font-size-complex="20pt"/>
    </style:style>
    <style:style style:name="T100" style:family="text">
      <style:text-properties style:font-name="Liberation Serif1" fo:font-size="22pt" style:font-name-asian="Liberation Serif2" style:font-size-asian="20pt" style:font-name-complex="Liberation Serif2" style:font-size-complex="20pt"/>
    </style:style>
    <style:style style:name="T101" style:family="text">
      <style:text-properties style:font-name="Liberation Serif1" fo:font-size="22pt" fo:font-style="italic" style:font-name-asian="Liberation Serif2" style:font-size-asian="20pt" style:font-style-asian="italic" style:font-name-complex="Liberation Serif2" style:font-size-complex="20pt" style:font-style-complex="italic"/>
    </style:style>
    <style:style style:name="T102" style:family="text">
      <style:text-properties style:font-name="Liberation Serif2" fo:font-size="22pt" fo:font-style="italic" style:font-name-asian="Liberation Serif2" style:font-size-asian="20pt" style:font-style-asian="italic" style:font-name-complex="Liberation Serif2" style:font-size-complex="20pt" style:font-style-complex="italic"/>
    </style:style>
    <style:style style:name="T103" style:family="text">
      <style:text-properties style:use-window-font-color="true" loext:opacity="0%" style:text-outline="false" style:text-line-through-style="none" style:text-line-through-type="none" style:font-name="Liberation Serif2" fo:font-size="22pt" fo:font-style="italic" fo:text-shadow="none" style:text-underline-style="none" fo:font-weight="normal" style:letter-kerning="true" style:font-name-asian="Liberation Serif2" style:font-size-asian="20pt" style:font-style-asian="italic" style:font-name-complex="Liberation Serif2" style:font-size-complex="20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ff0000" loext:opacity="100%" style:font-name="Liberation Serif1" fo:font-size="22pt" fo:font-style="italic" fo:font-weight="bold" fo:background-color="transparent" style:font-name-asian="Liberation Serif2" style:font-size-asian="20pt" style:font-style-asian="italic" style:font-weight-asian="bold" style:font-name-complex="Liberation Serif2" style:font-size-complex="20pt" style:font-style-complex="italic" style:font-weight-complex="bold"/>
    </style:style>
    <style:style style:name="T105" style:family="text">
      <style:text-properties fo:color="#ff0000" loext:opacity="100%" style:font-name="Liberation Serif2" fo:font-size="22pt" fo:font-style="italic" fo:font-weight="bold" style:font-name-asian="Liberation Serif2" style:font-size-asian="20pt" style:font-style-asian="italic" style:font-weight-asian="bold" style:font-name-complex="Liberation Serif2" style:font-size-complex="20pt" style:font-style-complex="italic" style:font-weight-complex="bold"/>
    </style:style>
    <style:style style:name="T106" style:family="text">
      <style:text-properties fo:font-size="24pt" style:font-size-asian="32pt" style:font-size-complex="32pt"/>
    </style:style>
    <style:style style:name="T107" style:family="text">
      <style:text-properties style:text-position="-15% 75%" fo:font-size="22pt" fo:font-style="italic" style:font-size-asian="20pt" style:font-style-asian="italic" style:font-size-complex="20pt" style:font-style-complex="italic"/>
    </style:style>
    <style:style style:name="T108" style:family="text">
      <style:text-properties fo:color="#5983b0" loext:opacity="100%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9" style:family="text">
      <style:text-properties style:use-window-font-color="true" loext:opacity="0%" style:text-outline="false" style:text-line-through-style="none" style:text-line-through-type="none" style:font-name="Liberation Serif1" fo:font-size="16pt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110" style:family="text">
      <style:text-properties style:use-window-font-color="true" loext:opacity="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ff8000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2" style:family="text">
      <style:text-properties fo:color="#ff8000" loext:opacity="100%" style:text-outline="false" style:text-line-through-style="none" style:text-line-through-type="none" style:text-position="-15% 75%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3" style:family="text">
      <style:text-properties fo:color="#ff8000" loext:opacity="100%" style:text-outline="false" style:text-line-through-style="none" style:text-line-through-type="none" style:font-name="Liberation Serif1" fo:font-size="16pt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114" style:family="text">
      <style:text-properties style:font-name="Liberation Serif1"/>
    </style:style>
    <style:style style:name="T115" style:family="text">
      <style:text-properties style:text-position="-15% 75%" fo:font-size="24pt" style:font-size-asian="22pt" style:font-size-complex="22pt"/>
    </style:style>
    <style:style style:name="T116" style:family="text">
      <style:text-properties style:text-position="-15% 75%" fo:font-size="24pt" fo:font-style="italic" style:font-size-asian="22pt" style:font-style-asian="italic" style:font-size-complex="22pt" style:font-style-complex="italic"/>
    </style:style>
    <style:style style:name="T117" style:family="text">
      <style:text-properties fo:font-size="24pt" style:font-size-asian="16pt" style:font-size-complex="16pt"/>
    </style:style>
    <style:style style:name="T118" style:family="text">
      <style:text-properties fo:font-size="24pt" fo:font-style="italic" style:font-size-asian="16pt" style:font-style-asian="italic" style:font-size-complex="16pt" style:font-style-complex="italic"/>
    </style:style>
    <style:style style:name="T119" style:family="text">
      <style:text-properties style:text-position="-15% 75%" fo:font-size="24pt" fo:font-style="italic" style:font-size-asian="16pt" style:font-style-asian="italic" style:font-size-complex="16pt" style:font-style-complex="italic"/>
    </style:style>
    <style:style style:name="T120" style:family="text">
      <style:text-properties style:text-position="-15% 75%"/>
    </style:style>
    <style:style style:name="T121" style:family="text">
      <style:text-properties fo:color="#3465a4" loext:opacity="100%" fo:font-size="22pt" style:font-size-asian="20pt" style:font-size-complex="20pt"/>
    </style:style>
    <style:style style:name="T122" style:family="text">
      <style:text-properties style:text-position="-15% 75%" fo:font-style="italic" style:font-style-asian="italic" style:font-style-complex="italic"/>
    </style:style>
    <style:style style:name="T123" style:family="text">
      <style:text-properties style:use-window-font-color="true" loext:opacity="0%" style:text-outline="false" style:text-line-through-style="none" style:text-line-through-type="none" style:font-name="Liberation Serif1" fo:font-size="22pt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124" style:family="text">
      <style:text-properties style:use-window-font-color="true" loext:opacity="0%" style:text-outline="false" style:text-line-through-style="none" style:text-line-through-type="none" style:text-position="-15% 75%" style:font-name="Liberation Serif1" fo:font-size="22pt" fo:font-style="normal" fo:text-shadow="none" style:text-underline-style="none" fo:font-weight="normal" style:letter-kerning="true" style:font-name-asian="Liberation Serif1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5" style:family="text">
      <style:text-properties style:text-position="-15% 75%" fo:font-size="22pt" style:font-size-asian="20pt" style:font-size-complex="20pt"/>
    </style:style>
    <style:style style:name="T1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9cm" svg:y="4.199cm" presentation:class="subtitle" presentation:user-transformed="true">
          <draw:text-box>
            <text:p/>
            <text:p>Continuous Distributions and the Poisson Process</text:p>
            <text:p/>
            <text:p/>
            <text:p><text:span text:style-name="T1"/></text:p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Continuous Random Variables</text:p>
              </text:list-item>
              <text:list-item>
                <text:p>The Uniform Distribution</text:p>
              </text:list-item>
              <text:list-item>
                <text:p>The Exponential Distribution</text:p>
              </text:list-item>
              <text:list-item>
                <text:p>The Poisson Pro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call: Probability function</text:p>
          </draw:text-box>
        </draw:frame>
        <draw:frame presentation:style-name="pr5" draw:text-style-name="P1" draw:layer="layout" svg:width="25.2cm" svg:height="9.134cm" svg:x="0.579cm" svg:y="3.8cm" presentation:class="outline" presentation:user-transformed="true">
          <draw:text-box>
            <text:list text:style-name="L3">
              <text:list-item>
                <text:p>Pr(<text:span text:style-name="T3">Ω</text:span><text:span text:style-name="T4">) = 1</text:span> </text:p>
              </text:list-item>
              <text:list-item>
                <text:p>For any event <text:span text:style-name="T5">E</text:span>, 0 <text:span text:style-name="T3">≤ Pr(</text:span><text:span text:style-name="T6">E</text:span><text:span text:style-name="T3">) ≤</text:span> 1.</text:p>
              </text:list-item>
              <text:list-item>
                <text:p>For any finite or enumerable collection <text:span text:style-name="T7">B</text:span> of disjoint events, <text:s/></text:p>
              </text:list-item>
            </text:list>
          </draw:text-box>
        </draw:frame>
        <draw:g>
          <svg:title>TexMaths</svg:title>
          <svg:desc>24§display§\Pr\left( \bigcup_{E\in\mathbf{B}} E\right) = \sum_{E\in\mathbf{B}} \Pr[E].§svg§600§FALSE§</svg:desc>
          <draw:frame draw:style-name="gr2" draw:text-style-name="P4" draw:layer="layout" svg:width="9.706cm" svg:height="2.527cm" svg:x="8.4cm" svg:y="8.483cm">
            <draw:image xlink:href="Pictures/10004A9400000FCD0000041EC350C91E1E90EF5A.svg" xlink:type="simple" xlink:show="embed" xlink:actuate="onLoad" draw:mime-type="image/svg+xml">
              <text:p/>
            </draw:image>
            <draw:image xlink:href="Pictures/100000010000013200000050E28C07E4771F3BF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draw:g>
          <svg:title>TexMaths</svg:title>
          <svg:desc>28§display§\therefore p = 0§svg§600§FALSE§</svg:desc>
          <draw:frame draw:style-name="gr2" draw:text-style-name="P4" draw:layer="layout" svg:width="3.186cm" svg:height="0.843cm" svg:x="11.368cm" svg:y="11.107cm">
            <draw:image xlink:href="Pictures/100010A7000004730000012EAE2FE3CC8E090867.svg" xlink:type="simple" xlink:show="embed" xlink:actuate="onLoad" draw:mime-type="image/svg+xml">
              <text:p/>
            </draw:image>
            <draw:image xlink:href="Pictures/1000000100000056000000179810E34ACD04F7C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E000000067C0B390C6982266F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draw:g>
          <svg:title>TexMaths</svg:title>
          <svg:desc>16§latex§\textcolor{orange}{
\begin{eqnarray*}
\Pr[x&lt;X\leq x+dx] &amp;=&amp; F(x+dx) - F(x) \\
&amp;\approx&amp; \textcolor{blue}{f(x)dx}.
\end{eqnarray*}}§svg§600§FALSE§</svg:desc>
          <draw:frame draw:style-name="gr3" draw:text-style-name="P5" draw:layer="layout" svg:width="10.758cm" svg:height="1.405cm" svg:x="16.602cm" svg:y="12.349cm">
            <draw:image xlink:href="Pictures/1000973600001A450000036FD7D683B84977DC9C.svg" xlink:type="simple" xlink:show="embed" xlink:actuate="onLoad" draw:mime-type="image/svg+xml">
              <text:p/>
            </draw:image>
            <draw:image xlink:href="Pictures/10000001000001FC000000426D154D00E0CD7E17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E000000067C0B390C6982266F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Continuous distribution</text:p>
          </draw:text-box>
        </draw:frame>
        <draw:g>
          <svg:title>TexMaths</svg:title>
          <svg:desc>20§display§\Pr[a\leq X\leq b] = \int_a^b f(x)dx.§svg§600§FALSE§</svg:desc>
          <draw:frame draw:style-name="gr2" draw:text-style-name="P4" draw:layer="layout" svg:width="8.638cm" svg:height="1.768cm" svg:x="2.5cm" svg:y="4.7cm">
            <draw:image xlink:href="Pictures/10005577000010E000000375B43B17937FDD1AC1.svg" xlink:type="simple" xlink:show="embed" xlink:actuate="onLoad" draw:mime-type="image/svg+xml">
              <text:p/>
            </draw:image>
            <draw:image xlink:href="Pictures/1000000100000147000000435B6E7C5C51F978EE.png" xlink:type="simple" xlink:show="embed" xlink:actuate="onLoad" draw:mime-type="image/png"/>
          </draw:frame>
        </draw:g>
        <draw:g>
          <svg:title>TexMaths</svg:title>
          <svg:desc>20§display§\mathbf{E}[X^i] = \int_{-\infty}^{\infty} x^i \textcolor{blue}{f(x)dx}.§svg§600§FALSE§</svg:desc>
          <draw:frame draw:style-name="gr2" draw:text-style-name="P4" draw:layer="layout" svg:width="7.23cm" svg:height="1.696cm" svg:x="2.56cm" svg:y="7.229cm">
            <draw:image xlink:href="Pictures/100050B000000E20000003519E3AC5123E5BD6BD.svg" xlink:type="simple" xlink:show="embed" xlink:actuate="onLoad" draw:mime-type="image/svg+xml">
              <text:p/>
            </draw:image>
            <draw:image xlink:href="Pictures/100000010000011100000040F4FE97CE2675F7FC.png" xlink:type="simple" xlink:show="embed" xlink:actuate="onLoad" draw:mime-type="image/png"/>
          </draw:frame>
        </draw:g>
        <draw:g>
          <svg:title>TexMaths</svg:title>
          <svg:desc>20§display§\mathbf{E}[g(X)] = \int_{-\infty}^{\infty} g(x) \textcolor{blue}{f(x)dx}.§svg§600§FALSE§</svg:desc>
          <draw:frame draw:style-name="gr2" draw:text-style-name="P4" draw:layer="layout" svg:width="8.524cm" svg:height="1.644cm" svg:x="2.56cm" svg:y="9.429cm">
            <draw:image xlink:href="Pictures/10005B74000010A700000337B444AC0ED3767F66.svg" xlink:type="simple" xlink:show="embed" xlink:actuate="onLoad" draw:mime-type="image/svg+xml">
              <text:p/>
            </draw:image>
            <draw:image xlink:href="Pictures/10000001000001420000003E7237B5D547847EAA.png" xlink:type="simple" xlink:show="embed" xlink:actuate="onLoad" draw:mime-type="image/png"/>
          </draw:frame>
        </draw:g>
        <draw:g>
          <svg:title>TexMaths</svg:title>
          <svg:desc>20§latex§\begin{eqnarray*}
\mathbf{Var}[X] &amp;=&amp; \mathbf{E}[(X-\mathbf{E}[X])^2]\\
&amp;=&amp;\int_{-\infty}^{\infty} (x-\mathbf{E}[x])^2 \textcolor{blue}{f(x)dx}\\
&amp;=&amp; \mathbf{E}[X^2] - (\mathbf{E}[X])^2.
\end{eqnarray*}
§svg§600§FALSE§</svg:desc>
          <draw:frame draw:style-name="gr2" draw:text-style-name="P4" draw:layer="layout" svg:width="11.278cm" svg:height="3.882cm" svg:x="13cm" svg:y="6.318cm">
            <draw:image xlink:href="Pictures/1000B5B200001608000007969946885380D2374C.svg" xlink:type="simple" xlink:show="embed" xlink:actuate="onLoad" draw:mime-type="image/svg+xml">
              <text:p/>
            </draw:image>
            <draw:image xlink:href="Pictures/10000001000001AA00000093ACEFE48345550F6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0">Lemma 1</text:span>. Let <text:span text:style-name="T5">X</text:span> <text:span text:style-name="T3">≥ </text:span><text:span text:style-name="T4">0</text:span> be a continuous random variable. Then </text:p>
              </text:list-item>
            </text:list>
          </draw:text-box>
        </draw:frame>
        <draw:g>
          <svg:title>TexMaths</svg:title>
          <svg:desc>24§display§\mathbf{E}[X] = \int_0^{\infty} \Pr[X\geq x] dx.§svg§600§FALSE§</svg:desc>
          <draw:frame draw:style-name="gr2" draw:text-style-name="P4" draw:layer="layout" svg:width="9.521cm" svg:height="1.978cm" svg:x="7.881cm" svg:y="5.422cm">
            <draw:image xlink:href="Pictures/1000462500000F80000003399A359486799486EC.svg" xlink:type="simple" xlink:show="embed" xlink:actuate="onLoad" draw:mime-type="image/svg+xml">
              <text:p/>
            </draw:image>
            <draw:image xlink:href="Pictures/100000010000012C0000003EC6AE95918DA9BA7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g>
          <svg:title>TexMaths</svg:title>
          <svg:desc>20§latex§\begin{eqnarray*}
\mathbf{E}[X] &amp;=&amp; \int_0^{\infty}\textcolor{blue}{y}\cdot f(y)dy\\
&amp;=&amp; \int_{y=0}^{\infty} f(y)\textcolor{blue}{\int_{x=0}^y dx} dy\\
&amp;=&amp;\int_{\textcolor{red}{x=0}}^{\infty}\int_{\textcolor{red}{y=x}}^{\infty} f(y) dy dx\\
&amp;=&amp; \int_{x=0}^{\infty} (1-F(x)) dx\\
&amp;=&amp; \int_{x=0}^{\infty} \Pr[X\geq x] dx.
\end{eqnarray*}§svg§600§FALSE§</svg:desc>
          <draw:frame draw:style-name="gr2" draw:text-style-name="P4" draw:layer="layout" svg:width="9.488cm" svg:height="9.506cm" svg:x="4cm" svg:y="4.193cm">
            <draw:image xlink:href="Pictures/100190A1000012890000129201FE03910674E1EB.svg" xlink:type="simple" xlink:show="embed" xlink:actuate="onLoad" draw:mime-type="image/svg+xml">
              <text:p/>
            </draw:image>
            <draw:image xlink:href="Pictures/100000010000016700000167600951F1F521DA8F.png" xlink:type="simple" xlink:show="embed" xlink:actuate="onLoad" draw:mime-type="image/png"/>
          </draw:frame>
        </draw:g>
        <draw:g>
          <svg:title>TexMaths</svg:title>
          <svg:desc>18§display§\textcolor{Gray}{0\leq x\leq y &lt; \infty}§svg§600§FALSE§</svg:desc>
          <draw:frame draw:style-name="gr2" draw:text-style-name="P4" draw:layer="layout" svg:width="4.185cm" svg:height="0.598cm" svg:x="16.916cm" svg:y="8.8cm">
            <draw:image xlink:href="Pictures/100020F8000009160000014DFDC863AC0D5F6123.svg" xlink:type="simple" xlink:show="embed" xlink:actuate="onLoad" draw:mime-type="image/svg+xml">
              <text:p/>
            </draw:image>
            <draw:image xlink:href="Pictures/10000001000000B000000019D04DE31AD66C227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Joint Distribution</text:p>
          </draw:text-box>
        </draw:frame>
        <draw:frame presentation:style-name="pr5" draw:text-style-name="P8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11">The joint distribution function of </text:span><text:span text:style-name="T12">X</text:span><text:span text:style-name="T11"> and </text:span><text:span text:style-name="T12">Y</text:span><text:span text:style-name="T11">: </text:span></text:p>
                <text:p><text:span text:style-name="T11"/></text:p>
                <text:p><text:span text:style-name="T11"/></text:p>
              </text:list-item>
              <text:list-item>
                <text:p><text:span text:style-name="T12">X</text:span><text:span text:style-name="T11"> and </text:span><text:span text:style-name="T12">Y</text:span><text:span text:style-name="T11"> have joint density function </text:span><text:span text:style-name="T12">f</text:span><text:span text:style-name="T11"> if for all </text:span><text:span text:style-name="T12">x</text:span><text:span text:style-name="T11">, </text:span><text:span text:style-name="T12">y, </text:span></text:p>
              </text:list-item>
            </text:list>
          </draw:text-box>
        </draw:frame>
        <draw:g>
          <svg:title>TexMaths</svg:title>
          <svg:desc>22§display§F(x, y) = \Pr[X\leq x, Y\leq y].§svg§600§FALSE§</svg:desc>
          <draw:frame draw:style-name="gr2" draw:text-style-name="P4" draw:layer="layout" svg:width="9.409cm" svg:height="0.77cm" svg:x="7.687cm" svg:y="5.861cm">
            <draw:image xlink:href="Pictures/10005203000010B60000015F6C64AEC6F9E79C59.svg" xlink:type="simple" xlink:show="embed" xlink:actuate="onLoad" draw:mime-type="image/svg+xml">
              <text:p/>
            </draw:image>
            <draw:image xlink:href="Pictures/10000001000001430000001B4211BFF267D5DE4E.png" xlink:type="simple" xlink:show="embed" xlink:actuate="onLoad" draw:mime-type="image/png"/>
          </draw:frame>
        </draw:g>
        <draw:g>
          <svg:title>TexMaths</svg:title>
          <svg:desc>22§display§F(x, y) = \int_{-\infty}^y \int_{-\infty}^x f(u,v) du dv.§svg§600§FALSE§</svg:desc>
          <draw:frame draw:style-name="gr2" draw:text-style-name="P4" draw:layer="layout" svg:width="10.87cm" svg:height="1.808cm" svg:x="6.588cm" svg:y="9.796cm">
            <draw:image xlink:href="Pictures/100074760000134E0000033747D91F61CD7866BE.svg" xlink:type="simple" xlink:show="embed" xlink:actuate="onLoad" draw:mime-type="image/svg+xml">
              <text:p/>
            </draw:image>
            <draw:image xlink:href="Pictures/10000001000001760000003E4BA9AFD0A9C6F4DC.png" xlink:type="simple" xlink:show="embed" xlink:actuate="onLoad" draw:mime-type="image/png"/>
          </draw:frame>
        </draw:g>
        <draw:g>
          <svg:title>TexMaths</svg:title>
          <svg:desc>22§display§\mbox{We denote that }\; f(x, y) = \frac{\partial^2}{\partial x\partial y}F(x,y). §svg§600§FALSE§</svg:desc>
          <draw:frame draw:style-name="gr2" draw:text-style-name="P4" draw:layer="layout" svg:width="13.486cm" svg:height="1.85cm" svg:x="3.783cm" svg:y="12.256cm">
            <draw:image xlink:href="Pictures/10008633000017F30000034A6D88BFD27C74BFB5.svg" xlink:type="simple" xlink:show="embed" xlink:actuate="onLoad" draw:mime-type="image/svg+xml">
              <text:p/>
            </draw:image>
            <draw:image xlink:href="Pictures/10000001000001CF00000040F4C864CECEBC48E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arginal Distribution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Given a joint distribution function </text:span><text:span text:style-name="T14">F</text:span><text:span text:style-name="T13">(</text:span><text:span text:style-name="T15">x</text:span><text:span text:style-name="T13">, </text:span><text:span text:style-name="T15">y</text:span><text:span text:style-name="T13">) over </text:span><text:span text:style-name="T15">X</text:span><text:span text:style-name="T13"> and </text:span><text:span text:style-name="T15">Y</text:span><text:span text:style-name="T13">, we have the </text:span><text:span text:style-name="T16">marginal distribution functions</text:span><text:span text:style-name="T13">:</text:span></text:p>
                <text:p><text:span text:style-name="T13"/></text:p>
                <text:p><text:span text:style-name="T13"/></text:p>
                <text:p><text:span text:style-name="T13">The corresponding </text:span><text:span text:style-name="T16">marginal density functions</text:span><text:span text:style-name="T13">: </text:span></text:p>
              </text:list-item>
            </text:list>
          </draw:text-box>
        </draw:frame>
        <draw:g>
          <svg:title>TexMaths</svg:title>
          <svg:desc>22§display§F_X(x) = \Pr[X\leq x], \quad F_Y(y) = \Pr[Y\leq y].§svg§600§FALSE§</svg:desc>
          <draw:frame draw:style-name="gr2" draw:text-style-name="P4" draw:layer="layout" svg:width="14.302cm" svg:height="0.829cm" svg:x="5.166cm" svg:y="6.567cm">
            <draw:image xlink:href="Pictures/100079C1000019660000017A3CD3DDCD8FA84614.svg" xlink:type="simple" xlink:show="embed" xlink:actuate="onLoad" draw:mime-type="image/svg+xml">
              <text:p/>
            </draw:image>
            <draw:image xlink:href="Pictures/10000001000001EB0000001D5BA1011B19A4458F.png" xlink:type="simple" xlink:show="embed" xlink:actuate="onLoad" draw:mime-type="image/png"/>
          </draw:frame>
        </draw:g>
        <draw:g>
          <svg:title>TexMaths</svg:title>
          <svg:desc>22§display§f_X(x)\mbox{ and } f_Y(y).§svg§600§FALSE§</svg:desc>
          <draw:frame draw:style-name="gr2" draw:text-style-name="P4" draw:layer="layout" svg:width="5.898cm" svg:height="0.829cm" svg:x="9.068cm" svg:y="10.467cm">
            <draw:image xlink:href="Pictures/100045A000000A7A0000017AD50BEC5811AC26A3.svg" xlink:type="simple" xlink:show="embed" xlink:actuate="onLoad" draw:mime-type="image/svg+xml">
              <text:p/>
            </draw:image>
            <draw:image xlink:href="Pictures/10000001000000CB0000001D5AB727A324B1D1E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Independenc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The random variables </text:span><text:span text:style-name="T15">X</text:span><text:span text:style-name="T13"> and </text:span><text:span text:style-name="T15">Y</text:span><text:span text:style-name="T13"> are independent if, for all </text:span><text:span text:style-name="T15">x</text:span><text:span text:style-name="T13"> and </text:span><text:span text:style-name="T15">y</text:span><text:span text:style-name="T13">, </text:span></text:p>
              </text:list-item>
            </text:list>
          </draw:text-box>
        </draw:frame>
        <draw:g>
          <svg:title>TexMaths</svg:title>
          <svg:desc>22§display§\Pr[(X\leq x)\cap (Y\leq y)] = \Pr[X\leq x] \Pr[Y\leq y].§svg§600§FALSE§</svg:desc>
          <draw:frame draw:style-name="gr2" draw:text-style-name="P4" draw:layer="layout" svg:width="15.666cm" svg:height="0.829cm" svg:x="4.8cm" svg:y="5.4cm">
            <draw:image xlink:href="Pictures/1000742500001BD20000017A6FC6E6BC0BC1EBD5.svg" xlink:type="simple" xlink:show="embed" xlink:actuate="onLoad" draw:mime-type="image/svg+xml">
              <text:p/>
            </draw:image>
            <draw:image xlink:href="Pictures/100000010000021A0000001D7C78CB2C7FE30993.png" xlink:type="simple" xlink:show="embed" xlink:actuate="onLoad" draw:mime-type="image/png"/>
          </draw:frame>
        </draw:g>
        <draw:g>
          <svg:title>TexMaths</svg:title>
          <svg:desc>22§display§F(x,y) = F_X(x) F_Y(y).§svg§600§FALSE§</svg:desc>
          <draw:frame draw:style-name="gr2" draw:text-style-name="P4" draw:layer="layout" svg:width="7.744cm" svg:height="0.77cm" svg:x="9.045cm" svg:y="7.996cm">
            <draw:image xlink:href="Pictures/10005DDC00000DC10000015FE49A613886E6FB59.svg" xlink:type="simple" xlink:show="embed" xlink:actuate="onLoad" draw:mime-type="image/svg+xml">
              <text:p/>
            </draw:image>
            <draw:image xlink:href="Pictures/100000010000010A0000001BD3F5423D6BF2AD93.png" xlink:type="simple" xlink:show="embed" xlink:actuate="onLoad" draw:mime-type="image/png"/>
          </draw:frame>
        </draw:g>
        <draw:custom-shape draw:style-name="gr4" draw:text-style-name="P9" draw:layer="layout" svg:width="0.4cm" svg:height="0.971cm" svg:x="12.4cm" svg:y="6.6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0.4cm" svg:height="0.971cm" svg:x="12.401cm" svg:y="9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2§display§f(x,y) = f_X(x) f_Y(y).§svg§600§FALSE§</svg:desc>
          <draw:frame draw:style-name="gr2" draw:text-style-name="P4" draw:layer="layout" svg:width="7.423cm" svg:height="0.829cm" svg:x="9.046cm" svg:y="10.797cm">
            <draw:image xlink:href="Pictures/1000562E00000D2F0000017A49919DB838686F1A.svg" xlink:type="simple" xlink:show="embed" xlink:actuate="onLoad" draw:mime-type="image/svg+xml">
              <text:p/>
            </draw:image>
            <draw:image xlink:href="Pictures/10000001000000FF0000001D7B0A5F945D87E0A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66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FD00000022F45E6350AB11D0F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FD00000022F45E6350AB11D0F3.png" xlink:type="simple" xlink:show="embed" xlink:actuate="onLoad" draw:mime-type="image/png"/>
          </draw:frame>
        </draw:g>
        <draw:g>
          <svg:title>TexMaths</svg:title>
          <svg:desc>22§display§F(x,y) = (1-e^{-ax}) (1-e^{-by}) = F_X(x) F_Y(y).§svg§600§FALSE§</svg:desc>
          <draw:frame draw:style-name="gr2" draw:text-style-name="P4" draw:layer="layout" svg:width="15.697cm" svg:height="0.887cm" svg:x="5.47cm" svg:y="11.339cm">
            <draw:image xlink:href="Pictures/1000937B00001BE000000194C8EA1FF61307F18C.svg" xlink:type="simple" xlink:show="embed" xlink:actuate="onLoad" draw:mime-type="image/svg+xml">
              <text:p/>
            </draw:image>
            <draw:image xlink:href="Pictures/100000010000021B0000001FCFAFF759E1B53D1B.png" xlink:type="simple" xlink:show="embed" xlink:actuate="onLoad" draw:mime-type="image/png"/>
          </draw:frame>
        </draw:g>
        <draw:g>
          <svg:title>TexMaths</svg:title>
          <svg:desc>22§display§f_X(x) = ae^{-ax}, f_Y(y) = be^{-by}, \;\therefore f(x, y) = f_X(x)f_Y(y).§svg§600§FALSE§</svg:desc>
          <draw:g>
            <draw:path draw:style-name="gr6" draw:text-style-name="P10" draw:layer="layout" svg:width="18.703cm" svg:height="0.804cm" svg:x="4.587cm" svg:y="12.879cm" svg:viewBox="0 0 18704 805" svg:d="M0 0c6235 0 12470 0 18704 0 0 268 0 537 0 805-6234 0-12469 0-18704 0 0-268 0-537 0-805z">
              <text:p/>
            </draw:path>
            <draw:path draw:style-name="gr7" draw:text-style-name="P11" draw:layer="layout" svg:width="0.384cm" svg:height="0.699cm" svg:x="4.589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8 9 22 9 16 0 33 0 50 0-19 101-38 203-57 305-13 74-26 142-68 142-2 0-22 0-35-13 35-2 41-31 41-42 0-17-13-26-28-26-20 0-42 18-42 46 0 35 33 53 64 53 44 0 75-44 88-75 24-48 44-140 44-147 15-81 31-162 46-243z">
              <text:p/>
            </draw:path>
            <draw:path draw:style-name="gr7" draw:text-style-name="P11" draw:layer="layout" svg:width="0.479cm" svg:height="0.368cm" svg:x="4.952cm" svg:y="13.279cm" svg:viewBox="0 0 480 369" svg:d="M275 162c17-16 34-33 51-50 70-68 90-90 138-92 9 0 16 0 16-11 0-7-7-9-9-9-16 0-35 2-51 2-13 0-48-2-64-2-4 0-8 2-8 13 2 2 0 7 6 7 5 0 20 2 20 13 0 9-9 17-15 22-5 4-73 70-93 92-18-35-36-70-55-105 0-3-2-7-2-9 0-4 11-11 29-13 4 0 11 0 11-11 0-2 0-9-9-9-11 0-23 2-35 2-13 0-25 0-36 0s-22 0-33 0c-8 0-19-2-28-2-2 0-11 0-11 13 0 7 6 7 15 7 31 0 33 4 40 15 25 50 50 100 75 149-11 10-21 21-31 31-9 9-35 33-44 44-66 66-88 88-139 90-6 0-13 0-13 11 0 2 2 9 9 9 15 0 33-3 50-3 9 0 22 0 31 0 11 0 22 3 31 3 2 0 11 0 11-11 0-9-7-9-9-9-6 0-17-2-17-13 0-9 8-16 19-29 37-35 74-70 110-105 22 42 44 85 66 127 3 4 2 4 3 7 0 2-9 11-29 13-4 0-11 0-11 11 0 2 0 9 9 9 11 0 24-3 35-3s24 0 35 0c9 0 22 0 33 0 9 0 20 3 29 3 2 0 11 0 11-11 0-9-7-9-16-9-30 0-33-7-39-16-29-57-57-114-86-171z">
              <text:p/>
            </draw:path>
            <draw:path draw:style-name="gr7" draw:text-style-name="P11" draw:layer="layout" svg:width="0.179cm" svg:height="0.769cm" svg:x="5.59cm" svg:y="12.954cm" svg:viewBox="0 0 180 770" svg:d="M180 761c0-2 0-2-13-15-97-97-123-244-123-360 0-134 31-270 125-364 11-11 11-11 11-13 0-7-4-9-8-9-9 0-77 53-124 151-39 84-48 169-48 235 0 59 9 151 51 239 46 94 112 145 121 145 4 0 8-2 8-9z">
              <text:p/>
            </draw:path>
            <draw:path draw:style-name="gr7" draw:text-style-name="P11" draw:layer="layout" svg:width="0.384cm" svg:height="0.348cm" svg:x="5.836cm" svg:y="13.191cm" svg:viewBox="0 0 385 349" svg:d="M235 107c5-19 22-89 77-89 5 0 22 0 40 11-22 2-37 21-37 39 0 13 8 29 28 29 18 0 42-16 42-47 0-39-46-50-73-50-44 0-70 42-81 59-18-50-59-59-81-59-82 0-126 99-126 118 0 9 7 9 9 9 7 0 9-2 11-9 26-81 77-100 103-100 16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7" draw:text-style-name="P11" draw:layer="layout" svg:width="0.177cm" svg:height="0.769cm" svg:x="6.301cm" svg:y="12.954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7" draw:text-style-name="P11" draw:layer="layout" svg:width="0.512cm" svg:height="0.179cm" svg:x="6.815cm" svg:y="13.25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7" draw:text-style-name="P11" draw:layer="layout" svg:width="0.353cm" svg:height="0.348cm" svg:x="7.618cm" svg:y="13.191cm" svg:viewBox="0 0 354 349" svg:d="M257 50c-13-28-37-50-70-50-90 0-187 114-187 226 0 72 42 123 103 123 16 0 53-2 99-57 7 33 36 57 71 57 28 0 46-18 57-42 13-28 24-74 24-77 0-6-6-6-9-6-8 0-8 2-11 13-13 50-28 94-59 94-20 0-22-20-22-35s0-22 9-57c9-31 11-39 17-68 9-36 18-72 27-107 6-22 6-25 6-27 0-13-8-22-22-22-19 0-30 18-33 35zM207 250c-5 13-5 15-16 29-33 41-66 52-88 52-37 0-48-41-48-72 0-37 24-132 42-167 24-46 59-74 90-74 51 0 62 63 62 68 0 4-3 8-3 13-13 50-26 101-39 151z">
              <text:p/>
            </draw:path>
            <draw:path draw:style-name="gr7" draw:text-style-name="P11" draw:layer="layout" svg:width="0.296cm" svg:height="0.348cm" svg:x="8.032cm" svg:y="13.191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6 0 58 21 58 48 0 81-124 81-157 81-10 0-20 0-30 0z">
              <text:p/>
            </draw:path>
            <draw:path draw:style-name="gr7" draw:text-style-name="P11" draw:layer="layout" svg:width="0.364cm" svg:height="0.025cm" svg:x="8.415cm" svg:y="13.066cm" svg:viewBox="0 0 365 26" svg:d="M343 26c9 0 22 0 22-13s-11-13-22-13c-107 0-214 0-321 0-9 0-22 0-22 13s13 13 22 13c107 0 214 0 321 0z">
              <text:p/>
            </draw:path>
            <draw:path draw:style-name="gr7" draw:text-style-name="P11" draw:layer="layout" svg:width="0.274cm" svg:height="0.242cm" svg:x="8.872cm" svg:y="12.976cm" svg:viewBox="0 0 275 243" svg:d="M196 33c-11-18-31-33-57-33-69 0-139 77-139 154 0 52 35 89 81 89 29 0 55-17 77-37 11 31 42 37 55 37 20 0 33-13 44-28 11-22 18-53 18-55 0-6-7-6-9-6-6 0-6 2-11 17-6 26-17 57-39 57-14 0-18-11-18-26 0-9 4-29 9-42 2-15 9-37 11-50 3-13 7-27 11-40 2-15 9-39 9-41 0-14-9-18-18-18s-22 7-24 22zM161 171c-5 15-16 26-29 35-4 5-26 22-48 22-20 0-40-13-40-53 0-28 15-87 29-109 24-42 52-51 66-51 39 0 48 42 48 46 0 3 0 7 0 9-9 34-18 67-26 101z">
              <text:p/>
            </draw:path>
            <draw:path draw:style-name="gr7" draw:text-style-name="P11" draw:layer="layout" svg:width="0.289cm" svg:height="0.242cm" svg:x="9.2cm" svg:y="12.976cm" svg:viewBox="0 0 290 243" svg:d="M110 180c-7 20-24 48-51 48-2 0-19 0-30-6 22-9 24-27 24-31 0-11-9-20-22-20-16 0-31 13-31 33 0 26 31 39 57 39 24 0 46-15 62-39 11 29 42 39 64 39 61 0 94-68 94-83 0-6-6-6-9-6-6 0-6 2-8 8-14 38-44 66-75 66-22 0-33-15-33-35 0-13 13-64 28-123 11-41 36-55 53-55 10 3 18 0 29 7-18 7-24 22-24 31 0 11 8 19 22 19 13 0 30-11 30-33 0-30-35-39-57-39-26 0-48 18-59 39-11-21-35-39-66-39-60 0-95 66-95 83 0 7 7 7 9 7 7 0 7-2 11-9 13-42 46-66 73-66 19 0 33 9 33 35 0 11-7 38-11 57-6 25-12 49-18 73z">
              <text:p/>
            </draw:path>
            <draw:path draw:style-name="gr7" draw:text-style-name="P11" draw:layer="layout" svg:width="0.089cm" svg:height="0.229cm" svg:x="9.631cm" svg:y="13.45cm" svg:viewBox="0 0 90 230" svg:d="M90 81c0-50-20-81-50-81-25 0-40 20-40 42 0 19 15 39 40 39 8 0 19-2 26-9 4-2 3-1 4-2 3 0 3 0 3 11 0 57-27 103-53 130-9 6-9 8-9 11 0 6 4 8 9 8 9 0 70-59 70-149z">
              <text:p/>
            </draw:path>
            <draw:path draw:style-name="gr7" draw:text-style-name="P11" draw:layer="layout" svg:width="0.384cm" svg:height="0.699cm" svg:x="9.948cm" svg:y="12.989cm" svg:viewBox="0 0 385 700" svg:d="M242 235c23 0 45 0 68 0 16 0 22 0 22-16 0-8-6-8-20-8-21 0-42 0-63 0 5-30 10-59 15-88 2-16 13-70 18-79 8-15 22-26 37-26 2 0 22 0 37 13-33 2-41 30-41 41 0 18 13 27 28 27 20 0 42-18 42-46 0-35-35-53-66-53-26 0-75 13-99 90-4 15-7 24-24 121-19 0-37 0-55 0-13 0-22 0-22 15 0 9 6 9 22 9 17 0 34 0 50 0-19 101-38 203-57 305-15 74-28 142-68 142-2 0-22 0-37-13 35-2 41-31 41-42 0-17-13-26-28-26-20 0-42 18-42 46 0 35 35 53 66 53 42 0 73-44 88-75 24-48 42-140 42-147 15-81 31-162 46-243z">
              <text:p/>
            </draw:path>
            <draw:path draw:style-name="gr7" draw:text-style-name="P11" draw:layer="layout" svg:width="0.428cm" svg:height="0.368cm" svg:x="10.317cm" svg:y="13.279cm" svg:viewBox="0 0 429 369" svg:d="M334 66c11-11 22-22 33-29 22-15 44-17 51-17 4 0 11 0 11-11 0-5-2-9-7-9-13 0-30 2-44 2-17 0-39-2-57-2-2 0-9 0-9 13 0 7 7 7 9 7 16 2 16 6 16 11 0 4-3 8-7 13-4 4-7 9-9 11-45 47-91 95-136 142-24-52-47-105-71-158-4-8-4-8-4-10 0-9 26-9 29-9 6 0 15 0 15-11 0-2 0-9-9-9-17 0-57 2-72 2-14 0-49-2-62-2-4 0-11 2-11 13 0 7 7 7 13 7 33 0 35 4 40 17 28 62 56 123 83 185-8 32-16 65-24 98-6 27-6 29-48 29-11 0-18 0-18 11 0 6 5 9 9 9 11 0 22-3 33-3s26 0 37 0 21 0 33 0 27 3 38 3c2 0 11 0 11-11 0-9-7-9-18-9-9 0-11 0-20 0-11-2-13-2-13-9 0-2 7-29 11-44 5-17 16-63 16-66 2-8 2-8 8-15 48-50 96-99 143-149z">
              <text:p/>
            </draw:path>
            <draw:path draw:style-name="gr7" draw:text-style-name="P11" draw:layer="layout" svg:width="0.177cm" svg:height="0.769cm" svg:x="10.898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55cm" svg:height="0.497cm" svg:x="11.144cm" svg:y="13.191cm" svg:viewBox="0 0 356 498" svg:d="M352 48c4-11 4-13 4-17 0-16-11-22-22-22-8 0-22 4-28 15 0 5-7 29-11 42-5 22-11 41-16 61-11 47-23 94-35 141-2 11-35 63-86 63-39 0-48-33-48-61 0-35 13-84 40-152 11-30 15-39 15-54 0-35-24-64-64-64-72 0-101 112-101 118 0 9 7 9 9 9 6 0 9-2 13-15 20-73 51-94 77-94 7 0 20 0 20 24 0 19-9 39-13 55-31 81-47 125-47 160 0 70 51 92 95 92 31 0 57-13 79-35-11 41-20 79-50 118-20 26-51 48-86 48-11 0-44-2-57-30 11 0 22 0 33-9 6-9 15-18 15-33 0-24-22-26-29-26-17 0-44 11-44 50 0 37 36 66 82 66 81 0 160-70 182-156 25-98 49-196 73-294z">
              <text:p/>
            </draw:path>
            <draw:path draw:style-name="gr7" draw:text-style-name="P11" draw:layer="layout" svg:width="0.179cm" svg:height="0.769cm" svg:x="11.571cm" svg:y="12.954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7" draw:text-style-name="P11" draw:layer="layout" svg:width="0.514cm" svg:height="0.179cm" svg:x="12.086cm" svg:y="13.25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283cm" svg:height="0.541cm" svg:x="12.895cm" svg:y="12.998cm" svg:viewBox="0 0 284 542" svg:d="M150 9c0-2 0-9-11-9-18 0-75 7-95 7-7 2-15 2-15 15 0 11 8 11 19 11 38 0 38 4 38 13 0 4-7 31-9 46-21 84-43 168-64 252-9 38-13 51-13 77 0 73 42 121 99 121 90 0 185-114 185-226 0-70-40-123-101-123-36 0-69 22-91 46 19-77 39-153 58-230zM77 298c4-15 4-17 11-26 37-50 73-61 92-61 29 0 49 22 49 72 0 46-24 134-40 162-24 53-61 79-90 79-26 0-53-19-53-77 0-15 0-28 13-76 6-24 12-49 18-73z">
              <text:p/>
            </draw:path>
            <draw:path draw:style-name="gr7" draw:text-style-name="P11" draw:layer="layout" svg:width="0.296cm" svg:height="0.348cm" svg:x="13.228cm" svg:y="13.191cm" svg:viewBox="0 0 297 349" svg:d="M108 162c22 0 79 0 119-17 55-22 57-68 57-79 0-33-29-66-82-66-85 0-202 75-202 211 0 76 44 138 121 138 110 0 176-81 176-90 0-5-7-11-11-11-2 0-4 2-9 9-61 74-145 74-156 74-59 0-66-63-66-88 0-8 0-32 13-81 13 0 27 0 40 0zM73 147c28-118 110-129 129-129 36 0 58 21 58 48 0 81-126 81-157 81-10 0-20 0-30 0z">
              <text:p/>
            </draw:path>
            <draw:path draw:style-name="gr7" draw:text-style-name="P11" draw:layer="layout" svg:width="0.364cm" svg:height="0.025cm" svg:x="13.61cm" svg:y="13.066cm" svg:viewBox="0 0 365 26" svg:d="M343 26c9 0 22 0 22-13s-13-13-22-13c-108 0-215 0-323 0-7 0-20 0-20 13s11 13 20 13c108 0 215 0 323 0z">
              <text:p/>
            </draw:path>
            <draw:path draw:style-name="gr7" draw:text-style-name="P11" draw:layer="layout" svg:width="0.219cm" svg:height="0.378cm" svg:x="14.07cm" svg:y="12.84cm" svg:viewBox="0 0 220 379" svg:d="M108 15c1-3 2-6 2-8 0-3-2-7-9-7-11 0-57 4-70 4-5 3-11 3-11 14 0 8 6 8 13 8 26 0 26 3 26 7s-4 26-8 37c-5 17-9 34-14 51-4 17-33 136-35 142-2 13-2 20-2 27 0 54 35 89 79 89 68 0 141-74 141-153 0-64-44-90-81-90-29 0-53 15-69 31 13-51 25-101 38-152zM79 364c-26 0-42-24-42-55 0-19 7-37 22-98 3-11 3-11 14-25 19-24 44-35 63-35 22 0 40 16 40 53 0 22-13 77-29 107-13 27-39 53-68 53z">
              <text:p/>
            </draw:path>
            <draw:path draw:style-name="gr7" draw:text-style-name="P11" draw:layer="layout" svg:width="0.276cm" svg:height="0.348cm" svg:x="14.332cm" svg:y="12.976cm" svg:viewBox="0 0 277 349" svg:d="M275 35c2-9 2-9 2-13 0-9-9-15-17-15-7 0-16 2-22 11-3 4-7 21-9 32-4 15-8 30-11 44-5 13-20 81-22 88-22 15-24 46-66 46-38 0-38-35-38-44 0-30 14-63 29-105 7-18 9-24 9-33 0-26-22-46-51-46-55 0-79 75-79 83 0 7 7 7 9 7 6 0 9-2 9-9 15-44 37-66 59-66 9 0 13 7 13 20 0 11-4 24-6 31-27 66-33 85-33 109 0 9 0 33 22 51 17 15 39 17 55 17 19 0 39-8 57-24-7 29-11 53-35 79-14 18-36 35-64 35-5 0-31 0-42-17 31-5 21-21 31-31 0-17-18-20-22-20-13 0-31 11-31 36 0 26 24 48 64 48 55 0 121-44 138-110 17-68 34-136 51-204z">
              <text:p/>
            </draw:path>
            <draw:path draw:style-name="gr7" draw:text-style-name="P11" draw:layer="layout" svg:width="0.091cm" svg:height="0.229cm" svg:x="14.743cm" svg:y="13.45cm" svg:viewBox="0 0 92 230" svg:d="M92 81c0-50-19-81-50-81-27 0-42 20-42 42 0 19 15 39 42 39 9 0 20-2 26-9 2-2 3-1 5-2 0 4 2 0 2 11 0 57-26 104-53 130-8 7-9 8-9 11 0 6 5 8 9 8 7 0 70-59 70-149z">
              <text:p/>
            </draw:path>
            <draw:path draw:style-name="gr7" draw:text-style-name="P11" draw:layer="layout" svg:width="0.468cm" svg:height="0.414cm" svg:x="15.26cm" svg:y="13.176cm" svg:viewBox="0 0 469 415" svg:d="M275 39c0-21-20-39-42-39s-42 18-42 39c0 22 20 42 42 42s42-17 42-42zM469 373c0-22-20-42-42-42s-42 20-42 42 20 42 42 42 42-20 42-42zM81 373c0-22-19-42-41-42s-40 20-40 42 18 42 40 42 41-20 41-42z">
              <text:p/>
            </draw:path>
            <draw:path draw:style-name="gr7" draw:text-style-name="P11" draw:layer="layout" svg:width="0.384cm" svg:height="0.699cm" svg:x="16.008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6 9 22 9s33 0 50 0c-19 101-38 203-57 305-13 74-26 142-68 142-2 0-22 0-35-13 35-2 41-31 41-42 0-17-13-26-28-26-20 0-42 18-42 46 0 35 33 53 64 53 44 0 75-44 88-75 24-48 42-140 44-147 15-81 31-162 46-243z">
              <text:p/>
            </draw:path>
            <draw:path draw:style-name="gr7" draw:text-style-name="P11" draw:layer="layout" svg:width="0.177cm" svg:height="0.769cm" svg:x="16.505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84cm" svg:height="0.348cm" svg:x="16.752cm" svg:y="13.191cm" svg:viewBox="0 0 385 349" svg:d="M235 107c5-19 22-89 77-89 3 0 22 0 38 11-22 2-38 21-38 39 0 13 9 29 31 29 16 0 42-16 42-47 0-39-46-50-73-50-44 0-72 42-81 59-20-50-62-59-84-59-79 0-123 99-123 118 0 9 7 9 9 9 7 0 9-2 9-9 26-81 77-100 103-100 16 0 42 6 42 50 0 24-13 77-42 184-11 49-39 79-72 79-5 0-22 0-40-9 20-4 37-19 37-41s-17-27-28-27c-24 0-42 20-42 44 0 35 37 51 73 51 50 0 79-53 81-59 9 28 35 59 84 59 79 0 123-99 123-119 0-6-7-6-9-6-9 0-9 2-11 6-26 84-79 101-103 101-29 0-42-24-42-50 0-16 4-33 13-68s18-70 26-106z">
              <text:p/>
            </draw:path>
            <draw:path draw:style-name="gr7" draw:text-style-name="P11" draw:layer="layout" svg:width="0.089cm" svg:height="0.229cm" svg:x="17.238cm" svg:y="13.45cm" svg:viewBox="0 0 90 230" svg:d="M90 81c0-50-20-81-50-81-25 0-40 20-40 42 0 19 15 39 40 39 8 0 19-2 26-9 2-2 3-1 4-2 3 0 3 0 3 11 0 57-26 104-53 130-8 7-9 8-9 11 0 6 4 8 9 8 9 0 70-59 70-149z">
              <text:p/>
            </draw:path>
            <draw:path draw:style-name="gr7" draw:text-style-name="P11" draw:layer="layout" svg:width="0.355cm" svg:height="0.497cm" svg:x="17.537cm" svg:y="13.191cm" svg:viewBox="0 0 356 498" svg:d="M352 48c4-11 4-13 4-17 0-16-11-22-24-22-6 0-20 4-26 15-2 5-7 29-11 42-5 22-11 41-16 61-11 47-23 94-35 141-2 11-35 63-86 63-39 0-48-33-48-61 0-35 13-84 40-152 11-30 15-39 15-54 0-35-24-64-64-64-72 0-101 112-101 118 0 9 7 9 9 9 6 0 9-2 11-15 22-73 53-94 79-94 7 0 20 0 20 24 0 19-9 39-13 55-31 81-47 125-47 160 0 70 51 92 95 92 31 0 57-13 79-35-11 41-20 79-50 118-20 26-51 48-86 48-11 0-44-2-57-30 11 0 22 0 33-9 6-9 15-18 15-33 0-24-22-26-29-26-17 0-44 11-44 50 0 37 36 66 82 66 79 0 160-70 182-156 25-98 49-196 73-294z">
              <text:p/>
            </draw:path>
            <draw:path draw:style-name="gr7" draw:text-style-name="P11" draw:layer="layout" svg:width="0.179cm" svg:height="0.769cm" svg:x="17.964cm" svg:y="12.954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7" draw:text-style-name="P11" draw:layer="layout" svg:width="0.514cm" svg:height="0.179cm" svg:x="18.478cm" svg:y="13.25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386cm" svg:height="0.699cm" svg:x="19.292cm" svg:y="12.989cm" svg:viewBox="0 0 387 700" svg:d="M244 235c22 0 44 0 66 0 16 0 22 0 22-16 0-8-6-8-20-8-21 0-42 0-63 0 5-30 10-59 15-88 2-16 13-70 18-79 8-15 22-26 37-26 2 0 24 0 37 13-33 2-41 30-41 41 0 18 15 27 28 27 20 0 44-18 44-46 0-35-37-53-68-53-26 0-75 13-99 90-4 15-7 24-24 121-18 0-35 0-53 0-15 0-24 0-24 15 0 9 6 9 22 9 17 0 34 0 50 0-19 101-38 203-57 305-15 74-28 142-68 142-2 0-22 0-37-13 35-2 44-31 44-42 0-17-16-26-29-26-22 0-44 18-44 46 0 35 35 53 66 53 42 0 73-44 88-75 24-48 42-140 42-147 16-81 32-162 48-243z">
              <text:p/>
            </draw:path>
            <draw:path draw:style-name="gr7" draw:text-style-name="P11" draw:layer="layout" svg:width="0.476cm" svg:height="0.368cm" svg:x="19.657cm" svg:y="13.279cm" svg:viewBox="0 0 477 369" svg:d="M273 162c17-16 35-33 53-50 68-68 90-90 138-92 7 0 13 0 13-11 0-7-4-6-6-9-16 0-35 2-51 2-15 0-50-2-64-2-4 0-11 2-11 13 3 2 0 7 9 7 5 0 18 2 18 13 0 9-9 17-13 22-5 4-73 70-93 92-18-35-36-70-55-105-2-3-2-7-2-9 0-4 9-11 29-13 2 0 11 0 11-11 0-2 0-9-9-9-11 0-27 2-38 2s-24 0-35 0c-9 0-22 0-31 0-8 0-22-2-30-2-3 0-11 0-11 13 0 7 6 7 15 7 33 0 35 4 40 15 25 50 51 100 77 149-11 10-21 21-31 31-11 9-35 33-46 44-66 66-88 88-137 90-6 0-13 0-13 11 0 2 2 9 7 9 17 0 35-3 50-3 9 0 24 0 33 0s22 3 31 3c2 0 11 0 11-11 0-9-7-9-9-9-6 0-17-2-17-13 0-9 6-16 19-29 36-35 72-70 108-105 22 42 44 85 66 127 2 4 3 4 5 7 0 2-11 11-29 13-7 0-13 0-13 11 0 2 0 9 9 9 13 0 26-3 37-3s24 0 35 0c9 0 22 0 31 0 11 0 22 3 31 3 2 0 11 0 11-11 0-9-7-9-16-9-33 0-35-7-39-16-30-57-59-114-88-171z">
              <text:p/>
            </draw:path>
            <draw:path draw:style-name="gr7" draw:text-style-name="P11" draw:layer="layout" svg:width="0.177cm" svg:height="0.769cm" svg:x="20.295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84cm" svg:height="0.348cm" svg:x="20.542cm" svg:y="13.191cm" svg:viewBox="0 0 385 349" svg:d="M235 107c5-19 22-89 77-89 3 0 22 0 38 11-22 2-38 21-38 39 0 13 9 29 31 29 16 0 42-16 42-47 0-39-46-50-73-50-44 0-72 42-81 59-20-50-62-59-84-59-79 0-123 99-123 118 0 9 7 9 9 9 7 0 9-2 9-9 26-81 77-100 103-100 16 0 42 6 42 50 0 24-13 77-42 184-11 49-39 79-72 79-5 0-22 0-40-9 20-4 37-19 37-41s-17-27-28-27c-24 0-42 20-42 44 0 35 37 51 73 51 50 0 79-53 81-59 9 28 35 59 84 59 79 0 123-99 123-119 0-6-7-6-9-6-9 0-9 2-11 6-26 84-79 101-103 101-29 0-42-24-42-50 0-16 4-33 13-68s18-70 26-106z">
              <text:p/>
            </draw:path>
            <draw:path draw:style-name="gr7" draw:text-style-name="P11" draw:layer="layout" svg:width="0.179cm" svg:height="0.769cm" svg:x="21.004cm" svg:y="12.954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7" draw:text-style-name="P11" draw:layer="layout" svg:width="0.384cm" svg:height="0.699cm" svg:x="21.303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8 9 22 9 16 0 33 0 50 0-19 101-38 203-57 305-13 74-26 142-68 142-2 0-22 0-35-13 35-2 41-31 41-42 0-17-13-26-28-26-20 0-42 18-42 46 0 35 33 53 64 53 44 0 75-44 88-75 24-48 42-140 44-147 15-81 31-162 46-243z">
              <text:p/>
            </draw:path>
            <draw:path draw:style-name="gr7" draw:text-style-name="P11" draw:layer="layout" svg:width="0.43cm" svg:height="0.368cm" svg:x="21.67cm" svg:y="13.279cm" svg:viewBox="0 0 431 369" svg:d="M337 66c8-11 19-22 33-29 22-15 41-17 48-17s13 0 13-11c0-5-4-9-9-9-13 0-28 2-44 2-15 0-39-2-55-2-2 0-11 0-11 13 0 7 7 7 9 7 18 2 18 6 18 11 0 4-5 8-9 13-2 4-4 9-9 11-45 47-89 95-134 142-24-52-48-105-73-158-4-8-4-8-4-10 0-9 26-9 31-9 6 0 13 0 13-11 0-2 0-9-9-9-15 0-55 2-72 2-14 0-49-2-62-2-4 0-11 2-11 13 0 7 7 7 15 7 31 0 33 4 40 17 28 62 56 123 84 185-8 32-17 65-25 98-8 27-8 29-50 29-9 0-16 0-16 11 0 6 3 9 9 9 9 0 22-3 33-3s27 0 35 0c11 0 25 0 36 0s24 3 35 3c4 0 13 0 13-11 0-9-7-9-20-9-9 0-11 0-20 0-11-2-11-2-11-9 0-2 7-29 9-44 5-17 16-63 18-66 2-8 2-8 6-15 49-50 97-99 146-149z">
              <text:p/>
            </draw:path>
            <draw:path draw:style-name="gr7" draw:text-style-name="P11" draw:layer="layout" svg:width="0.179cm" svg:height="0.769cm" svg:x="22.251cm" svg:y="12.954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7" draw:text-style-name="P11" draw:layer="layout" svg:width="0.355cm" svg:height="0.497cm" svg:x="22.497cm" svg:y="13.191cm" svg:viewBox="0 0 356 498" svg:d="M354 48c2-11 2-13 2-17 0-16-11-22-22-22-8 0-19 4-26 15-2 5-9 29-11 42-7 22-11 41-15 61-12 47-24 94-36 141-4 11-37 63-88 63-39 0-48-33-48-61 0-35 13-84 40-152 13-30 15-39 15-54 0-35-24-64-62-64-74 0-103 112-103 118 0 9 6 6 9 9 9 0 9-2 13-15 20-73 53-94 77-94 7 0 20 0 20 24 0 19-7 39-13 55-31 81-44 125-44 160 0 70 48 92 94 92 29 0 55-13 77-35-9 41-20 79-50 118-20 26-49 48-84 48-11 0-46-2-59-30 13 0 22 0 33-9 8-9 15-18 15-33 0-24-20-26-29-26-17 0-41 11-41 50 0 37 33 66 81 66 79 0 158-70 180-156 25-98 50-196 75-294z">
              <text:p/>
            </draw:path>
            <draw:path draw:style-name="gr7" draw:text-style-name="P11" draw:layer="layout" svg:width="0.177cm" svg:height="0.769cm" svg:x="22.926cm" svg:y="12.954cm" svg:viewBox="0 0 178 770" svg:d="M178 386c0-61-6-153-50-241-47-95-113-145-121-145-5 0-7 4-7 9 0 2 0 2 15 17 75 75 119 198 119 360 0 132-28 265-125 364-9 9-9 9-9 11 0 7 2 9 7 9 8 0 79-53 123-149 39-86 48-171 48-235z">
              <text:p/>
            </draw:path>
            <draw:path draw:style-name="gr7" draw:text-style-name="P11" draw:layer="layout" svg:width="0.08cm" svg:height="0.08cm" svg:x="23.25cm" svg:y="13.45cm" svg:viewBox="0 0 81 81" svg:d="M81 42c0-22-18-42-41-42-24 0-40 20-40 42s16 39 40 39c23 0 41-17 41-3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20§display§\Pr[X\leq x\mid \textcolor{red}{Y = y}]  = \lim_{\delta\rightarrow 0} \Pr[X\leq x\mid y\leq Y\leq y+\delta].§svg§600§FALSE§</svg:desc>
          <draw:frame draw:style-name="gr2" draw:text-style-name="P4" draw:layer="layout" svg:width="15.962cm" svg:height="0.994cm" svg:x="4.238cm" svg:y="4.235cm">
            <draw:image xlink:href="Pictures/1000876F00001F2E000001F24987436C1C3B476C.svg" xlink:type="simple" xlink:show="embed" xlink:actuate="onLoad" draw:mime-type="image/svg+xml">
              <text:p/>
            </draw:image>
            <draw:image xlink:href="Pictures/100000010000025B000000268EA7CC10A95CAA53.png" xlink:type="simple" xlink:show="embed" xlink:actuate="onLoad" draw:mime-type="image/png"/>
          </draw:frame>
        </draw:g>
        <draw:frame draw:style-name="gr8" draw:text-style-name="P12" draw:layer="layout" svg:width="3.2cm" svg:height="1.11cm" svg:x="4cm" svg:y="5.6cm">
          <draw:text-box>
            <text:p><text:span text:style-name="T18">Why?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18§latex§\begin{eqnarray*}
\textcolor{red}{\Pr[X\leq x\mid Y=y]} &amp; = &amp;\lim_{\delta\rightarrow 0} \Pr[X\leq x\mid y\leq Y\leq y+\delta]\\
&amp;=&amp; \lim_{\delta\rightarrow 0}  \frac{\Pr[(X\leq x)\cap (y\leq Y\leq y+\delta)]}{\Pr[y\leq Y\leq y+\delta]}\\
&amp;=&amp; \lim_{\delta\rightarrow 0} \frac{F(x, y+\delta) - F(x, y)}{F_Y(y+\delta) - F_Y(y)}\\
&amp;=&amp; \lim_{\delta\rightarrow 0} \int_{u=-\infty}^x \frac{\partial F(u, y+\delta)/\partial x - \partial F(u, y)/\partial x}{F_Y(y+\delta)-F_Y(y)}du\\
&amp;=&amp;  \int_{u=-\infty}^x \lim_{\delta\rightarrow 0} \frac{(\partial F(u, y+\delta)/\partial x - \partial F(u, y)/\partial x)/\delta}{(F_Y(y+\delta)-F_Y(y))/\delta}du\\
&amp;=&amp; \textcolor{red}{\int_{u=-\infty}^x \frac{f(u, y)}{f_Y(y)} du}.
\end{eqnarray*}§svg§600§FALSE§</svg:desc>
          <draw:frame draw:style-name="gr2" draw:text-style-name="P4" draw:layer="layout" svg:width="20.561cm" svg:height="9.808cm" svg:x="2.039cm" svg:y="4.035cm">
            <draw:image xlink:href="Pictures/1004249D00002CA00000154AB75EE655135E93A2.svg" xlink:type="simple" xlink:show="embed" xlink:actuate="onLoad" draw:mime-type="image/svg+xml">
              <text:p/>
            </draw:image>
            <draw:image xlink:href="Pictures/10000001000003600000019CCB15BAA0BB8EC4B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frame presentation:style-name="pr5" draw:text-style-name="P1" draw:layer="layout" svg:width="25.2cm" svg:height="9.134cm" svg:x="0.3cm" svg:y="3.987cm" presentation:class="outline" presentation:user-transformed="true">
          <draw:text-box>
            <text:list text:style-name="L3">
              <text:list-item>
                <text:p><text:span text:style-name="T13">For example, </text:span></text:p>
              </text:list-item>
            </text:list>
          </draw:text-box>
        </draw:frame>
        <draw:g>
          <svg:title>TexMaths</svg:title>
          <svg:desc>20§latex§\begin{eqnarray*}
&amp; &amp;\Pr[X\leq 3\mid Y = 4] \\
&amp;=&amp; \int^{3}_{u=0} \frac{abe^{-au+4b}}{be^{-4b}} du = 1 - e^{-3a}.
\end{eqnarray*}§svg§600§FALSE§</svg:desc>
          <draw:g>
            <draw:path draw:style-name="gr6" draw:text-style-name="P10" draw:layer="layout" svg:width="10.439cm" svg:height="2.659cm" svg:x="1.396cm" svg:y="8.273cm" svg:viewBox="0 0 10440 2660" svg:d="M5221 2660c-1740 0-3481 0-5221 0 0-887 0-1773 0-2660 3480 0 6960 0 10440 0 0 887 0 1773 0 2660-1740 0-3479 0-5219 0z">
              <text:p/>
            </draw:path>
            <draw:path draw:style-name="gr7" draw:text-style-name="P11" draw:layer="layout" svg:width="0.413cm" svg:height="0.479cm" svg:x="2.634cm" svg:y="8.285cm" svg:viewBox="0 0 414 480" svg:d="M136 258c39 0 79 0 118 0 84 0 160-58 160-128 0-68-70-130-166-130-83 0-165 0-248 0 0 7 0 15 0 22 6 0 12 0 18 0 54 0 54 8 54 32 0 123 0 246 0 370 0 26 0 34-54 34-6 0-12 0-18 0 0 7 0 14 0 22 26-2 78-2 104-2s80 0 104 2c0-8 0-15 0-22-5 0-11 0-16 0-56 0-56-8-56-34 0-56 0-111 0-166zM134 240c0-63 0-127 0-190 0-24 0-28 34-28 21 0 41 0 62 0 112 0 112 74 112 108s0 110-112 110c-32 0-64 0-96 0z">
              <text:p/>
            </draw:path>
            <draw:path draw:style-name="gr7" draw:text-style-name="P11" draw:layer="layout" svg:width="0.235cm" svg:height="0.311cm" svg:x="3.108cm" svg:y="8.453cm" svg:viewBox="0 0 236 312" svg:d="M98 78c0-26 0-52 0-78-33 3-65 5-98 8 0 7 0 15 0 22 50 0 54 6 54 40 0 63 0 125 0 188 0 32-6 32-54 32 0 7 0 14 0 22 28-2 60-2 80-2 28 0 62 0 90 2 0-8 0-15 0-22-5 0-11 0-16 0-52 0-52-8-52-34 0-36 0-72 0-108 0-70 28-132 82-132 6 0 6 0 8 0-2 2-16 10-16 28 0 20 14 30 30 30 12 0 30-8 30-30s-22-44-52-44c-52 0-76 48-86 78z">
              <text:p/>
            </draw:path>
            <draw:path draw:style-name="gr7" draw:text-style-name="P11" draw:layer="layout" svg:width="0.095cm" svg:height="0.702cm" svg:x="3.446cm" svg:y="8.237cm" svg:viewBox="0 0 96 703" svg:d="M96 703c0-9 0-19 0-29-23 0-45 0-68 0 0-216 0-431 0-646 23 0 45 0 68 0 0-9 0-19 0-28-32 0-64 0-96 0 0 234 0 469 0 703 32 0 64 0 96 0z">
              <text:p/>
            </draw:path>
            <draw:path draw:style-name="gr7" draw:text-style-name="P11" draw:layer="layout" svg:width="0.577cm" svg:height="0.479cm" svg:x="3.578cm" svg:y="8.285cm" svg:viewBox="0 0 578 480" svg:d="M322 190c-20-47-40-93-60-140-2-4-1-5-2-8 0-4 12-18 40-20 8-2 14-2 14-14 0-8-8-8-10-8-28 0-58 2-88 2-18 0-62-2-80-2-4 0-12 0-12 14 0 8 8 8 16 8 42 0 46 6 54 22 27 65 55 131 82 196-49 53-99 106-148 160-3 2-7 5-10 8-34 36-66 48-102 50-10 0-16 0-16 14 3 2 0 8 8 8 22 0 46-2 66-2 26 0 54 2 80 2 4 0 12 0 12-14 0-8-6-8-8-8-6-2-28-2-28-22 0-12 10-22 18-32 24-26 48-51 72-76 21-23 43-46 64-68 23 56 47 112 70 168 4 8 4 8 4 10 0 4-14 16-40 20-8 0-14 2-14 12s8 10 10 10c20 0 68-2 88-2 18 0 60 2 78 2 6 0 14 0 14-14 0-8-8-8-12-8-48-2-50-4-62-32-26-64-74-174-90-216 48-50 122-134 144-152 20-18 48-34 90-36 8-2 14-2 14-14 0-2 0-8-8-8-22 0-44 2-66 2-26 0-52-2-78-2-4 0-14 0-14 14 0 4 4 6 8 8 8 0 28 2 28 22 0 8-6 18-12 24-38 41-76 81-114 122z">
              <text:p/>
            </draw:path>
            <draw:path draw:style-name="gr7" draw:text-style-name="P11" draw:layer="layout" svg:width="0.429cm" svg:height="0.543cm" svg:x="4.449cm" svg:y="8.317cm" svg:viewBox="0 0 430 544" svg:d="M416 30c8-4 14-6 14-16 0-8-6-14-14-14-4 0-10 4-14 4-129 61-259 123-388 184-12 6-14 10-14 16s4 12 14 16c129 60 259 121 388 182 10 6 12 6 14 6 6 0 14-6 14-14s-4-12-16-16c-123-58-245-116-368-174 123-58 247-116 370-174zM404 544c12 0 26 0 26-14s-16-14-26-14c-126 0-252 0-378 0-12 0-26 0-26 14s12 14 24 14c127 0 253 0 380 0z">
              <text:p/>
            </draw:path>
            <draw:path draw:style-name="gr7" draw:text-style-name="P11" draw:layer="layout" svg:width="0.291cm" svg:height="0.481cm" svg:x="5.161cm" svg:y="8.297cm" svg:viewBox="0 0 292 482" svg:d="M176 220c56-18 98-68 98-124 0-58-62-96-130-96-70 0-124 42-124 96 0 22 16 36 36 36 22 0 36-16 36-36 0-36-34-36-44-36 22-34 68-42 94-42 28 0 66 14 66 78 0 8 0 48-18 80-22 34-46 36-64 36-4 2-22 2-26 2-6 2-12 2-12 8 0 8 6 8 18 8 10 0 20 0 30 0 58 0 84 48 84 118 0 94-48 116-80 116-30 0-82-12-106-54 24 4 46-12 46-38s-20-40-40-40c-16 0-40 10-40 40 0 64 66 110 142 110 86 0 150-64 150-134 0-58-44-114-116-128z">
              <text:p/>
            </draw:path>
            <draw:path draw:style-name="gr7" draw:text-style-name="P11" draw:layer="layout" svg:width="0.027cm" svg:height="0.702cm" svg:x="5.763cm" svg:y="8.237cm" svg:viewBox="0 0 28 703" svg:d="M28 26c0-12 0-26-14-26s-14 14-14 26c0 217 0 434 0 652 0 12 0 25 14 25s14-13 14-25c0-218 0-435 0-652z">
              <text:p/>
            </draw:path>
            <draw:path draw:style-name="gr7" draw:text-style-name="P11" draw:layer="layout" svg:width="0.509cm" svg:height="0.479cm" svg:x="6.095cm" svg:y="8.285cm" svg:viewBox="0 0 510 480" svg:d="M394 80c3-3 7-7 10-10 20-22 44-46 92-48 8-2 14-2 14-14 0-6-4-8-10-8-18 0-38 2-56 2-24 0-48-2-72-2-4 0-12 0-12 12 0 8 6 10 10 10 6 0 26 0 26 16 0 12-16 30-20 34-54 62-108 124-162 186-26-69-52-139-78-208-4-10-3-8-4-12 0-16 34-16 42-16 10 0 16 0 16-14 0-8-8-8-10-8-20 0-70 2-88 2s-62-2-80-2c-4 0-12 0-12 14 0 8 6 8 16 8 42 0 44 6 50 24 29 77 57 153 86 230 2 2 4 10 4 12s-28 116-32 128c-8 38-10 40-66 42-14 0-18 0-18 14 0 8 5 5 8 8 20 0 70-2 90-2s70 2 90 2c4 0 12 0 12-14 0-8-6-8-18-8-2 0-16 0-28-2-14-2-18-2-18-12 0-4 6-28 10-44 8-33 16-66 24-98 4-14 4-16 10-22 58-67 116-133 174-200z">
              <text:p/>
            </draw:path>
            <draw:path draw:style-name="gr7" draw:text-style-name="P11" draw:layer="layout" svg:width="0.465cm" svg:height="0.163cm" svg:x="6.869cm" svg:y="8.50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1" draw:layer="layout" svg:width="0.309cm" svg:height="0.475cm" svg:x="7.591cm" svg:y="8.289cm" svg:viewBox="0 0 310 476" svg:d="M186 360c0 20 0 40 0 60 0 26 0 34-52 34-5 0-11 0-16 0 0 7 0 14 0 22 30-2 67-2 96-2s66 0 94 2c0-8 0-15 0-22-5 0-9 0-14 0-52 0-54-8-54-34 0-20 0-40 0-60 23 0 47 0 70 0 0-8 0-15 0-22-23 0-47 0-70 0 0-107 0-213 0-320 0-14 0-18-10-18-6 0-10 0-14 8-72 110-144 220-216 330 0 7 0 14 0 22 62 0 124 0 186 0zM190 338c-57 0-113 0-170 0 57-88 113-175 170-262 0 87 0 174 0 262z">
              <text:p/>
            </draw:path>
            <draw:path draw:style-name="gr7" draw:text-style-name="P11" draw:layer="layout" svg:width="0.095cm" svg:height="0.702cm" svg:x="7.937cm" svg:y="8.237cm" svg:viewBox="0 0 96 703" svg:d="M96 0c-32 0-64 0-96 0 0 9 0 19 0 28 23 0 45 0 68 0 0 215 0 430 0 646-23 0-45 0-68 0 0 10 0 20 0 29 32 0 64 0 96 0 0-234 0-469 0-703z">
              <text:p/>
            </draw:path>
            <draw:path draw:style-name="gr7" draw:text-style-name="P11" draw:layer="layout" svg:width="0.467cm" svg:height="0.163cm" svg:x="1.4cm" svg:y="10.062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621cm" svg:height="1.558cm" svg:x="2.65cm" svg:y="9.364cm" svg:viewBox="0 0 622 1559" svg:d="M34 1527c22 0 34-16 34-34 0-22-18-34-34-34-18 0-34 10-34 36 0 34 34 64 78 64 106 0 146-164 196-368 54-222 100-446 138-671 26-150 52-290 76-380 8-34 32-126 60-126 22 0 38 14 42 16-24 2-36 18-36 36 0 22 18 34 34 34 18 0 34-10 34-36 0-38-38-64-76-64-54 0-92 76-132 220-2 6-96 360-174 819-18 106-38 224-62 322-12 50-46 182-102 182-26 0-28-11-42-16z">
              <text:p/>
            </draw:path>
            <draw:path draw:style-name="gr7" draw:text-style-name="P11" draw:layer="layout" svg:width="0.225cm" svg:height="0.335cm" svg:x="3.34cm" svg:y="9.21cm" svg:viewBox="0 0 226 336" svg:d="M108 162c38 0 66 28 66 80 0 60-36 80-64 80-20 0-64-6-84-36 22 0 28-16 28-26 0-16-12-28-28-28-12 0-26 8-26 28 0 46 50 76 110 76 68 0 116-44 116-94 0-38-32-76-86-88 52-18 70-56 70-86 0-38-43-68-98-68s-98 26-98 66c0 18 12 26 26 26 16 0 26-10 26-24s-10-26-26-26c18-22 52-28 70-28 22 0 52 12 52 54 0 20-6 44-18 58-18 20-30 20-56 22-12 0-12 0-16 2-1 2-4 0-4 6s4 6 12 6c9 0 19 0 28 0z">
              <text:p/>
            </draw:path>
            <draw:path draw:style-name="gr7" draw:text-style-name="P11" draw:layer="layout" svg:width="0.285cm" svg:height="0.221cm" svg:x="3.024cm" svg:y="10.741cm" svg:viewBox="0 0 286 222" svg:d="M184 138c-2 10-6 28-8 30-8 14-28 40-58 40-34 0-34-32-34-40 0-28 12-64 26-100 4-10 8-18 8-24 0-26-22-44-48-44-48 0-70 68-70 76 0 6 6 6 8 6 6 0 8-2 8-8 12-40 34-60 54-60 8 0 12 6 12 18s-4 22-10 32c-26 68-26 82-26 96 0 8 0 32 18 46 14 12 34 16 52 16 30 0 46-16 64-32 10 32 42 32 48 32 18 0 30-10 40-26 10-18 12-32 18-48 0-8-5-5-8-8-8 0-8 2-12 16-6 24-16 52-36 52-12 0-16-10-16-24 0-8 4-26 8-38 2-14 8-34 10-44 4-15 8-29 12-44 2-12 8-34 8-36 0-10-8-16-16-16-18 0-22 14-26 30-9 34-17 68-26 102z">
              <text:p/>
            </draw:path>
            <draw:path draw:style-name="gr7" draw:text-style-name="P11" draw:layer="layout" svg:width="0.361cm" svg:height="0.131cm" svg:x="3.368cm" svg:y="10.769cm" svg:viewBox="0 0 362 132" svg:d="M342 24c8 0 20 0 20-12s-12-12-18-12c-109 0-217 0-326 0-8 0-18 0-18 12s10 12 18 12c108 0 216 0 324 0zM344 132c6 0 18 0 18-12s-12-12-20-12c-108 0-216 0-324 0-8 0-18 0-18 12s10 12 18 12c109 0 217 0 326 0z">
              <text:p/>
            </draw:path>
            <draw:path draw:style-name="gr7" draw:text-style-name="P11" draw:layer="layout" svg:width="0.227cm" svg:height="0.335cm" svg:x="3.79cm" svg:y="10.633cm" svg:viewBox="0 0 228 336" svg:d="M228 168c0-54-6-92-28-126-16-24-46-42-86-42-114 0-114 133-114 168s0 168 114 168 114-132 114-168zM114 322c-22 0-52-14-62-54-8-28-8-70-8-106s0-72 8-100c10-38 42-50 62-50 26 0 52 18 60 46 8 26 10 62 10 104 0 36 0 74-8 104-8 44-42 56-62 56z">
              <text:p/>
            </draw:path>
            <draw:path draw:style-name="gr7" draw:text-style-name="P11" draw:layer="layout" svg:width="0.321cm" svg:height="0.317cm" svg:x="4.309cm" svg:y="9.534cm" svg:viewBox="0 0 322 318" svg:d="M234 44c-14-26-34-44-66-44-82 0-168 104-168 206 0 66 38 112 92 112 14 0 50-2 92-52 6 28 30 52 64 52 24 0 40-16 52-38 12-26 22-68 22-70 0-8-8-8-10-8-6 0-8 4-10 14-12 46-24 86-52 86-20 0-22-18-22-32 0-16 2-20 10-52 8-30 8-36 14-62 9-33 17-67 26-100 6-20 6-20 6-24 0-12-10-18-22-18-16 0-26 16-28 30zM188 226c-4 14-4 14-14 26-32 40-60 50-80 50-36 0-44-38-44-66 0-34 22-122 38-154 22-40 54-66 82-66 44 0 54 57 54 62s0 8-2 10c-11 46-23 92-34 138z">
              <text:p/>
            </draw:path>
            <draw:path draw:style-name="gr7" draw:text-style-name="P11" draw:layer="layout" svg:width="0.257cm" svg:height="0.495cm" svg:x="4.685cm" svg:y="9.356cm" svg:viewBox="0 0 258 496" svg:d="M134 8c-3-3 0-8-8-8-16 0-68 6-86 8-6 0-14 2-14 14 0 8 6 8 18 8 32 0 34 6 34 12s-6 28-10 44c-19 76-39 152-58 228-8 36-10 48-10 72 0 66 36 110 88 110 84 0 170-104 170-206 0-64-38-112-94-112-32 0-60 20-82 42 17-71 35-141 52-212zM68 274c4-16 4-16 10-24 36-46 68-56 86-56 24 0 44 20 44 66 0 40-24 122-36 148-24 48-56 72-84 72-24 0-46-18-46-70 0-14 0-28 10-72 5-22 11-43 16-64z">
              <text:p/>
            </draw:path>
            <draw:path draw:style-name="gr7" draw:text-style-name="P11" draw:layer="layout" svg:width="0.269cm" svg:height="0.317cm" svg:x="4.985cm" svg:y="9.534cm" svg:viewBox="0 0 270 318" svg:d="M100 148c20 0 72-2 108-16 48-22 52-62 52-72 0-32-26-60-76-60-78 0-184 68-184 190 0 72 42 128 110 128 102 0 160-74 160-82 0-6-4-10-8-10s-4 2-10 8c-54 68-132 68-140 68-54 0-60-58-60-80 0-10 0-32 10-74 13 0 25 0 38 0zM66 132c28-106 100-116 118-116 34 0 52 20 52 44 0 72-112 72-140 72-10 0-20 0-30 0z">
              <text:p/>
            </draw:path>
            <draw:path draw:style-name="gr7" draw:text-style-name="P11" draw:layer="layout" svg:width="0.333cm" svg:height="0.023cm" svg:x="5.333cm" svg:y="9.454cm" svg:viewBox="0 0 334 24" svg:d="M314 24c8 0 20 0 20-12s-12-12-20-12c-98 0-196 0-294 0-8 0-20 0-20 12s12 12 20 12c98 0 196 0 294 0z">
              <text:p/>
            </draw:path>
            <draw:path draw:style-name="gr7" draw:text-style-name="P11" draw:layer="layout" svg:width="0.251cm" svg:height="0.221cm" svg:x="5.749cm" svg:y="9.372cm" svg:viewBox="0 0 252 222" svg:d="M178 30c-10-16-26-30-50-30-64 0-128 70-128 140 0 48 32 82 74 82 28 0 52-14 70-34 10 30 38 34 52 34 18 0 30-10 38-26 12-18 12-32 18-48 0-8-6-8-8-8-8 0-8 2-12 16-4 24-14 52-34 52-14 0-18-10-18-24 0-8 4-26 8-38 4-14 8-34 10-44 3-13 7-25 10-38 4-12 10-36 10-38 0-12-10-16-18-16s-18 6-22 20zM146 156c-2 14-14 24-24 32-4 4-24 20-46 20-18 0-36-12-36-48 0-26 14-80 26-100 22-38 48-46 62-46 34 0 44 38 44 44-1 2-2 4-2 6-8 31-16 61-24 92z">
              <text:p/>
            </draw:path>
            <draw:path draw:style-name="gr7" draw:text-style-name="P11" draw:layer="layout" svg:width="0.285cm" svg:height="0.221cm" svg:x="6.047cm" svg:y="9.372cm" svg:viewBox="0 0 286 222" svg:d="M186 138c-2 10-5 19-8 28-10 16-30 42-60 42-34 0-34-32-34-40 0-30 14-64 28-100 4-10 6-18 6-26 0-24-20-42-46-42-50 0-72 68-72 76 0 6 8 6 10 6 6 0 6-2 8-8 12-40 34-60 52-60 8 0 12 6 12 18 0 10-4 22-8 32-26 68-26 82-26 96 0 8 0 30 18 46 14 12 34 16 50 16 32 0 48-16 64-32 12 32 44 32 50 32 16 0 30-10 38-26 12-18 12-32 18-48 0-8-6-8-8-8-6 0-8 2-10 16-6 22-16 52-36 52-14 0-16-10-16-24 0-8 4-26 6-38 4-14 8-34 12-44 3-15 7-29 10-44 4-12 10-34 10-36 0-10-8-16-18-16-18 0-20 14-24 30-9 34-17 68-26 102z">
              <text:p/>
            </draw:path>
            <draw:path draw:style-name="gr7" draw:text-style-name="P11" draw:layer="layout" svg:width="0.361cm" svg:height="0.363cm" svg:x="6.391cm" svg:y="9.284cm" svg:viewBox="0 0 362 364" svg:d="M194 194c50 0 100 0 150 0 6 0 18 0 18-12s-10-12-18-12c-50 0-100 0-150 0 0-50 0-100 0-150 0-8 0-20-12-20s-12 12-12 20c0 50 0 100 0 150-51 0-101 0-152 0-6 0-18 0-18 12s12 12 18 12c51 0 101 0 152 0 0 50 0 101 0 152 0 6 0 18 12 18s12-12 12-18c0-51 0-102 0-152z">
              <text:p/>
            </draw:path>
            <draw:path draw:style-name="gr7" draw:text-style-name="P11" draw:layer="layout" svg:width="0.241cm" svg:height="0.331cm" svg:x="6.807cm" svg:y="9.258cm" svg:viewBox="0 0 242 332" svg:d="M242 250c0-6 0-12 0-18-19 0-37 0-56 0 0-73 0-145 0-218 0-10 0-14-10-14-6 0-8 0-12 6-55 75-109 151-164 226 0 6 0 12 0 18 49 0 97 0 146 0 0 14 0 28 0 42 0 16 0 22-40 22-5 0-9 0-14 0 0 6 0 12 0 18 24-2 56-2 74-2s50 0 74 2c0-6 0-12 0-18-5 0-9 0-14 0-40 0-40-6-40-22 0-14 0-28 0-42 19 0 37 0 56 0zM148 52c0 60 0 120 0 180-43 0-87 0-130 0 43-60 87-120 130-180z">
              <text:p/>
            </draw:path>
            <draw:path draw:style-name="gr7" draw:text-style-name="P11" draw:layer="layout" svg:width="0.199cm" svg:height="0.345cm" svg:x="7.101cm" svg:y="9.248cm" svg:viewBox="0 0 200 346" svg:d="M98 14c1-3 2-6 2-8s-2-6-8-6c-10 0-52 4-64 4-4 2-10 2-10 12 0 8 6 8 12 8 24 0 24 2 24 6s-4 24-8 34c-4 15-8 31-12 46-4 16-30 124-32 132-2 10-2 18-2 24 0 48 32 80 72 80 62 0 128-66 128-140 0-56-40-82-74-82-26 0-48 14-62 28 11-46 23-92 34-138zM72 332c-24 0-38-20-38-50 0-18 6-34 20-90 2-10 2-10 12-22 18-20 40-32 58-32 20 0 36 14 36 48 0 20-10 70-26 98-12 24-36 48-62 48z">
              <text:p/>
            </draw:path>
            <draw:path draw:style-name="gr7" draw:text-style-name="P11" draw:layer="layout" svg:width="3.07cm" svg:height="0.027cm" svg:x="4.279cm" svg:y="10.13cm" svg:viewBox="0 0 3071 28" svg:d="M1536 28c-512 0-1024 0-1536 0 0-9 0-19 0-28 1024 0 2048 0 3071 0 0 9 0 19 0 28-511 0-1023 0-1535 0z">
              <text:p/>
            </draw:path>
            <draw:path draw:style-name="gr7" draw:text-style-name="P11" draw:layer="layout" svg:width="0.257cm" svg:height="0.495cm" svg:x="5.033cm" svg:y="10.313cm" svg:viewBox="0 0 258 496" svg:d="M136 8c0-2 0-8-10-8-16 0-68 6-86 6-6 2-14 2-14 16 0 8 8 8 18 8 34 0 34 4 34 12 0 4-6 28-10 42-19 77-37 153-56 230-10 36-12 46-12 70 0 68 38 112 90 112 82 0 168-106 168-206 0-64-36-114-92-114-34 0-62 22-82 44 17-71 35-141 52-212zM68 274c6-16 6-18 12-26 34-46 66-56 84-56 26 0 44 22 44 66 0 42-24 122-36 150-22 46-56 72-82 72-24 0-48-20-48-72 0-12 0-26 12-70 5-22 9-43 14-64z">
              <text:p/>
            </draw:path>
            <draw:path draw:style-name="gr7" draw:text-style-name="P11" draw:layer="layout" svg:width="0.267cm" svg:height="0.319cm" svg:x="5.335cm" svg:y="10.489cm" svg:viewBox="0 0 268 320" svg:d="M98 150c20 0 72-2 108-16 48-22 52-64 52-74 0-30-26-60-74-60-78 0-184 70-184 192 0 72 40 128 110 128 100 0 158-76 158-84 0-4-4-8-8-8s-4 0-8 6c-56 70-132 70-142 70-54 0-60-60-60-82 0-8 0-30 10-72 13 0 25 0 38 0zM66 134c26-108 98-118 118-118 32 0 52 20 52 44 0 74-114 74-142 74-9 0-19 0-28 0z">
              <text:p/>
            </draw:path>
            <draw:path draw:style-name="gr7" draw:text-style-name="P11" draw:layer="layout" svg:width="0.331cm" svg:height="0.023cm" svg:x="5.683cm" svg:y="10.463cm" svg:viewBox="0 0 332 24" svg:d="M312 24c8 0 20 0 20-12s-12-12-20-12c-98 0-196 0-294 0-8 0-18 0-18 12s10 12 18 12c98 0 196 0 294 0z">
              <text:p/>
            </draw:path>
            <draw:path draw:style-name="gr7" draw:text-style-name="P11" draw:layer="layout" svg:width="0.241cm" svg:height="0.329cm" svg:x="6.087cm" svg:y="10.268cm" svg:viewBox="0 0 242 330" svg:d="M242 250c0-6 0-12 0-18-19 0-37 0-56 0 0-73 0-147 0-220 0-10 0-12-10-12-6 0-8 0-12 6-55 75-109 151-164 226 0 6 0 12 0 18 49 0 97 0 146 0 0 13 0 26 0 40 0 16 0 22-40 22-5 0-9 0-14 0 0 6 0 12 0 18 24 0 56-2 74-2s50 2 74 2c0-6 0-12 0-18-5 0-9 0-14 0-40 0-40-6-40-22 0-14 0-27 0-40 19 0 37 0 56 0zM148 52c0 60 0 120 0 180-43 0-87 0-130 0 43-60 87-120 130-180z">
              <text:p/>
            </draw:path>
            <draw:path draw:style-name="gr7" draw:text-style-name="P11" draw:layer="layout" svg:width="0.199cm" svg:height="0.345cm" svg:x="6.381cm" svg:y="10.258cm" svg:viewBox="0 0 200 346" svg:d="M98 14c1-3 1-5 2-8 0-2-2-6-8-6-10 0-52 4-64 4-4 0-10 2-10 12 0 6 6 6 12 6 24 0 24 4 24 8s-4 22-8 34c-4 15-8 31-12 46-4 16-30 124-32 130-2 12-2 18-2 24 0 50 32 82 72 82 62 0 128-68 128-140 0-58-40-82-74-82-26 0-48 14-62 26 11-45 23-91 34-136zM72 332c-24 0-38-22-38-50 0-18 6-36 20-90 2-10 2-12 12-22 18-22 40-32 58-32 20 0 36 14 36 48 0 20-12 70-26 98-12 24-36 48-62 48z">
              <text:p/>
            </draw:path>
            <draw:path draw:style-name="gr7" draw:text-style-name="P11" draw:layer="layout" svg:width="0.333cm" svg:height="0.495cm" svg:x="7.463cm" svg:y="9.832cm" svg:viewBox="0 0 334 496" svg:d="M334 8c-3-3 0-8-8-8-10 0-78 6-90 8-6 0-10 4-10 14 0 8 6 8 18 8 34 0 34 4 34 12-1 5-1 9-2 14-14 55-28 111-42 166-12-26-32-44-64-44-82 0-170 102-170 204 0 66 38 114 94 114 14 0 48-4 92-54 4 30 30 54 64 54 24 0 40-16 52-40s13-46 20-68c0-8-6-8-8-8-8 0-8 2-10 12-12 46-24 88-54 88-18 0-20-18-20-32 0-18 0-22 4-34 33-136 67-271 100-406zM188 404c-2 12-2 14-14 26-30 38-60 50-78 50-36 0-46-38-46-66 0-36 22-122 38-154 22-42 54-68 82-68 46 0 56 58 56 62s-2 8-2 12c-12 46-24 92-36 138z">
              <text:p/>
            </draw:path>
            <draw:path draw:style-name="gr7" draw:text-style-name="P11" draw:layer="layout" svg:width="0.361cm" svg:height="0.317cm" svg:x="7.821cm" svg:y="10.01cm" svg:viewBox="0 0 362 318" svg:d="M226 270c8 30 32 48 62 48 26 0 42-16 52-40 12-24 15-46 22-68 0-8-6-8-8-8-8 0-8 2-10 12-10 40-24 88-54 88-14 0-22-10-22-32 0-16 10-48 14-74 7-25 13-51 20-76 2-10 10-36 12-48 4-16 12-42 12-46 0-12-10-20-22-20-2 0-22 2-26 26-14 50-46 174-54 210 0 4-28 60-80 60-36 0-44-32-44-58 0-40 20-94 38-144 10-20 12-30 12-44 0-30-22-56-56-56-68 0-94 100-94 108 0 6 5 4 8 6 8 0 8-2 12-12 18-62 44-88 72-88 6 0 16 2 16 24 0 16-8 36-12 48-26 70-40 112-40 148 0 66 48 84 86 84 46 0 72-32 84-48z">
              <text:p/>
            </draw:path>
            <draw:path draw:style-name="gr7" draw:text-style-name="P11" draw:layer="layout" svg:width="0.467cm" svg:height="0.163cm" svg:x="8.437cm" svg:y="10.062cm" svg:viewBox="0 0 468 164" svg:d="M444 28c10 0 24 0 24-14s-14-14-22-14c-141 0-281 0-422 0-10 0-24 0-24 14s14 14 24 14c140 0 280 0 420 0zM446 164c8 0 22 0 22-14s-14-14-24-14c-140 0-280 0-420 0-10 0-24 0-24 14s14 14 24 14c141 0 281 0 422 0z">
              <text:p/>
            </draw:path>
            <draw:path draw:style-name="gr7" draw:text-style-name="P11" draw:layer="layout" svg:width="0.231cm" svg:height="0.467cm" svg:x="9.203cm" svg:y="9.852cm" svg:viewBox="0 0 232 468" svg:d="M144 18c0-16 0-18-16-18-44 44-106 44-128 44 0 7 0 15 0 22 14 0 56 0 92-18 0 121 0 242 0 364 0 26-2 34-66 34-7 0-15 0-22 0 0 7 0 14 0 22 24-2 86-2 114-2s90 0 114 2c0-8 0-15 0-22-7 0-15 0-22 0-64 0-66-8-66-34 0-132 0-263 0-394z">
              <text:p/>
            </draw:path>
            <draw:path draw:style-name="gr7" draw:text-style-name="P11" draw:layer="layout" svg:width="0.427cm" svg:height="0.027cm" svg:x="9.706cm" svg:y="10.13cm" svg:viewBox="0 0 428 28" svg:d="M404 28c12 0 24 0 24-14s-12-14-24-14c-127 0-253 0-380 0-12 0-24 0-24 14s12 14 24 14c127 0 253 0 380 0z">
              <text:p/>
            </draw:path>
            <draw:path draw:style-name="gr7" draw:text-style-name="P11" draw:layer="layout" svg:width="0.269cm" svg:height="0.317cm" svg:x="10.382cm" svg:y="10.01cm" svg:viewBox="0 0 270 318" svg:d="M100 148c20 0 72-2 106-16 50-22 54-64 54-74 0-30-28-58-76-58-78 0-184 68-184 190 0 72 42 128 110 128 102 0 160-76 160-84 0-4-4-8-8-8s-6 0-10 6c-54 70-132 70-140 70-54 0-62-60-62-82 0-8 2-30 12-72 13 0 25 0 38 0zM66 132c28-106 100-118 118-118 34 0 52 20 52 44 0 74-112 74-140 74-10 0-20 0-30 0z">
              <text:p/>
            </draw:path>
            <draw:path draw:style-name="gr7" draw:text-style-name="P11" draw:layer="layout" svg:width="0.331cm" svg:height="0.023cm" svg:x="10.73cm" svg:y="9.894cm" svg:viewBox="0 0 332 24" svg:d="M314 24c8 0 18 0 18-12s-10-12-18-12c-98 0-196 0-294 0-8 0-20 0-20 12s12 12 20 12c98 0 196 0 294 0z">
              <text:p/>
            </draw:path>
            <draw:path draw:style-name="gr7" draw:text-style-name="P11" draw:layer="layout" svg:width="0.227cm" svg:height="0.337cm" svg:x="11.142cm" svg:y="9.702cm" svg:viewBox="0 0 228 338" svg:d="M108 164c40 0 66 26 66 78 0 62-34 80-64 80-18 0-62-6-82-34 22-2 28-18 28-28 0-16-12-28-28-28-14 0-28 8-28 30 0 46 52 76 112 76 68 0 116-46 116-96 0-38-32-76-86-88 52-18 70-56 70-86 0-38-45-68-100-68s-96 28-96 66c0 18 12 26 26 26 16 0 24-10 24-24s-8-24-24-26c18-22 50-26 70-26 22 0 52 10 52 52 0 22-6 44-20 60-16 18-30 20-54 20-12 2-14 2-16 2-1 2-4 0-4 6 0 8 4 8 12 8 9 0 17 0 26 0z">
              <text:p/>
            </draw:path>
            <draw:path draw:style-name="gr7" draw:text-style-name="P11" draw:layer="layout" svg:width="0.251cm" svg:height="0.221cm" svg:x="11.426cm" svg:y="9.812cm" svg:viewBox="0 0 252 222" svg:d="M178 30c-10-16-26-30-50-30-64 0-128 70-128 140 0 48 32 82 74 82 28 0 52-14 70-34 10 30 38 34 52 34 18 0 30-10 38-26 12-18 18-46 18-48 0-8-6-8-8-8-8 0-8 2-12 16-6 24-14 52-36 52-12 0-16-10-16-24 0-8 4-26 8-38 4-14 8-34 10-44 3-13 7-25 10-38 4-12 10-36 10-38 0-12-10-16-18-16s-18 6-22 20zM146 156c-2 14-14 24-24 32-4 4-24 20-46 20-18 0-36-12-36-48 0-26 14-80 26-98 22-40 48-48 62-48 34 0 44 38 44 44 0 2-2 4-2 6-8 31-16 61-24 92z">
              <text:p/>
            </draw:path>
            <draw:path draw:style-name="gr7" draw:text-style-name="P11" draw:layer="layout" svg:width="0.073cm" svg:height="0.073cm" svg:x="11.798cm" svg:y="10.246cm" svg:viewBox="0 0 74 74" svg:d="M74 36c0-20-18-36-38-36s-36 16-36 36 16 38 36 38 38-18 38-38z">
              <text:p/>
            </draw:path>
          </draw:g>
        </draw:g>
        <draw:g>
          <svg:title>TexMaths</svg:title>
          <svg:desc>22§display§F(x,y) = 1 - e^{-ax} - e^{-by} + e^{-(ax+by)}, §svg§600§FALSE§</svg:desc>
          <draw:frame draw:style-name="gr2" draw:text-style-name="P4" draw:layer="layout" svg:width="13.05cm" svg:height="0.975cm" svg:x="1.663cm" svg:y="5.897cm">
            <draw:image xlink:href="Pictures/100071150000172D000001BC0A825619F9D49EBB.svg" xlink:type="simple" xlink:show="embed" xlink:actuate="onLoad" draw:mime-type="image/svg+xml">
              <text:p/>
            </draw:image>
            <draw:image xlink:href="Pictures/10000001000001C000000022992AA1DDDC3ADF06.png" xlink:type="simple" xlink:show="embed" xlink:actuate="onLoad" draw:mime-type="image/png"/>
          </draw:frame>
        </draw:g>
        <draw:frame draw:style-name="gr9" draw:text-style-name="P4" draw:layer="layout" svg:width="11.8cm" svg:height="5.303cm" svg:x="15.4cm" svg:y="4cm">
          <draw:image xlink:href="Pictures/10000001000008E900000401549FADA00E209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Density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9">Assume that </text:span><text:span text:style-name="T20">f</text:span><text:span text:style-name="T21">Y</text:span><text:span text:style-name="T19">(</text:span><text:span text:style-name="T20">y</text:span><text:span text:style-name="T22">) </text:span><text:span text:style-name="T23">≠</text:span><text:span text:style-name="T24"> 0 (resp., </text:span><text:span text:style-name="T25">f</text:span><text:span text:style-name="T26">X</text:span><text:span text:style-name="T27">(</text:span><text:span text:style-name="T25">x</text:span><text:span text:style-name="T27">) </text:span><text:span text:style-name="T28">≠</text:span><text:span text:style-name="T27"> 0), </text:span><text:span text:style-name="T13"><text:s/></text:span></text:p>
              </text:list-item>
            </text:list>
          </draw:text-box>
        </draw:frame>
        <draw:g>
          <svg:title>TexMaths</svg:title>
          <svg:desc>22§latex§\begin{eqnarray*}
f_{X\mid Y}(x, y) &amp;=&amp; \frac{f(x, y)}{f_Y(y)}\\
f_{Y\mid X}(x, y) &amp;=&amp; \frac{f(x, y)}{f_X(x)}.
\end{eqnarray*}§svg§600§FALSE§</svg:desc>
          <draw:frame draw:style-name="gr2" draw:text-style-name="P4" draw:layer="layout" svg:width="8.175cm" svg:height="3.96cm" svg:x="7.83cm" svg:y="5.601cm">
            <draw:image xlink:href="Pictures/1000DB1000000E85000007095369933F64B7B0A7.svg" xlink:type="simple" xlink:show="embed" xlink:actuate="onLoad" draw:mime-type="image/svg+xml">
              <text:p/>
            </draw:image>
            <draw:image xlink:href="Pictures/100000010000011900000088BF6685C5F6C44BF2.png" xlink:type="simple" xlink:show="embed" xlink:actuate="onLoad" draw:mime-type="image/png"/>
          </draw:frame>
        </draw:g>
        <draw:g>
          <svg:title>TexMaths</svg:title>
          <svg:desc>22§display§\mathbf{E}[X\mid Y = y] = \int_{x=-\infty}^{\infty} x\cdot f_{X\mid Y} (x, y) dx.§svg§600§FALSE§</svg:desc>
          <draw:frame draw:style-name="gr2" draw:text-style-name="P4" draw:layer="layout" svg:width="13.402cm" svg:height="1.808cm" svg:x="6.316cm" svg:y="10.777cm">
            <draw:image xlink:href="Pictures/100080B8000017CD00000337D28D0FEA3A6B25F1.svg" xlink:type="simple" xlink:show="embed" xlink:actuate="onLoad" draw:mime-type="image/svg+xml">
              <text:p/>
            </draw:image>
            <draw:image xlink:href="Pictures/10000001000001CD0000003EA0604F2433BAC5D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Uniform Distribution</text:p>
          </draw:text-box>
        </draw:frame>
        <draw:g>
          <draw:line draw:style-name="gr10" draw:text-style-name="P4" draw:layer="layout" svg:x1="3.6cm" svg:y1="3.5cm" svg:x2="3.6cm" svg:y2="8.5cm">
            <text:p/>
          </draw:line>
          <draw:line draw:style-name="gr11" draw:text-style-name="P4" draw:layer="layout" svg:x1="3cm" svg:y1="8.1cm" svg:x2="11.6cm" svg:y2="8.1cm">
            <text:p/>
          </draw:line>
          <draw:line draw:style-name="gr12" draw:text-style-name="P4" draw:layer="layout" svg:x1="3.6cm" svg:y1="8.1cm" svg:x2="6cm" svg:y2="8.1cm">
            <text:p/>
          </draw:line>
          <draw:line draw:style-name="gr12" draw:text-style-name="P4" draw:layer="layout" svg:x1="8.5cm" svg:y1="8.1cm" svg:x2="11.45cm" svg:y2="8.1cm">
            <text:p/>
          </draw:line>
          <draw:line draw:style-name="gr12" draw:text-style-name="P4" draw:layer="layout" svg:x1="6.1cm" svg:y1="6cm" svg:x2="8.5cm" svg:y2="6cm">
            <text:p/>
          </draw:line>
          <draw:line draw:style-name="gr13" draw:text-style-name="P4" draw:layer="layout" svg:x1="6.087cm" svg:y1="8.152cm" svg:x2="6.087cm" svg:y2="5.952cm">
            <text:p/>
          </draw:line>
          <draw:line draw:style-name="gr13" draw:text-style-name="P4" draw:layer="layout" svg:x1="8.487cm" svg:y1="8.152cm" svg:x2="8.487cm" svg:y2="5.952cm">
            <text:p/>
          </draw:line>
          <draw:line draw:style-name="gr13" draw:text-style-name="P4" draw:layer="layout" svg:x1="3.588cm" svg:y1="6.047cm" svg:x2="5.988cm" svg:y2="6.047cm">
            <text:p/>
          </draw:line>
          <draw:g>
            <svg:title>TexMaths</svg:title>
            <svg:desc>16§display§\frac{1}{b-a}§svg§600§FALSE§</svg:desc>
            <draw:frame draw:style-name="gr2" draw:text-style-name="P4" draw:layer="layout" svg:width="1.267cm" svg:height="1.187cm" svg:x="2.069cm" svg:y="5.393cm">
              <draw:image xlink:href="Pictures/10000EC900000319000002E7A211E40C596092AE.svg" xlink:type="simple" xlink:show="embed" xlink:actuate="onLoad" draw:mime-type="image/svg+xml">
                <text:p/>
              </draw:image>
              <draw:image xlink:href="Pictures/100000010000003C000000384F198161AE28C4BD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5.97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D0000000C29135911E38AB636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8.37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B000000134D0DDA78F6984A5C.png" xlink:type="simple" xlink:show="embed" xlink:actuate="onLoad" draw:mime-type="image/png"/>
            </draw:frame>
          </draw:g>
          <draw:line draw:style-name="gr10" draw:text-style-name="P4" draw:layer="layout" svg:x1="15.101cm" svg:y1="3.5cm" svg:x2="15.101cm" svg:y2="8.5cm">
            <text:p/>
          </draw:line>
          <draw:line draw:style-name="gr11" draw:text-style-name="P4" draw:layer="layout" svg:x1="14.501cm" svg:y1="8.1cm" svg:x2="23.101cm" svg:y2="8.1cm">
            <text:p/>
          </draw:line>
          <draw:line draw:style-name="gr12" draw:text-style-name="P4" draw:layer="layout" svg:x1="15.101cm" svg:y1="8.1cm" svg:x2="17.551cm" svg:y2="8.1cm">
            <text:p/>
          </draw:line>
          <draw:line draw:style-name="gr12" draw:text-style-name="P4" draw:layer="layout" svg:x1="20.014cm" svg:y1="5.974cm" svg:x2="22.964cm" svg:y2="5.974cm">
            <text:p/>
          </draw:line>
          <draw:line draw:style-name="gr12" draw:text-style-name="P4" draw:layer="layout" svg:x1="17.588cm" svg:y1="8.1cm" svg:x2="20.049cm" svg:y2="5.951cm">
            <text:p/>
          </draw:line>
          <draw:line draw:style-name="gr13" draw:text-style-name="P4" draw:layer="layout" svg:x1="19.988cm" svg:y1="8.152cm" svg:x2="19.988cm" svg:y2="5.952cm">
            <text:p/>
          </draw:line>
          <draw:line draw:style-name="gr13" draw:text-style-name="P4" draw:layer="layout" svg:x1="15.089cm" svg:y1="6.021cm" svg:x2="19.889cm" svg:y2="6.021cm">
            <text:p/>
          </draw:line>
          <draw:g>
            <svg:title>TexMaths</svg:title>
            <svg:desc>16§display§1§svg§600§FALSE§</svg:desc>
            <draw:frame draw:style-name="gr2" draw:text-style-name="P4" draw:layer="layout" svg:width="0.234cm" svg:height="0.373cm" svg:x="14.47cm" svg:y="5.894cm">
              <draw:image xlink:href="Pictures/1000033100000093000000EA5795EF8A37F00334.svg" xlink:type="simple" xlink:show="embed" xlink:actuate="onLoad" draw:mime-type="image/svg+xml">
                <text:p/>
              </draw:image>
              <draw:image xlink:href="Pictures/100000010000000B00000012247D6B5F55568087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17.471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D0000000C29135911E38AB636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19.871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B000000134D0DDA78F6984A5C.png" xlink:type="simple" xlink:show="embed" xlink:actuate="onLoad" draw:mime-type="image/png"/>
            </draw:frame>
          </draw:g>
        </draw:g>
        <draw:g>
          <svg:title>TexMaths</svg:title>
          <svg:desc>18§display§F(x) = \left\{\begin{array}{ll}
0 &amp; \mbox{ if } x\leq a,\\
\frac{x-a}{b-a} &amp; \mbox{ if } a\leq x\leq b,\\
1 &amp; \mbox{ if } x\geq b.
\end{array}
\right.§svg§600§FALSE§</svg:desc>
          <draw:frame draw:style-name="gr2" draw:text-style-name="P4" draw:layer="layout" svg:width="8.431cm" svg:height="2.322cm" svg:x="14.334cm" svg:y="9.191cm">
            <draw:image xlink:href="Pictures/10008EB90000124D0000050B284E2E128A3DCDAB.svg" xlink:type="simple" xlink:show="embed" xlink:actuate="onLoad" draw:mime-type="image/svg+xml">
              <text:p/>
            </draw:image>
            <draw:image xlink:href="Pictures/1000000100000162000000624907EB73DEB292AB.png" xlink:type="simple" xlink:show="embed" xlink:actuate="onLoad" draw:mime-type="image/png"/>
          </draw:frame>
        </draw:g>
        <draw:g>
          <svg:title>TexMaths</svg:title>
          <svg:desc>18§display§f(x) = \left\{\begin{array}{ll}
0 &amp; \mbox{ if } x\leq a,\\
\frac{1}{b-a} &amp; \mbox{ if } a\leq x\leq b,\\
0 &amp; \mbox{ if } x\geq b.
\end{array}
\right.§svg§600§FALSE§</svg:desc>
          <draw:frame draw:style-name="gr2" draw:text-style-name="P4" draw:layer="layout" svg:width="8.203cm" svg:height="2.275cm" svg:x="2.736cm" svg:y="9.192cm">
            <draw:image xlink:href="Pictures/10008264000011CE000004F10D503B321AE467A2.svg" xlink:type="simple" xlink:show="embed" xlink:actuate="onLoad" draw:mime-type="image/svg+xml">
              <text:p/>
            </draw:image>
            <draw:image xlink:href="Pictures/100000010000015900000060AB443D05AA3AD472.png" xlink:type="simple" xlink:show="embed" xlink:actuate="onLoad" draw:mime-type="image/png"/>
          </draw:frame>
        </draw:g>
        <draw:g>
          <svg:title>TexMaths</svg:title>
          <svg:desc>16§display§\mathbf{E}[X] = \int_a^b \frac{x}{b-a} dx = \frac{b^2-a^2}{2(b-a)} = \frac{b+a}{2}.§svg§600§FALSE§</svg:desc>
          <draw:frame draw:style-name="gr2" draw:text-style-name="P4" draw:layer="layout" svg:width="9.942cm" svg:height="1.467cm" svg:x="2.546cm" svg:y="11.848cm">
            <draw:image xlink:href="Pictures/10007D79000018470000039609F440179F9F216A.svg" xlink:type="simple" xlink:show="embed" xlink:actuate="onLoad" draw:mime-type="image/svg+xml">
              <text:p/>
            </draw:image>
            <draw:image xlink:href="Pictures/10000001000001D6000000450D3B703062521A48.png" xlink:type="simple" xlink:show="embed" xlink:actuate="onLoad" draw:mime-type="image/png"/>
          </draw:frame>
        </draw:g>
        <draw:g>
          <svg:title>TexMaths</svg:title>
          <svg:desc>16§display§\mathbf{E}[X^2] = \int_a^b \frac{x^2}{b-a} dx = \frac{b^3-a^3}{3(b-a)} = \frac{b^2+ab+a^2}{3}.§svg§600§FALSE§</svg:desc>
          <draw:frame draw:style-name="gr2" draw:text-style-name="P4" draw:layer="layout" svg:width="11.925cm" svg:height="1.467cm" svg:x="14.147cm" svg:y="11.851cm">
            <draw:image xlink:href="Pictures/10009FE400001D1E000003962F43BE92E5B116E7.svg" xlink:type="simple" xlink:show="embed" xlink:actuate="onLoad" draw:mime-type="image/svg+xml">
              <text:p/>
            </draw:image>
            <draw:image xlink:href="Pictures/10000001000002330000004581DC9A3516356EAC.png" xlink:type="simple" xlink:show="embed" xlink:actuate="onLoad" draw:mime-type="image/png"/>
          </draw:frame>
        </draw:g>
        <draw:g>
          <svg:title>TexMaths</svg:title>
          <svg:desc>16§display§\mathbf{Var}[X] = \mathbf{E}[X^2] - (\mathbf{E}[X])^2 = \frac{(b-a)^2}{12}.§svg§600§FALSE§</svg:desc>
          <draw:frame draw:style-name="gr2" draw:text-style-name="P4" draw:layer="layout" svg:width="9.618cm" svg:height="1.23cm" svg:x="9.108cm" svg:y="13.466cm">
            <draw:image xlink:href="Pictures/10005C270000177C0000030264DD5A93AE06E7D0.svg" xlink:type="simple" xlink:show="embed" xlink:actuate="onLoad" draw:mime-type="image/svg+xml">
              <text:p/>
            </draw:image>
            <draw:image xlink:href="Pictures/10000001000001C60000003A9A924324C9942D2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Distribution</text:p>
          </draw:text-box>
        </draw:frame>
        <draw:frame presentation:style-name="pr5" draw:text-style-name="P1" draw:layer="layout" svg:width="25.2cm" svg:height="9.134cm" svg:x="0.6cm" svg:y="3.6cm" presentation:class="outline" presentation:user-transformed="true">
          <draw:text-box>
            <text:list text:style-name="L3">
              <text:list-item>
                <text:p><text:span text:style-name="T29">Definition</text:span><text:span text:style-name="T13">. An exponential distribution with parameter </text:span><text:span text:style-name="T30">λ</text:span><text:span text:style-name="T27"> is given by the following probability distribution function: </text:span></text:p>
              </text:list-item>
            </text:list>
          </draw:text-box>
        </draw:frame>
        <draw:frame draw:style-name="gr2" draw:text-style-name="P4" draw:layer="layout" svg:width="8cm" svg:height="6.56cm" svg:x="3.462cm" svg:y="8.126cm">
          <draw:image xlink:href="Pictures/10000001000003CA0000031B82844C55EC89F850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6.37cm" svg:x="14.1cm" svg:y="8.227cm">
          <draw:image xlink:href="Pictures/10000001000003D00000030983B755FCA23E14B4.png" xlink:type="simple" xlink:show="embed" xlink:actuate="onLoad" draw:mime-type="image/png">
            <text:p/>
          </draw:image>
        </draw:frame>
        <draw:frame draw:style-name="gr14" draw:text-style-name="P14" draw:layer="layout" svg:width="3.2cm" svg:height="0.835cm" svg:x="21.9cm" svg:y="12.734cm">
          <draw:text-box>
            <text:p><text:span text:style-name="T31">wikipedia</text:span></text:p>
          </draw:text-box>
        </draw:frame>
        <draw:g>
          <svg:title>TexMaths</svg:title>
          <svg:desc>22§display§F(x) = \left\{\begin{array}{ll}
1 - e^{-\lambda x} &amp; \mbox{ for } x\geq 0,\\
0 &amp; \mbox{ otherwise.}
\end{array}§svg§600§FALSE§</svg:desc>
          <draw:g>
            <draw:path draw:style-name="gr6" draw:text-style-name="P10" draw:layer="layout" svg:width="10.856cm" svg:height="1.775cm" svg:x="6.695cm" svg:y="6.007cm" svg:viewBox="0 0 10857 1776" svg:d="M0 0c3619 0 7238 0 10857 0 0 592 0 1184 0 1776-3619 0-7238 0-10857 0 0-592 0-1184 0-1776z">
              <text:p/>
            </draw:path>
            <draw:path draw:style-name="gr7" draw:text-style-name="P11" draw:layer="layout" svg:width="0.549cm" svg:height="0.524cm" svg:x="6.684cm" svg:y="6.565cm" svg:viewBox="0 0 550 525" svg:d="M205 275c25 0 51 0 77 0 57 0 63 11 63 33 0 6 0 15-6 39 0 2-2 5-2 7 0 6 4 11 8 11 9 0 9-2 14-18 13-55 27-111 41-167 3-9 3-9 3-13-3-2-2-7-9-7-8 0-9 3-11 16-18 59-35 75-101 75-24 0-47 0-71 0 17-66 34-132 51-198 6-27 6-29 42-29 33 0 67 0 101 0 94 0 112 24 112 84 0 17 0 22-2 41 0 11 0 14 0 16s2 9 9 9c8 0 8-5 11-20 5-45 10-90 15-134 2-20-2-20-22-20-126 0-252 0-378 0-16 0-22 0-22 15 0 9 6 9 19 9 29 0 51 0 51 13 0 5 0 5-2 20-35 136-69 271-104 407-6 31-8 37-70 37-13 0-22 0-22 15 0 9 11 9 13 9 22 0 79-2 101-2 27 0 91 2 115 2 9 0 17 0 17-15 0-7-4-7-4-9-2 0-4 0-22 0s-22 0-40-2c-24-2-26-4-26-15 0-3 0-7 4-18 16-64 31-128 47-191z">
              <text:p/>
            </draw:path>
            <draw:path draw:style-name="gr7" draw:text-style-name="P11" draw:layer="layout" svg:width="0.177cm" svg:height="0.773cm" svg:x="7.337cm" svg:y="6.51cm" svg:viewBox="0 0 178 774" svg:d="M178 765c0-2 0-5-13-18-97-96-121-241-121-360 0-134 29-268 123-365 11-9 11-11 11-13 0-7-2-9-6-9-9 0-80 53-124 152-39 83-48 169-48 235 0 59 7 154 51 239 46 97 112 148 121 148 4 0 6-5 6-9z">
              <text:p/>
            </draw:path>
            <draw:path draw:style-name="gr7" draw:text-style-name="P11" draw:layer="layout" svg:width="0.384cm" svg:height="0.351cm" svg:x="7.584cm" svg:y="6.747cm" svg:viewBox="0 0 385 352" svg:d="M235 110c5-20 22-92 77-92 3 0 22 0 38 11-22 4-38 22-38 41 0 11 9 27 31 27 16 0 42-13 42-44 0-42-46-53-73-53-44 0-72 42-81 59-20-50-62-59-84-59-79 0-125 101-125 121 0 6 9 6 11 6 7 0 9-2 9-8 26-82 77-101 103-101 16 0 42 6 42 52 0 25-13 75-42 183-11 48-39 81-72 81-5 0-22 0-40-11 20-2 37-20 37-42 0-19-17-26-28-26-24 0-42 20-42 44 0 37 37 53 73 53 50 0 77-55 81-60 9 29 35 60 81 60 82 0 126-101 126-121 0-7-7-7-11-7-7 0-7 2-9 9-26 81-79 101-103 101-31 0-42-24-42-50 0-18 4-36 13-69 9-35 18-70 26-105z">
              <text:p/>
            </draw:path>
            <draw:path draw:style-name="gr7" draw:text-style-name="P11" draw:layer="layout" svg:width="0.179cm" svg:height="0.773cm" svg:x="8.046cm" svg:y="6.51cm" svg:viewBox="0 0 180 774" svg:d="M180 387c0-60-8-154-50-242-46-94-115-145-121-145-5 0-9 4-9 9 0 2 0 4 15 17 75 77 119 200 119 361 0 132-28 268-123 365-11 8-11 11-11 13 0 4 4 9 9 9 6 0 77-53 123-152 40-86 48-171 48-235z">
              <text:p/>
            </draw:path>
            <draw:path draw:style-name="gr7" draw:text-style-name="P11" draw:layer="layout" svg:width="0.514cm" svg:height="0.179cm" svg:x="8.56cm" svg:y="6.807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377cm" svg:height="1.852cm" svg:x="9.434cm" svg:y="5.969cm" svg:viewBox="0 0 378 1853" svg:d="M222 1180c0-35 0-92-50-154-29-39-73-74-128-98 152-73 178-185 178-229 0-148 0-296 0-444 0-48 0-147 150-220 6-4 6-6 6-17 0-16 0-18-17-18-11 0-13 0-33 11-77 37-152 99-170 191-2 18-2 24-2 75 0 119 0 237 0 356 0 24 0 66 0 73-6 81-55 151-143 200-11 8-13 8-13 22 0 13 2 13 13 19 51 29 126 84 141 181 2 17 2 19 2 28 0 152 0 305 0 457 0 112 79 185 174 231 18 9 20 9 31 9 15 0 17 0 17-18 0-11-2-13-8-15-31-16-130-66-148-178 0-11 0-20 0-66 0-132 0-264 0-396z">
              <text:p/>
            </draw:path>
            <draw:path draw:style-name="gr7" draw:text-style-name="P11" draw:layer="layout" svg:width="0.254cm" svg:height="0.513cm" svg:x="10.368cm" svg:y="6.108cm" svg:viewBox="0 0 255 514" svg:d="M158 20c0-18 0-20-17-20-49 51-117 51-141 51 0 8 0 16 0 24 15 0 62 0 101-22 0 133 0 266 0 400 0 28-2 37-72 37-8 0-17 0-25 0 0 8 0 16 0 24 27-2 95-2 126-2s99 0 125 2c0-8 0-16 0-24-8 0-16 0-24 0-70 0-73-9-73-37 0-145 0-289 0-433z">
              <text:p/>
            </draw:path>
            <draw:path draw:style-name="gr7" draw:text-style-name="P11" draw:layer="layout" svg:width="0.47cm" svg:height="0.03cm" svg:x="10.923cm" svg:y="6.413cm" svg:viewBox="0 0 471 31" svg:d="M444 31c14 0 27 0 27-16 0-15-13-15-27-15-139 0-278 0-418 0-13 0-26 0-26 15 0 16 13 16 26 16 140 0 279 0 418 0z">
              <text:p/>
            </draw:path>
            <draw:path draw:style-name="gr7" draw:text-style-name="P11" draw:layer="layout" svg:width="0.296cm" svg:height="0.348cm" svg:x="11.666cm" svg:y="6.281cm" svg:viewBox="0 0 297 349" svg:d="M108 163c24 0 81-3 119-18 55-24 59-68 59-79 0-35-31-66-84-66-85 0-202 75-202 209 0 79 46 140 121 140 110 0 176-81 176-92 0-4-4-9-9-9-4 0-6 3-11 7-61 77-145 77-154 77-61 0-68-64-68-90 0-9 2-33 13-79 13 0 27 0 40 0zM73 145c30-116 110-127 129-127 36 0 58 22 58 48 0 79-124 79-157 79-10 0-20 0-30 0z">
              <text:p/>
            </draw:path>
            <draw:path draw:style-name="gr7" draw:text-style-name="P11" draw:layer="layout" svg:width="0.364cm" svg:height="0.025cm" svg:x="12.049cm" svg:y="6.193cm" svg:viewBox="0 0 365 26" svg:d="M343 26c9 0 22 0 22-13s-11-13-22-13c-107 0-214 0-321 0-9 0-22 0-22 13s13 13 22 13c107 0 214 0 321 0z">
              <text:p/>
            </draw:path>
            <draw:path draw:style-name="gr7" draw:text-style-name="P11" draw:layer="layout" svg:width="0.296cm" svg:height="0.381cm" svg:x="12.513cm" svg:y="5.967cm" svg:viewBox="0 0 297 382" svg:d="M178 220c29 61 60 140 64 147 11 13 20 13 29 13 3 0 7 0 11 0 11 0 15 0 15-6 0-3 0-5-2-5-7-6-11-20-13-24-44-104-88-208-132-312-5-9-16-33-73-33-7 0-13 0-13 7 0 6 4 8 6 8 14 3 22 3 36 33 22 51 44 101 66 152-54 48-107 97-161 145-7 4-11 9-11 18 0 13 11 19 20 19s15-8 17-8c47-52 94-103 141-154z">
              <text:p/>
            </draw:path>
            <draw:path draw:style-name="gr7" draw:text-style-name="P11" draw:layer="layout" svg:width="0.289cm" svg:height="0.243cm" svg:x="12.865cm" svg:y="6.103cm" svg:viewBox="0 0 290 244" svg:d="M110 182c-7 18-24 47-51 47-2 0-17 0-30-7 24-7 24-26 24-31 0-11-9-20-22-20s-31 14-31 33c0 27 31 40 57 40 27 0 49-15 62-37 13 28 42 37 64 37 61 0 94-68 94-84 0-6-6-6-9-6-6 0-6 2-8 9-11 37-44 66-75 66-22 0-33-14-33-36 0-13 13-63 28-123 11-41 36-55 53-55 10 3 18 0 29 9-18 5-24 20-24 29 0 11 9 20 22 20 12 0 30-11 30-33 0-31-35-40-57-40-26 0-48 18-59 40-11-22-35-40-66-40-60 0-95 66-95 84 0 6 6 4 9 6 7 0 9-2 11-9 13-41 48-66 75-66 17 0 31 11 31 36 0 11-7 39-11 57-6 25-12 50-18 74z">
              <text:p/>
            </draw:path>
            <draw:path draw:style-name="gr7" draw:text-style-name="P11" draw:layer="layout" svg:width="0.248cm" svg:height="0.544cm" svg:x="14.286cm" svg:y="6.077cm" svg:viewBox="0 0 249 545" svg:d="M110 213c0-30 0-60 0-90 0-68 35-105 70-105 3 0 14 0 25 6-9 2-22 13-22 31s13 35 33 35c22 0 33-17 33-35 0-29-29-55-69-55-55 0-121 42-121 123 0 30 0 60 0 90-19 0-39 0-59 0 0 8 0 16 0 24 20 0 40 0 59 0 0 83 0 166 0 249 0 35-6 35-59 35 0 8 0 16 0 24 31 0 66-2 88-2 31 0 68 0 99 2 0-8 0-16 0-24-6 0-12 0-18 0-57 0-57-9-57-35 0-83 0-166 0-249 30 0 59 0 88 0 0-8 0-16 0-24-30 0-60 0-90 0z">
              <text:p/>
            </draw:path>
            <draw:path draw:style-name="gr7" draw:text-style-name="P11" draw:layer="layout" svg:width="0.342cm" svg:height="0.353cm" svg:x="14.517cm" svg:y="6.277cm" svg:viewBox="0 0 343 354" svg:d="M343 180c0-99-77-180-171-180-97 0-172 84-172 180 0 99 81 174 172 174 92 0 171-75 171-174zM172 334c-33 0-66-15-88-50-20-36-20-82-20-110 0-31 0-73 20-106 19-35 57-53 88-53 33 0 67 18 88 51 20 33 19 79 19 108 0 28 0 70-17 103-18 35-51 57-90 57z">
              <text:p/>
            </draw:path>
            <draw:path draw:style-name="gr7" draw:text-style-name="P11" draw:layer="layout" svg:width="0.259cm" svg:height="0.34cm" svg:x="14.904cm" svg:y="6.281cm" svg:viewBox="0 0 260 341" svg:d="M108 84c0-28 0-56 0-84-36 3-72 6-108 9 0 8 0 16 0 24 55 0 59 4 59 42 0 69 0 137 0 206 0 35-8 35-59 35 0 9 0 17 0 25 31 0 66-3 88-3 31 0 68 0 99 3 0-8 0-16 0-25-6 0-12 0-18 0-57 0-57-8-57-35 0-39 0-79 0-118 0-77 31-145 90-145 5 0 7 0 9 0-2 0-17 8-17 30 0 20 15 33 33 33 13 0 33-11 33-35s-25-46-58-46c-57 0-83 51-94 84z">
              <text:p/>
            </draw:path>
            <draw:path draw:style-name="gr7" draw:text-style-name="P11" draw:layer="layout" svg:width="0.384cm" svg:height="0.348cm" svg:x="15.465cm" svg:y="6.281cm" svg:viewBox="0 0 385 349" svg:d="M235 108c5-20 22-90 77-90 5 0 22 0 40 8-22 5-37 25-37 42 0 13 8 27 28 27 18 0 42-14 42-44 0-40-46-51-73-51-44 0-70 40-81 59-18-52-59-59-81-59-82 0-126 99-126 119 0 6 7 6 9 6 7 0 9 0 11-6 26-84 77-101 103-101 14 0 42 6 42 50 0 24-13 77-42 185-13 46-39 79-74 79-5 0-22 0-38-9 20-4 35-20 35-42s-15-28-28-28c-22 0-42 22-42 46 0 35 40 50 73 50 50 0 79-54 81-59 9 29 37 59 84 59 79 0 123-98 123-118 0-9-7-9-9-9-7 0-9 4-11 9-24 83-77 101-101 101-31 0-44-24-44-51 0-17 4-33 13-68s18-70 26-105z">
              <text:p/>
            </draw:path>
            <draw:path draw:style-name="gr7" draw:text-style-name="P11" draw:layer="layout" svg:width="0.472cm" svg:height="0.595cm" svg:x="16.162cm" svg:y="6.132cm" svg:viewBox="0 0 473 596" svg:d="M458 240c11-5 15-9 15-16 0-9-2-13-15-20-143-66-285-133-427-200-9-4-13-4-16-4-8 0-15 7-15 15 0 9 7 14 15 16 136 64 272 127 407 191-135 64-269 127-404 191-16 7-18 13-18 18 0 9 9 15 15 15 5 0 5 0 16-4 142-68 284-135 427-202zM447 596c13 0 26 0 26-16 0-15-15-15-29-15-138 0-277 0-415 0-11 0-29 0-29 15 0 16 15 16 29 16 139 0 278 0 418 0z">
              <text:p/>
            </draw:path>
            <draw:path draw:style-name="gr7" draw:text-style-name="P11" draw:layer="layout" svg:width="0.325cm" svg:height="0.531cm" svg:x="16.945cm" svg:y="6.108cm" svg:viewBox="0 0 326 532" svg:d="M326 268c0-61-5-125-31-182-35-73-99-86-132-86-46 0-104 20-134 92-25 53-29 115-29 176 0 57 2 128 35 185 33 63 88 79 128 79 42 0 99-18 134-90 24-53 29-115 29-174zM163 514c-31 0-77-19-90-92-9-48-9-119-9-165 0-48 0-99 6-141 16-92 73-98 93-98 24 0 75 13 90 90 9 44 9 101 9 149 0 59 0 112-9 161-11 74-57 96-90 96z">
              <text:p/>
            </draw:path>
            <draw:path draw:style-name="gr7" draw:text-style-name="P11" draw:layer="layout" svg:width="0.089cm" svg:height="0.23cm" svg:x="17.368cm" svg:y="6.541cm" svg:viewBox="0 0 90 231" svg:d="M90 81c0-50-20-81-48-81-27 0-42 20-42 40 0 22 15 41 42 41 9 0 17-2 26-11 2 0 2-2 5-2 0 5 0 2 0 13 0 57-27 104-51 128-9 9-9 11-9 13 0 4 2 9 7 9 9 0 70-60 70-150z">
              <text:p/>
            </draw:path>
            <draw:path draw:style-name="gr7" draw:text-style-name="P11" draw:layer="layout" svg:width="0.325cm" svg:height="0.529cm" svg:x="10.329cm" svg:y="7.035cm" svg:viewBox="0 0 326 530" svg:d="M326 266c0-62-5-123-31-180-35-75-99-86-132-86-46 0-101 20-134 90-25 55-29 114-29 176 0 57 4 127 35 187 33 61 90 77 128 77 42 0 101-16 134-90 24-53 29-113 29-174zM163 514c-31 0-75-19-90-94-9-46-9-117-9-163 0-50 0-101 6-143 16-92 73-99 93-99 26 0 77 16 92 90 7 44 7 104 7 152 0 57 0 110-9 161-11 72-55 96-90 96z">
              <text:p/>
            </draw:path>
            <draw:path draw:style-name="gr7" draw:text-style-name="P11" draw:layer="layout" svg:width="0.342cm" svg:height="0.353cm" svg:x="14.282cm" svg:y="7.202cm" svg:viewBox="0 0 343 354" svg:d="M343 180c0-99-79-180-171-180-97 0-172 84-172 180 0 101 79 174 172 174 92 0 171-75 171-174zM172 336c-33 0-69-17-88-52-20-33-20-82-20-108 0-31 0-73 17-108 22-35 58-50 91-50s66 17 85 50c20 33 20 77 20 108 0 26 0 68-15 103-18 33-53 57-90 57z">
              <text:p/>
            </draw:path>
            <draw:path draw:style-name="gr7" draw:text-style-name="P11" draw:layer="layout" svg:width="0.241cm" svg:height="0.48cm" svg:x="14.66cm" svg:y="7.075cm" svg:viewBox="0 0 242 481" svg:d="M121 165c37 0 73 0 110 0 0-8 0-16 0-24-37 0-73 0-110 0 0-47 0-94 0-141-7 0-13 0-20 0-2 62-24 145-101 147 0 6 0 12 0 18 22 0 44 0 66 0 0 71 0 142 0 213 0 95 73 103 101 103 55 0 75-55 75-103 0-15 0-29 0-44-6 0-12 0-18 0 0 14 0 28 0 42 0 57-24 88-52 88-51 0-51-71-51-84 0-72 0-143 0-215z">
              <text:p/>
            </draw:path>
            <draw:path draw:style-name="gr7" draw:text-style-name="P11" draw:layer="layout" svg:width="0.386cm" svg:height="0.535cm" svg:x="14.972cm" svg:y="7.013cm" svg:viewBox="0 0 387 536" svg:d="M59 477c0 35-8 35-59 35 0 8 0 16 0 24 26-2 66-4 86-4s61 2 88 4c0-8 0-16 0-24-53 0-62 0-62-35 0-48 0-95 0-143 0-79 55-123 106-123 48 0 57 42 57 86 0 60 0 120 0 180 0 35-9 35-62 35 0 8 0 16 0 24 29-2 69-4 88-4 20 0 60 2 86 4 0-8 0-16 0-24-39 0-59 0-59-24 0-49 0-98 0-147 0-66 0-90-24-119-11-13-36-29-82-29-64 0-99 47-112 77 0-90 0-180 0-270-37 3-73 6-110 9 0 8 0 16 0 24 53 0 59 4 59 42 0 134 0 268 0 402z">
              <text:p/>
            </draw:path>
            <draw:path draw:style-name="gr7" draw:text-style-name="P11" draw:layer="layout" svg:width="0.298cm" svg:height="0.353cm" svg:x="15.397cm" svg:y="7.202cm" svg:viewBox="0 0 299 354" svg:d="M66 152c4-115 70-134 97-134 79 0 86 103 86 134-61 0-122 0-183 0zM66 167c72 0 144 0 216 0 15 0 17 0 17-15 0-77-42-152-136-152-90 0-163 79-163 176 0 103 81 178 172 178 94 0 127-86 127-99 0-9-4-11-9-11-6 0-8 7-11 11-26 81-96 81-103 81-40 0-70-24-88-52-22-38-22-88-22-117z">
              <text:p/>
            </draw:path>
            <draw:path draw:style-name="gr7" draw:text-style-name="P11" draw:layer="layout" svg:width="0.259cm" svg:height="0.342cm" svg:x="15.742cm" svg:y="7.207cm" svg:viewBox="0 0 260 343" svg:d="M106 86c0-29 0-57 0-86-36 3-71 6-106 9 0 8 0 16 0 24 53 0 59 4 59 44 0 69 0 138 0 207 0 35-8 35-59 35 0 8 0 16 0 24 29-2 66-5 88-5 31 0 66 0 97 5 0-8 0-16 0-24-5 0-10 0-16 0-57 0-59-9-59-38 0-39 0-79 0-118 0-77 33-145 92-145 5 0 7 0 9 0-4 2-20 11-20 30 0 22 18 33 36 33 13 0 33-7 33-33 0-25-25-48-58-48-57 0-85 53-96 86z">
              <text:p/>
            </draw:path>
            <draw:path draw:style-name="gr7" draw:text-style-name="P11" draw:layer="layout" svg:width="0.527cm" svg:height="0.34cm" svg:x="16.037cm" svg:y="7.215cm" svg:viewBox="0 0 528 341" svg:d="M464 73c13-38 38-49 64-49 0-8 0-16 0-24-15 2-40 2-55 2-22 0-57-2-73-2 0 8 0 16 0 24 29 0 44 16 44 38 0 4 0 6-2 15-23 66-47 132-70 198-26-72-52-144-77-216-2-8-5-11-5-13 0-22 31-22 47-22 0-8 0-16 0-24-22 0-62 2-82 2-22 0-44 0-68-2 0 8 0 16 0 24 29 0 42 2 48 11 5 5 14 29 18 44-22 62-44 125-66 187-24-69-48-138-73-207-4-8-4-11-4-13 0-22 31-22 46-22 0-8 0-16 0-24-24 0-68 2-86 2-2 0-44 0-70-2 0 8 0 16 0 24 37 0 46 2 57 27 32 91 65 183 97 274 4 11 5 16 15 16s14-5 16-16c26-72 53-145 79-217 26 73 53 146 79 219 2 9 6 14 16 14 9 0 11-7 15-14 30-85 60-169 90-254z">
              <text:p/>
            </draw:path>
            <draw:path draw:style-name="gr7" draw:text-style-name="P11" draw:layer="layout" svg:width="0.164cm" svg:height="0.515cm" svg:x="16.607cm" svg:y="7.033cm" svg:viewBox="0 0 165 516" svg:d="M110 174c-36 3-72 5-108 8 0 8 0 17 0 25 51 0 57 4 57 41 0 70 0 140 0 209 0 35-8 35-59 35 0 8 0 16 0 24 24-2 66-4 84-4 28 0 55 2 81 4 0-8 0-16 0-24-51 0-55-4-55-35 0-94 0-189 0-283zM114 40c0-25-19-40-41-40-25 0-40 20-40 40 0 22 15 41 40 41 22 0 41-17 41-41z">
              <text:p/>
            </draw:path>
            <draw:path draw:style-name="gr7" draw:text-style-name="P11" draw:layer="layout" svg:width="0.252cm" svg:height="0.353cm" svg:x="16.82cm" svg:y="7.202cm" svg:viewBox="0 0 253 354" svg:d="M136 196c18 4 80 15 80 72 0 40-27 70-86 70-66 0-93-43-108-109-2-11-4-14-11-14-11 0-11 5-11 20 0 34 0 68 0 101 0 13 0 18 9 18 4 0 4 0 20-16 2 0 2-2 15-17 35 33 68 33 86 33 88 0 123-51 123-106 0-41-22-66-31-74-26-25-57-31-90-38-42-9-95-17-95-61 0-29 20-60 88-60 84 0 88 69 91 93 0 6 6 6 8 6 9 0 9-2 9-17 0-26 0-52 0-77 0-13 0-20-6-20-5 0-7 0-16 9-2 4-11 11-13 13-31-22-62-22-73-22-94 0-125 53-125 95 0 28 13 48 33 65 26 20 48 25 103 36z">
              <text:p/>
            </draw:path>
            <draw:path draw:style-name="gr7" draw:text-style-name="P11" draw:layer="layout" svg:width="0.298cm" svg:height="0.353cm" svg:x="17.121cm" svg:y="7.202cm" svg:viewBox="0 0 299 354" svg:d="M66 152c4-115 68-134 95-134 79 0 88 103 88 134-61 0-122 0-183 0zM64 167c72 0 143 0 215 0 18 0 20 0 20-15 0-77-42-152-138-152-88 0-161 79-161 176 0 103 81 178 172 178 92 0 127-86 127-99 0-9-6-11-9-11-8 0-8 7-11 11-26 81-96 81-103 81-40 0-70-24-88-52-24-38-24-88-24-117z">
              <text:p/>
            </draw:path>
            <draw:path draw:style-name="gr7" draw:text-style-name="P11" draw:layer="layout" svg:width="0.08cm" svg:height="0.083cm" svg:x="17.511cm" svg:y="7.466cm" svg:viewBox="0 0 81 84" svg:d="M81 42c0-22-18-42-41-42-24 0-40 20-40 42s16 42 40 42c23 0 41-20 41-42z">
              <text:p/>
            </draw:path>
          </draw:g>
        </draw:g>
        <draw:frame draw:style-name="gr2" draw:text-style-name="P4" draw:layer="layout" svg:width="2.828cm" svg:height="0.564cm" draw:transform="rotate (1.5707963267949) translate (3.32cm 12.597cm)">
          <draw:image xlink:href="Pictures/10000000000001E1000000602DD713FE193946CE.png" xlink:type="simple" xlink:show="embed" xlink:actuate="onLoad" draw:mime-type="image/png">
            <text:p/>
          </draw:image>
          <svg:title>TexMaths</svg:title>
          <svg:desc>14§display§f(x) = \lambda e^{-\lambda x}§png§600§FALSE§</svg:desc>
        </draw:frame>
        <draw:frame draw:style-name="gr2" draw:text-style-name="P4" draw:layer="layout" svg:width="3.48cm" svg:height="0.564cm" draw:transform="rotate (1.5707963267949) translate (14.112cm 12.92cm)">
          <draw:image xlink:href="Pictures/100000000000025000000060E7B2099DD49A1270.png" xlink:type="simple" xlink:show="embed" xlink:actuate="onLoad" draw:mime-type="image/png">
            <text:p/>
          </draw:image>
          <svg:title>TexMaths</svg:title>
          <svg:desc>14§display§F(x) = 1-e^{-\lambda x}§png§600§FALSE§</svg:desc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Exponential Distribution</text:p>
          </draw:text-box>
        </draw:frame>
        <draw:g>
          <svg:title>TexMaths</svg:title>
          <svg:desc>20§display§\mathbf{E}[X] = \int_0^{\infty} t\lambda e^{-\lambda t} dt = \frac{1}{\lambda}.§svg§600§FALSE§</svg:desc>
          <draw:frame draw:style-name="gr2" draw:text-style-name="P4" draw:layer="layout" svg:width="8.192cm" svg:height="1.648cm" svg:x="5.173cm" svg:y="7.157cm">
            <draw:image xlink:href="Pictures/100042EE000010010000033985596E8248BF27F7.svg" xlink:type="simple" xlink:show="embed" xlink:actuate="onLoad" draw:mime-type="image/svg+xml">
              <text:p/>
            </draw:image>
            <draw:image xlink:href="Pictures/10000001000001360000003E011D1CA20C1994A5.png" xlink:type="simple" xlink:show="embed" xlink:actuate="onLoad" draw:mime-type="image/png"/>
          </draw:frame>
        </draw:g>
        <draw:frame draw:style-name="gr15" draw:text-style-name="P15" draw:layer="layout" svg:width="11.9cm" svg:height="1.2cm" svg:x="13.9cm" svg:y="7.4cm">
          <draw:text-box>
            <text:p><text:span text:style-name="T32">(Integration by parts or using Lemma 1)</text:span></text:p>
          </draw:text-box>
        </draw:frame>
        <draw:g>
          <svg:title>TexMaths</svg:title>
          <svg:desc>20§display§\mathbf{E}[X^2] = \int_0^{\infty} t^2\lambda e^{-\lambda t} dt = \frac{2}{\lambda^2}.§svg§600§FALSE§</svg:desc>
          <draw:frame draw:style-name="gr2" draw:text-style-name="P4" draw:layer="layout" svg:width="9.138cm" svg:height="1.648cm" svg:x="5.173cm" svg:y="9.557cm">
            <draw:image xlink:href="Pictures/10004F3F000011DA00000339F98E45CE211097A7.svg" xlink:type="simple" xlink:show="embed" xlink:actuate="onLoad" draw:mime-type="image/svg+xml">
              <text:p/>
            </draw:image>
            <draw:image xlink:href="Pictures/10000001000001590000003EC65D21505D95F169.png" xlink:type="simple" xlink:show="embed" xlink:actuate="onLoad" draw:mime-type="image/png"/>
          </draw:frame>
        </draw:g>
        <draw:g>
          <svg:title>TexMaths</svg:title>
          <svg:desc>20§display§\mathbf{Var}[X] = \mathbf{E}[X^2] - (\mathbf{E}[X])^2 = \frac{1}{\lambda^2}.§svg§600§FALSE§</svg:desc>
          <draw:frame draw:style-name="gr2" draw:text-style-name="P4" draw:layer="layout" svg:width="10.406cm" svg:height="1.486cm" svg:x="5.188cm" svg:y="12.038cm">
            <draw:image xlink:href="Pictures/10004ADA00001454000002E8E2B437AF975EED93.svg" xlink:type="simple" xlink:show="embed" xlink:actuate="onLoad" draw:mime-type="image/svg+xml">
              <text:p/>
            </draw:image>
            <draw:image xlink:href="Pictures/100000010000018900000038D88743BC6C8FC419.png" xlink:type="simple" xlink:show="embed" xlink:actuate="onLoad" draw:mime-type="image/png"/>
          </draw:frame>
        </draw:g>
        <draw:g>
          <svg:title>TexMaths</svg:title>
          <svg:desc>24§display§\textbf{Note:}\;\; \Pr[X &gt; t] = 1 - \Pr[X\leq t] = 1 - F(t) = e^{-\lambda t}.§svg§600§TRUE§</svg:desc>
          <draw:g>
            <draw:path draw:style-name="gr7" draw:text-style-name="P11" draw:layer="layout" svg:width="0.69cm" svg:height="0.575cm" svg:x="2.696cm" svg:y="4.582cm" svg:viewBox="0 0 691 576" svg:d="M221 10c-10-10-10-10-29-10-64 0-128 0-192 0 0 13 0 26 0 38 30 0 61 0 91 0 0 159 0 317 0 475 0 17-2 20-26 22-19 2-22 2-46 2-6 0-13 0-19 0 0 13 0 26 0 39 31-3 79-3 113-3 36 0 79 0 113 3 0-13 0-26 0-39-8 0-15 0-22 0-14 0-29-2-43-2-24-2-27-5-27-22 0-147 0-294 0-441 140 165 280 330 420 494 10 10 10 10 24 10 22 0 22-7 22-27 0-162 0-324 0-487 0-16 2-19 24-21 22-3 24-3 46-3 7 0 14 0 21 0 0-12 0-25 0-38-31 2-79 2-113 2-36 0-79 0-112-2 0 13 0 26 0 38 6 0 12 0 19 0 17 0 31 0 45 3 24 2 27 5 27 21 0 114 0 228 0 341-112-131-224-262-336-393z">
              <text:p/>
            </draw:path>
            <draw:path draw:style-name="gr7" draw:text-style-name="P11" draw:layer="layout" svg:width="0.429cm" svg:height="0.385cm" svg:x="3.45cm" svg:y="4.776cm" svg:viewBox="0 0 430 386" svg:d="M430 199c0-113-80-199-216-199-140 0-214 86-214 199 0 103 72 187 214 187 141 0 216-84 216-187zM214 353c-108 0-108-91-108-163 0-39 0-82 14-111 17-31 53-48 94-48 36 0 72 15 88 43 20 29 20 75 20 116 0 72 0 163-108 163z">
              <text:p/>
            </draw:path>
            <draw:path draw:style-name="gr7" draw:text-style-name="P11" draw:layer="layout" svg:width="0.304cm" svg:height="0.536cm" svg:x="3.925cm" svg:y="4.625cm" svg:viewBox="0 0 305 537" svg:d="M70 199c0 77 0 154 0 231 0 91 72 107 132 107 64 0 103-48 103-107 0-16 0-31 0-46-14 0-27 0-41 0 0 14 0 29 0 43 0 58-26 77-50 77-48 0-48-53-48-72 0-78 0-155 0-233 40 0 81 0 122 0 0-13 0-25 0-38-41 0-82 0-122 0 0-54 0-107 0-161-14 0-28 0-41 0 0 84-43 166-125 168 0 10 0 21 0 31 23 0 46 0 70 0z">
              <text:p/>
            </draw:path>
            <draw:path draw:style-name="gr7" draw:text-style-name="P11" draw:layer="layout" svg:width="0.388cm" svg:height="0.385cm" svg:x="4.311cm" svg:y="4.776cm" svg:viewBox="0 0 389 386" svg:d="M362 199c20 0 27 0 27-24 0-26-5-86-48-129-31-29-75-46-132-46-137 0-209 86-209 192 0 113 84 194 218 194 135 0 171-88 171-103 0-14-17-14-19-14-15 0-17 5-22 17-19 40-67 67-120 67-120 0-120-111-120-154 85 0 170 0 254 0zM108 170c0-31 2-67 19-96 22-33 55-43 82-43 98 0 98 111 101 139-68 0-135 0-202 0z">
              <text:p/>
            </draw:path>
            <draw:path draw:style-name="gr7" draw:text-style-name="P11" draw:layer="layout" svg:width="0.131cm" svg:height="0.371cm" svg:x="4.796cm" svg:y="4.786cm" svg:viewBox="0 0 132 372" svg:d="M132 65c0-36-28-65-65-65s-67 29-67 65 30 65 67 65 65-29 65-65zM132 307c0-36-28-65-65-65s-67 29-67 65 30 65 67 65 65-29 65-65z">
              <text:p/>
            </draw:path>
            <draw:path draw:style-name="gr7" draw:text-style-name="P11" draw:layer="layout" svg:width="0.496cm" svg:height="0.572cm" svg:x="5.636cm" svg:y="4.584cm" svg:viewBox="0 0 497 573" svg:d="M161 307c48 0 96 0 144 0 101 0 192-67 192-151 0-82-84-156-199-156-100 0-199 0-298 0 0 9 0 18 0 26 6 0 13 0 19 0 67 0 67 8 67 39 0 148 0 296 0 444 0 31 0 38-67 38-6 0-13 0-19 0 0 9 0 18 0 26 29-2 92-2 125-2 32 0 93 0 125 2 0-8 0-17 0-26-8 0-15 0-22 0-65 0-67-7-67-38 0-67 0-135 0-202zM158 286c0-76 0-151 0-226 0-29 3-34 44-34 24 0 49 0 74 0 134 0 134 89 134 130 0 38 0 130-134 130-39 0-78 0-118 0z">
              <text:p/>
            </draw:path>
            <draw:path draw:style-name="gr7" draw:text-style-name="P11" draw:layer="layout" svg:width="0.282cm" svg:height="0.371cm" svg:x="6.205cm" svg:y="4.786cm" svg:viewBox="0 0 283 372" svg:d="M118 94c0-32 0-63 0-94-40 3-79 6-118 10 0 8 0 17 0 26 58 0 65 5 65 48 0 75 0 150 0 226 0 36-10 36-65 36 0 8 0 17 0 26 31 0 72-2 96-2 34 0 72 0 106 2 0-9 0-18 0-26-6 0-12 0-17 0-63 0-65-8-65-39 0-43 0-86 0-129 0-84 36-159 101-159 5 0 7 0 9 0-2 3-19 12-19 34 0 24 17 36 36 36 15 0 36-9 36-36 0-28-26-53-62-53-63 0-94 58-103 94z">
              <text:p/>
            </draw:path>
            <draw:path draw:style-name="gr7" draw:text-style-name="P11" draw:layer="layout" svg:width="0.114cm" svg:height="0.841cm" svg:x="6.61cm" svg:y="4.527cm" svg:viewBox="0 0 115 842" svg:d="M115 842c0-11 0-22 0-33-27 0-54 0-81 0 0-259 0-517 0-775 27 0 54 0 81 0 0-12 0-23 0-34-38 0-77 0-115 0 0 281 0 561 0 842 38 0 77 0 115 0z">
              <text:p/>
            </draw:path>
            <draw:path draw:style-name="gr7" draw:text-style-name="P11" draw:layer="layout" svg:width="0.693cm" svg:height="0.572cm" svg:x="6.769cm" svg:y="4.584cm" svg:viewBox="0 0 694 573" svg:d="M386 228c-24-56-48-112-72-168-2-7-3-6-4-10 0-4 14-21 50-24 10-2 17-2 17-16 0-10-10-10-12-10-36 0-72 2-108 2-19 0-72-2-94-2-5 0-14 0-14 17 0 9 7 9 19 9 50 0 55 8 62 27 34 78 68 157 101 235-59 63-118 126-177 190-4 3-8 6-12 9-41 46-82 58-125 60-10 2-17 2-17 17 0 2 0 9 10 9 26 0 52-2 79-2 31 0 65 2 96 2 5 0 14 0 14-16 0-8-6-7-9-10-10 0-34-2-34-24 0-14 12-29 22-38 28-31 57-61 86-91 26-28 51-56 77-84 28 67 56 134 84 201 2 10 3 8 5 12 0 7-17 22-51 24-7 2-17 2-17 17 0 9 10 9 15 9 24 0 81-2 105-2 22 0 72 2 94 2 5 0 17 0 17-14 0-12-10-12-17-12-55 0-58-2-72-36-34-79-89-209-108-259 58-60 146-161 173-185 24-19 55-38 105-41 12-2 20-2 20-16 0-3 0-10-10-10-26 0-55 2-79 2-31 0-65-2-94-2-7 0-17 0-17 17 0 5 5 7 10 9 7 0 34 3 34 24 0 12-10 24-17 32-45 48-90 97-135 146z">
              <text:p/>
            </draw:path>
            <draw:path draw:style-name="gr7" draw:text-style-name="P11" draw:layer="layout" svg:width="0.513cm" svg:height="0.486cm" svg:x="7.815cm" svg:y="4.704cm" svg:viewBox="0 0 514 487" svg:d="M499 262c7-3 15-6 15-17s-8-15-15-19c-156-74-312-148-468-221-12-5-12-5-14-5-10 0-17 7-17 17 0 7 2 12 14 19 148 70 296 139 444 209-148 69-296 139-444 209-12 4-14 9-14 16 0 10 7 17 17 17 2 0 2 0 14-5 156-73 312-147 468-220z">
              <text:p/>
            </draw:path>
            <draw:path draw:style-name="gr7" draw:text-style-name="P11" draw:layer="layout" svg:width="0.258cm" svg:height="0.534cm" svg:x="8.653cm" svg:y="4.632cm" svg:viewBox="0 0 259 535" svg:d="M156 190c26 0 53 0 79 0 17 0 24 0 24-17 0-10-7-10-24-10-24 0-48 0-72 0 29-120 34-137 34-141 0-15-10-22-24-22-3 0-27 0-34 29-11 45-22 89-33 134-27 0-53 0-80 0-16 0-26 0-26 17 0 10 7 10 24 10 25 0 50 0 74 0-60 240-64 254-64 268 0 46 33 77 79 77 86 0 134-122 134-129 0-8-7-8-12-8-7 0-7 3-12 12-36 87-81 106-110 106-17 0-24-10-24-38 0-20 0-27 5-41 20-83 41-165 62-247z">
              <text:p/>
            </draw:path>
            <draw:path draw:style-name="gr7" draw:text-style-name="P11" draw:layer="layout" svg:width="0.114cm" svg:height="0.841cm" svg:x="8.958cm" svg:y="4.527cm" svg:viewBox="0 0 115 842" svg:d="M115 0c-38 0-77 0-115 0 0 11 0 22 0 34 27 0 54 0 82 0 0 258 0 516 0 775-28 0-55 0-82 0 0 11 0 22 0 33 38 0 77 0 115 0 0-281 0-561 0-842z">
              <text:p/>
            </draw:path>
            <draw:path draw:style-name="gr7" draw:text-style-name="P11" draw:layer="layout" svg:width="0.561cm" svg:height="0.196cm" svg:x="9.454cm" svg:y="4.851cm" svg:viewBox="0 0 562 197" svg:d="M533 34c12 0 29 0 29-17s-17-17-29-17c-168 0-336 0-504 0-12 0-29 0-29 17s17 17 29 17c168 0 336 0 504 0zM533 197c12 0 29 0 29-17s-17-17-29-17c-168 0-336 0-504 0-12 0-29 0-29 17s17 17 29 17c168 0 336 0 504 0z">
              <text:p/>
            </draw:path>
            <draw:path draw:style-name="gr7" draw:text-style-name="P11" draw:layer="layout" svg:width="0.277cm" svg:height="0.558cm" svg:x="10.374cm" svg:y="4.599cm" svg:viewBox="0 0 278 559" svg:d="M173 22c0-22 0-22-19-22-53 53-128 53-154 53 0 9 0 17 0 26 17 0 65 0 110-21 0 145 0 291 0 436 0 29-2 39-79 39-9 0-17 0-26 0 0 8 0 17 0 26 29-2 103-2 137-2 33 0 105 0 136 2 0-9 0-18 0-26-9 0-19 0-28 0-75 0-77-8-77-39 0-157 0-315 0-472z">
              <text:p/>
            </draw:path>
            <draw:path draw:style-name="gr7" draw:text-style-name="P11" draw:layer="layout" svg:width="0.515cm" svg:height="0.033cm" svg:x="10.976cm" svg:y="4.932cm" svg:viewBox="0 0 516 34" svg:d="M487 34c15 0 29 0 29-17s-14-17-29-17c-152 0-304 0-456 0-14 0-31 0-31 17s17 17 31 17c152 0 304 0 456 0z">
              <text:p/>
            </draw:path>
            <draw:path draw:style-name="gr7" draw:text-style-name="P11" draw:layer="layout" svg:width="0.496cm" svg:height="0.572cm" svg:x="11.78cm" svg:y="4.584cm" svg:viewBox="0 0 497 573" svg:d="M161 307c48 0 96 0 144 0 101 0 192-67 192-151 0-82-84-156-199-156-100 0-199 0-298 0 0 9 0 18 0 26 6 0 13 0 19 0 65 0 67 8 67 39 0 148 0 296 0 444 0 31-2 38-67 38-6 0-13 0-19 0 0 9 0 18 0 26 29-2 92-2 125-2 32 0 93 0 125 2 0-8 0-17 0-26-8 0-15 0-22 0-65 0-67-7-67-38 0-67 0-135 0-202zM158 286c0-76 0-151 0-226 0-29 3-34 41-34 26 0 51 0 77 0 134 0 134 89 134 130 0 38 0 130-134 130-39 0-78 0-118 0z">
              <text:p/>
            </draw:path>
            <draw:path draw:style-name="gr7" draw:text-style-name="P11" draw:layer="layout" svg:width="0.282cm" svg:height="0.371cm" svg:x="12.349cm" svg:y="4.786cm" svg:viewBox="0 0 283 372" svg:d="M115 94c0-32 0-63 0-94-38 3-77 6-115 10 0 8 0 17 0 26 58 0 65 5 65 48 0 75 0 150 0 226 0 36-10 36-65 36 0 8 0 17 0 26 31 0 72-2 96-2 34 0 72 0 106 2 0-9 0-18 0-26-6 0-12 0-17 0-63 0-65-8-65-39 0-43 0-86 0-129 0-84 36-159 101-159 5 0 5 0 7 0-2 3-19 12-19 34 0 24 19 36 36 36s38-9 38-36c0-28-26-53-62-53-63 0-94 58-106 94z">
              <text:p/>
            </draw:path>
            <draw:path draw:style-name="gr7" draw:text-style-name="P11" draw:layer="layout" svg:width="0.114cm" svg:height="0.841cm" svg:x="12.755cm" svg:y="4.527cm" svg:viewBox="0 0 115 842" svg:d="M115 842c0-11 0-22 0-33-27 0-54 0-81 0 0-259 0-517 0-775 27 0 54 0 81 0 0-12 0-23 0-34-38 0-77 0-115 0 0 281 0 561 0 842 38 0 77 0 115 0z">
              <text:p/>
            </draw:path>
            <draw:path draw:style-name="gr7" draw:text-style-name="P11" draw:layer="layout" svg:width="0.695cm" svg:height="0.572cm" svg:x="12.911cm" svg:y="4.584cm" svg:viewBox="0 0 696 573" svg:d="M386 228c-23-56-46-112-69-168-3-7-3-6-5-10 0-4 14-21 50-24 8-2 17-2 17-16 0-10-9-10-12-10-36 0-72 2-108 2-19 0-72-2-93-2-5 0-15 0-15 17 0 9 7 9 19 9 51 0 56 8 63 27 33 78 67 157 101 235-60 63-120 126-180 190-4 3-7 6-10 9-41 46-82 58-125 60-9 2-19 2-19 17 0 2 0 9 12 9 26 0 53-2 79-2 31 0 65 2 94 2 5 0 17 0 17-16 0-8-10-10-12-10-8 0-34-2-34-24 0-14 14-29 24-38 29-31 58-61 86-91 25-28 50-56 75-84 29 67 57 134 86 201 3 10 3 8 5 12 0 7-17 22-50 24-10 2-17 2-17 17 0 9 9 9 14 9 22 0 82-2 106-2 21 0 72 2 93 2 5 0 15 0 15-14 0-12-7-12-15-12-55 0-57-2-72-36-33-79-88-209-108-259 56-60 144-161 173-185 24-19 55-38 106-41 12-2 19-2 19-16 0-3 0-10-12-10-24 0-53 2-79 2-31 0-63-2-94-2-5 0-14 0-14 17 0 5 2 7 9 9 8 0 34 3 34 24 0 12-10 24-17 32-45 48-91 97-137 146z">
              <text:p/>
            </draw:path>
            <draw:path draw:style-name="gr7" draw:text-style-name="P11" draw:layer="layout" svg:width="0.515cm" svg:height="0.649cm" svg:x="13.957cm" svg:y="4.623cm" svg:viewBox="0 0 516 650" svg:d="M499 36c10-5 17-10 17-19 0-10-7-17-17-17-5 0-12 5-14 5-156 73-312 147-468 221-15 7-17 12-17 19s7 14 17 19c156 73 312 146 468 218 9 5 12 5 14 5 10 0 17-7 17-17 0-7-2-12-17-19-147-69-294-137-441-206 147-70 294-139 441-209zM487 650c15 0 29 0 29-17 0-16-17-16-31-16-151 0-303 0-454 0-12 0-31 0-31 16 0 17 17 17 31 17 152 0 304 0 456 0z">
              <text:p/>
            </draw:path>
            <draw:path draw:style-name="gr7" draw:text-style-name="P11" draw:layer="layout" svg:width="0.258cm" svg:height="0.534cm" svg:x="14.797cm" svg:y="4.632cm" svg:viewBox="0 0 259 535" svg:d="M156 190c26 0 53 0 79 0 17 0 24 0 24-17 0-10-7-10-24-10-25 0-49 0-74 0 31-120 36-137 36-141 0-15-10-22-24-22-3 0-27 0-34 29-11 45-22 89-33 134-27 0-53 0-80 0-16 0-26 0-26 17 0 10 7 10 24 10 25 0 50 0 74 0-60 240-64 254-64 268 0 46 33 77 79 77 84 0 134-122 134-129 0-8-7-8-12-8-7 0-7 3-12 12-36 87-81 106-110 106-17 0-27-10-27-38 0-20 3-27 8-41 20-83 41-165 62-247z">
              <text:p/>
            </draw:path>
            <draw:path draw:style-name="gr7" draw:text-style-name="P11" draw:layer="layout" svg:width="0.114cm" svg:height="0.841cm" svg:x="15.102cm" svg:y="4.527cm" svg:viewBox="0 0 115 842" svg:d="M115 0c-38 0-77 0-115 0 0 11 0 22 0 34 27 0 54 0 82 0 0 258 0 516 0 775-28 0-55 0-82 0 0 11 0 22 0 33 38 0 77 0 115 0 0-281 0-561 0-842z">
              <text:p/>
            </draw:path>
            <draw:path draw:style-name="gr7" draw:text-style-name="P11" draw:layer="layout" svg:width="0.561cm" svg:height="0.196cm" svg:x="15.599cm" svg:y="4.851cm" svg:viewBox="0 0 562 197" svg:d="M533 34c12 0 29 0 29-17s-17-17-29-17c-168 0-336 0-504 0-12 0-29 0-29 17s17 17 29 17c168 0 336 0 504 0zM533 197c12 0 29 0 29-17s-17-17-29-17c-168 0-336 0-504 0-12 0-29 0-29 17s17 17 29 17c168 0 336 0 504 0z">
              <text:p/>
            </draw:path>
            <draw:path draw:style-name="gr7" draw:text-style-name="P11" draw:layer="layout" svg:width="0.277cm" svg:height="0.558cm" svg:x="16.515cm" svg:y="4.599cm" svg:viewBox="0 0 278 559" svg:d="M175 22c0-22 0-22-21-22-51 53-125 53-154 53 0 9 0 17 0 26 19 0 67 0 113-21 0 145 0 291 0 436 0 29-5 39-79 39-9 0-18 0-27 0 0 8 0 17 0 26 29-2 102-2 137-2s106 0 134 2c0-9 0-18 0-26-8 0-17 0-26 0-74 0-77-8-77-39 0-157 0-315 0-472z">
              <text:p/>
            </draw:path>
            <draw:path draw:style-name="gr7" draw:text-style-name="P11" draw:layer="layout" svg:width="0.515cm" svg:height="0.033cm" svg:x="17.12cm" svg:y="4.932cm" svg:viewBox="0 0 516 34" svg:d="M487 34c15 0 29 0 29-17s-14-17-29-17c-153 0-305 0-458 0-15 0-29 0-29 17s14 17 29 17c153 0 305 0 458 0z">
              <text:p/>
            </draw:path>
            <draw:path draw:style-name="gr7" draw:text-style-name="P11" draw:layer="layout" svg:width="0.597cm" svg:height="0.57cm" svg:x="17.927cm" svg:y="4.587cm" svg:viewBox="0 0 598 571" svg:d="M223 298c27 0 55 0 82 0 62 0 69 14 69 38 0 7 0 17-4 41-3 5-3 7-3 9 0 8 5 10 10 10 7 0 7-2 12-17 15-61 30-121 45-182 3-10 3-12 3-15-3-3-1-9-10-9-8 0-9 5-12 19-17 65-36 79-108 79-25 0-51 0-77 0 18-71 36-142 53-213 7-29 10-32 46-32 37 0 75 0 113 0 103 0 122 27 122 92 0 19 0 24-2 45-3 12-3 12-3 15 0 4 3 12 10 12 9 0 9-5 12-22 5-49 11-98 17-146 2-22 0-22-22-22-138 0-275 0-413 0-17 0-26 0-26 17 0 9 7 9 24 9 31 0 55 0 55 15 0 2 0 5-5 19-37 149-73 298-110 446-10 34-12 39-77 39-14 0-24 0-24 16 0 10 10 10 12 10 24 0 86-2 110-2 29 0 99 2 128 2 7 0 16 0 16-14 0-8-3-7-4-10-3-2-5-2-24-2-20 0-22 0-44 0-24-3-26-8-26-17 0-3 0-7 2-19 18-71 36-141 53-211z">
              <text:p/>
            </draw:path>
            <draw:path draw:style-name="gr7" draw:text-style-name="P11" draw:layer="layout" svg:width="0.193cm" svg:height="0.841cm" svg:x="18.637cm" svg:y="4.527cm" svg:viewBox="0 0 194 842" svg:d="M194 833c0-3 0-3-14-17-103-106-132-267-132-394 0-146 34-295 137-398 9-12 9-12 9-14 0-8-2-10-7-10-9 0-84 58-134 166-43 91-53 184-53 256 0 65 10 166 55 262 51 103 123 158 132 158 5 0 7-2 7-9z">
              <text:p/>
            </draw:path>
            <draw:path draw:style-name="gr7" draw:text-style-name="P11" draw:layer="layout" svg:width="0.258cm" svg:height="0.534cm" svg:x="18.901cm" svg:y="4.632cm" svg:viewBox="0 0 259 535" svg:d="M154 190c26 0 52 0 79 0 17 0 26 0 26-17 0-10-9-10-24-10-25 0-49 0-74 0 31-120 33-137 33-141 0-15-9-22-24-22-2 0-26 0-33 29-11 45-23 89-34 134-26 0-53 0-79 0-17 0-24 0-24 17 0 10 7 10 24 10 25 0 50 0 74 0-62 240-64 254-64 268 0 46 31 77 76 77 87 0 135-122 135-129 0-8-7-8-10-8-7 0-9 3-12 12-36 87-81 106-110 106-17 0-27-10-27-38 0-20 3-27 5-41 21-83 42-165 63-247z">
              <text:p/>
            </draw:path>
            <draw:path draw:style-name="gr7" draw:text-style-name="P11" draw:layer="layout" svg:width="0.193cm" svg:height="0.841cm" svg:x="19.235cm" svg:y="4.527cm" svg:viewBox="0 0 194 842" svg:d="M194 422c0-67-9-168-55-264-50-103-122-158-132-158-5 0-7 5-7 10 0 2 0 2 14 19 84 81 132 216 132 393 0 144-31 291-136 399-10 9-10 9-10 12 0 7 2 9 7 9 10 0 84-57 135-163 43-94 52-187 52-257z">
              <text:p/>
            </draw:path>
            <draw:path draw:style-name="gr7" draw:text-style-name="P11" draw:layer="layout" svg:width="0.558cm" svg:height="0.196cm" svg:x="19.796cm" svg:y="4.851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7" draw:text-style-name="P11" draw:layer="layout" svg:width="0.323cm" svg:height="0.381cm" svg:x="20.677cm" svg:y="4.786cm" svg:viewBox="0 0 324 382" svg:d="M120 178c24 0 86 0 127-20 60-24 65-74 65-86 0-36-34-72-91-72-94 0-221 82-221 230 0 84 50 152 132 152 120 0 192-89 192-99 0-5-5-12-10-12-4 0-7 3-12 10-67 81-158 81-168 81-64 0-74-69-74-96 0-9 2-36 14-88 16 0 31 0 46 0zM79 161c34-130 120-142 142-142 41 0 62 24 62 53 0 89-134 89-170 89-11 0-23 0-34 0z">
              <text:p/>
            </draw:path>
            <draw:path draw:style-name="gr7" draw:text-style-name="P11" draw:layer="layout" svg:width="0.397cm" svg:height="0.028cm" svg:x="21.095cm" svg:y="4.649cm" svg:viewBox="0 0 398 29" svg:d="M377 29c7 0 21 0 21-15 0-14-12-14-21-14-118 0-235 0-353 0-10 0-24 0-24 14 0 15 14 15 24 15 118 0 235 0 353 0z">
              <text:p/>
            </draw:path>
            <draw:path draw:style-name="gr7" draw:text-style-name="P11" draw:layer="layout" svg:width="0.325cm" svg:height="0.414cm" svg:x="21.601cm" svg:y="4.402cm" svg:viewBox="0 0 326 415" svg:d="M197 240c29 67 62 154 69 161 10 14 22 14 32 14 3 0 6 0 9 0 12 0 19 0 19-7 0-2-2-5-4-7-8-5-12-19-15-24-48-114-96-227-144-341-5-10-17-36-79-36-7 0-14 0-14 7s4 10 9 10c12 2 22 2 39 36 23 55 46 110 69 165-58 52-117 104-175 156-7 8-12 12-12 22 0 14 12 19 22 19 9 0 16-7 19-9 52-56 104-111 156-166z">
              <text:p/>
            </draw:path>
            <draw:path draw:style-name="gr7" draw:text-style-name="P11" draw:layer="layout" svg:width="0.198cm" svg:height="0.373cm" svg:x="21.983cm" svg:y="4.443cm" svg:viewBox="0 0 199 374" svg:d="M120 134c20 0 40 0 60 0 12 0 19 0 19-12 0-7-7-7-17-7-18 0-36 0-55 0 7-29 15-59 22-89 0-2 0-4 0-7 0-12-7-19-19-19-15 0-24 10-29 26-3 15 5-14-22 89-20 0-40 0-60 0-12 0-19 0-19 12 0 7 7 7 19 7 19 0 37 0 55 0-12 47-24 93-36 140-2 16-7 36-7 45 0 34 29 55 63 55 64 0 103-82 103-91 0-8-7-7-10-7-7 0-7 2-12 12-17 36-48 70-79 70-12 0-22-8-22-29 0-5 3-19 5-24 14-57 27-114 41-171z">
              <text:p/>
            </draw:path>
            <draw:path draw:style-name="gr7" draw:text-style-name="P11" draw:layer="layout" svg:width="0.088cm" svg:height="0.088cm" svg:x="22.328cm" svg:y="5.069cm" svg:viewBox="0 0 89 89" svg:d="M89 46c0-24-21-46-46-46s-43 22-43 46 18 43 43 43 46-19 46-4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0.6cm" svg:height="2.6cm" svg:x="0.5cm" svg:y="0.6cm" presentation:class="title" presentation:user-transformed="true">
          <draw:text-box>
            <text:p text:style-name="P6"><text:span text:style-name="T33">Exponential Distribution (</text:span><text:span text:style-name="T34">memoryless</text:span><text:span text:style-name="T33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30">λ</text:span><text:span text:style-name="T28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1940000001B73371817ADD038E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7" draw:layer="layout" svg:width="20.6cm" svg:height="2.6cm" svg:x="0.5cm" svg:y="0.6cm" presentation:class="title" presentation:user-transformed="true">
          <draw:text-box>
            <text:p text:style-name="P6"><text:span text:style-name="T33">Exponential Distribution (</text:span><text:span text:style-name="T34">memoryless</text:span><text:span text:style-name="T33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30">λ</text:span><text:span text:style-name="T28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1940000001B73371817ADD038EE.png" xlink:type="simple" xlink:show="embed" xlink:actuate="onLoad" draw:mime-type="image/png"/>
          </draw:frame>
        </draw:g>
        <draw:g>
          <svg:title>TexMaths</svg:title>
          <svg:desc>18§latex§\textcolor{MidnightBlue}{
\begin{eqnarray*}
\Pr[X&gt;s+t\mid X&gt;t] &amp;=&amp; \frac{\Pr[X&gt;s+t]}{\Pr[X&gt;t]}\\
&amp;=&amp; \frac{1-\Pr[X\leq s+t]}{1-\Pr[X\leq t]}\\
&amp;=&amp; \frac{e^{-\lambda (s+t)}}{e^{-\lambda t}}\\
&amp;=&amp; e^{-\lambda s} = \Pr[X&gt;s].
\end{eqnarray*}}§svg§600§FALSE§</svg:desc>
          <draw:frame draw:style-name="gr2" draw:text-style-name="P4" draw:layer="layout" svg:width="12.69cm" svg:height="5.945cm" svg:x="5.767cm" svg:y="7.182cm">
            <draw:image xlink:href="Pictures/100105E300001B8B00000CE8116C5C0162C527C5.svg" xlink:type="simple" xlink:show="embed" xlink:actuate="onLoad" draw:mime-type="image/svg+xml">
              <text:p/>
            </draw:image>
            <draw:image xlink:href="Pictures/1000000100000215000000FA06282F912B46421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6"><text:span text:style-name="T35">Lemma</text:span><text:span text:style-name="T36">. If </text:span><text:span text:style-name="T37">X</text:span><text:span text:style-name="T38">1</text:span><text:span text:style-name="T36">, </text:span><text:span text:style-name="T37">X</text:span><text:span text:style-name="T38">2</text:span><text:span text:style-name="T36">, …, </text:span><text:span text:style-name="T37">X</text:span><text:span text:style-name="T39">n</text:span><text:span text:style-name="T36"> are independent exponential random variables with parameters </text:span><text:span text:style-name="T40">λ</text:span><text:span text:style-name="T38">1</text:span><text:span text:style-name="T40">, λ</text:span><text:span text:style-name="T38">2</text:span><text:span text:style-name="T40">, …, λ</text:span><text:span text:style-name="T39">n</text:span><text:span text:style-name="T41">, respectively, then </text:span><text:span text:style-name="T42">min(</text:span><text:span text:style-name="T43">X</text:span><text:span text:style-name="T44">1</text:span><text:span text:style-name="T45">, </text:span><text:span text:style-name="T43">X</text:span><text:span text:style-name="T44">2</text:span><text:span text:style-name="T45">, …, </text:span><text:span text:style-name="T43">X</text:span><text:span text:style-name="T46">n</text:span><text:span text:style-name="T47">)</text:span><text:span text:style-name="T48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5C000000208F94DA00A017FF7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6"><text:span text:style-name="T35">Lemma</text:span><text:span text:style-name="T36">. If </text:span><text:span text:style-name="T37">X</text:span><text:span text:style-name="T38">1</text:span><text:span text:style-name="T36">, </text:span><text:span text:style-name="T37">X</text:span><text:span text:style-name="T38">2</text:span><text:span text:style-name="T36">, …, </text:span><text:span text:style-name="T37">X</text:span><text:span text:style-name="T39">n</text:span><text:span text:style-name="T36"> are independent exponential random variables with parameters </text:span><text:span text:style-name="T40">λ</text:span><text:span text:style-name="T38">1</text:span><text:span text:style-name="T40">, λ</text:span><text:span text:style-name="T38">2</text:span><text:span text:style-name="T40">, …, λ</text:span><text:span text:style-name="T39">n</text:span><text:span text:style-name="T41">, respectively, then </text:span><text:span text:style-name="T42">min(</text:span><text:span text:style-name="T43">X</text:span><text:span text:style-name="T44">1</text:span><text:span text:style-name="T45">, </text:span><text:span text:style-name="T43">X</text:span><text:span text:style-name="T44">2</text:span><text:span text:style-name="T45">, …, </text:span><text:span text:style-name="T43">X</text:span><text:span text:style-name="T46">n</text:span><text:span text:style-name="T47">)</text:span><text:span text:style-name="T48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5C000000208F94DA00A017FF73.png" xlink:type="simple" xlink:show="embed" xlink:actuate="onLoad" draw:mime-type="image/png"/>
          </draw:frame>
        </draw:g>
        <draw:g>
          <svg:title>TexMaths</svg:title>
          <svg:desc>20§latex§\begin{textcolor}{MidnightBlue}{
\begin{eqnarray*}
\Pr[\min(X_1,X_2,\ldots,X_n)&gt;x] &amp;=&amp; \Pr[(X_1&gt;x)\cap (X_2&gt;x)\cap \cdots\cap (X_n &gt; x)]\\
&amp;=&amp; \Pr[X_1&gt;x] \cdot \Pr[X_2&gt;x] \cdots \Pr[X_n&gt;x]\\
&amp;=&amp; e^{-\lambda_1 x}\cdot  e^{-\lambda_2 x}\cdots e^{-\lambda_n x}\\
&amp;=&amp; e^{-\sum_{i=1}^n\lambda_i}.
\end{eqnarray*}}§svg§600§FALSE§</svg:desc>
          <draw:g>
            <draw:path draw:style-name="gr6" draw:text-style-name="P10" draw:layer="layout" svg:width="23.353cm" svg:height="3.621cm" svg:x="2.327cm" svg:y="8.667cm" svg:viewBox="0 0 23354 3622" svg:d="M0 0c7785 0 15569 0 23354 0 0 1207 0 2415 0 3622-7785 0-15569 0-23354 0 0-1207 0-2415 0-3622z">
              <text:p/>
            </draw:path>
            <draw:path draw:style-name="gr16" draw:text-style-name="P17" draw:layer="layout" svg:width="0.413cm" svg:height="0.477cm" svg:x="2.315cm" svg:y="8.679cm" svg:viewBox="0 0 414 478" svg:d="M136 256c39 0 79 0 118 0 84 0 160-56 160-126s-68-130-166-130c-83 0-165 0-248 0 0 7 0 13 0 20 6 0 12 0 18 0 54 0 54 8 54 34 0 123 0 247 0 370 0 26 0 34-54 34-6 0-12 0-18 0 0 6 0 13 0 20 26-2 78-2 104-2s80 0 104 2c0-7 0-14 0-20-5 0-11 0-16 0-56 0-56-8-56-34 0-56 0-112 0-168zM134 238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2.789cm" svg:y="8.847cm" svg:viewBox="0 0 236 310" svg:d="M98 78c0-26 0-52 0-78-33 3-65 5-98 8 0 7 0 15 0 22 50 0 54 4 54 40 0 63 0 125 0 188 0 32-6 32-54 32 0 7 0 13 0 20 28 0 60-2 80-2 28 0 62 0 90 2 0-7 0-13 0-20-5 0-11 0-16 0-52 0-52-8-52-34 0-36 0-72 0-108 0-70 28-132 82-132 6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3.127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47cm" svg:height="0.309cm" svg:x="3.263cm" svg:y="8.847cm" svg:viewBox="0 0 548 310" svg:d="M54 70c0 63 0 125 0 188 0 32-8 32-54 32 0 7 0 13 0 20 24 0 60-2 78-2 20 0 56 2 80 2 0-7 0-13 0-20-48 0-56 0-56-32 0-43 0-87 0-130 0-72 50-112 96-112 44 0 52 38 52 78 0 55 0 109 0 164 0 32-8 32-56 32 0 7 0 13 0 20 26 0 62-2 80-2s54 2 78 2c0-7 0-13 0-20-46 0-54 0-54-32 0-43 0-87 0-130 0-72 50-112 94-112 46 0 52 38 52 78 0 55 0 109 0 164 0 32-6 32-54 32 0 7 0 13 0 20 24 0 60-2 80-2 18 0 54 2 78 2 0-7 0-13 0-20-36 0-54 0-54-22 0-45 0-89 0-134 0-60 0-82-22-108-10-12-34-26-74-26-60 0-90 42-102 70-10-62-62-70-94-70-50 0-84 30-104 74 0-25 0-49 0-74-33 3-65 5-98 8 0 7 0 15 0 22 48 0 54 4 54 40z">
              <text:p/>
            </draw:path>
            <draw:path draw:style-name="gr16" draw:text-style-name="P17" draw:layer="layout" svg:width="0.149cm" svg:height="0.469cm" svg:x="3.849cm" svg:y="8.687cm" svg:viewBox="0 0 150 470" svg:d="M100 160c-33 3-65 5-98 8 0 7 0 15 0 22 46 0 52 4 52 38 0 63 0 126 0 190 0 32-8 32-54 32 0 6 0 13 0 20 22 0 60-2 78-2 24 0 48 2 72 2 0-7 0-14 0-20-46 0-50-4-50-32 0-86 0-172 0-258zM104 38c0-22-18-38-38-38-22 0-36 20-36 38 0 20 14 38 36 38 20 0 38-16 38-38z">
              <text:p/>
            </draw:path>
            <draw:path draw:style-name="gr16" draw:text-style-name="P17" draw:layer="layout" svg:width="0.353cm" svg:height="0.309cm" svg:x="4.043cm" svg:y="8.847cm" svg:viewBox="0 0 354 310" svg:d="M56 70c0 63 0 125 0 188 0 32-8 32-56 32 0 7 0 13 0 20 24 0 60-2 80-2 18 0 54 2 78 2 0-7 0-13 0-20-46 0-54 0-54-32 0-43 0-87 0-130 0-72 50-112 94-112s52 38 52 78c0 55 0 109 0 164 0 32-8 32-54 32 0 7 0 13 0 20 24 0 60-2 80-2 18 0 54 2 78 2 0-7 0-13 0-20-36 0-54 0-54-22 0-45 0-89 0-134 0-60 0-82-22-108-10-12-34-26-74-26-52 0-84 30-104 74 0-25 0-49 0-74-33 3-67 5-100 8 0 7 0 15 0 22 50 0 56 4 56 40z">
              <text:p/>
            </draw:path>
            <draw:path draw:style-name="gr16" draw:text-style-name="P17" draw:layer="layout" svg:width="0.161cm" svg:height="0.701cm" svg:x="4.481cm" svg:y="8.631cm" svg:viewBox="0 0 162 702" svg:d="M162 696c0-2 0-4-10-16-88-88-112-222-112-328 0-122 28-246 114-334 8-8 8-8 8-10 0-6-2-8-6-8-8 0-70 48-112 136-36 78-44 156-44 216 0 54 8 140 46 218 42 86 102 132 110 132 4 0 6-2 6-6z">
              <text:p/>
            </draw:path>
            <draw:path draw:style-name="gr16" draw:text-style-name="P17" draw:layer="layout" svg:width="0.579cm" svg:height="0.477cm" svg:x="4.70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6" draw:text-style-name="P17" draw:layer="layout" svg:width="0.177cm" svg:height="0.325cm" svg:x="5.321cm" svg:y="8.937cm" svg:viewBox="0 0 178 326" svg:d="M110 14c0-14 0-14-14-14-32 30-76 32-96 32 0 5 0 11 0 16 12 0 44 0 70-12 0 83 0 167 0 250 0 16 0 22-48 22-6 0-12 0-18 0 0 6 0 12 0 18 8 0 68-2 86-2 16 0 78 2 88 2 0-6 0-12 0-18-6 0-12 0-18 0-50 0-50-6-50-22 0-91 0-181 0-272z">
              <text:p/>
            </draw:path>
            <draw:path draw:style-name="gr16" draw:text-style-name="P17" draw:layer="layout" svg:width="0.081cm" svg:height="0.209cm" svg:x="5.64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6" draw:text-style-name="P17" draw:layer="layout" svg:width="0.579cm" svg:height="0.477cm" svg:x="5.91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6" draw:text-style-name="P17" draw:layer="layout" svg:width="0.217cm" svg:height="0.325cm" svg:x="6.507cm" svg:y="8.937cm" svg:viewBox="0 0 218 326" svg:d="M218 236c-5 0-11 0-16 0-2 12-6 40-14 46-4 2-40 2-48 2-30 0-60 0-90 0 52-46 68-60 98-82 36-30 70-60 70-106 0-60-52-96-114-96s-104 42-104 88c0 24 22 28 28 28 10 0 26-10 26-26 0-10-4-26-30-26 16-36 48-46 72-46 50 0 74 38 74 78 0 42-30 76-46 94-39 39-79 79-118 118-6 4-6 4-6 18 68 0 136 0 204 0 5-30 9-60 14-90z">
              <text:p/>
            </draw:path>
            <draw:path draw:style-name="gr16" draw:text-style-name="P17" draw:layer="layout" svg:width="0.081cm" svg:height="0.209cm" svg:x="6.85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6" draw:text-style-name="P17" draw:layer="layout" svg:width="0.073cm" svg:height="0.073cm" svg:x="7.165cm" svg:y="9.083cm" svg:viewBox="0 0 74 74" svg:d="M74 38c0-20-15-38-36-38s-38 18-38 38 17 36 38 36 36-16 36-36z">
              <text:p/>
            </draw:path>
            <draw:path draw:style-name="gr16" draw:text-style-name="P17" draw:layer="layout" svg:width="0.073cm" svg:height="0.073cm" svg:x="7.477cm" svg:y="9.083cm" svg:viewBox="0 0 74 74" svg:d="M74 38c0-20-16-38-36-38s-38 18-38 38 18 36 38 36 36-16 36-36z">
              <text:p/>
            </draw:path>
            <draw:path draw:style-name="gr16" draw:text-style-name="P17" draw:layer="layout" svg:width="0.075cm" svg:height="0.073cm" svg:x="7.789cm" svg:y="9.083cm" svg:viewBox="0 0 76 74" svg:d="M76 38c0-20-18-38-38-38s-38 18-38 38 18 36 38 36 38-16 38-36z">
              <text:p/>
            </draw:path>
            <draw:path draw:style-name="gr16" draw:text-style-name="P17" draw:layer="layout" svg:width="0.081cm" svg:height="0.209cm" svg:x="8.103cm" svg:y="9.083cm" svg:viewBox="0 0 82 210" svg:d="M82 74c0-46-18-74-46-74-22 0-36 18-36 38 0 18 14 36 36 36 8 0 18-2 26-8 2-2 1-1 2-2 2 0 2 0 2 10 0 52-24 94-48 118-8 8-8 8-8 10 0 6 4 8 8 8 8 0 64-54 64-136z">
              <text:p/>
            </draw:path>
            <draw:path draw:style-name="gr16" draw:text-style-name="P17" draw:layer="layout" svg:width="0.579cm" svg:height="0.477cm" svg:x="8.372cm" svg:y="8.679cm" svg:viewBox="0 0 580 478" svg:d="M322 190c-20-47-40-93-60-140-2-6-1-5-2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6" draw:text-style-name="P17" draw:layer="layout" svg:width="0.301cm" svg:height="0.221cm" svg:x="8.958cm" svg:y="9.047cm" svg:viewBox="0 0 302 222" svg:d="M38 186c-2 6-6 18-6 20 0 10 10 16 18 16s16-8 18-12 6-20 10-30c2-10 8-32 10-44 4-12 6-22 8-34 6-20 6-24 22-44 12-20 36-44 72-44 30 0 30 24 30 34 0 30-22 84-30 104-4 14-6 18-6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6" draw:text-style-name="P17" draw:layer="layout" svg:width="0.163cm" svg:height="0.701cm" svg:x="9.358cm" svg:y="8.631cm" svg:viewBox="0 0 164 702" svg:d="M164 352c0-56-8-140-48-220-42-86-102-132-108-132s-8 2-8 8c0 2 0 2 14 16 68 68 108 180 108 328 0 120-26 244-112 332-10 8-10 10-10 12 0 4 2 6 8 6s70-48 110-136c36-78 46-156 46-214z">
              <text:p/>
            </draw:path>
            <draw:path draw:style-name="gr16" draw:text-style-name="P17" draw:layer="layout" svg:width="0.429cm" svg:height="0.405cm" svg:x="9.844cm" svg:y="8.779cm" svg:viewBox="0 0 430 406" svg:d="M418 218c6-2 12-5 12-14s-6-12-12-16c-130-61-260-123-390-184-10-4-10-4-12-4-8 0-16 6-16 14 0 6 4 10 14 16 123 58 247 116 370 174-123 58-247 116-370 174-10 4-14 8-14 14 0 8 8 14 16 14 2 0 2 0 12-4 130-62 260-123 390-184z">
              <text:p/>
            </draw:path>
            <draw:path draw:style-name="gr16" draw:text-style-name="P17" draw:layer="layout" svg:width="0.349cm" svg:height="0.317cm" svg:x="10.548cm" svg:y="8.847cm" svg:viewBox="0 0 350 318" svg:d="M216 98c4-18 20-82 68-82 4 0 22 0 36 8-20 4-34 22-34 38 0 12 8 26 26 26 16 0 38-14 38-42 0-36-40-46-64-46-42 0-66 38-74 54-18-46-56-54-76-54-74 0-114 92-114 108 0 8 8 8 10 8 4 0 6-2 8-8 24-74 70-92 94-92 14 0 38 6 38 46 0 22-12 70-38 168-10 44-36 74-66 74-4 0-20 0-36-10 18-4 34-18 34-38 0-18-16-24-26-24-22 0-40 18-40 40 0 32 36 46 66 46 48 0 72-48 74-52 10 26 34 52 76 52 74 0 114-90 114-108 0-6-8-6-10-6-6 0-8 2-8 8-24 74-72 92-94 92-28 0-38-24-38-48 0-14 4-30 12-62s16-64 24-96z">
              <text:p/>
            </draw:path>
            <draw:path draw:style-name="gr16" draw:text-style-name="P17" draw:layer="layout" svg:width="0.095cm" svg:height="0.701cm" svg:x="10.946cm" svg:y="8.631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467cm" svg:height="0.163cm" svg:x="11.868cm" svg:y="8.901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6" draw:text-style-name="P17" draw:layer="layout" svg:width="0.413cm" svg:height="0.477cm" svg:x="13.102cm" svg:y="8.679cm" svg:viewBox="0 0 414 478" svg:d="M136 256c39 0 79 0 118 0 84 0 160-56 160-126s-70-130-166-130c-83 0-165 0-248 0 0 7 0 13 0 20 6 0 12 0 18 0 54 0 54 8 54 34 0 123 0 247 0 370 0 26 0 34-54 34-6 0-12 0-18 0 0 6 0 13 0 20 26-2 78-2 104-2s80 0 104 2c0-7 0-14 0-20-6 0-12 0-18 0-54 0-54-8-54-34 0-56 0-112 0-168zM134 238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3.576cm" svg:y="8.847cm" svg:viewBox="0 0 236 310" svg:d="M98 78c0-26 0-52 0-78-33 3-65 5-98 8 0 7 0 15 0 22 50 0 54 4 54 40 0 63 0 125 0 188 0 32-8 32-54 32 0 7 0 13 0 20 28 0 60-2 80-2 28 0 62 0 90 2 0-7 0-13 0-20-5 0-11 0-16 0-52 0-52-8-52-34 0-36 0-72 0-108 0-70 28-132 82-132 4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3.914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163cm" svg:height="0.701cm" svg:x="14.09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6" draw:text-style-name="P17" draw:layer="layout" svg:width="0.577cm" svg:height="0.477cm" svg:x="14.32cm" svg:y="8.679cm" svg:viewBox="0 0 578 478" svg:d="M320 190c-19-47-39-93-58-140-2-6-3-5-4-8 0-4 12-18 42-22 6 0 14 0 14-12 0-8-8-8-10-8-30 0-60 2-90 2-16 0-60-2-78-2-4 0-12 0-12 14 0 6 6 6 16 6 42 0 46 8 52 24 28 65 56 131 84 196-50 53-100 105-150 158-3 2-5 5-8 8-34 38-68 50-104 52-8 0-14 0-14 14 3 2 0 6 8 6 22 0 44-2 66-2 26 0 54 2 78 2 6 0 14 0 14-14 0-6-5-4-8-6-8-2-28-2-28-22 0-12 10-24 18-32 24-26 48-51 72-76 21-23 41-45 62-68 24 55 48 110 72 166 2 8 3 6 4 10 0 6-14 18-42 22-8 0-14 0-14 12 0 8 8 8 12 8 18 0 68-2 88-2 18 0 60 2 78 2 4 0 14 0 14-12 0-8-8-8-14-8-46-2-48-4-60-32-28-66-74-174-90-216 48-50 120-134 144-154 20-16 46-34 88-36 10 0 16 0 16-14-3-2 0-6-8-6-22 0-46 2-68 2-26 0-52-2-78-2-4 0-12 0-12 14 0 4 4 6 8 6 6 2 28 2 28 22 0 10-8 20-14 26-38 41-76 81-114 122z">
              <text:p/>
            </draw:path>
            <draw:path draw:style-name="gr16" draw:text-style-name="P17" draw:layer="layout" svg:width="0.179cm" svg:height="0.325cm" svg:x="14.936cm" svg:y="8.937cm" svg:viewBox="0 0 180 326" svg:d="M112 14c0-14-2-14-16-14-32 30-76 32-96 32 0 5 0 11 0 16 12 0 44 0 72-12 0 83 0 167 0 250 0 16 0 22-50 22-6 0-12 0-18 0 0 6 0 12 0 18 8 0 68-2 88-2 14 0 76 2 88 2 0-6 0-12 0-18-7 0-13 0-20 0-48 0-48-6-48-22 0-91 0-181 0-272z">
              <text:p/>
            </draw:path>
            <draw:path draw:style-name="gr16" draw:text-style-name="P17" draw:layer="layout" svg:width="0.427cm" svg:height="0.405cm" svg:x="15.452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6" draw:text-style-name="P17" draw:layer="layout" svg:width="0.349cm" svg:height="0.317cm" svg:x="16.156cm" svg:y="8.847cm" svg:viewBox="0 0 350 318" svg:d="M214 98c4-18 20-82 70-82 2 0 20 0 34 8-20 4-34 22-34 38 0 12 8 26 28 26 14 0 38-14 38-42 0-36-42-46-66-46-40 0-66 38-74 54-18-46-56-54-76-54-72 0-114 92-114 108 0 8 8 8 10 8 6 0 8-2 8-8 24-74 70-92 94-92 14 0 38 6 38 46 0 22-12 70-38 168-10 44-36 74-66 74-4 0-20 0-36-10 18-4 34-18 34-38 0-18-16-24-26-24-22 0-38 18-38 40 0 32 34 46 66 46 46 0 70-48 74-52 8 26 32 52 74 52 74 0 114-90 114-108 0-6-6-6-10-6-6 0-6 2-8 8-24 74-72 92-94 92-28 0-38-24-38-48 0-14 4-30 12-62s16-64 24-96z">
              <text:p/>
            </draw:path>
            <draw:path draw:style-name="gr16" draw:text-style-name="P17" draw:layer="layout" svg:width="0.163cm" svg:height="0.701cm" svg:x="16.576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6" draw:text-style-name="P17" draw:layer="layout" svg:width="0.391cm" svg:height="0.435cm" svg:x="17.004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6" draw:text-style-name="P17" draw:layer="layout" svg:width="0.163cm" svg:height="0.701cm" svg:x="17.6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6" draw:text-style-name="P17" draw:layer="layout" svg:width="0.577cm" svg:height="0.477cm" svg:x="17.884cm" svg:y="8.679cm" svg:viewBox="0 0 578 478" svg:d="M322 190c-20-47-40-93-60-140-2-6-3-5-4-8 0-4 12-18 42-22 6 0 14 0 14-12 0-8-8-8-10-8-30 0-60 2-90 2-16 0-60-2-78-2-4 0-12 0-12 14 0 6 6 6 16 6 42 0 46 8 52 24 28 65 56 131 84 196-49 53-99 105-148 158-3 2-7 5-10 8-34 38-68 50-104 52-8 0-14 0-14 14 3 2 0 6 8 6 22 0 44-2 66-2 26 0 54 2 80 2 4 0 12 0 12-14 0-6-5-4-8-6-8-2-28-2-28-22 0-12 10-24 18-32 24-26 48-51 72-76 21-23 43-45 64-68 23 55 47 110 70 166 2 8 3 6 4 10 0 6-14 18-42 22-6 0-14 0-14 12 0 8 8 8 12 8 18 0 68-2 88-2 18 0 60 2 78 2 4 0 14 0 14-12 0-8-8-8-14-8-46-2-48-4-60-32-28-66-74-174-90-216 48-50 122-134 144-154 20-16 46-34 88-36 10 0 16 0 16-14-3-2 0-6-8-6-22 0-46 2-66 2-26 0-54-2-78-2-6 0-14 0-14 14 0 4 4 6 8 6 6 2 28 2 28 22 0 10-8 20-14 26-37 41-75 81-112 122z">
              <text:p/>
            </draw:path>
            <draw:path draw:style-name="gr16" draw:text-style-name="P17" draw:layer="layout" svg:width="0.215cm" svg:height="0.325cm" svg:x="18.478cm" svg:y="8.937cm" svg:viewBox="0 0 216 326" svg:d="M216 236c-5 0-11 0-16 0-2 12-6 40-12 46-4 2-42 2-50 2-30 0-60 0-90 0 52-46 70-60 98-82 36-30 70-60 70-106 0-60-52-96-114-96s-102 42-102 88c0 24 20 28 26 28 12 0 26-10 26-26 0-10-4-26-30-26 16-36 50-46 72-46 50 0 76 38 76 78 0 42-32 76-48 94-39 39-79 79-118 118-4 4-4 4-4 18 67 0 135 0 202 0 5-30 9-60 14-90z">
              <text:p/>
            </draw:path>
            <draw:path draw:style-name="gr16" draw:text-style-name="P17" draw:layer="layout" svg:width="0.427cm" svg:height="0.405cm" svg:x="19.016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6" draw:text-style-name="P17" draw:layer="layout" svg:width="0.349cm" svg:height="0.317cm" svg:x="19.72cm" svg:y="8.847cm" svg:viewBox="0 0 350 318" svg:d="M214 98c4-18 20-82 70-82 2 0 20 0 34 8-20 4-34 22-34 38 0 12 8 26 28 26 14 0 38-14 38-42 0-36-42-46-66-46-40 0-66 38-74 54-18-46-56-54-76-54-72 0-112 92-112 108 0 8 6 8 8 8 6 0 8-2 8-8 24-74 70-92 94-92 14 0 38 6 38 46 0 22-12 70-38 168-10 44-36 74-66 74-4 0-20 0-36-10 18-4 34-18 34-38 0-18-16-24-26-24-22 0-38 18-38 40 0 32 34 46 66 46 46 0 72-48 74-52 8 26 32 52 76 52 72 0 112-90 112-108 0-6-6-6-8-6-8 0-8 2-10 8-24 74-72 92-94 92-26 0-38-24-38-48 0-14 4-30 12-62s16-64 24-96z">
              <text:p/>
            </draw:path>
            <draw:path draw:style-name="gr16" draw:text-style-name="P17" draw:layer="layout" svg:width="0.163cm" svg:height="0.701cm" svg:x="20.139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6" draw:text-style-name="P17" draw:layer="layout" svg:width="0.391cm" svg:height="0.435cm" svg:x="20.567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6" draw:text-style-name="P17" draw:layer="layout" svg:width="0.073cm" svg:height="0.073cm" svg:x="21.215cm" svg:y="8.945cm" svg:viewBox="0 0 74 74" svg:d="M74 38c0-22-18-38-38-38s-36 17-36 38 16 36 36 36 38-16 38-36z">
              <text:p/>
            </draw:path>
            <draw:path draw:style-name="gr16" draw:text-style-name="P17" draw:layer="layout" svg:width="0.073cm" svg:height="0.073cm" svg:x="21.527cm" svg:y="8.945cm" svg:viewBox="0 0 74 74" svg:d="M74 38c0-22-17-38-38-38s-36 17-36 38 15 36 36 36 38-16 38-36z">
              <text:p/>
            </draw:path>
            <draw:path draw:style-name="gr16" draw:text-style-name="P17" draw:layer="layout" svg:width="0.073cm" svg:height="0.073cm" svg:x="21.839cm" svg:y="8.945cm" svg:viewBox="0 0 74 74" svg:d="M74 38c0-22-15-38-36-38s-38 17-38 38 17 36 38 36 36-16 36-36z">
              <text:p/>
            </draw:path>
            <draw:path draw:style-name="gr16" draw:text-style-name="P17" draw:layer="layout" svg:width="0.389cm" svg:height="0.435cm" svg:x="22.169cm" svg:y="8.737cm" svg:viewBox="0 0 390 436" svg:d="M390 154c0-106-108-154-194-154-92 0-196 50-196 154 0 86 0 172 0 258 0 12 0 24 14 24s14-12 14-24c0-86 0-171 0-256 0-104 114-128 168-128 30 0 76 8 112 32 54 34 54 78 54 98 0 85 0 169 0 254 0 12 0 24 14 24s14-12 14-24c0-86 0-172 0-258z">
              <text:p/>
            </draw:path>
            <draw:path draw:style-name="gr16" draw:text-style-name="P17" draw:layer="layout" svg:width="0.161cm" svg:height="0.701cm" svg:x="22.825cm" svg:y="8.631cm" svg:viewBox="0 0 162 702" svg:d="M162 696c0-2 0-4-12-16-88-88-110-222-110-328 0-122 26-246 114-334 8-8 8-8 8-10 0-6-2-8-6-8-8 0-70 48-112 136-36 78-44 156-44 216 0 54 8 140 46 218 42 86 102 132 110 132 4 0 6-2 6-6z">
              <text:p/>
            </draw:path>
            <draw:path draw:style-name="gr16" draw:text-style-name="P17" draw:layer="layout" svg:width="0.579cm" svg:height="0.477cm" svg:x="23.047cm" svg:y="8.679cm" svg:viewBox="0 0 580 478" svg:d="M322 190c-19-47-39-93-58-140-4-6-3-5-4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6" draw:text-style-name="P17" draw:layer="layout" svg:width="0.301cm" svg:height="0.221cm" svg:x="23.633cm" svg:y="9.047cm" svg:viewBox="0 0 302 222" svg:d="M38 186c-2 6-6 18-6 20 0 10 10 16 18 16s16-8 18-12 6-20 10-30c2-10 8-32 10-44 4-12 6-22 8-34 6-20 6-24 22-44 12-20 36-44 74-44 28 0 28 24 28 34 0 30-22 84-28 104-6 14-8 18-8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6" draw:text-style-name="P17" draw:layer="layout" svg:width="0.429cm" svg:height="0.405cm" svg:x="24.247cm" svg:y="8.779cm" svg:viewBox="0 0 430 406" svg:d="M416 218c8-2 14-5 14-14s-6-12-14-16c-130-61-260-123-390-184-8-4-10-4-12-4-8 0-14 6-14 14 0 6 4 10 12 16 123 58 247 116 370 174-123 58-247 116-370 174-8 4-12 8-12 14 0 8 6 14 14 14 2 0 4 0 12-4 130-62 260-123 390-184z">
              <text:p/>
            </draw:path>
            <draw:path draw:style-name="gr16" draw:text-style-name="P17" draw:layer="layout" svg:width="0.349cm" svg:height="0.317cm" svg:x="24.951cm" svg:y="8.847cm" svg:viewBox="0 0 350 318" svg:d="M214 98c4-18 20-82 70-82 4 0 20 0 34 8-18 4-34 22-34 38 0 12 8 26 28 26 16 0 38-14 38-42 0-36-42-46-66-46-40 0-66 38-74 54-18-46-56-54-76-54-72 0-112 92-112 108 0 8 6 8 8 8 6 0 8-2 8-8 24-74 72-92 96-92 12 0 38 6 38 46 0 22-12 70-38 168-12 44-36 74-68 74-4 0-20 0-34-10 16-4 32-18 32-38 0-18-16-24-26-24-20 0-38 18-38 40 0 32 34 46 66 46 46 0 72-48 74-52 8 26 34 52 76 52 72 0 112-90 112-108 0-6-6-6-8-6-6 0-8 2-10 8-22 74-70 92-94 92-26 0-38-24-38-48 0-14 4-30 12-62s16-64 24-96z">
              <text:p/>
            </draw:path>
            <draw:path draw:style-name="gr16" draw:text-style-name="P17" draw:layer="layout" svg:width="0.163cm" svg:height="0.701cm" svg:x="25.371cm" svg:y="8.631cm" svg:viewBox="0 0 164 702" svg:d="M164 352c0-56-8-140-46-220-42-86-102-132-110-132-4 0-8 2-8 8 0 2 0 2 14 16 70 68 110 180 110 328 0 120-26 244-114 332-10 8-10 10-10 12 0 4 4 6 8 6 8 0 70-48 112-136 36-78 44-156 44-214z">
              <text:p/>
            </draw:path>
            <draw:path draw:style-name="gr16" draw:text-style-name="P17" draw:layer="layout" svg:width="0.095cm" svg:height="0.701cm" svg:x="25.621cm" svg:y="8.631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467cm" svg:height="0.165cm" svg:x="11.868cm" svg:y="9.952cm" svg:viewBox="0 0 468 166" svg:d="M444 28c10 0 24 0 24-14s-14-14-24-14c-141 0-281 0-422 0-8 0-22 0-22 14s14 14 24 14c140 0 280 0 420 0zM444 166c10 0 24 0 24-14s-14-14-24-14c-140 0-280 0-420 0-10 0-24 0-24 14s14 14 22 14c141 0 281 0 422 0z">
              <text:p/>
            </draw:path>
            <draw:path draw:style-name="gr16" draw:text-style-name="P17" draw:layer="layout" svg:width="0.413cm" svg:height="0.479cm" svg:x="13.102cm" svg:y="9.73cm" svg:viewBox="0 0 414 480" svg:d="M136 258c39 0 79 0 118 0 84 0 160-56 160-126s-70-132-166-132c-83 0-165 0-248 0 0 7 0 15 0 22 6 0 12 0 18 0 54 0 54 8 54 34 0 123 0 247 0 370 0 26 0 32-54 32-6 0-12 0-18 0 0 7 0 14 0 22 26-2 78-2 104-2s80 0 104 2c0-8 0-15 0-22-6 0-12 0-18 0-54 0-54-6-54-32 0-56 0-112 0-168zM134 240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3.576cm" svg:y="9.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3.914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7cm" svg:height="0.479cm" svg:x="14.046cm" svg:y="9.73cm" svg:viewBox="0 0 578 480" svg:d="M322 192c-20-47-40-93-60-140-2-6-1-5-2-8 0-6 12-18 40-22 8 0 14 0 14-12 0-10-8-10-10-10-28 0-60 2-88 2-18 0-62-2-80-2-4 0-12 0-12 14 0 8 8 8 16 8 42 0 46 8 52 24 28 65 56 131 84 196-49 53-99 105-148 158-3 2-7 5-10 8-34 38-66 48-102 50-10 2-16 2-16 14 0 2 0 8 8 8 22 0 46-2 66-2 26 0 54 2 80 2 4 0 12 0 12-14 0-6-6-8-8-8-6 0-28-2-28-20 0-12 10-24 18-32 24-26 48-51 72-76 21-23 43-47 64-70 23 56 47 112 70 168 4 8 3 6 4 10 0 6-14 18-40 20-8 2-14 2-14 14 0 8 8 8 10 8 20 0 68-2 88-2 18 0 60 2 78 2 6 0 14 0 14-12 0-10-8-10-12-10-48 0-50-2-62-30-26-66-74-174-90-218 48-48 122-132 144-152 20-16 48-34 90-36 8 0 14 0 14-14-3-3 0-8-8-8-22 0-44 2-66 2-26 0-54-2-78-2-4 0-14 0-14 14 0 6 4 8 8 8 8 2 28 2 28 22 0 10-6 20-12 26-38 41-76 81-114 122z">
              <text:p/>
            </draw:path>
            <draw:path draw:style-name="gr16" draw:text-style-name="P17" draw:layer="layout" svg:width="0.179cm" svg:height="0.325cm" svg:x="14.662cm" svg:y="9.99cm" svg:viewBox="0 0 180 326" svg:d="M112 14c0-14-2-14-14-14-32 30-78 32-98 32 0 5 0 11 0 16 12 0 44 0 72-14 0 84 0 168 0 252 0 16 0 22-50 22-6 0-12 0-18 0 0 6 0 12 0 18 8 0 70-2 88-2 14 0 76 2 88 2 0-6 0-12 0-18-6 0-12 0-18 0-50 0-50-6-50-22 0-91 0-181 0-272z">
              <text:p/>
            </draw:path>
            <draw:path draw:style-name="gr16" draw:text-style-name="P17" draw:layer="layout" svg:width="0.429cm" svg:height="0.405cm" svg:x="15.178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15.882cm" svg:y="9.9cm" svg:viewBox="0 0 350 318" svg:d="M214 98c4-18 20-82 70-82 4 0 20 0 34 8-18 4-32 22-32 38 0 12 6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5cm" svg:height="0.701cm" svg:x="16.278cm" svg:y="9.684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073cm" svg:height="0.073cm" svg:x="16.676cm" svg:y="9.998cm" svg:viewBox="0 0 74 74" svg:d="M74 38c0-22-18-38-38-38s-36 17-36 38 16 36 36 36 38-16 38-36z">
              <text:p/>
            </draw:path>
            <draw:path draw:style-name="gr16" draw:text-style-name="P17" draw:layer="layout" svg:width="0.413cm" svg:height="0.479cm" svg:x="16.99cm" svg:y="9.73cm" svg:viewBox="0 0 414 480" svg:d="M136 258c39 0 79 0 118 0 84 0 160-56 160-126s-68-132-166-132c-83 0-165 0-248 0 0 7 0 15 0 22 6 0 12 0 18 0 54 0 56 8 56 34 0 123 0 247 0 370 0 26-2 32-56 32-6 0-12 0-18 0 0 7 0 14 0 22 26-2 78-2 104-2s80 0 104 2c0-8 0-15 0-22-5 0-11 0-16 0-56 0-56-6-56-32 0-56 0-112 0-168zM134 240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7.464cm" svg:y="9.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7.802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9cm" svg:height="0.479cm" svg:x="17.934cm" svg:y="9.73cm" svg:viewBox="0 0 580 480" svg:d="M322 192c-20-47-40-93-60-140-2-6-1-5-2-8 0-6 12-18 40-22 8 0 14 0 14-12 0-10-8-10-10-10-28 0-58 2-88 2-18 0-62-2-80-2-4 0-12 0-12 14 0 8 8 8 16 8 42 0 46 8 54 24 27 65 55 131 82 196-49 53-99 105-148 158-3 2-7 5-10 8-34 38-66 48-102 50-10 2-16 2-16 14 0 2 0 8 10 8 20 0 44-2 66-2 26 0 52 2 78 2 4 0 12 0 12-14 0-6-6-8-8-8-6 0-28-2-28-20 0-12 10-24 18-32 24-26 48-51 72-76 21-23 43-47 64-70 23 56 47 112 70 168 4 8 3 6 4 10 0 6-14 18-40 20-8 2-14 2-14 14 0 8 8 8 10 8 20 0 68-2 88-2 18 0 62 2 78 2 6 0 14 0 14-12 0-10-8-10-12-10-48 0-50-2-62-30-26-66-74-174-90-218 48-48 122-132 144-152 20-16 48-34 90-36 8 0 16 0 16-14-3-3 0-8-10-8-22 0-44 2-66 2-26 0-52-2-78-2-4 0-14 0-14 14 0 6 4 8 8 8 8 2 30 2 30 22 0 10-8 20-14 26-38 41-76 81-114 122z">
              <text:p/>
            </draw:path>
            <draw:path draw:style-name="gr16" draw:text-style-name="P17" draw:layer="layout" svg:width="0.217cm" svg:height="0.325cm" svg:x="18.528cm" svg:y="9.99cm" svg:viewBox="0 0 218 326" svg:d="M218 236c-6 0-12 0-18 0 0 12-6 40-12 46-4 2-42 2-48 2-31 0-61 0-92 0 52-46 70-60 100-82 36-30 70-60 70-106 0-60-52-96-116-96-60 0-102 42-102 88 0 24 22 28 26 28 12 0 26-10 26-26 0-10-4-28-28-28 14-34 48-44 72-44 48 0 74 38 74 78 0 42-30 76-46 94-39 39-79 77-118 116-6 6-6 6-6 20 67 0 135 0 202 0 5-30 11-60 16-90z">
              <text:p/>
            </draw:path>
            <draw:path draw:style-name="gr16" draw:text-style-name="P17" draw:layer="layout" svg:width="0.429cm" svg:height="0.405cm" svg:x="19.066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19.77cm" svg:y="9.9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7cm" svg:height="0.701cm" svg:x="20.165cm" svg:y="9.684cm" svg:viewBox="0 0 98 702" svg:d="M98 0c-33 0-65 0-98 0 0 9 0 19 0 28 23 0 45 0 68 0 0 215 0 430 0 646-23 0-45 0-68 0 0 9 0 18 0 28 33 0 65 0 98 0 0-234 0-468 0-702z">
              <text:p/>
            </draw:path>
            <draw:path draw:style-name="gr16" draw:text-style-name="P17" draw:layer="layout" svg:width="0.073cm" svg:height="0.073cm" svg:x="20.523cm" svg:y="9.998cm" svg:viewBox="0 0 74 74" svg:d="M74 38c0-22-16-38-36-38s-38 17-38 38 18 36 38 36 36-16 36-36z">
              <text:p/>
            </draw:path>
            <draw:path draw:style-name="gr16" draw:text-style-name="P17" draw:layer="layout" svg:width="0.075cm" svg:height="0.073cm" svg:x="20.835cm" svg:y="9.998cm" svg:viewBox="0 0 76 74" svg:d="M76 38c0-22-18-38-38-38s-38 17-38 38 18 36 38 36 38-16 38-36z">
              <text:p/>
            </draw:path>
            <draw:path draw:style-name="gr16" draw:text-style-name="P17" draw:layer="layout" svg:width="0.075cm" svg:height="0.073cm" svg:x="21.147cm" svg:y="9.998cm" svg:viewBox="0 0 76 74" svg:d="M76 38c0-22-18-38-38-38s-38 17-38 38 18 36 38 36 38-16 38-36z">
              <text:p/>
            </draw:path>
            <draw:path draw:style-name="gr16" draw:text-style-name="P17" draw:layer="layout" svg:width="0.413cm" svg:height="0.479cm" svg:x="21.425cm" svg:y="9.73cm" svg:viewBox="0 0 414 480" svg:d="M134 258c40 0 80 0 120 0 84 0 160-56 160-126s-70-132-166-132c-83 0-165 0-248 0 0 7 0 15 0 22 5 0 11 0 16 0 54 0 56 8 56 34 0 123 0 247 0 370 0 26-2 32-56 32-5 0-11 0-16 0 0 7 0 14 0 22 24-2 75-2 102-2s80 0 104 2c0-8 0-15 0-22-5 0-11 0-16 0-54 0-56-6-56-32 0-56 0-112 0-168zM132 240c0-63 0-127 0-190 0-22 2-28 34-28 21 0 43 0 64 0 112 0 112 76 112 110 0 32 0 108-112 108-33 0-65 0-98 0z">
              <text:p/>
            </draw:path>
            <draw:path draw:style-name="gr16" draw:text-style-name="P17" draw:layer="layout" svg:width="0.237cm" svg:height="0.309cm" svg:x="21.897cm" svg:y="9.9cm" svg:viewBox="0 0 238 310" svg:d="M98 78c0-26 0-52 0-78-33 3-65 5-98 8 0 7 0 15 0 22 50 0 56 4 56 40 0 63 0 125 0 188 0 30-8 30-56 30 0 7 0 15 0 22 28 0 62-2 82-2 28 0 60 0 88 2 0-7 0-15 0-22-5 0-9 0-14 0-52 0-54-6-54-32 0-36 0-72 0-108 0-70 30-132 84-132 4 0 4 0 6 0-2 2-16 10-16 28 0 20 16 30 30 30s32-7 32-30-22-44-52-44c-52 0-78 48-88 78z">
              <text:p/>
            </draw:path>
            <draw:path draw:style-name="gr16" draw:text-style-name="P17" draw:layer="layout" svg:width="0.095cm" svg:height="0.701cm" svg:x="22.237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9cm" svg:height="0.479cm" svg:x="22.367cm" svg:y="9.73cm" svg:viewBox="0 0 580 480" svg:d="M322 192c-19-47-39-93-58-140-2-6-3-5-4-8 0-6 12-18 42-22 6 0 14 0 14-12 0-10-8-10-10-10-30 0-60 2-90 2-18 0-60-2-78-2-4 0-12 0-12 14 0 8 6 8 16 8 42 0 46 8 52 24 27 65 55 131 82 196-49 53-99 105-148 158-3 2-5 5-8 8-34 38-68 48-104 50-8 2-16 2-16 14 0 2 0 8 10 8 20 0 44-2 66-2 26 0 54 2 78 2 4 0 14 0 14-14 0-6-8-8-10-8-6 0-28-2-28-20 0-12 12-24 20-32 24-26 48-51 72-76 21-23 41-47 62-70 24 56 48 112 72 168 2 8 3 6 4 10 0 6-14 18-42 20-8 2-14 2-14 14 0 8 8 8 10 8 20 0 70-2 90-2 18 0 60 2 78 2 4 0 12 0 12-12 0-10-6-10-12-10-46 0-48-2-60-30-28-66-74-174-90-218 46-48 120-132 144-152 20-16 46-34 88-36 10 0 16 0 16-14-3-3 0-8-10-8-20 0-44 2-66 2-26 0-52-2-78-2-4 0-12 0-12 14 0 6 2 8 8 8 6 2 28 2 28 22 0 10-8 20-14 26-38 41-76 81-114 122z">
              <text:p/>
            </draw:path>
            <draw:path draw:style-name="gr16" draw:text-style-name="P17" draw:layer="layout" svg:width="0.299cm" svg:height="0.219cm" svg:x="22.955cm" svg:y="10.1cm" svg:viewBox="0 0 300 220" svg:d="M36 186c-2 6-4 18-4 20 0 10 8 14 16 14s17-6 20-10 6-20 8-30 8-32 10-44c4-12 6-22 10-34 4-20 6-24 20-44s36-46 74-46c28 0 28 26 28 36 0 28-20 84-28 104-6 14-8 18-8 26 0 26 22 42 46 42 50 0 72-66 72-74 0-6-6-6-8-6-6 0-8 2-10 8-10 40-32 60-52 60-10 0-12-8-12-18 0-12 2-18 12-40 6-16 26-68 26-94 0-48-38-56-64-56-42 0-68 24-84 44-4-34-32-44-52-44-22 0-32 14-40 26-10 18-16 46-16 48 0 6 6 6 8 6 6 0 6 0 10-14 8-28 18-54 36-54 14 0 16 12 16 26 0 8-5 26-8 40s-8 34-10 44c-5 21-11 43-16 64z">
              <text:p/>
            </draw:path>
            <draw:path draw:style-name="gr16" draw:text-style-name="P17" draw:layer="layout" svg:width="0.429cm" svg:height="0.405cm" svg:x="23.567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24.271cm" svg:y="9.9cm" svg:viewBox="0 0 350 318" svg:d="M214 98c4-18 20-82 70-82 4 0 20 0 36 8-20 4-34 22-34 38 0 12 8 26 26 26 16 0 38-14 38-42 0-36-42-46-66-46-40 0-64 38-72 54-18-46-56-54-76-54-74 0-114 90-114 108 0 8 6 8 8 8 6 0 8-2 10-8 24-74 70-92 94-92 14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7cm" svg:height="0.701cm" svg:x="24.667cm" svg:y="9.684cm" svg:viewBox="0 0 98 702" svg:d="M98 0c-33 0-65 0-98 0 0 9 0 19 0 28 23 0 47 0 70 0 0 215 0 430 0 646-23 0-47 0-70 0 0 9 0 18 0 28 33 0 65 0 98 0 0-234 0-468 0-702z">
              <text:p/>
            </draw:path>
            <draw:path draw:style-name="gr16" draw:text-style-name="P17" draw:layer="layout" svg:width="0.467cm" svg:height="0.165cm" svg:x="11.868cm" svg:y="11.006cm" svg:viewBox="0 0 468 166" svg:d="M444 28c10 0 24 0 24-14s-14-14-24-14c-141 0-281 0-422 0-8 0-22 0-22 14s14 14 24 14c140 0 280 0 420 0zM444 166c10 0 24-1 24-16s-14-14-24-14c-140 0-280 0-420 0-10 0-24-1-24 14s14 16 22 16c141 0 281 0 422 0z">
              <text:p/>
            </draw:path>
            <draw:path draw:style-name="gr16" draw:text-style-name="P17" draw:layer="layout" svg:width="0.269cm" svg:height="0.317cm" svg:x="13.11cm" svg:y="10.954cm" svg:viewBox="0 0 270 318" svg:d="M100 148c20 0 72-2 106-16 50-22 54-62 54-72 0-32-28-60-76-60-78 0-184 68-184 192 0 70 42 126 110 126 102 0 160-74 160-82 0-4-4-10-8-10s-6 2-10 8c-56 68-132 68-140 68-54 0-62-58-62-80 0-10 2-30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3cm" svg:x="13.458cm" svg:y="10.84cm" svg:viewBox="0 0 332 24" svg:d="M314 24c8 0 18 0 18-12s-10-12-18-12c-98 0-196 0-294 0-8 0-20 0-20 10 0 14 12 14 20 14 98 0 196 0 294 0z">
              <text:p/>
            </draw:path>
            <draw:path draw:style-name="gr16" draw:text-style-name="P17" draw:layer="layout" svg:width="0.271cm" svg:height="0.345cm" svg:x="13.88cm" svg:y="10.634cm" svg:viewBox="0 0 272 346" svg:d="M164 200c24 56 52 128 58 134 8 12 18 12 26 12 3 0 7 0 10 0 8 0 14 0 14-6 0-4-2-4-4-6-4-4-10-16-12-20-40-95-80-189-120-284-4-8-14-30-66-30-6 0-12 0-12 6s4 6 8 6c10 2 18 4 32 32 19 46 39 92 58 138-49 43-97 87-146 130-6 6-10 10-10 18 0 12 10 16 18 16s14-6 16-8c43-46 87-92 130-138z">
              <text:p/>
            </draw:path>
            <draw:path draw:style-name="gr16" draw:text-style-name="P17" draw:layer="layout" svg:width="0.143cm" svg:height="0.233cm" svg:x="14.228cm" svg:y="10.81cm" svg:viewBox="0 0 144 234" svg:d="M90 12c0-12-2-12-12-12-26 24-64 24-72 24-2 0-4 0-6 0 0 5 0 9 0 14 2 0 4 0 6 0 8 0 30 0 52-10 0 59 0 117 0 176 0 12 0 16-38 16-6 0-12 0-18 0 0 5 0 9 0 14 20 0 52 0 72 0s52 0 70 0c0-5 0-9 0-14-6 0-12 0-18 0-36 0-36-4-36-16 0-64 0-128 0-192z">
              <text:p/>
            </draw:path>
            <draw:path draw:style-name="gr16" draw:text-style-name="P17" draw:layer="layout" svg:width="0.261cm" svg:height="0.221cm" svg:x="14.476cm" svg:y="10.758cm" svg:viewBox="0 0 262 222" svg:d="M98 164c-4 18-20 44-46 44-2 0-16 0-26-8 20-6 22-24 22-26 0-12-8-18-20-18-14 0-28 12-28 30 0 24 28 36 52 36 22 0 42-14 54-36 12 26 40 36 60 36 56 0 86-62 86-76 0-6-6-6-8-6-8 0-8 2-10 8-10 34-40 60-66 60-20 0-32-14-32-32 0-14 12-58 26-112 10-38 32-50 48-50 2 0 18 0 28 6-16 4-22 18-22 28s9 18 20 18 26-10 26-30c0-28-30-36-50-36-24 0-44 16-56 34-8-20-30-34-58-34-56 0-86 60-86 74 0 8 6 8 8 8 6 0 6-2 8-10 14-38 44-58 68-58 16 0 30 8 30 32 0 10-6 34-10 50-6 23-12 45-18 68z">
              <text:p/>
            </draw:path>
            <draw:path draw:style-name="gr16" draw:text-style-name="P17" draw:layer="layout" svg:width="0.075cm" svg:height="0.073cm" svg:x="15.022cm" svg:y="11.052cm" svg:viewBox="0 0 76 74" svg:d="M76 36c0-20-18-36-38-36s-38 15-38 36 18 38 38 38 38-16 38-38z">
              <text:p/>
            </draw:path>
            <draw:path draw:style-name="gr16" draw:text-style-name="P17" draw:layer="layout" svg:width="0.269cm" svg:height="0.317cm" svg:x="15.346cm" svg:y="10.954cm" svg:viewBox="0 0 270 318" svg:d="M100 148c20 0 72-2 106-16 50-22 54-62 54-72 0-32-28-60-76-60-78 0-184 68-184 192 0 70 42 126 110 126 100 0 160-74 160-82 0-4-4-10-8-10s-6 2-10 8c-56 68-132 68-140 68-56 0-62-58-62-80 0-10 2-30 12-74 13 0 25 0 38 0zM66 132c28-106 100-116 118-116 34 0 52 20 52 44 0 72-112 72-142 72-9 0-19 0-28 0z">
              <text:p/>
            </draw:path>
            <draw:path draw:style-name="gr16" draw:text-style-name="P17" draw:layer="layout" svg:width="0.331cm" svg:height="0.023cm" svg:x="15.694cm" svg:y="10.84cm" svg:viewBox="0 0 332 24" svg:d="M312 24c8 0 20 0 20-12s-10-12-20-12c-97 0-195 0-292 0-8 0-20 0-20 10 0 14 12 14 20 14 97 0 195 0 292 0z">
              <text:p/>
            </draw:path>
            <draw:path draw:style-name="gr16" draw:text-style-name="P17" draw:layer="layout" svg:width="0.271cm" svg:height="0.345cm" svg:x="16.116cm" svg:y="10.634cm" svg:viewBox="0 0 272 346" svg:d="M162 200c26 56 54 128 58 134 10 12 20 12 28 12 3 0 5 0 8 0 10 0 16 0 16-6 0-4-2-4-4-6-6-4-10-16-12-20-40-95-80-189-120-284-4-8-14-30-66-30-6 0-12 0-12 6s4 6 8 6c10 2 18 4 30 32 20 46 40 92 60 138-49 43-97 87-146 130-6 6-10 10-10 18 0 12 10 16 18 16s14-6 16-8c43-46 85-92 128-138z">
              <text:p/>
            </draw:path>
            <draw:path draw:style-name="gr16" draw:text-style-name="P17" draw:layer="layout" svg:width="0.173cm" svg:height="0.233cm" svg:x="16.446cm" svg:y="10.81cm" svg:viewBox="0 0 174 234" svg:d="M174 166c-5 0-9 0-14 0-2 8-4 30-10 32-4 2-32 2-38 2-23 0-45 0-68 0 22-16 48-36 70-50 30-22 60-42 60-80 0-44-42-70-92-70-48 0-82 28-82 62 0 18 14 22 20 22 10 0 20-6 20-20s-8-20-20-22c10-16 30-26 54-26 34 0 62 20 62 54 0 30-20 52-46 76-29 24-57 48-86 72-4 4-4 4-4 6 0 3 0 7 0 10 54 0 108 0 162 0 4-23 8-45 12-68z">
              <text:p/>
            </draw:path>
            <draw:path draw:style-name="gr16" draw:text-style-name="P17" draw:layer="layout" svg:width="0.261cm" svg:height="0.221cm" svg:x="16.712cm" svg:y="10.758cm" svg:viewBox="0 0 262 222" svg:d="M98 164c-4 18-20 44-46 44-2 0-16 0-26-8 20-6 22-24 22-26 0-12-10-18-20-18-14 0-28 12-28 30 0 24 28 36 52 36 22 0 42-14 54-36 12 26 40 36 58 36 58 0 88-62 88-76 0-6-5-4-8-6-8 0-8 2-10 8-10 34-40 60-68 60-18 0-30-14-30-32 0-14 12-58 26-112 10-38 32-50 48-50 2 0 16 0 28 6-16 4-22 18-22 28s9 18 20 18 26-10 26-30c0-28-30-36-50-36-26 0-44 16-56 34-8-20-32-34-58-34-56 0-88 60-88 74 0 8 8 8 10 8 6 0 6-2 8-10 12-38 44-58 68-58 16 0 30 8 30 32 0 10-6 34-10 50-6 23-12 45-18 68z">
              <text:p/>
            </draw:path>
            <draw:path draw:style-name="gr16" draw:text-style-name="P17" draw:layer="layout" svg:width="0.073cm" svg:height="0.073cm" svg:x="17.22cm" svg:y="11.052cm" svg:viewBox="0 0 74 74" svg:d="M74 36c0-20-18-36-38-36s-36 15-36 36 16 38 36 38 38-16 38-38z">
              <text:p/>
            </draw:path>
            <draw:path draw:style-name="gr16" draw:text-style-name="P17" draw:layer="layout" svg:width="0.073cm" svg:height="0.073cm" svg:x="17.532cm" svg:y="11.052cm" svg:viewBox="0 0 74 74" svg:d="M74 36c0-20-17-36-38-36s-36 15-36 36 15 38 36 38 38-16 38-38z">
              <text:p/>
            </draw:path>
            <draw:path draw:style-name="gr16" draw:text-style-name="P17" draw:layer="layout" svg:width="0.073cm" svg:height="0.073cm" svg:x="17.844cm" svg:y="11.052cm" svg:viewBox="0 0 74 74" svg:d="M74 36c0-20-15-36-36-36s-38 15-38 36 17 38 38 38 36-16 36-38z">
              <text:p/>
            </draw:path>
            <draw:path draw:style-name="gr16" draw:text-style-name="P17" draw:layer="layout" svg:width="0.269cm" svg:height="0.317cm" svg:x="18.128cm" svg:y="10.954cm" svg:viewBox="0 0 270 318" svg:d="M100 148c20 0 72-2 106-16 50-22 54-62 54-72 0-32-28-60-76-60-78 0-184 68-184 192 0 70 42 126 110 126 102 0 160-74 160-82 0-4-4-10-8-10s-6 2-10 8c-54 68-132 68-140 68-54 0-62-58-62-80 0-10 2-30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3cm" svg:x="18.476cm" svg:y="10.84cm" svg:viewBox="0 0 332 24" svg:d="M314 24c8 0 18 0 18-12s-10-12-18-12c-98 0-196 0-294 0-8 0-20 0-20 10 0 14 12 14 20 14 98 0 196 0 294 0z">
              <text:p/>
            </draw:path>
            <draw:path draw:style-name="gr16" draw:text-style-name="P17" draw:layer="layout" svg:width="0.271cm" svg:height="0.345cm" svg:x="18.898cm" svg:y="10.634cm" svg:viewBox="0 0 272 346" svg:d="M164 200c24 56 52 128 58 134 8 12 18 12 26 12 3 0 7 0 10 0 8 0 14 0 14-6 0-4-2-4-2-6-6-4-12-16-14-20-40-95-80-189-120-284-4-8-14-30-66-30-6 0-12 0-12 6s4 6 8 6c10 2 20 4 32 32 19 46 39 92 58 138-49 43-97 87-146 130-6 6-10 10-10 18 0 12 10 16 18 16 10 0 14-6 16-8 43-46 87-92 130-138z">
              <text:p/>
            </draw:path>
            <draw:path draw:style-name="gr16" draw:text-style-name="P17" draw:layer="layout" svg:width="0.245cm" svg:height="0.157cm" svg:x="19.228cm" svg:y="10.89cm" svg:viewBox="0 0 246 158" svg:d="M36 120c-2 10-6 24-6 26 0 8 6 12 14 12 4 0 12-2 16-12 3-9 4-18 8-26 10-48 10-48 12-50 4-10 30-58 72-58 18 0 26 8 26 24 0 20-16 56-24 76-2 6-4 10-4 16 0 18 18 30 38 30 38 0 58-46 58-54 0-4-6-4-8-4-6 0-6 0-8 8-6 20-22 38-40 38-8 0-10-6-10-12 0-8 2-12 4-20 6-14 22-54 22-72 0-26-18-42-52-42-32 0-54 18-66 34-2-28-30-34-42-34-36 0-31 36-46 54 0 4 6 4 8 4 6 0 6-2 8-6 4-20 12-40 28-40 12 0 14 10 14 18 0 4-4 18-6 28-2 8-6 24-8 30-3 11-5 21-8 32z">
              <text:p/>
            </draw:path>
            <draw:path draw:style-name="gr16" draw:text-style-name="P17" draw:layer="layout" svg:width="0.263cm" svg:height="0.221cm" svg:x="19.564cm" svg:y="10.758cm" svg:viewBox="0 0 264 222" svg:d="M100 164c-6 18-22 44-48 44-9-3-16 0-26-8 20-6 22-24 22-26 0-12-8-18-20-18-14 0-28 12-28 30 0 24 28 36 52 36 22 0 42-14 54-36 12 26 40 36 60 36 56 0 86-62 86-76 0-6-6-6-8-6-6 0-8 2-10 8-10 34-38 60-66 60-20 0-30-14-30-32 0-14 12-58 26-112 8-38 32-50 48-50 9 2 16 0 26 6-16 4-22 18-22 28s8 18 20 18 28-10 28-30c0-28-32-36-52-36-24 0-44 16-54 34-10-20-32-34-60-34-54 0-86 60-86 74 0 8 6 8 8 8 6 0 6-2 10-10 12-38 42-58 66-58 16 0 30 8 30 32 0 10-6 34-10 50-5 23-11 45-16 68z">
              <text:p/>
            </draw:path>
            <draw:path draw:style-name="gr16" draw:text-style-name="P17" draw:layer="layout" svg:width="0.467cm" svg:height="0.163cm" svg:x="11.868cm" svg:y="12.059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6" draw:text-style-name="P17" draw:layer="layout" svg:width="0.269cm" svg:height="0.317cm" svg:x="13.11cm" svg:y="12.007cm" svg:viewBox="0 0 270 318" svg:d="M100 148c20 0 72-2 106-16 50-22 54-62 54-72 0-32-28-60-76-60-78 0-184 68-184 190 0 72 42 128 110 128 102 0 160-74 160-82 0-6-4-10-8-10s-6 2-10 6c-56 70-132 70-140 70-54 0-62-58-62-80 0-10 2-32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5cm" svg:x="13.458cm" svg:y="11.891cm" svg:viewBox="0 0 332 26" svg:d="M314 26c8 0 18 0 18-12 0-14-10-14-18-14-98 0-196 0-294 0-8 0-20 0-20 12 0 14 12 14 20 14 98 0 196 0 294 0z">
              <text:p/>
            </draw:path>
            <draw:path draw:style-name="gr16" draw:text-style-name="P17" draw:layer="layout" svg:width="0.513cm" svg:height="0.491cm" svg:x="13.978cm" svg:y="11.659cm" svg:viewBox="0 0 514 492" svg:d="M234 254c6-6 6-6 6-8s0-4-4-8c-58-71-116-143-174-214 71 0 143 0 214 0 72 0 110 10 118 12 44 12 86 40 104 82 5 0 11 0 16 0-15-39-31-79-46-118-151 0-301 0-452 0-12 0-12 0-14 2s-2 2-2 16c66 81 132 161 198 242-64 72-128 144-192 216-6 6-6 6-6 8 0 8 6 8 16 8 151 0 301 0 452 0 15-43 31-86 46-128-5 0-11 0-16 0-18 46-60 72-96 82-10 2-46 14-122 14s-152 0-228 0c61-69 121-138 182-206z">
              <text:p/>
            </draw:path>
            <draw:path draw:style-name="gr16" draw:text-style-name="P17" draw:layer="layout" svg:width="0.245cm" svg:height="0.159cm" svg:x="14.562cm" svg:y="11.659cm" svg:viewBox="0 0 246 160" svg:d="M38 122c-2 8-6 24-6 26 0 8 6 12 12 12s14-2 18-12c0-2 4-18 6-26 12-48 8-33 12-50 6-10 30-60 74-60 16 0 24 10 24 26 0 20-14 56-22 76-2 4-4 10-4 16 0 18 18 30 38 30 38 0 56-46 56-54 0-6-4-6-6-6-6 0-6 2-8 8-8 22-24 40-40 40-8 0-12-6-12-14 0-6 2-10 6-18 6-14 22-54 22-74 0-26-18-42-52-42-32 0-54 20-66 36-2-30-30-36-44-36-34 0-46 54-46 56 0 4 6 4 8 4 6 0 8-2 8-6 6-20 14-42 28-42 12 0 14 12 14 20 0 4-2 18-4 26-4 10-6 24-8 32-3 11-5 21-8 32z">
              <text:p/>
            </draw:path>
            <draw:path draw:style-name="gr16" draw:text-style-name="P17" draw:layer="layout" svg:width="0.123cm" svg:height="0.237cm" svg:x="14.562cm" svg:y="11.951cm" svg:viewBox="0 0 124 238" svg:d="M108 16c0-10-6-16-16-16s-20 10-20 22c0 8 8 14 14 14 12 0 22-10 22-20zM124 184c0-6-4-4-6-6-6 0-8 2-10 8-6 20-20 40-38 40-8 0-12-6-12-14 0-6 2-10 6-18 2-6 6-14 6-18 2-4 16-36 20-48 4-8 6-12 6-18 0-16-16-30-38-30-38 0-58 44-58 54 0 4 6 4 8 4 6 0 6-2 8-6 8-26 26-42 40-42 6 0 10 4 10 14 0 2 0 6-2 12-2 8-18 44-22 56-4 6-4 8-8 20-2 4-4 10-4 16 0 18 18 30 38 30 38 0 56-46 56-54z">
              <text:p/>
            </draw:path>
            <draw:path draw:style-name="gr16" draw:text-style-name="P17" draw:layer="layout" svg:width="0.293cm" svg:height="0.103cm" svg:x="14.752cm" svg:y="12.045cm" svg:viewBox="0 0 294 104" svg:d="M280 20c4 0 14 0 14-10s-10-10-16-10c-87 0-175 0-262 0-6 0-16 0-16 10s10 10 14 10c89 0 177 0 266 0zM278 104c6 0 16 0 16-10s-10-10-14-10c-89 0-177 0-266 0-4 0-14 0-14 10s10 10 16 10c87 0 175 0 262 0z">
              <text:p/>
            </draw:path>
            <draw:path draw:style-name="gr16" draw:text-style-name="P17" draw:layer="layout" svg:width="0.143cm" svg:height="0.233cm" svg:x="15.13cm" svg:y="11.951cm" svg:viewBox="0 0 144 234" svg:d="M90 10c0-10-2-10-14-10-24 22-64 22-70 22-2 0-4 0-6 0 0 5 0 11 0 16 2 0 4 0 6 0 8 0 30 0 52-10 0 59 0 117 0 176 0 10 0 14-38 14-6 0-12 0-18 0 0 5 0 11 0 16 20-2 52-2 72-2s52 0 70 2c0-5 0-11 0-16-6 0-12 0-18 0-36 0-36-4-36-14 0-65 0-129 0-194z">
              <text:p/>
            </draw:path>
            <draw:path draw:style-name="gr16" draw:text-style-name="P17" draw:layer="layout" svg:width="0.271cm" svg:height="0.347cm" svg:x="15.486cm" svg:y="11.685cm" svg:viewBox="0 0 272 348" svg:d="M162 202c26 56 54 126 58 134 10 12 20 12 26 12 3 0 7 0 10 0 10 0 16 0 16-6 0-4-2-4-4-6-6-6-10-16-12-20-40-95-80-189-120-284-4-8-14-32-66-32-6 0-12 0-12 8 0 6 4 6 6 6 12 2 20 4 32 32 20 46 40 92 60 138-49 43-97 87-146 130-6 6-10 10-10 18 0 12 10 16 18 16s14-6 16-8c43-46 85-92 128-138z">
              <text:p/>
            </draw:path>
            <draw:path draw:style-name="gr16" draw:text-style-name="P17" draw:layer="layout" svg:width="0.123cm" svg:height="0.237cm" svg:x="15.816cm" svg:y="11.863cm" svg:viewBox="0 0 124 238" svg:d="M106 16c0-10-6-16-14-16-10 0-22 10-22 22 0 10 8 14 14 14 12 0 22-10 22-20zM124 184c0-6-6-6-8-6-6 0-6 2-8 10-6 18-22 38-40 38-8 0-10-6-10-12 0-8 2-12 4-18 2-8 6-14 8-20 0-4 14-36 20-48 2-8 4-12 4-18 0-16-16-30-38-30-36 0-56 44-56 54 0 4 4 3 6 4 6 0 8-2 8-6 8-26 26-40 40-40 8 0 12 4 12 12 0 2 0 6-4 14-2 6-18 44-22 54-2 6-2 8-8 20-2 4-4 10-4 16 0 18 18 30 38 30 38 0 58-46 58-54z">
              <text:p/>
            </draw:path>
            <draw:path draw:style-name="gr16" draw:text-style-name="P17" draw:layer="layout" svg:width="0.073cm" svg:height="0.073cm" svg:x="16.102cm" svg:y="12.243cm" svg:viewBox="0 0 74 74" svg:d="M74 38c0-22-17-38-38-38s-36 17-36 38 15 36 36 36 38-16 38-36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9">An airline ticket counter with </text:span><text:span text:style-name="T50">n</text:span><text:span text:style-name="T49"> service agents.</text:span></text:p>
              </text:list-item>
              <text:list-item>
                <text:p><text:span text:style-name="T49">The time agent </text:span><text:span text:style-name="T50">i</text:span><text:span text:style-name="T49"> takes per customer: </text:span><text:span text:style-name="T49"><text:tab/></text:span></text:p>
                <text:list>
                  <text:list-item>
                    <text:p><text:span text:style-name="T51">Exponential distribution, parameter </text:span><text:span text:style-name="T52">λ</text:span><text:span text:style-name="T53">i</text:span></text:p>
                  </text:list-item>
                </text:list>
              </text:list-item>
              <text:list-item>
                <text:p text:style-name="P16"><text:span text:style-name="T54">You are at the head of the line and wondering how long, in average, you wait for an agent to serve you...</text:span><text:span text:style-name="T55"> </text:span></text:p>
              </text:list-item>
            </text:list>
          </draw:text-box>
        </draw:frame>
        <draw:g>
          <draw:custom-shape draw:style-name="gr17" draw:text-style-name="P18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19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0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9">An airline ticket counter with </text:span><text:span text:style-name="T50">n</text:span><text:span text:style-name="T49"> service agents.</text:span></text:p>
              </text:list-item>
              <text:list-item>
                <text:p><text:span text:style-name="T49">The time agent </text:span><text:span text:style-name="T50">i</text:span><text:span text:style-name="T49"> takes per customer: </text:span><text:span text:style-name="T49"><text:tab/></text:span></text:p>
                <text:list>
                  <text:list-item>
                    <text:p><text:span text:style-name="T51">Exponential distribution, parameter </text:span><text:span text:style-name="T52">λ</text:span><text:span text:style-name="T53">i</text:span></text:p>
                  </text:list-item>
                </text:list>
              </text:list-item>
              <text:list-item>
                <text:p text:style-name="P16"><text:span text:style-name="T54">You are at the head of the line and wondering how long, in average, you wait for an agent to serve you...</text:span><text:span text:style-name="T55"> </text:span></text:p>
              </text:list-item>
            </text:list>
          </draw:text-box>
        </draw:frame>
        <draw:g>
          <draw:custom-shape draw:style-name="gr17" draw:text-style-name="P18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19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0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frame draw:style-name="gr23" draw:text-style-name="P22" draw:layer="layout" svg:width="14.4cm" svg:height="2.799cm" svg:x="2.6cm" svg:y="11.4cm">
            <draw:text-box>
              <text:p><text:span text:style-name="T56">The time until the first agent is free</text:span></text:p>
              <text:list text:style-name="L4">
                <text:list-item>
                  <text:p><text:span text:style-name="T56">Exponential distribution with parameter </text:span><text:span text:style-name="T56"><text:tab/></text:span></text:p>
                  <text:p><text:span text:style-name="T57"/></text:p>
                </text:list-item>
                <text:list-item>
                  <text:p><text:span text:style-name="T56">Expected waiting time: </text:span></text:p>
                </text:list-item>
              </text:list>
            </draw:text-box>
          </draw:frame>
          <draw:g>
            <svg:title>TexMaths</svg:title>
            <svg:desc>16§display§\textcolor{Orange}{\sum_{i=1}^n \lambda_i}§svg§600§FALSE§</svg:desc>
            <draw:frame draw:style-name="gr24" draw:text-style-name="P4" draw:layer="layout" svg:width="1.37cm" svg:height="1.542cm" svg:x="14cm" svg:y="11.865cm">
              <draw:image xlink:href="Pictures/10001E1A00000359000003C5AA4DA2E2AF4E6911.svg" xlink:type="simple" xlink:show="embed" xlink:actuate="onLoad" draw:mime-type="image/svg+xml">
                <text:p/>
              </draw:image>
              <draw:image xlink:href="Pictures/100000010000004100000049C206EF33F16F7BBE.png" xlink:type="simple" xlink:show="embed" xlink:actuate="onLoad" draw:mime-type="image/png"/>
            </draw:frame>
          </draw:g>
          <draw:g>
            <svg:title>TexMaths</svg:title>
            <svg:desc>16§display§\textcolor{Red}{1/\sum_{i=1}^n \lambda_i}§svg§600§FALSE§</svg:desc>
            <draw:frame draw:style-name="gr24" draw:text-style-name="P4" draw:layer="layout" svg:width="2.026cm" svg:height="1.542cm" svg:x="9.7cm" svg:y="13cm">
              <draw:image xlink:href="Pictures/100021FE000004F3000003C5E420CDA2A74949F8.svg" xlink:type="simple" xlink:show="embed" xlink:actuate="onLoad" draw:mime-type="image/svg+xml">
                <text:p/>
              </draw:image>
              <draw:image xlink:href="Pictures/100000010000006000000049FB66147D04D03EEF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Counting process.</text:span></text:p>
                <text:list>
                  <text:list-item>
                    <text:p><text:span text:style-name="T58">E.g., arrivals of customers to a queue, emissions of radioactive particles, price surges in the stock markets, etc.</text:span></text:p>
                  </text:list-item>
                </text:list>
              </text:list-item>
              <text:list-item>
                <text:p><text:span text:style-name="T15">N</text:span><text:span text:style-name="T13">(</text:span><text:span text:style-name="T15">t</text:span><text:span text:style-name="T13">): the number of events in the interval (say [0, </text:span><text:span text:style-name="T15">t</text:span><text:span text:style-name="T13">]).</text:span></text:p>
              </text:list-item>
              <text:list-item>
                <text:p><text:span text:style-name="T36">A </text:span><text:span text:style-name="T59">stochastic </text:span><text:span text:style-name="T60">counting</text:span><text:span text:style-name="T59"> process</text:span><text:span text:style-name="T36">: {</text:span><text:span text:style-name="T15">N</text:span><text:span text:style-name="T13">(</text:span><text:span text:style-name="T15">t</text:span><text:span text:style-name="T13">): <text:s/></text:span><text:span text:style-name="T15">t</text:span><text:span text:style-name="T13"> </text:span><text:span text:style-name="T28">≥</text:span><text:span text:style-name="T27"> 0</text:span><text:span text:style-name="T13">}</text:span></text:p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1">Siméon Poisson (1781</text:span><text:span text:style-name="T62">−</text:span><text:span text:style-name="T61">1840)</text:span></text:p>
            <text:p text:style-name="P23"><text:span text:style-name="T61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3">A </text:span><text:span text:style-name="T64">Poisson process</text:span><text:span text:style-name="T63"> {</text:span><text:span text:style-name="T65">N</text:span><text:span text:style-name="T58">(</text:span><text:span text:style-name="T65">t</text:span><text:span text:style-name="T58">): <text:s/></text:span><text:span text:style-name="T65">t</text:span><text:span text:style-name="T58"> </text:span><text:span text:style-name="T66">≥</text:span><text:span text:style-name="T67"> 0</text:span><text:span text:style-name="T58">} with parameter </text:span><text:span text:style-name="T68">λ</text:span><text:span text:style-name="T67"> </text:span><text:span text:style-name="T58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9"><text:s/></text:span><text:span text:style-name="T65">N</text:span><text:span text:style-name="T58">(0) = 0.</text:span></text:p>
                  </text:list-item>
                  <text:list-item>
                    <text:p text:style-name="P25"><text:span text:style-name="T63">(Independent &amp; stationary increments) For any </text:span><text:span text:style-name="T70">t</text:span><text:span text:style-name="T63">, </text:span><text:span text:style-name="T70">s</text:span><text:span text:style-name="T63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3">the distribution of </text:span><text:span text:style-name="T70">N</text:span><text:span text:style-name="T63">(</text:span><text:span text:style-name="T70">t</text:span><text:span text:style-name="T63">+</text:span><text:span text:style-name="T70">s</text:span><text:span text:style-name="T63">) – </text:span><text:span text:style-name="T70">N</text:span><text:span text:style-name="T63">(</text:span><text:span text:style-name="T70">s</text:span><text:span text:style-name="T63">) is identical to the distribution of </text:span><text:span text:style-name="T70">N</text:span><text:span text:style-name="T63">(</text:span><text:span text:style-name="T70">t</text:span><text:span text:style-name="T63">);</text:span></text:p>
                      </text:list-item>
                      <text:list-item>
                        <text:p><text:span text:style-name="T63">for disjoint intervals [</text:span><text:span text:style-name="T70">t</text:span><text:span text:style-name="T71">1</text:span><text:span text:style-name="T63">, </text:span><text:span text:style-name="T70">t</text:span><text:span text:style-name="T71">2</text:span><text:span text:style-name="T63">] and [</text:span><text:span text:style-name="T70">t</text:span><text:span text:style-name="T71">3</text:span><text:span text:style-name="T63">, </text:span><text:span text:style-name="T70">t</text:span><text:span text:style-name="T71">4</text:span><text:span text:style-name="T63">], the distribution of </text:span><text:span text:style-name="T70">N</text:span><text:span text:style-name="T63">(</text:span><text:span text:style-name="T70">t</text:span><text:span text:style-name="T71">2</text:span><text:span text:style-name="T63">) – </text:span><text:span text:style-name="T70">N</text:span><text:span text:style-name="T63">(</text:span><text:span text:style-name="T70">t</text:span><text:span text:style-name="T71">1</text:span><text:span text:style-name="T63">) is independent of the </text:span><text:span text:style-name="T58">distribution of </text:span><text:span text:style-name="T65">N</text:span><text:span text:style-name="T58">(</text:span><text:span text:style-name="T65">t</text:span><text:span text:style-name="T72">4</text:span><text:span text:style-name="T58">) – </text:span><text:span text:style-name="T65">N</text:span><text:span text:style-name="T58">(</text:span><text:span text:style-name="T65">t</text:span><text:span text:style-name="T72">3</text:span><text:span text:style-name="T58">).</text:span></text:p>
                        <text:p><text:span text:style-name="T7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8"/></text:p>
                    <text:p><text:span text:style-name="T58"><text:s/></text:span></text:p>
                  </text:list-item>
                  <text:list-item>
                    <text:p><text:span text:style-name="T58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1">Siméon Poisson (1781</text:span><text:span text:style-name="T62">−</text:span><text:span text:style-name="T61">1840)</text:span></text:p>
            <text:p text:style-name="P23"><text:span text:style-name="T61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FF0000003AF67D8538EADE7833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FD0000003AD5DAEDF3FB1C246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3">A </text:span><text:span text:style-name="T64">Poisson process</text:span><text:span text:style-name="T63"> {</text:span><text:span text:style-name="T65">N</text:span><text:span text:style-name="T58">(</text:span><text:span text:style-name="T65">t</text:span><text:span text:style-name="T58">): <text:s/></text:span><text:span text:style-name="T65">t</text:span><text:span text:style-name="T58"> </text:span><text:span text:style-name="T66">≥</text:span><text:span text:style-name="T67"> 0</text:span><text:span text:style-name="T58">} with parameter </text:span><text:span text:style-name="T68">λ</text:span><text:span text:style-name="T67"> </text:span><text:span text:style-name="T58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9"><text:s/></text:span><text:span text:style-name="T65">N</text:span><text:span text:style-name="T58">(0) = 0.</text:span></text:p>
                  </text:list-item>
                  <text:list-item>
                    <text:p text:style-name="P25"><text:span text:style-name="T63">(Independent &amp; stationary increments) For any </text:span><text:span text:style-name="T70">t</text:span><text:span text:style-name="T63">, </text:span><text:span text:style-name="T70">s</text:span><text:span text:style-name="T63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3">the distribution of </text:span><text:span text:style-name="T70">N</text:span><text:span text:style-name="T63">(</text:span><text:span text:style-name="T70">t</text:span><text:span text:style-name="T63">+</text:span><text:span text:style-name="T70">s</text:span><text:span text:style-name="T63">) – </text:span><text:span text:style-name="T70">N</text:span><text:span text:style-name="T63">(</text:span><text:span text:style-name="T70">s</text:span><text:span text:style-name="T63">) is identical to the distribution of </text:span><text:span text:style-name="T70">N</text:span><text:span text:style-name="T63">(</text:span><text:span text:style-name="T70">t</text:span><text:span text:style-name="T63">);</text:span></text:p>
                      </text:list-item>
                      <text:list-item>
                        <text:p><text:span text:style-name="T63">for disjoint intervals [</text:span><text:span text:style-name="T70">t</text:span><text:span text:style-name="T71">1</text:span><text:span text:style-name="T63">, </text:span><text:span text:style-name="T70">t</text:span><text:span text:style-name="T71">2</text:span><text:span text:style-name="T63">] and [</text:span><text:span text:style-name="T70">t</text:span><text:span text:style-name="T71">3</text:span><text:span text:style-name="T63">, </text:span><text:span text:style-name="T70">t</text:span><text:span text:style-name="T71">4</text:span><text:span text:style-name="T63">], the distribution of </text:span><text:span text:style-name="T70">N</text:span><text:span text:style-name="T63">(</text:span><text:span text:style-name="T70">t</text:span><text:span text:style-name="T71">2</text:span><text:span text:style-name="T63">) – </text:span><text:span text:style-name="T70">N</text:span><text:span text:style-name="T63">(</text:span><text:span text:style-name="T70">t</text:span><text:span text:style-name="T71">1</text:span><text:span text:style-name="T63">) is independent of the </text:span><text:span text:style-name="T58">distribution of </text:span><text:span text:style-name="T65">N</text:span><text:span text:style-name="T58">(</text:span><text:span text:style-name="T65">t</text:span><text:span text:style-name="T72">4</text:span><text:span text:style-name="T58">) – </text:span><text:span text:style-name="T65">N</text:span><text:span text:style-name="T58">(</text:span><text:span text:style-name="T65">t</text:span><text:span text:style-name="T72">3</text:span><text:span text:style-name="T58">).</text:span></text:p>
                        <text:p><text:span text:style-name="T7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8"/></text:p>
                    <text:p><text:span text:style-name="T58"><text:s/></text:span></text:p>
                  </text:list-item>
                  <text:list-item>
                    <text:p><text:span text:style-name="T58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1">Siméon Poisson (1781</text:span><text:span text:style-name="T62">−</text:span><text:span text:style-name="T61">1840)</text:span></text:p>
            <text:p text:style-name="P23"><text:span text:style-name="T61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FF0000003AF67D8538EADE7833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FD0000003AD5DAEDF3FB1C2466.png" xlink:type="simple" xlink:show="embed" xlink:actuate="onLoad" draw:mime-type="image/png"/>
          </draw:frame>
        </draw:g>
        <draw:frame draw:style-name="gr26" draw:text-style-name="P26" draw:layer="layout" svg:width="12.6cm" svg:height="1.757cm" svg:x="11.8cm" svg:y="11.046cm">
          <draw:text-box>
            <text:p><text:span text:style-name="T74">The number of events in a given time interval follows the </text:span><text:span text:style-name="T75">Poisson distribution</text:span><text:span text:style-name="T74">!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6">Poisson Process → Poisson Distribution</text:span></text:p>
          </draw:text-box>
        </draw:frame>
        <draw:frame presentation:style-name="pr5" draw:text-style-name="P27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6"><text:span text:style-name="T77">Theorem</text:span><text:span text:style-name="T78">. Let {</text:span><text:span text:style-name="T79">N</text:span><text:span text:style-name="T80">(</text:span><text:span text:style-name="T79">t</text:span><text:span text:style-name="T80">): <text:s/></text:span><text:span text:style-name="T79">t</text:span><text:span text:style-name="T81"> </text:span><text:span text:style-name="T82">≥ 0</text:span><text:span text:style-name="T81">}</text:span><text:span text:style-name="T82"> be</text:span><text:span text:style-name="T78"> a Poisson process with</text:span><text:span text:style-name="T80"> with parameter </text:span><text:span text:style-name="T83">λ</text:span><text:span text:style-name="T84">. For any </text:span><text:span text:style-name="T83">t</text:span><text:span text:style-name="T84">, </text:span><text:span text:style-name="T83">s</text:span><text:span text:style-name="T84"> </text:span><text:span text:style-name="T85">≥</text:span><text:span text:style-name="T86"> 0 and any integer </text:span><text:span text:style-name="T87">n </text:span><text:span text:style-name="T85">≥</text:span><text:span text:style-name="T86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2220000003820AB74E35C91A7C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6">Poisson Process → Poisson Distribution</text:span></text:p>
          </draw:text-box>
        </draw:frame>
        <draw:frame presentation:style-name="pr5" draw:text-style-name="P27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6"><text:span text:style-name="T77">Theorem</text:span><text:span text:style-name="T78">. Let {</text:span><text:span text:style-name="T79">N</text:span><text:span text:style-name="T80">(</text:span><text:span text:style-name="T79">t</text:span><text:span text:style-name="T80">): <text:s/></text:span><text:span text:style-name="T79">t</text:span><text:span text:style-name="T81"> </text:span><text:span text:style-name="T82">≥ 0</text:span><text:span text:style-name="T81">}</text:span><text:span text:style-name="T82"> be</text:span><text:span text:style-name="T78"> a Poisson process with</text:span><text:span text:style-name="T80"> with parameter </text:span><text:span text:style-name="T83">λ</text:span><text:span text:style-name="T84">. For any </text:span><text:span text:style-name="T83">t</text:span><text:span text:style-name="T84">, </text:span><text:span text:style-name="T83">s</text:span><text:span text:style-name="T84"> </text:span><text:span text:style-name="T85">≥</text:span><text:span text:style-name="T86"> 0 and any integer </text:span><text:span text:style-name="T87">n </text:span><text:span text:style-name="T85">≥</text:span><text:span text:style-name="T86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2220000003820AB74E35C91A7C4.png" xlink:type="simple" xlink:show="embed" xlink:actuate="onLoad" draw:mime-type="image/png"/>
          </draw:frame>
        </draw:g>
        <draw:custom-shape draw:style-name="gr27" draw:text-style-name="P4" draw:layer="layout" svg:width="8.6cm" svg:height="1.4cm" svg:x="8.2cm" svg:y="6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extcolor{Orange}{ =  \Pr[N(t) - N(0)] = \Pr[N(t) - 0]}§svg§600§FALSE§</svg:desc>
          <draw:frame draw:style-name="gr2" draw:text-style-name="P4" draw:layer="layout" svg:width="10.428cm" svg:height="0.754cm" svg:x="8.503cm" svg:y="8.204cm">
            <draw:image xlink:href="Pictures/10004A1A0000145F0000017A0CF4DCEAE070F040.svg" xlink:type="simple" xlink:show="embed" xlink:actuate="onLoad" draw:mime-type="image/svg+xml">
              <text:p/>
            </draw:image>
            <draw:image xlink:href="Pictures/100000010000018A0000001D694075CBEF42059A.png" xlink:type="simple" xlink:show="embed" xlink:actuate="onLoad" draw:mime-type="image/png"/>
          </draw:frame>
        </draw:g>
        <draw:frame draw:style-name="gr15" draw:text-style-name="P28" draw:layer="layout" svg:width="19.8cm" svg:height="1.2cm" svg:x="3.8cm" svg:y="10cm">
          <draw:text-box>
            <text:list text:style-name="L4">
              <text:list-item>
                <text:p><text:span text:style-name="T88"><text:s/></text:span><text:span text:style-name="T88">The probability that </text:span><text:span text:style-name="T89">n</text:span><text:span text:style-name="T88"> events happen during time interval of length </text:span><text:span text:style-name="T89">t</text:span><text:span text:style-name="T88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6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90">Theorem</text:span><text:span text:style-name="T91">. Let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be a </text:span><text:span text:style-name="T95">stochastic process</text:span><text:span text:style-name="T49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6"><text:s/></text:span><text:span text:style-name="T50">N</text:span><text:span text:style-name="T49">(0) = 0.</text:span></text:p>
                  </text:list-item>
                  <text:list-item>
                    <text:p text:style-name="P25"><text:span text:style-name="T91">(Independent increments) For disjoint intervals [</text:span><text:span text:style-name="T92">t</text:span><text:span text:style-name="T97">1</text:span><text:span text:style-name="T91">, </text:span><text:span text:style-name="T92">t</text:span><text:span text:style-name="T97">2</text:span><text:span text:style-name="T91">] and [</text:span><text:span text:style-name="T92">t</text:span><text:span text:style-name="T97">3</text:span><text:span text:style-name="T91">, </text:span><text:span text:style-name="T92">t</text:span><text:span text:style-name="T97">4</text:span><text:span text:style-name="T91">], the distribution of </text:span><text:span text:style-name="T92">N</text:span><text:span text:style-name="T91">(</text:span><text:span text:style-name="T92">t</text:span><text:span text:style-name="T97">2</text:span><text:span text:style-name="T91">) – </text:span><text:span text:style-name="T92">N</text:span><text:span text:style-name="T91">(</text:span><text:span text:style-name="T92">t</text:span><text:span text:style-name="T97">1</text:span><text:span text:style-name="T91">) is independent of the </text:span><text:span text:style-name="T49">distribution of </text:span><text:span text:style-name="T50">N</text:span><text:span text:style-name="T49">(</text:span><text:span text:style-name="T50">t</text:span><text:span text:style-name="T98">4</text:span><text:span text:style-name="T49">) – </text:span><text:span text:style-name="T50">N</text:span><text:span text:style-name="T49">(</text:span><text:span text:style-name="T50">t</text:span><text:span text:style-name="T98">3</text:span><text:span text:style-name="T49">).</text:span></text:p>
                  </text:list-item>
                  <text:list-item>
                    <text:p><text:span text:style-name="T49">For any </text:span><text:span text:style-name="T50">t</text:span><text:span text:style-name="T49">, </text:span><text:span text:style-name="T50">s</text:span><text:span text:style-name="T49"> </text:span><text:span text:style-name="T99">≥</text:span><text:span text:style-name="T100"> 0, </text:span><text:span text:style-name="T101">N</text:span><text:span text:style-name="T100">(</text:span><text:span text:style-name="T101">t</text:span><text:span text:style-name="T100">+</text:span><text:span text:style-name="T101">s</text:span><text:span text:style-name="T100">) – </text:span><text:span text:style-name="T101">N</text:span><text:span text:style-name="T100">(</text:span><text:span text:style-name="T101">s</text:span><text:span text:style-name="T100">) has a Poisson distribution with mean </text:span><text:span text:style-name="T102">λt</text:span><text:span text:style-name="T99">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91">Then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is a Poisson process with rate </text:span><text:span text:style-name="T103">λ</text:span><text:span text:style-name="T94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6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90">Theorem</text:span><text:span text:style-name="T91">. Let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be a </text:span><text:span text:style-name="T95">stochastic process</text:span><text:span text:style-name="T49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6"><text:s/></text:span><text:span text:style-name="T50">N</text:span><text:span text:style-name="T49">(0) = 0.</text:span></text:p>
                  </text:list-item>
                  <text:list-item>
                    <text:p text:style-name="P25"><text:span text:style-name="T91">(Independent increments) For disjoint intervals [</text:span><text:span text:style-name="T92">t</text:span><text:span text:style-name="T97">1</text:span><text:span text:style-name="T91">, </text:span><text:span text:style-name="T92">t</text:span><text:span text:style-name="T97">2</text:span><text:span text:style-name="T91">] and [</text:span><text:span text:style-name="T92">t</text:span><text:span text:style-name="T97">3</text:span><text:span text:style-name="T91">, </text:span><text:span text:style-name="T92">t</text:span><text:span text:style-name="T97">4</text:span><text:span text:style-name="T91">], the distribution of </text:span><text:span text:style-name="T92">N</text:span><text:span text:style-name="T91">(</text:span><text:span text:style-name="T92">t</text:span><text:span text:style-name="T97">2</text:span><text:span text:style-name="T91">) – </text:span><text:span text:style-name="T92">N</text:span><text:span text:style-name="T91">(</text:span><text:span text:style-name="T92">t</text:span><text:span text:style-name="T97">1</text:span><text:span text:style-name="T91">) is independent of the </text:span><text:span text:style-name="T49">distribution of </text:span><text:span text:style-name="T50">N</text:span><text:span text:style-name="T49">(</text:span><text:span text:style-name="T50">t</text:span><text:span text:style-name="T98">4</text:span><text:span text:style-name="T49">) – </text:span><text:span text:style-name="T50">N</text:span><text:span text:style-name="T49">(</text:span><text:span text:style-name="T50">t</text:span><text:span text:style-name="T98">3</text:span><text:span text:style-name="T49">).</text:span></text:p>
                  </text:list-item>
                  <text:list-item>
                    <text:p><text:span text:style-name="T49">For any </text:span><text:span text:style-name="T50">t</text:span><text:span text:style-name="T49">, </text:span><text:span text:style-name="T50">s</text:span><text:span text:style-name="T49"> </text:span><text:span text:style-name="T99">≥</text:span><text:span text:style-name="T100"> 0, </text:span><text:span text:style-name="T101">N</text:span><text:span text:style-name="T100">(</text:span><text:span text:style-name="T104">t</text:span><text:span text:style-name="T100">+</text:span><text:span text:style-name="T101">s</text:span><text:span text:style-name="T100">) – </text:span><text:span text:style-name="T101">N</text:span><text:span text:style-name="T100">(</text:span><text:span text:style-name="T101">s</text:span><text:span text:style-name="T100">) has a Poisson distribution with mean </text:span><text:span text:style-name="T102">λ</text:span><text:span text:style-name="T105">t</text:span><text:span text:style-name="T99">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91">Then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is a Poisson process with rate </text:span><text:span text:style-name="T103">λ</text:span><text:span text:style-name="T94">.</text:span></text:p>
              </text:list-header>
            </text:list>
          </draw:text-box>
        </draw:frame>
        <draw:g>
          <svg:title>TexMaths</svg:title>
          <svg:desc>18§display§\textcolor{MidnightBlue}{\lim_{t\rightarrow 0}\frac{\Pr[N(t) = 1]}{t} = \lim_{t\rightarrow 0} \frac{e^{-\lambda t}\lambda t}{t} = \lambda.}§svg§600§FALSE§</svg:desc>
          <draw:frame draw:style-name="gr2" draw:text-style-name="P4" draw:layer="layout" svg:width="9.931cm" svg:height="1.451cm" svg:x="2.101cm" svg:y="11.676cm">
            <draw:image xlink:href="Pictures/10006C030000158E0000032737BEB43B54B9B990.svg" xlink:type="simple" xlink:show="embed" xlink:actuate="onLoad" draw:mime-type="image/svg+xml">
              <text:p/>
            </draw:image>
            <draw:image xlink:href="Pictures/10000001000001A10000003D077A0F8126BD1609.png" xlink:type="simple" xlink:show="embed" xlink:actuate="onLoad" draw:mime-type="image/png"/>
          </draw:frame>
        </draw:g>
        <draw:g>
          <svg:title>TexMaths</svg:title>
          <svg:desc>18§display§\textcolor{MidnightBlue}{\lim_{t\rightarrow 0}\frac{\Pr[N(t) \geq 2]}{t} = \lim_{t\rightarrow 0} 
\sum_{k\geq 2}\frac{e^{-\lambda t}(\lambda \textcolor{red}{t})^k}{k!\textcolor{red}{t}} = 0.}§svg§600§FALSE§</svg:desc>
          <draw:frame draw:style-name="gr2" draw:text-style-name="P4" draw:layer="layout" svg:width="11.666cm" svg:height="1.807cm" svg:x="14.402cm" svg:y="11.678cm">
            <draw:image xlink:href="Pictures/10009AC400001952000003ED44C6A8BC0DC2EA8D.svg" xlink:type="simple" xlink:show="embed" xlink:actuate="onLoad" draw:mime-type="image/svg+xml">
              <text:p/>
            </draw:image>
            <draw:image xlink:href="Pictures/10000001000001EA0000004CF7E70E4AC7FB1CC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 Intuitive Idea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Balls: events, bins: time slots</text:p>
                <text:p/>
                <text:p/>
                <text:p/>
              </text:list-item>
              <text:list-item>
                <text:p>A lot of balls into a lot of (infinitely small) bins...</text:p>
              </text:list-item>
            </text:list>
          </draw:text-box>
        </draw:frame>
        <draw:custom-shape draw:style-name="gr28" draw:text-style-name="P23" draw:layer="layout" svg:width="2cm" svg:height="2.4cm" svg:x="3.401cm" svg:y="5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23" draw:layer="layout" svg:width="2cm" svg:height="2.4cm" svg:x="6.702cm" svg:y="5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23" draw:layer="layout" svg:width="2cm" svg:height="2.4cm" svg:x="10.103cm" svg:y="5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23" draw:layer="layout" svg:width="2cm" svg:height="2.4cm" svg:x="18.804cm" svg:y="5.5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2.2cm" svg:height="1.195cm" svg:x="14.001cm" svg:y="5.801cm">
          <draw:text-box>
            <text:p text:style-name="P23"><text:span text:style-name="T106">…</text:span><text:span text:style-name="T106">...</text:span></text:p>
          </draw:text-box>
        </draw:frame>
        <draw:custom-shape draw:style-name="gr30" draw:text-style-name="P30" draw:layer="layout" svg:width="0.4cm" svg:height="0.4cm" svg:x="3.9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4cm" svg:height="0.4cm" svg:x="4.4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4cm" svg:height="0.4cm" svg:x="7.401cm" svg:y="7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4cm" svg:height="0.4cm" svg:x="19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4cm" svg:height="0.4cm" svg:x="19.5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4cm" svg:height="0.4cm" svg:x="20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0.6cm" svg:height="2.4cm" svg:x="9.3cm" svg:y="11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2.2cm" svg:height="1.195cm" svg:x="12.602cm" svg:y="11.602cm">
          <draw:text-box>
            <text:p text:style-name="P23"><text:span text:style-name="T106">…</text:span><text:span text:style-name="T106">...</text:span></text:p>
          </draw:text-box>
        </draw:frame>
        <draw:custom-shape draw:style-name="gr30" draw:text-style-name="P30" draw:layer="layout" svg:width="0.4cm" svg:height="0.4cm" svg:x="9.4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0.6cm" svg:height="2.4cm" svg:x="10.101cm" svg:y="11.3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3" draw:layer="layout" svg:width="0.6cm" svg:height="2.4cm" svg:x="10.902cm" svg:y="11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0" draw:layer="layout" svg:width="0.4cm" svg:height="0.4cm" svg:x="11.0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0.6cm" svg:height="2.4cm" svg:x="15.303cm" svg:y="11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0" draw:layer="layout" svg:width="0.4cm" svg:height="0.4cm" svg:x="15.4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other Viewpoint: Interarrival</text:p>
          </draw:text-box>
        </draw:frame>
        <draw:frame presentation:style-name="pr5" draw:text-style-name="P3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96">Surprising fact: <text:s/>All of the </text:span><text:span text:style-name="T50">X</text:span><text:span text:style-name="T107">n</text:span><text:span text:style-name="T96"> have the same distribution and this distribution is </text:span><text:span text:style-name="T108">exponential</text:span><text:span text:style-name="T96">!</text:span></text:p>
              </text:list-item>
            </text:list>
          </draw:text-box>
        </draw:frame>
        <draw:line draw:style-name="gr32" draw:text-style-name="P4" draw:layer="layout" svg:x1="6.4cm" svg:y1="8.8cm" svg:x2="18.8cm" svg:y2="8.8cm">
          <text:p/>
        </draw:line>
        <draw:custom-shape draw:style-name="gr33" draw:text-style-name="P23" draw:layer="layout" svg:width="0.4cm" svg:height="0.4cm" svg:x="13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cm" svg:height="0.4cm" svg:x="9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2" draw:layer="layout" svg:width="3.101cm" svg:height="1.505cm" svg:x="8.899cm" svg:y="8.88cm">
          <draw:text-box>
            <text:p text:style-name="P23"><text:span text:style-name="T109">(</text:span><text:span text:style-name="T110">n</text:span><text:span text:style-name="T109"> – 1)th event</text:span></text:p>
          </draw:text-box>
        </draw:frame>
        <draw:frame draw:style-name="gr34" draw:text-style-name="P32" draw:layer="layout" svg:width="3.101cm" svg:height="1.505cm" svg:x="12.7cm" svg:y="8.881cm">
          <draw:text-box>
            <text:p text:style-name="P23"><text:span text:style-name="T110">n</text:span><text:span text:style-name="T109">th event</text:span></text:p>
          </draw:text-box>
        </draw:frame>
        <draw:line draw:style-name="gr35" draw:text-style-name="P23" draw:layer="layout" svg:x1="10cm" svg:y1="7.8cm" svg:x2="14cm" svg:y2="7.8cm">
          <text:p/>
        </draw:line>
        <draw:frame draw:style-name="gr36" draw:text-style-name="P33" draw:layer="layout" svg:width="5.066cm" svg:height="0.931cm" svg:x="9.534cm" svg:y="6.7cm">
          <draw:text-box>
            <text:p><text:span text:style-name="T111">X</text:span><text:span text:style-name="T112">n</text:span><text:span text:style-name="T113">: the interval time</text:span></text:p>
          </draw:text-box>
        </draw:frame>
        <draw:custom-shape draw:style-name="gr33" draw:text-style-name="P23" draw:layer="layout" svg:width="0.4cm" svg:height="0.4cm" svg:x="7.1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cm" svg:height="0.4cm" svg:x="7.9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23" draw:layer="layout" svg:width="0.4cm" svg:height="0.4cm" svg:x="7.203cm" svg:y="1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2" draw:layer="layout" svg:width="10cm" svg:height="1cm" svg:x="7.5cm" svg:y="12.374cm">
            <draw:text-box>
              <text:p><text:span text:style-name="T114">: <text:s/>events of Poisson process</text:span></text:p>
            </draw:text-box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5">1</text:span><text:span text:style-name="T13"> has an exponential distribution with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display§\Pr[X_1&gt;t] = \textcolor{blue}{\Pr[N(t) = 0]} = e^{\lambda t}.§svg§600§FALSE§</svg:desc>
          <draw:frame draw:style-name="gr2" draw:text-style-name="P4" draw:layer="layout" svg:width="10.024cm" svg:height="0.806cm" svg:x="8.504cm" svg:y="7.439cm">
            <draw:image xlink:href="Pictures/100048990000139500000194B12DDDCA4F71A73B.svg" xlink:type="simple" xlink:show="embed" xlink:actuate="onLoad" draw:mime-type="image/svg+xml">
              <text:p/>
            </draw:image>
            <draw:image xlink:href="Pictures/100000010000017B0000001FEFDE6E0C4535D121.png" xlink:type="simple" xlink:show="embed" xlink:actuate="onLoad" draw:mime-type="image/png"/>
          </draw:frame>
        </draw:g>
        <draw:g>
          <svg:title>TexMaths</svg:title>
          <svg:desc>20§display§F(X_1) = 1 - \Pr[X_1&gt;t] = 1- e^{\lambda t}.§svg§600§FALSE§</svg:desc>
          <draw:frame draw:style-name="gr2" draw:text-style-name="P4" draw:layer="layout" svg:width="10.564cm" svg:height="0.806cm" svg:x="8.404cm" svg:y="9.139cm">
            <draw:image xlink:href="Pictures/10004A51000014A300000194F9A28EAF4653EDAC.svg" xlink:type="simple" xlink:show="embed" xlink:actuate="onLoad" draw:mime-type="image/svg+xml">
              <text:p/>
            </draw:image>
            <draw:image xlink:href="Pictures/100000010000018F0000001F5261068CB207619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6">i</text:span><text:span text:style-name="T13"> , </text:span><text:span text:style-name="T15">i</text:span><text:span text:style-name="T13"> = 1, 2, …, are i.i.d exponential random variables with parameter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2BB0000009DFC8E32EEA42F78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6">i</text:span><text:span text:style-name="T13"> , </text:span><text:span text:style-name="T15">i</text:span><text:span text:style-name="T13"> = 1, 2, …, are i.i.d exponential random variables with parameter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2BB0000009DFC8E32EEA42F78A3.png" xlink:type="simple" xlink:show="embed" xlink:actuate="onLoad" draw:mime-type="image/png"/>
          </draw:frame>
        </draw:g>
        <draw:custom-shape draw:style-name="gr38" draw:text-style-name="P4" draw:layer="layout" svg:width="8.2cm" svg:height="3.4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2.2cm" svg:y1="11cm" svg:x2="15.6cm" svg:y2="12.2cm">
          <text:p/>
        </draw:line>
        <draw:g>
          <svg:title>TexMaths</svg:title>
          <svg:desc>14§display§\textcolor{Orange}{\because \mbox{ Poisson process } \&amp;  \sim \mbox{distribution of } N(t_i) - N(0) = N(t_i)}§svg§600§FALSE§</svg:desc>
          <draw:frame draw:style-name="gr2" draw:text-style-name="P4" draw:layer="layout" svg:width="13.033cm" svg:height="0.49cm" svg:x="11.787cm" svg:y="12.791cm">
            <draw:image xlink:href="Pictures/1000B26B000024780000017A2A5417A430C8D1E8.svg" xlink:type="simple" xlink:show="embed" xlink:actuate="onLoad" draw:mime-type="image/svg+xml">
              <text:p/>
            </draw:image>
            <draw:image xlink:href="Pictures/10000001000002C20000001D9E00DBD26365309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4" draw:layer="layout" svg:width="21.2cm" svg:height="2.6cm" svg:x="0.3cm" svg:y="0.6cm" presentation:class="title" presentation:user-transformed="true">
          <draw:text-box>
            <text:p><text:span text:style-name="T117">So, why the Poisson process makes </text:span><text:span text:style-name="T118">P</text:span><text:span text:style-name="T119">n</text:span><text:span text:style-name="T117">(</text:span><text:span text:style-name="T118">t</text:span><text:span text:style-name="T117">) Poisson distributed?</text:span></text:p>
          </draw:text-box>
        </draw:frame>
        <draw:frame draw:style-name="gr40" draw:text-style-name="P4" draw:layer="layout" svg:width="13.6cm" svg:height="7.711cm" svg:x="0.4cm" svg:y="4.3cm">
          <draw:image xlink:href="Pictures/1000000100000831000004A579B0CE54A1BE1BB1.png" xlink:type="simple" xlink:show="embed" xlink:actuate="onLoad" draw:mime-type="image/png">
            <text:p/>
          </draw:image>
        </draw:frame>
        <draw:frame draw:style-name="gr40" draw:text-style-name="P4" draw:layer="layout" svg:width="14.034cm" svg:height="4.238cm" svg:x="13.4cm" svg:y="7.8cm">
          <draw:image xlink:href="Pictures/10000001000008350000027B9F6F232620022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9.134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1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1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9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1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draw:g>
          <svg:title>TexMaths</svg:title>
          <svg:desc>16§display§\mbox{Solve } P'_0(t) = -\lambda P_0(t)§svg§600§FALSE§</svg:desc>
          <draw:frame draw:style-name="gr2" draw:text-style-name="P4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1010000001C22563F6D501773A5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0" draw:layer="layout" svg:width="13.202cm" svg:height="3.402cm" svg:x="13.913cm" svg:y="6.431cm" svg:viewBox="0 0 13203 3403" svg:d="M6601 3403c-2201 0-4401 0-6601 0 0-1134 0-2269 0-3403 4401 0 8802 0 13203 0 0 1134 0 2269 0 3403-2201 0-4402 0-6602 0z">
              <text:p/>
            </draw:path>
            <draw:path draw:style-name="gr7" draw:text-style-name="P11" draw:layer="layout" svg:width="0.34cm" svg:height="0.303cm" svg:x="13.902cm" svg:y="6.943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7" draw:text-style-name="P11" draw:layer="layout" svg:width="0.401cm" svg:height="0.383cm" svg:x="14.438cm" svg:y="6.819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7" draw:text-style-name="P11" draw:layer="layout" svg:width="0.098cm" svg:height="0.202cm" svg:x="14.873cm" svg:y="6.752cm" svg:viewBox="0 0 99 203" svg:d="M96 34c3-7 3-10 3-13 0-11-11-21-22-21-16 0-21 11-23 18-17 57-34 114-51 171-1 0-2 4-3 6 0 5 13 8 16 8s3 0 6-6c25-55 49-109 74-163z">
              <text:p/>
            </draw:path>
            <draw:path draw:style-name="gr7" draw:text-style-name="P11" draw:layer="layout" svg:width="0.181cm" svg:height="0.268cm" svg:x="14.798cm" svg:y="7.082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7" draw:text-style-name="P11" draw:layer="layout" svg:width="0.13cm" svg:height="0.56cm" svg:x="15.084cm" svg:y="6.783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7" draw:text-style-name="P11" draw:layer="layout" svg:width="0.172cm" svg:height="0.357cm" svg:x="15.26cm" svg:y="6.851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7" draw:text-style-name="P11" draw:layer="layout" svg:width="0.129cm" svg:height="0.56cm" svg:x="15.483cm" svg:y="6.783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7" draw:text-style-name="P11" draw:layer="layout" svg:width="0.372cm" svg:height="0.132cm" svg:x="16.263cm" svg:y="6.997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7" draw:text-style-name="P11" draw:layer="layout" svg:width="0.124cm" svg:height="0.388cm" svg:x="17.327cm" svg:y="6.815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7" draw:text-style-name="P11" draw:layer="layout" svg:width="0.119cm" svg:height="0.375cm" svg:x="17.482cm" svg:y="6.827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7" draw:text-style-name="P11" draw:layer="layout" svg:width="0.439cm" svg:height="0.247cm" svg:x="17.637cm" svg:y="6.955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1" draw:layer="layout" svg:width="0.213cm" svg:height="0.276cm" svg:x="17.26cm" svg:y="7.298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7" draw:text-style-name="P11" draw:layer="layout" svg:width="0.386cm" svg:height="0.207cm" svg:x="17.524cm" svg:y="7.368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7" draw:text-style-name="P11" draw:layer="layout" svg:width="0.181cm" svg:height="0.269cm" svg:x="17.962cm" svg:y="7.309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7" draw:text-style-name="P11" draw:layer="layout" svg:width="0.401cm" svg:height="0.383cm" svg:x="18.349cm" svg:y="6.44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7" draw:text-style-name="P11" draw:layer="layout" svg:width="0.181cm" svg:height="0.268cm" svg:x="18.709cm" svg:y="6.647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7" draw:text-style-name="P11" draw:layer="layout" svg:width="0.13cm" svg:height="0.562cm" svg:x="18.996cm" svg:y="6.402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19.172cm" svg:y="6.472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7" draw:text-style-name="P11" draw:layer="layout" svg:width="0.372cm" svg:height="0.373cm" svg:x="19.519cm" svg:y="6.496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7" draw:text-style-name="P11" draw:layer="layout" svg:width="0.274cm" svg:height="0.396cm" svg:x="20.08cm" svg:y="6.434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7" draw:text-style-name="P11" draw:layer="layout" svg:width="0.129cm" svg:height="0.562cm" svg:x="20.405cm" svg:y="6.402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7" draw:text-style-name="P11" draw:layer="layout" svg:width="0.343cm" svg:height="0.021cm" svg:x="20.763cm" svg:y="6.672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401cm" svg:height="0.383cm" svg:x="21.301cm" svg:y="6.44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7" draw:text-style-name="P11" draw:layer="layout" svg:width="0.183cm" svg:height="0.268cm" svg:x="21.659cm" svg:y="6.647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7" draw:text-style-name="P11" draw:layer="layout" svg:width="0.13cm" svg:height="0.562cm" svg:x="21.947cm" svg:y="6.402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22.123cm" svg:y="6.472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7" draw:text-style-name="P11" draw:layer="layout" svg:width="0.129cm" svg:height="0.562cm" svg:x="22.346cm" svg:y="6.402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7" draw:text-style-name="P11" draw:layer="layout" svg:width="4.205cm" svg:height="0.021cm" svg:x="18.327cm" svg:y="7.053cm" svg:viewBox="0 0 4206 22" svg:d="M2102 22c-701 0-1401 0-2102 0 0-7 0-15 0-22 1402 0 2804 0 4206 0 0 7 0 15 0 22-701 0-1403 0-2104 0z">
              <text:p/>
            </draw:path>
            <draw:path draw:style-name="gr7" draw:text-style-name="P11" draw:layer="layout" svg:width="0.276cm" svg:height="0.394cm" svg:x="20.298cm" svg:y="7.2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7" draw:text-style-name="P11" draw:layer="layout" svg:width="0.372cm" svg:height="0.13cm" svg:x="16.263cm" svg:y="8.448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41" draw:text-style-name="P35" draw:layer="layout" svg:width="0.124cm" svg:height="0.388cm" svg:x="17.327cm" svg:y="8.264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41" draw:text-style-name="P35" draw:layer="layout" svg:width="0.119cm" svg:height="0.375cm" svg:x="17.482cm" svg:y="8.276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41" draw:text-style-name="P35" draw:layer="layout" svg:width="0.439cm" svg:height="0.247cm" svg:x="17.637cm" svg:y="8.404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41" draw:text-style-name="P35" draw:layer="layout" svg:width="0.213cm" svg:height="0.276cm" svg:x="17.26cm" svg:y="8.747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41" draw:text-style-name="P35" draw:layer="layout" svg:width="0.386cm" svg:height="0.207cm" svg:x="17.524cm" svg:y="8.817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41" draw:text-style-name="P35" draw:layer="layout" svg:width="0.181cm" svg:height="0.268cm" svg:x="17.962cm" svg:y="8.759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7" draw:text-style-name="P11" draw:layer="layout" svg:width="0.401cm" svg:height="0.381cm" svg:x="18.188cm" svg:y="8.27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7" draw:text-style-name="P11" draw:layer="layout" svg:width="0.181cm" svg:height="0.268cm" svg:x="18.548cm" svg:y="8.476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7" draw:text-style-name="P11" draw:layer="layout" svg:width="0.13cm" svg:height="0.56cm" svg:x="18.834cm" svg:y="8.232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7" draw:text-style-name="P11" draw:layer="layout" svg:width="0.172cm" svg:height="0.356cm" svg:x="19.01cm" svg:y="8.302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7" draw:text-style-name="P11" draw:layer="layout" svg:width="0.13cm" svg:height="0.56cm" svg:x="19.232cm" svg:y="8.232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7" draw:text-style-name="P11" draw:layer="layout" svg:width="0.343cm" svg:height="0.021cm" svg:x="19.533cm" svg:y="8.121cm" svg:viewBox="0 0 344 22" svg:d="M325 22c9 0 19 0 19-11s-10-11-19-11c-102 0-203 0-304 0-10 0-21 0-21 11s11 11 21 11c101 0 202 0 304 0z">
              <text:p/>
            </draw:path>
            <draw:path draw:style-name="gr7" draw:text-style-name="P11" draw:layer="layout" svg:width="0.33cm" svg:height="0.383cm" svg:x="20.037cm" svg:y="7.889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7" draw:text-style-name="P11" draw:layer="layout" svg:width="0.188cm" svg:height="0.247cm" svg:x="20.416cm" svg:y="8.025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7" draw:text-style-name="P11" draw:layer="layout" svg:width="0.076cm" svg:height="0.562cm" svg:x="20.687cm" svg:y="7.851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1" draw:layer="layout" svg:width="0.473cm" svg:height="0.383cm" svg:x="20.799cm" svg:y="7.889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7" draw:text-style-name="P11" draw:layer="layout" svg:width="0.129cm" svg:height="0.562cm" svg:x="21.346cm" svg:y="7.851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7" draw:text-style-name="P11" draw:layer="layout" svg:width="0.276cm" svg:height="0.396cm" svg:x="21.539cm" svg:y="7.883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7" draw:text-style-name="P11" draw:layer="layout" svg:width="0.13cm" svg:height="0.562cm" svg:x="21.864cm" svg:y="7.851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7" draw:text-style-name="P11" draw:layer="layout" svg:width="0.373cm" svg:height="0.13cm" svg:x="22.238cm" svg:y="8.067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7" draw:text-style-name="P11" draw:layer="layout" svg:width="0.185cm" svg:height="0.373cm" svg:x="22.851cm" svg:y="7.899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7" draw:text-style-name="P11" draw:layer="layout" svg:width="0.076cm" svg:height="0.562cm" svg:x="23.094cm" svg:y="7.851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0.343cm" svg:height="0.021cm" svg:x="23.41cm" svg:y="8.121cm" svg:viewBox="0 0 344 22" svg:d="M323 22c10 0 21 0 21-11s-11-11-21-11c-101 0-202 0-304 0-9 0-19 0-19 11s10 11 19 11c102 0 203 0 304 0z">
              <text:p/>
            </draw:path>
            <draw:path draw:style-name="gr41" draw:text-style-name="P35" draw:layer="layout" svg:width="0.33cm" svg:height="0.383cm" svg:x="23.944cm" svg:y="7.889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41" draw:text-style-name="P35" draw:layer="layout" svg:width="0.188cm" svg:height="0.247cm" svg:x="24.323cm" svg:y="8.025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41" draw:text-style-name="P35" draw:layer="layout" svg:width="0.076cm" svg:height="0.562cm" svg:x="24.593cm" svg:y="7.851cm" svg:viewBox="0 0 77 563" svg:d="M77 563c0-7 0-15 0-22-18 0-36 0-55 0 0-173 0-346 0-519 19 0 37 0 55 0 0-7 0-15 0-22-26 0-51 0-77 0 0 188 0 375 0 563 26 0 51 0 77 0z">
              <text:p/>
            </draw:path>
            <draw:path draw:style-name="gr41" draw:text-style-name="P35" draw:layer="layout" svg:width="0.473cm" svg:height="0.383cm" svg:x="24.705cm" svg:y="7.889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41" draw:text-style-name="P35" draw:layer="layout" svg:width="0.129cm" svg:height="0.562cm" svg:x="25.252cm" svg:y="7.851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41" draw:text-style-name="P35" draw:layer="layout" svg:width="0.276cm" svg:height="0.396cm" svg:x="25.446cm" svg:y="7.883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41" draw:text-style-name="P35" draw:layer="layout" svg:width="0.13cm" svg:height="0.562cm" svg:x="25.771cm" svg:y="7.851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41" draw:text-style-name="P35" draw:layer="layout" svg:width="0.341cm" svg:height="0.434cm" svg:x="26.161cm" svg:y="7.915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41" draw:text-style-name="P35" draw:layer="layout" svg:width="0.223cm" svg:height="0.373cm" svg:x="26.735cm" svg:y="7.899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41" draw:text-style-name="P35" draw:layer="layout" svg:width="0.076cm" svg:height="0.562cm" svg:x="27.001cm" svg:y="7.851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7.657cm" svg:height="0.021cm" svg:x="19.487cm" svg:y="8.502cm" svg:viewBox="0 0 7658 22" svg:d="M3828 22c-1276 0-2552 0-3828 0 0-7 0-15 0-22 2553 0 5105 0 7658 0 0 7 0 15 0 22-1276 0-2553 0-3830 0z">
              <text:p/>
            </draw:path>
            <draw:path draw:style-name="gr41" draw:text-style-name="P35" draw:layer="layout" svg:width="0.274cm" svg:height="0.394cm" svg:x="23.186cm" svg:y="8.649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7" draw:text-style-name="P11" draw:layer="layout" svg:width="0.372cm" svg:height="0.13cm" svg:x="16.263cm" svg:y="9.516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1" draw:layer="layout" svg:width="0.343cm" svg:height="0.021cm" svg:x="17.278cm" svg:y="9.57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277cm" svg:height="0.397cm" svg:x="17.698cm" svg:y="9.332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7" draw:text-style-name="P11" draw:layer="layout" svg:width="0.401cm" svg:height="0.383cm" svg:x="18.018cm" svg:y="9.338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7" draw:text-style-name="P11" draw:layer="layout" svg:width="0.183cm" svg:height="0.269cm" svg:x="18.377cm" svg:y="9.545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7" draw:text-style-name="P11" draw:layer="layout" svg:width="0.13cm" svg:height="0.562cm" svg:x="18.665cm" svg:y="9.3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7" draw:text-style-name="P11" draw:layer="layout" svg:width="0.172cm" svg:height="0.357cm" svg:x="18.841cm" svg:y="9.37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7" draw:text-style-name="P11" draw:layer="layout" svg:width="0.129cm" svg:height="0.562cm" svg:x="19.063cm" svg:y="9.3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7" draw:text-style-name="P11" draw:layer="layout" svg:width="0.058cm" svg:height="0.058cm" svg:x="19.298cm" svg:y="9.663cm" svg:viewBox="0 0 59 59" svg:d="M59 29c0-16-14-29-30-29s-29 12-29 29 13 30 29 30 30-13 30-30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1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0" draw:layer="layout" svg:width="13.202cm" svg:height="3.402cm" svg:x="13.912cm" svg:y="6.43cm" svg:viewBox="0 0 13203 3403" svg:d="M6601 3403c-2201 0-4401 0-6601 0 0-1134 0-2269 0-3403 4401 0 8802 0 13203 0 0 1134 0 2269 0 3403-2201 0-4402 0-6602 0z">
              <text:p/>
            </draw:path>
            <draw:path draw:style-name="gr7" draw:text-style-name="P11" draw:layer="layout" svg:width="0.34cm" svg:height="0.303cm" svg:x="13.901cm" svg:y="6.942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7" draw:text-style-name="P11" draw:layer="layout" svg:width="0.401cm" svg:height="0.383cm" svg:x="14.437cm" svg:y="6.818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7" draw:text-style-name="P11" draw:layer="layout" svg:width="0.098cm" svg:height="0.202cm" svg:x="14.872cm" svg:y="6.751cm" svg:viewBox="0 0 99 203" svg:d="M96 34c3-7 3-10 3-13 0-11-11-21-22-21-16 0-21 11-23 18-17 57-34 114-51 171-1 0-2 4-3 6 0 5 13 8 16 8s3 0 6-6c25-55 49-109 74-163z">
              <text:p/>
            </draw:path>
            <draw:path draw:style-name="gr7" draw:text-style-name="P11" draw:layer="layout" svg:width="0.181cm" svg:height="0.268cm" svg:x="14.797cm" svg:y="7.081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7" draw:text-style-name="P11" draw:layer="layout" svg:width="0.13cm" svg:height="0.56cm" svg:x="15.083cm" svg:y="6.782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7" draw:text-style-name="P11" draw:layer="layout" svg:width="0.172cm" svg:height="0.357cm" svg:x="15.259cm" svg:y="6.85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7" draw:text-style-name="P11" draw:layer="layout" svg:width="0.129cm" svg:height="0.56cm" svg:x="15.482cm" svg:y="6.782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7" draw:text-style-name="P11" draw:layer="layout" svg:width="0.372cm" svg:height="0.132cm" svg:x="16.262cm" svg:y="6.996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7" draw:text-style-name="P11" draw:layer="layout" svg:width="0.124cm" svg:height="0.388cm" svg:x="17.326cm" svg:y="6.814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7" draw:text-style-name="P11" draw:layer="layout" svg:width="0.119cm" svg:height="0.375cm" svg:x="17.481cm" svg:y="6.826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7" draw:text-style-name="P11" draw:layer="layout" svg:width="0.439cm" svg:height="0.247cm" svg:x="17.636cm" svg:y="6.954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1" draw:layer="layout" svg:width="0.213cm" svg:height="0.276cm" svg:x="17.259cm" svg:y="7.297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7" draw:text-style-name="P11" draw:layer="layout" svg:width="0.386cm" svg:height="0.207cm" svg:x="17.523cm" svg:y="7.367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7" draw:text-style-name="P11" draw:layer="layout" svg:width="0.181cm" svg:height="0.269cm" svg:x="17.961cm" svg:y="7.308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7" draw:text-style-name="P11" draw:layer="layout" svg:width="0.401cm" svg:height="0.383cm" svg:x="18.348cm" svg:y="6.439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7" draw:text-style-name="P11" draw:layer="layout" svg:width="0.181cm" svg:height="0.268cm" svg:x="18.708cm" svg:y="6.646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7" draw:text-style-name="P11" draw:layer="layout" svg:width="0.13cm" svg:height="0.562cm" svg:x="18.995cm" svg:y="6.401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19.171cm" svg:y="6.471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7" draw:text-style-name="P11" draw:layer="layout" svg:width="0.372cm" svg:height="0.373cm" svg:x="19.518cm" svg:y="6.495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7" draw:text-style-name="P11" draw:layer="layout" svg:width="0.274cm" svg:height="0.396cm" svg:x="20.079cm" svg:y="6.433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7" draw:text-style-name="P11" draw:layer="layout" svg:width="0.129cm" svg:height="0.562cm" svg:x="20.404cm" svg:y="6.401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7" draw:text-style-name="P11" draw:layer="layout" svg:width="0.343cm" svg:height="0.021cm" svg:x="20.762cm" svg:y="6.671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401cm" svg:height="0.383cm" svg:x="21.3cm" svg:y="6.439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7" draw:text-style-name="P11" draw:layer="layout" svg:width="0.183cm" svg:height="0.268cm" svg:x="21.658cm" svg:y="6.646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7" draw:text-style-name="P11" draw:layer="layout" svg:width="0.13cm" svg:height="0.562cm" svg:x="21.946cm" svg:y="6.401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22.122cm" svg:y="6.471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7" draw:text-style-name="P11" draw:layer="layout" svg:width="0.129cm" svg:height="0.562cm" svg:x="22.345cm" svg:y="6.401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7" draw:text-style-name="P11" draw:layer="layout" svg:width="4.205cm" svg:height="0.021cm" svg:x="18.326cm" svg:y="7.052cm" svg:viewBox="0 0 4206 22" svg:d="M2102 22c-701 0-1401 0-2102 0 0-7 0-15 0-22 1402 0 2804 0 4206 0 0 7 0 15 0 22-701 0-1403 0-2104 0z">
              <text:p/>
            </draw:path>
            <draw:path draw:style-name="gr7" draw:text-style-name="P11" draw:layer="layout" svg:width="0.276cm" svg:height="0.394cm" svg:x="20.297cm" svg:y="7.199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7" draw:text-style-name="P11" draw:layer="layout" svg:width="0.372cm" svg:height="0.13cm" svg:x="16.262cm" svg:y="8.447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41" draw:text-style-name="P35" draw:layer="layout" svg:width="0.124cm" svg:height="0.388cm" svg:x="17.326cm" svg:y="8.263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41" draw:text-style-name="P35" draw:layer="layout" svg:width="0.119cm" svg:height="0.375cm" svg:x="17.481cm" svg:y="8.275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41" draw:text-style-name="P35" draw:layer="layout" svg:width="0.439cm" svg:height="0.247cm" svg:x="17.636cm" svg:y="8.403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41" draw:text-style-name="P35" draw:layer="layout" svg:width="0.213cm" svg:height="0.276cm" svg:x="17.259cm" svg:y="8.746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41" draw:text-style-name="P35" draw:layer="layout" svg:width="0.386cm" svg:height="0.207cm" svg:x="17.523cm" svg:y="8.816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41" draw:text-style-name="P35" draw:layer="layout" svg:width="0.181cm" svg:height="0.268cm" svg:x="17.961cm" svg:y="8.758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7" draw:text-style-name="P11" draw:layer="layout" svg:width="0.401cm" svg:height="0.381cm" svg:x="18.187cm" svg:y="8.269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7" draw:text-style-name="P11" draw:layer="layout" svg:width="0.181cm" svg:height="0.268cm" svg:x="18.547cm" svg:y="8.475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7" draw:text-style-name="P11" draw:layer="layout" svg:width="0.13cm" svg:height="0.56cm" svg:x="18.833cm" svg:y="8.231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7" draw:text-style-name="P11" draw:layer="layout" svg:width="0.172cm" svg:height="0.356cm" svg:x="19.009cm" svg:y="8.301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7" draw:text-style-name="P11" draw:layer="layout" svg:width="0.13cm" svg:height="0.56cm" svg:x="19.231cm" svg:y="8.231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7" draw:text-style-name="P11" draw:layer="layout" svg:width="0.343cm" svg:height="0.021cm" svg:x="19.532cm" svg:y="8.12cm" svg:viewBox="0 0 344 22" svg:d="M325 22c9 0 19 0 19-11s-10-11-19-11c-102 0-203 0-304 0-10 0-21 0-21 11s11 11 21 11c101 0 202 0 304 0z">
              <text:p/>
            </draw:path>
            <draw:path draw:style-name="gr7" draw:text-style-name="P11" draw:layer="layout" svg:width="0.33cm" svg:height="0.383cm" svg:x="20.036cm" svg:y="7.888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7" draw:text-style-name="P11" draw:layer="layout" svg:width="0.188cm" svg:height="0.247cm" svg:x="20.415cm" svg:y="8.024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7" draw:text-style-name="P11" draw:layer="layout" svg:width="0.076cm" svg:height="0.562cm" svg:x="20.686cm" svg:y="7.85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1" draw:layer="layout" svg:width="0.473cm" svg:height="0.383cm" svg:x="20.798cm" svg:y="7.888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7" draw:text-style-name="P11" draw:layer="layout" svg:width="0.129cm" svg:height="0.562cm" svg:x="21.345cm" svg:y="7.85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7" draw:text-style-name="P11" draw:layer="layout" svg:width="0.276cm" svg:height="0.396cm" svg:x="21.538cm" svg:y="7.882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7" draw:text-style-name="P11" draw:layer="layout" svg:width="0.13cm" svg:height="0.562cm" svg:x="21.863cm" svg:y="7.85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7" draw:text-style-name="P11" draw:layer="layout" svg:width="0.373cm" svg:height="0.13cm" svg:x="22.237cm" svg:y="8.066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7" draw:text-style-name="P11" draw:layer="layout" svg:width="0.185cm" svg:height="0.373cm" svg:x="22.85cm" svg:y="7.898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7" draw:text-style-name="P11" draw:layer="layout" svg:width="0.076cm" svg:height="0.562cm" svg:x="23.093cm" svg:y="7.85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0.343cm" svg:height="0.021cm" svg:x="23.409cm" svg:y="8.12cm" svg:viewBox="0 0 344 22" svg:d="M323 22c10 0 21 0 21-11s-11-11-21-11c-101 0-202 0-304 0-9 0-19 0-19 11s10 11 19 11c102 0 203 0 304 0z">
              <text:p/>
            </draw:path>
            <draw:path draw:style-name="gr41" draw:text-style-name="P35" draw:layer="layout" svg:width="0.33cm" svg:height="0.383cm" svg:x="23.943cm" svg:y="7.888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41" draw:text-style-name="P35" draw:layer="layout" svg:width="0.188cm" svg:height="0.247cm" svg:x="24.322cm" svg:y="8.024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41" draw:text-style-name="P35" draw:layer="layout" svg:width="0.076cm" svg:height="0.562cm" svg:x="24.592cm" svg:y="7.85cm" svg:viewBox="0 0 77 563" svg:d="M77 563c0-7 0-15 0-22-18 0-36 0-55 0 0-173 0-346 0-519 19 0 37 0 55 0 0-7 0-15 0-22-26 0-51 0-77 0 0 188 0 375 0 563 26 0 51 0 77 0z">
              <text:p/>
            </draw:path>
            <draw:path draw:style-name="gr41" draw:text-style-name="P35" draw:layer="layout" svg:width="0.473cm" svg:height="0.383cm" svg:x="24.704cm" svg:y="7.888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41" draw:text-style-name="P35" draw:layer="layout" svg:width="0.129cm" svg:height="0.562cm" svg:x="25.251cm" svg:y="7.85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41" draw:text-style-name="P35" draw:layer="layout" svg:width="0.276cm" svg:height="0.396cm" svg:x="25.445cm" svg:y="7.882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41" draw:text-style-name="P35" draw:layer="layout" svg:width="0.13cm" svg:height="0.562cm" svg:x="25.77cm" svg:y="7.85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41" draw:text-style-name="P35" draw:layer="layout" svg:width="0.341cm" svg:height="0.434cm" svg:x="26.16cm" svg:y="7.914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41" draw:text-style-name="P35" draw:layer="layout" svg:width="0.223cm" svg:height="0.373cm" svg:x="26.734cm" svg:y="7.898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41" draw:text-style-name="P35" draw:layer="layout" svg:width="0.076cm" svg:height="0.562cm" svg:x="27cm" svg:y="7.85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7.657cm" svg:height="0.021cm" svg:x="19.486cm" svg:y="8.501cm" svg:viewBox="0 0 7658 22" svg:d="M3828 22c-1276 0-2552 0-3828 0 0-7 0-15 0-22 2553 0 5105 0 7658 0 0 7 0 15 0 22-1276 0-2553 0-3830 0z">
              <text:p/>
            </draw:path>
            <draw:path draw:style-name="gr41" draw:text-style-name="P35" draw:layer="layout" svg:width="0.274cm" svg:height="0.394cm" svg:x="23.185cm" svg:y="8.648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7" draw:text-style-name="P11" draw:layer="layout" svg:width="0.372cm" svg:height="0.13cm" svg:x="16.262cm" svg:y="9.515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1" draw:layer="layout" svg:width="0.343cm" svg:height="0.021cm" svg:x="17.277cm" svg:y="9.569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277cm" svg:height="0.397cm" svg:x="17.697cm" svg:y="9.331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7" draw:text-style-name="P11" draw:layer="layout" svg:width="0.401cm" svg:height="0.383cm" svg:x="18.017cm" svg:y="9.337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7" draw:text-style-name="P11" draw:layer="layout" svg:width="0.183cm" svg:height="0.269cm" svg:x="18.376cm" svg:y="9.544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7" draw:text-style-name="P11" draw:layer="layout" svg:width="0.13cm" svg:height="0.562cm" svg:x="18.664cm" svg:y="9.299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7" draw:text-style-name="P11" draw:layer="layout" svg:width="0.172cm" svg:height="0.357cm" svg:x="18.84cm" svg:y="9.369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7" draw:text-style-name="P11" draw:layer="layout" svg:width="0.129cm" svg:height="0.562cm" svg:x="19.062cm" svg:y="9.299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7" draw:text-style-name="P11" draw:layer="layout" svg:width="0.058cm" svg:height="0.058cm" svg:x="19.297cm" svg:y="9.662cm" svg:viewBox="0 0 59 59" svg:d="M59 29c0-16-14-29-30-29s-29 12-29 29 13 30 29 30 30-13 30-30z">
              <text:p/>
            </draw:path>
          </draw:g>
        </draw:g>
        <draw:g>
          <svg:title>TexMaths</svg:title>
          <svg:desc>16§display§\mbox{Solve } P'_0(t) = -\lambda P_0(t)§svg§600§FALSE§</svg:desc>
          <draw:frame draw:style-name="gr2" draw:text-style-name="P4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1010000001C22563F6D501773A5.png" xlink:type="simple" xlink:show="embed" xlink:actuate="onLoad" draw:mime-type="image/png"/>
          </draw:frame>
        </draw:g>
        <draw:g>
          <svg:title>TexMaths</svg:title>
          <svg:desc>16§display§\frac{P'_0(t)}{P_0(t)} = -\lambda. \Rightarrow \int \frac{P'_0(t)}{P_0(t)} dt = \int -\lambda dt§svg§600§FALSE§</svg:desc>
          <draw:frame draw:style-name="gr2" draw:text-style-name="P4" draw:layer="layout" svg:width="9.056cm" svg:height="1.33cm" svg:x="14.089cm" svg:y="11.916cm">
            <draw:image xlink:href="Pictures/10007CA00000161D000003409C97119BCA70A1D8.svg" xlink:type="simple" xlink:show="embed" xlink:actuate="onLoad" draw:mime-type="image/svg+xml">
              <text:p/>
            </draw:image>
            <draw:image xlink:href="Pictures/10000001000001AC0000003FA0E3F472B4990C76.png" xlink:type="simple" xlink:show="embed" xlink:actuate="onLoad" draw:mime-type="image/png"/>
          </draw:frame>
        </draw:g>
        <draw:g>
          <svg:title>TexMaths</svg:title>
          <svg:desc>16§display§\ln P_0(t) = -\lambda t+C\;\; \therefore P_0(t) = e^{-\lambda t} \mbox{ (\because P_0(0) = 1)} §svg§600§FALSE§</svg:desc>
          <draw:g>
            <draw:path draw:style-name="gr6" draw:text-style-name="P10" draw:layer="layout" svg:width="12.147cm" svg:height="0.585cm" svg:x="14.102cm" svg:y="13.711cm" svg:viewBox="0 0 12148 586" svg:d="M0 0c4049 0 8098 0 12148 0 0 195 0 390 0 586-4050 0-8099 0-12148 0 0-196 0-391 0-586z">
              <text:p/>
            </draw:path>
            <draw:path draw:style-name="gr7" draw:text-style-name="P11" draw:layer="layout" svg:width="0.124cm" svg:height="0.387cm" svg:x="14.092cm" svg:y="13.797cm" svg:viewBox="0 0 125 388" svg:d="M80 0c-27 2-53 4-80 6 0 6 0 12 0 18 38 0 43 3 43 30 0 98 0 195 0 292 0 24-6 24-43 24 0 6 0 12 0 18 18 0 49-2 62-2 14 0 42 2 63 2 0-6 0-12 0-18-39 0-45 0-45-24 0-115 0-231 0-346z">
              <text:p/>
            </draw:path>
            <draw:path draw:style-name="gr7" draw:text-style-name="P11" draw:layer="layout" svg:width="0.282cm" svg:height="0.246cm" svg:x="14.247cm" svg:y="13.937cm" svg:viewBox="0 0 283 247" svg:d="M43 56c0 50 0 100 0 150 0 24-6 24-43 24 0 6 0 11 0 17 19 0 48-1 64-1 14 0 43 1 62 1 0-6 0-11 0-17-38 0-43 0-43-24 0-35 0-69 0-104 0-57 39-89 75-89s42 30 42 62c0 44 0 87 0 131 0 24-6 24-43 24 0 6 0 11 0 17 19 0 48-1 62-1 15 0 45 1 64 1 0-6 0-11 0-17-30 0-43 0-45-16 0-36 0-71 0-107 0-48 0-66-17-86-8-10-26-21-59-21-40 0-68 24-84 59 0-20 0-39 0-59-26 2-52 4-78 6 0 6 0 12 0 18 38 0 43 3 43 32z">
              <text:p/>
            </draw:path>
            <draw:path draw:style-name="gr7" draw:text-style-name="P11" draw:layer="layout" svg:width="0.401cm" svg:height="0.38cm" svg:x="14.657cm" svg:y="13.803cm" svg:viewBox="0 0 402 381" svg:d="M149 204c32 0 64 0 96 0 80 0 157-57 157-119 0-44-37-85-111-85-61 0-121 0-182 0-10 0-16 0-16 10 0 8 5 8 16 8 8 0 17 0 24 0 9 1 13 3 13 9 0 2-2 3-4 11-25 100-50 200-75 300-5 23-6 26-51 26-10 0-16 0-16 11 0 6 8 6 10 6 16 0 56-1 70-1 13 0 24 1 37 1s24 0 37 0c3 0 11 0 11-11 0-6-5-6-16-6-21 0-37 0-37-10 0-3 2-6 2-9 11-47 23-94 35-141zM189 38c5-19 6-20 30-20 18 0 36 0 55 0 46 0 76 14 76 52 0 23-11 70-33 91-29 24-63 29-87 29-26 0-53 0-80 0 13-51 26-101 39-152z">
              <text:p/>
            </draw:path>
            <draw:path draw:style-name="gr7" draw:text-style-name="P11" draw:layer="layout" svg:width="0.181cm" svg:height="0.267cm" svg:x="15.0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7" draw:text-style-name="P11" draw:layer="layout" svg:width="0.13cm" svg:height="0.559cm" svg:x="15.303cm" svg:y="13.765cm" svg:viewBox="0 0 131 560" svg:d="M131 554c0-2 0-2-9-12-71-70-88-177-88-261 0-98 20-196 89-265 8-8 8-8 8-10 0-4-1-6-5-6-6 0-57 38-89 110-29 61-37 123-37 171 0 43 6 110 38 174 34 68 82 105 88 105 4 0 5-2 5-6z">
              <text:p/>
            </draw:path>
            <draw:path draw:style-name="gr7" draw:text-style-name="P11" draw:layer="layout" svg:width="0.172cm" svg:height="0.355cm" svg:x="15.479cm" svg:y="13.835cm" svg:viewBox="0 0 173 356" svg:d="M104 126c18 0 35 0 53 0 11 0 16 0 16-11 0-7-5-7-15-7-16 0-33 0-49 0 19-79 22-90 22-94 0-9-6-14-16-14-1 0-17 0-22 19-8 30-15 60-23 89-17 0-35 0-52 0-12 0-18 0-18 12 0 6 5 6 16 6 17 0 33 0 50 0-40 160-42 169-42 179 0 30 21 51 51 51 58 0 90-82 90-86 0-5-5-5-7-5-6 0-6 1-9 8-24 57-55 70-72 70-13 0-18-6-18-25 0-13 0-18 3-28 14-54 28-109 42-164z">
              <text:p/>
            </draw:path>
            <draw:path draw:style-name="gr7" draw:text-style-name="P11" draw:layer="layout" svg:width="0.13cm" svg:height="0.559cm" svg:x="15.701cm" svg:y="13.765cm" svg:viewBox="0 0 131 560" svg:d="M131 281c0-45-6-112-37-176-33-68-83-105-88-105-3 0-6 3-6 6 0 2 0 2 11 13 55 54 87 144 87 262 0 96-21 193-90 265-8 6-8 6-8 8 0 4 3 6 6 6 5 0 56-38 90-108 29-63 35-125 35-171z">
              <text:p/>
            </draw:path>
            <draw:path draw:style-name="gr7" draw:text-style-name="P11" draw:layer="layout" svg:width="0.373cm" svg:height="0.13cm" svg:x="16.0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7" draw:text-style-name="P11" draw:layer="layout" svg:width="0.341cm" svg:height="0.021cm" svg:x="16.685cm" svg:y="14.035cm" svg:viewBox="0 0 342 22" svg:d="M323 22c10 0 19 0 19-11s-9-11-19-11c-101 0-202 0-304 0-9 0-19 0-19 11s10 11 19 11c102 0 203 0 304 0z">
              <text:p/>
            </draw:path>
            <draw:path draw:style-name="gr7" draw:text-style-name="P11" draw:layer="layout" svg:width="0.277cm" svg:height="0.395cm" svg:x="17.105cm" svg:y="13.797cm" svg:viewBox="0 0 278 396" svg:d="M171 225c24 59 51 144 59 156 10 13 15 13 31 13 4 0 8 0 13 0 4 0 4-3 4-5 0-1 0-3-1-6-7-5-10-14-13-26-38-105-77-211-115-317-11-34-42-40-69-40-3 0-10 0-10 6 0 4 4 4 5 5 18 3 23 7 37 45 18 51 36 102 54 153-51 51-103 102-155 153-6 7-11 10-11 18 0 9 8 16 18 16 9 0 14-7 19-13 45-53 89-105 134-158z">
              <text:p/>
            </draw:path>
            <draw:path draw:style-name="gr7" draw:text-style-name="P11" draw:layer="layout" svg:width="0.172cm" svg:height="0.355cm" svg:x="17.416cm" svg:y="13.835cm" svg:viewBox="0 0 173 356" svg:d="M102 126c18 0 36 0 53 0 11 0 18 0 18-11 0-7-7-7-16-7-17 0-33 0-50 0 21-79 23-90 23-94 0-9-7-14-16-14-2 0-18 0-23 19-7 30-14 60-21 89-18 0-36 0-54 0-11 0-16 0-16 12 0 6 5 6 16 6 17 0 33 0 50 0-42 160-44 169-44 179 0 30 21 51 52 51 57 0 89-82 89-86 0-5-5-5-6-5-5 0-7 1-8 8-24 57-55 70-74 70-11 0-17-6-17-25 0-13 1-18 3-28 14-54 28-109 41-164z">
              <text:p/>
            </draw:path>
            <draw:path draw:style-name="gr7" draw:text-style-name="P11" draw:layer="layout" svg:width="0.372cm" svg:height="0.371cm" svg:x="17.764cm" svg:y="13.859cm" svg:viewBox="0 0 373 372" svg:d="M198 198c53 0 105 0 157 0 8 0 18 0 18-11s-10-11-18-11c-52 0-104 0-157 0 0-53 0-106 0-158 0-8 0-18-11-18s-11 10-11 18c0 52 0 105 0 158-53 0-106 0-158 0-8 0-18 0-18 11s10 11 18 11c52 0 105 0 158 0 0 52 0 104 0 156 0 8 0 18 11 18s11-10 11-18c0-52 0-104 0-156z">
              <text:p/>
            </draw:path>
            <draw:path draw:style-name="gr7" draw:text-style-name="P11" draw:layer="layout" svg:width="0.397cm" svg:height="0.406cm" svg:x="18.322cm" svg:y="13.79cm" svg:viewBox="0 0 398 407" svg:d="M398 5c0-2 0-5-6-5-2 0-2 0-8 6-13 15-26 29-38 43-7-8-32-49-95-49-125 0-251 123-251 254 0 92 66 153 152 153 50 0 91-22 122-48 52-46 62-97 62-99 0-5-6-5-8-5-3 0-5 0-6 5-5 16-18 56-58 89-38 31-74 40-102 40-52 0-111-28-111-116 0-32 11-123 67-188 36-40 88-67 138-67 58 0 91 43 91 108 0 22-1 22-1 27 0 6 4 7 8 7 6 0 6-2 9-12 12-47 24-95 35-143z">
              <text:p/>
            </draw:path>
            <draw:path draw:style-name="gr7" draw:text-style-name="P11" draw:layer="layout" svg:width="0.34cm" svg:height="0.301cm" svg:x="19.221cm" svg:y="13.926cm" svg:viewBox="0 0 341 302" svg:d="M200 29c0-16-14-29-30-29-17 0-29 13-29 29s13 30 29 30 30-13 30-30zM341 271c0-16-14-30-31-30-16 0-28 14-28 30s12 31 28 31c17 0 31-15 31-31zM59 271c0-16-12-30-29-30-16 0-30 14-30 30s14 31 30 31c17 0 29-15 29-31z">
              <text:p/>
            </draw:path>
            <draw:path draw:style-name="gr7" draw:text-style-name="P11" draw:layer="layout" svg:width="0.401cm" svg:height="0.38cm" svg:x="19.757cm" svg:y="13.803cm" svg:viewBox="0 0 402 381" svg:d="M149 204c32 0 64 0 96 0 78 0 157-57 157-119 0-44-37-85-111-85-61 0-121 0-182 0-10 0-16 0-16 10 0 8 5 8 16 8 6 0 17 0 24 0 9 1 13 3 13 9 0 2-2 3-4 11-25 100-50 200-75 300-5 23-6 26-51 26-10 0-16 0-16 11 0 6 8 6 10 6 16 0 54-1 70-1 13 0 24 1 37 1s24 0 37 0c3 0 11 0 11-11 0-6-7-6-16-6-21 0-37 0-37-10 0-3 2-6 2-9 11-47 23-94 35-141zM189 38c5-19 6-20 30-20 18 0 36 0 55 0 46 0 76 14 76 52 0 23-11 70-33 91-29 24-63 29-87 29-26 0-53 0-80 0 13-51 26-101 39-152z">
              <text:p/>
            </draw:path>
            <draw:path draw:style-name="gr7" draw:text-style-name="P11" draw:layer="layout" svg:width="0.181cm" svg:height="0.267cm" svg:x="20.1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7" draw:text-style-name="P11" draw:layer="layout" svg:width="0.13cm" svg:height="0.559cm" svg:x="20.403cm" svg:y="13.765cm" svg:viewBox="0 0 131 560" svg:d="M131 554c0-2 0-2-9-12-71-70-88-177-88-261 0-98 20-196 89-265 8-8 8-8 8-10 0-4-1-6-6-6s-56 38-88 110c-29 61-37 123-37 171 0 43 6 110 38 174 34 68 82 105 87 105s6-2 6-6z">
              <text:p/>
            </draw:path>
            <draw:path draw:style-name="gr7" draw:text-style-name="P11" draw:layer="layout" svg:width="0.172cm" svg:height="0.355cm" svg:x="20.579cm" svg:y="13.835cm" svg:viewBox="0 0 173 356" svg:d="M104 126c18 0 35 0 53 0 11 0 16 0 16-11 0-7-5-7-16-7-17 0-33 0-50 0 21-79 24-90 24-94 0-9-6-14-16-14-1 0-17 0-22 19-8 30-15 60-23 89-17 0-35 0-52 0-12 0-18 0-18 12 0 6 5 6 16 6 17 0 33 0 50 0-40 160-44 169-44 179 0 30 23 51 53 51 58 0 90-82 90-86 0-5-5-5-8-5-5 0-5 1-8 8-24 57-55 70-74 70-11 0-16-6-16-25 0-13 0-18 3-28 14-54 28-109 42-164z">
              <text:p/>
            </draw:path>
            <draw:path draw:style-name="gr7" draw:text-style-name="P11" draw:layer="layout" svg:width="0.13cm" svg:height="0.559cm" svg:x="20.802cm" svg:y="13.765cm" svg:viewBox="0 0 131 560" svg:d="M131 281c0-45-6-112-37-176-35-68-83-105-88-105-3 0-6 3-6 6 0 2 0 2 11 13 55 54 87 144 87 262 0 96-21 193-90 265-8 6-8 6-8 8 0 4 3 6 6 6 5 0 56-38 90-108 29-63 35-125 35-171z">
              <text:p/>
            </draw:path>
            <draw:path draw:style-name="gr7" draw:text-style-name="P11" draw:layer="layout" svg:width="0.373cm" svg:height="0.13cm" svg:x="21.1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7" draw:text-style-name="P11" draw:layer="layout" svg:width="0.215cm" svg:height="0.253cm" svg:x="21.765cm" svg:y="13.937cm" svg:viewBox="0 0 216 254" svg:d="M78 118c16 0 58 0 87-13 40-16 41-49 41-57 0-24-20-48-59-48-62 0-147 54-147 153 0 56 32 101 88 101 80 0 128-59 128-66 0-3-5-8-8-8-2 0-3 2-6 7-45 54-106 54-114 54-43 0-48-46-48-64 0-6 0-24 10-59 9 0 19 0 28 0zM53 107c21-86 80-94 94-94 26 0 42 16 42 35 0 59-91 59-114 59-7 0-15 0-22 0z">
              <text:p/>
            </draw:path>
            <draw:path draw:style-name="gr7" draw:text-style-name="P11" draw:layer="layout" svg:width="0.265cm" svg:height="0.018cm" svg:x="22.043cm" svg:y="13.846cm" svg:viewBox="0 0 266 19" svg:d="M250 19c6 0 16 0 16-9 0-10-10-10-16-10-79 0-157 0-236 0-4 0-14 0-14 10 0 9 8 9 14 9 79 0 157 0 236 0z">
              <text:p/>
            </draw:path>
            <draw:path draw:style-name="gr7" draw:text-style-name="P11" draw:layer="layout" svg:width="0.215cm" svg:height="0.275cm" svg:x="22.381cm" svg:y="13.682cm" svg:viewBox="0 0 216 276" svg:d="M130 160c19 44 41 102 46 106 8 10 14 10 21 10 2 0 5 0 8 0 8 0 11 0 11-5 0-1-2-3-2-5-4-3-8-12-9-15-32-76-64-152-96-227-3-6-11-24-53-24-5 0-11 0-11 5s5 6 6 6c8 2 16 2 26 24 15 37 31 73 46 110-38 35-77 69-115 104-5 5-8 8-8 14 0 10 8 13 13 13 8 0 13-5 14-6 34-37 68-74 103-110z">
              <text:p/>
            </draw:path>
            <draw:path draw:style-name="gr7" draw:text-style-name="P11" draw:layer="layout" svg:width="0.132cm" svg:height="0.248cm" svg:x="22.635cm" svg:y="13.709cm" svg:viewBox="0 0 133 249" svg:d="M80 89c13 0 27 0 40 0 8 0 13 0 13-8 0-4-5-4-13-4-12 0-25 0-37 0 5-20 10-40 15-59 0-2 1-4 1-5 0-8-5-13-13-13-11 0-16 6-19 18-3 9 3-10-14 59-14 0-27 0-40 0-8 0-13 0-13 8 0 4 5 4 11 4 12 0 25 0 37 0-7 31-15 62-22 93-4 11-7 24-7 30 0 23 21 37 43 37 44 0 68-55 68-61 0-5-5-5-7-5-3 0-5 2-8 8-11 24-30 47-53 47-8 0-12-5-12-19 0-4 1-13 1-16 10-38 19-76 29-114z">
              <text:p/>
            </draw:path>
            <draw:path draw:style-name="gr7" draw:text-style-name="P11" draw:layer="layout" svg:width="0.13cm" svg:height="0.559cm" svg:x="23.059cm" svg:y="13.765cm" svg:viewBox="0 0 131 560" svg:d="M131 554c0-2 0-2-9-12-71-70-90-177-90-261 0-98 22-196 91-265 8-8 8-8 8-10 0-4-3-6-6-6-5 0-56 38-90 110-29 61-35 123-35 171 0 43 6 110 37 174 33 68 83 105 88 105 3 0 6-2 6-6z">
              <text:p/>
            </draw:path>
            <draw:path draw:style-name="gr7" draw:text-style-name="P11" draw:layer="layout" svg:width="0.34cm" svg:height="0.301cm" svg:x="23.238cm" svg:y="13.926cm" svg:viewBox="0 0 341 302" svg:d="M61 29c0-16-15-29-31-29s-30 13-30 29 14 30 30 30 31-13 31-30zM202 271c0-16-15-30-31-30s-30 14-30 30 14 31 30 31 31-15 31-31zM341 29c0-16-13-29-29-29s-30 13-30 29 14 30 30 30 29-13 29-30z">
              <text:p/>
            </draw:path>
            <draw:path draw:style-name="gr7" draw:text-style-name="P11" draw:layer="layout" svg:width="0.401cm" svg:height="0.38cm" svg:x="23.776cm" svg:y="13.803cm" svg:viewBox="0 0 402 381" svg:d="M147 204c32 0 64 0 96 0 80 0 159-57 159-119 0-44-37-85-111-85-61 0-121 0-182 0-11 0-18 0-18 10 0 8 5 8 16 8 8 0 18 0 24 0 10 1 13 3 13 9 0 2 0 3-2 11-25 100-50 200-75 300-6 23-8 26-51 26-10 0-16 0-16 11 0 6 6 6 8 6 16 0 56-1 72-1 11 0 24 1 35 1 13 0 26 0 37 0 5 0 11 0 11-11 0-6-5-6-16-6-21 0-37 0-37-10 0-3 2-6 4-9 11-47 22-94 33-141zM189 38c5-19 5-20 30-20 18 0 35 0 53 0 46 0 77 14 77 52 0 23-11 70-34 91-27 24-61 29-86 29-26 0-52 0-79 0 13-51 26-101 39-152z">
              <text:p/>
            </draw:path>
            <draw:path draw:style-name="gr7" draw:text-style-name="P11" draw:layer="layout" svg:width="0.181cm" svg:height="0.267cm" svg:x="24.134cm" svg:y="14.009cm" svg:viewBox="0 0 182 268" svg:d="M182 136c0-43-4-75-22-102-13-18-37-34-69-34-91 0-91 108-91 136s0 132 91 132 91-105 91-132zM91 257c-17 0-41-11-49-43-5-23-5-54-5-85 0-28 0-57 5-80 8-30 33-38 49-38 23 0 42 13 50 35 6 21 6 50 6 83 0 31 0 59-5 83-8 37-35 45-51 45z">
              <text:p/>
            </draw:path>
            <draw:path draw:style-name="gr7" draw:text-style-name="P11" draw:layer="layout" svg:width="0.129cm" svg:height="0.559cm" svg:x="24.422cm" svg:y="13.765cm" svg:viewBox="0 0 130 560" svg:d="M130 554c0-2 0-2-10-12-69-70-88-177-88-261 0-98 22-196 91-265 7-8 7-8 7-10 0-4-2-6-5-6-7 0-56 38-90 110-29 61-35 123-35 171 0 43 6 110 37 174 33 68 81 105 88 105 3 0 5-2 5-6z">
              <text:p/>
            </draw:path>
            <draw:path draw:style-name="gr7" draw:text-style-name="P11" draw:layer="layout" svg:width="0.236cm" svg:height="0.384cm" svg:x="24.606cm" svg:y="13.813cm" svg:viewBox="0 0 237 385" svg:d="M237 193c0-45-2-89-23-131-25-54-72-62-94-62-34 0-75 14-99 65-18 40-21 83-21 128 0 42 3 93 26 136 24 44 65 56 92 56 31 0 74-12 98-66 19-38 21-81 21-126zM118 372c-20 0-54-13-64-67-6-34-6-85-6-118 0-37 0-74 3-104 11-65 53-72 67-72 20 0 56 11 68 66 4 31 4 75 4 110 0 41 0 79-6 115-8 54-40 70-66 70z">
              <text:p/>
            </draw:path>
            <draw:path draw:style-name="gr7" draw:text-style-name="P11" draw:layer="layout" svg:width="0.129cm" svg:height="0.559cm" svg:x="24.899cm" svg:y="13.765cm" svg:viewBox="0 0 130 560" svg:d="M130 281c0-45-7-112-37-176-34-68-82-105-88-105-3 0-5 3-5 6 0 2 0 2 10 13 56 54 88 144 88 262 0 96-21 193-92 265-6 6-6 6-6 8 0 4 2 6 5 6 6 0 56-38 89-108 29-63 36-125 36-171z">
              <text:p/>
            </draw:path>
            <draw:path draw:style-name="gr7" draw:text-style-name="P11" draw:layer="layout" svg:width="0.373cm" svg:height="0.13cm" svg:x="25.272cm" svg:y="13.98cm" svg:viewBox="0 0 374 131" svg:d="M355 22c8 0 19 0 19-11s-11-11-17-11c-113 0-225 0-338 0-8 0-19 0-19 11s11 11 19 11c112 0 224 0 336 0zM357 131c6 0 17 0 17-11 0-12-11-12-19-12-112 0-224 0-336 0-8 0-19 0-19 12 0 11 11 11 19 11 113 0 225 0 338 0z">
              <text:p/>
            </draw:path>
            <draw:path draw:style-name="gr7" draw:text-style-name="P11" draw:layer="layout" svg:width="0.185cm" svg:height="0.371cm" svg:x="25.884cm" svg:y="13.813cm" svg:viewBox="0 0 186 372" svg:d="M115 14c0-14 0-14-13-14-35 35-84 35-102 35 0 6 0 12 0 18 11 0 45 0 74-15 0 97 0 194 0 291 0 19-2 25-53 25-6 0-12 0-18 0 0 6 0 12 0 18 19-2 69-2 91-2 23 0 72 0 92 2 0-6 0-12 0-18-6 0-12 0-18 0-51 0-53-5-53-25 0-105 0-210 0-315z">
              <text:p/>
            </draw:path>
            <draw:path draw:style-name="gr7" draw:text-style-name="P11" draw:layer="layout" svg:width="0.13cm" svg:height="0.559cm" svg:x="26.147cm" svg:y="13.765cm" svg:viewBox="0 0 131 560" svg:d="M131 281c0-45-6-112-37-176-33-68-83-105-88-105-3 0-6 3-6 6 0 2 0 2 11 13 56 54 88 144 88 262 0 96-21 193-91 265-8 6-8 6-8 8 0 4 3 6 6 6 5 0 56-38 90-108 29-63 35-125 35-171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4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342000000A53E41F47EA9D42B95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4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3AE000000BD5238F5FB03487C2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4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342000000A53E41F47EA9D42B95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4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3AE000000BD5238F5FB03487C2B.png" xlink:type="simple" xlink:show="embed" xlink:actuate="onLoad" draw:mime-type="image/png"/>
          </draw:frame>
        </draw:g>
        <draw:g>
          <svg:title>TexMaths</svg:title>
          <svg:desc>18§display§\mbox{Solve }\;\;  P'_n(t) = -\lambda P_n(t) + \lambda P_{n-1}(t). \;\;
\Rightarrow\;\;  e^{\lambda t}(P'_n(t)+\lambda P_n(t)) = e^{\lambda t} (\lambda P_{n-1}(t).)§svg§600§FALSE§</svg:desc>
          <draw:frame draw:style-name="gr2" draw:text-style-name="P4" draw:layer="layout" svg:width="21.965cm" svg:height="0.776cm" svg:x="2.358cm" svg:y="13.346cm">
            <draw:image xlink:href="Pictures/1000E0F000002F92000001952785552BE982D74D.svg" xlink:type="simple" xlink:show="embed" xlink:actuate="onLoad" draw:mime-type="image/svg+xml">
              <text:p/>
            </draw:image>
            <draw:image xlink:href="Pictures/10000001000003990000001F47BF107CBBCA3E5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4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3BF000000602EC01028D4D05C6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4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3BF000000602EC01028D4D05C60.png" xlink:type="simple" xlink:show="embed" xlink:actuate="onLoad" draw:mime-type="image/png"/>
          </draw:frame>
        </draw:g>
        <draw:g>
          <svg:title>TexMaths</svg:title>
          <svg:desc>18§latex§\begin{eqnarray*}
&amp; &amp; \therefore \frac{d}{dt}(e^{\lambda t} P_1(t)) = \lambda e^{\lambda t}P_0(t) = \lambda.\\
&amp;\Rightarrow&amp; \int d(e^{\lambda t} P_1(t)) = \int \lambda dt.\\
&amp;\Rightarrow&amp; e^{\lambda t} P_1(t) = \lambda t + C\\
&amp;\Rightarrow&amp; P_1(t) = e^{-\lambda t}(\lambda t + C) =  t\lambda e^{-\lambda t}.
\end{eqnarray*}§svg§600§FALSE§</svg:desc>
          <draw:frame draw:style-name="gr2" draw:text-style-name="P4" draw:layer="layout" svg:width="10.112cm" svg:height="4.934cm" svg:x="1.753cm" svg:y="7.245cm">
            <draw:image xlink:href="Pictures/1001300D000015F300000AB6A0093998112BF5C3.svg" xlink:type="simple" xlink:show="embed" xlink:actuate="onLoad" draw:mime-type="image/svg+xml">
              <text:p/>
            </draw:image>
            <draw:image xlink:href="Pictures/10000001000001A9000000CF18AA3E7D86607152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4" draw:layer="layout" svg:width="3.893cm" svg:height="0.725cm" svg:x="14cm" svg:y="7.475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A40000001F2C967E8BB8918568.png" xlink:type="simple" xlink:show="embed" xlink:actuate="onLoad" draw:mime-type="image/png"/>
          </draw:frame>
        </draw:g>
        <draw:g>
          <svg:title>TexMaths</svg:title>
          <svg:desc>18§display§\textcolor{red}{\mbox{Note: } P_1(0) = 0}§svg§600§FALSE§</svg:desc>
          <draw:frame draw:style-name="gr2" draw:text-style-name="P4" draw:layer="layout" svg:width="4.453cm" svg:height="0.679cm" svg:x="13.35cm" svg:y="11.481cm">
            <draw:image xlink:href="Pictures/100025D7000009AB0000017AC8E8B7151F8AA987.svg" xlink:type="simple" xlink:show="embed" xlink:actuate="onLoad" draw:mime-type="image/svg+xml">
              <text:p/>
            </draw:image>
            <draw:image xlink:href="Pictures/10000001000000BB0000001DCE4DBE3E6EAE3335.png" xlink:type="simple" xlink:show="embed" xlink:actuate="onLoad" draw:mime-type="image/png"/>
          </draw:frame>
        </draw:g>
        <draw:g>
          <svg:title>TexMaths</svg:title>
          <svg:desc>14§display§\textcolor{red}{\mbox{1 event occurs in zero time period}}§svg§600§FALSE§</svg:desc>
          <draw:g>
            <draw:path draw:style-name="gr6" draw:text-style-name="P10" draw:layer="layout" svg:width="7.265cm" svg:height="0.383cm" svg:x="13.4cm" svg:y="12.225cm" svg:viewBox="0 0 7266 384" svg:d="M0 0c2422 0 4844 0 7266 0 0 128 0 256 0 384-2422 0-4844 0-7266 0 0-128 0-256 0-384z">
              <text:p/>
            </draw:path>
            <draw:path draw:style-name="gr41" draw:text-style-name="P35" draw:layer="layout" svg:width="0.161cm" svg:height="0.324cm" svg:x="13.418cm" svg:y="12.214cm" svg:viewBox="0 0 162 325" svg:d="M101 13c0-12 0-13-11-13-31 31-73 31-90 31 0 5 0 10 0 15 10 0 39 0 64-13 0 85 0 169 0 253 0 18-1 24-44 24-6 0-12 0-17 0 0 5 0 10 0 15 18-1 60-1 80-1 19 0 63 0 79 1 0-5 0-10 0-15-5 0-10 0-15 0-45 0-46-6-46-24 0-91 0-182 0-273z">
              <text:p/>
            </draw:path>
            <draw:path draw:style-name="gr41" draw:text-style-name="P35" draw:layer="layout" svg:width="0.189cm" svg:height="0.224cm" svg:x="13.799cm" svg:y="12.32cm" svg:viewBox="0 0 190 225" svg:d="M41 96c2-72 44-85 61-85 51 0 55 66 55 85-39 0-78 0-116 0zM41 106c45 0 91 0 137 0 11 0 12 0 12-10 0-49-26-96-88-96-57 0-102 50-102 112 0 65 52 113 108 113 60 0 82-55 82-65 0-4-4-5-7-5-4 0-5 3-5 7-18 50-62 50-67 50-24 0-45-14-56-32-14-24-14-56-14-74z">
              <text:p/>
            </draw:path>
            <draw:path draw:style-name="gr41" draw:text-style-name="P35" draw:layer="layout" svg:width="0.24cm" svg:height="0.215cm" svg:x="14.013cm" svg:y="12.328cm" svg:viewBox="0 0 241 216" svg:d="M195 47c4-11 12-32 46-32 0-5 0-10 0-15-13 1-27 1-38 1s-34-1-42-1c0 5 0 10 0 15 18 0 22 12 22 21 0 4 0 7-2 11-17 42-33 84-49 126-19-46-38-91-56-137-3-7-3-7-3-8 0-13 19-13 28-13 0-5 0-10 0-15-14 0-42 1-53 1-14 0-34 0-48-1 0 5 0 10 0 15 31 0 32 3 39 18 24 58 47 116 70 174 4 7 5 9 11 9 7 0 9-4 10-9 22-53 43-107 65-160z">
              <text:p/>
            </draw:path>
            <draw:path draw:style-name="gr41" draw:text-style-name="P35" draw:layer="layout" svg:width="0.189cm" svg:height="0.224cm" svg:x="14.264cm" svg:y="12.32cm" svg:viewBox="0 0 190 225" svg:d="M41 96c2-72 44-85 61-85 51 0 55 66 55 85-39 0-78 0-116 0zM41 106c45 0 91 0 137 0 11 0 12 0 12-10 0-49-26-96-88-96-57 0-102 50-102 112 0 65 50 113 108 113 60 0 82-55 82-65 0-4-4-5-7-5-4 0-5 3-7 7-16 50-60 50-65 50-26 0-45-14-56-32-14-24-14-56-14-74z">
              <text:p/>
            </draw:path>
            <draw:path draw:style-name="gr41" draw:text-style-name="P35" draw:layer="layout" svg:width="0.247cm" svg:height="0.215cm" svg:x="14.483cm" svg:y="12.323cm" svg:viewBox="0 0 248 216" svg:d="M39 49c0 43 0 86 0 130 0 22-5 22-39 22 0 5 0 10 0 15 17 0 42-1 56-1 13 0 38 1 55 1 0-5 0-10 0-15-33 0-38 0-38-22 0-30 0-60 0-90 0-50 35-78 66-78 30 0 36 27 36 55 0 37 0 75 0 113 0 22-6 22-38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41" draw:text-style-name="P35" draw:layer="layout" svg:width="0.153cm" svg:height="0.305cm" svg:x="14.737cm" svg:y="12.239cm" svg:viewBox="0 0 154 306" svg:d="M76 105c23 0 46 0 70 0 0-5 0-11 0-16-24 0-47 0-70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41" draw:text-style-name="P35" draw:layer="layout" svg:width="0.217cm" svg:height="0.224cm" svg:x="15.096cm" svg:y="12.32cm" svg:viewBox="0 0 218 225" svg:d="M218 114c0-62-49-114-109-114-61 0-109 53-109 114 0 63 52 111 109 111 59 0 109-48 109-111zM109 212c-21 0-43-10-56-32-12-22-12-52-12-70s0-44 12-67c13-22 37-32 56-32 21 0 41 11 55 32 13 21 14 49 14 67s0 45-11 66c-12 22-33 36-58 36z">
              <text:p/>
            </draw:path>
            <draw:path draw:style-name="gr41" draw:text-style-name="P35" draw:layer="layout" svg:width="0.185cm" svg:height="0.224cm" svg:x="15.36cm" svg:y="12.32cm" svg:viewBox="0 0 186 225" svg:d="M41 113c0-80 40-100 65-100 5 0 37 0 54 18-21 1-24 15-24 22 0 13 10 22 22 22 14 0 24-8 24-22 0-33-38-53-76-53-61 0-106 53-106 113 0 63 48 112 105 112 66 0 81-60 81-65 0-4-4-4-5-4-5 0-6 2-7 4-14 47-47 52-65 52-25 0-68-21-68-99z">
              <text:p/>
            </draw:path>
            <draw:path draw:style-name="gr41" draw:text-style-name="P35" draw:layer="layout" svg:width="0.187cm" svg:height="0.224cm" svg:x="15.578cm" svg:y="12.32cm" svg:viewBox="0 0 188 225" svg:d="M41 113c0-80 40-100 65-100 6 0 37 0 54 18-20 1-24 15-24 22 0 13 10 22 24 22 12 0 22-8 22-22 0-33-38-53-76-53-61 0-106 53-106 113 0 63 49 112 105 112 66 0 83-60 83-65 0-4-6-4-7-4-5 0-6 2-6 4-15 47-46 52-64 52-27 0-70-21-70-99z">
              <text:p/>
            </draw:path>
            <draw:path draw:style-name="gr41" draw:text-style-name="P35" draw:layer="layout" svg:width="0.247cm" svg:height="0.221cm" svg:x="15.795cm" svg:y="12.323cm" svg:viewBox="0 0 248 222" svg:d="M176 177c0 15 0 30 0 45 24-2 48-4 72-6 0-5 0-10 0-15-35 0-38-3-38-27 0-58 0-116 0-174-24 2-49 4-73 6 0 5 0 10 0 15 35 0 38 3 38 28 0 29 0 58 0 86 0 42-22 76-59 76-42 0-43-23-43-48 0-54 0-109 0-163-24 2-49 4-73 6 0 5 0 10 0 15 39 0 39 1 39 45 0 24 0 49 0 74 0 37 0 82 74 82 28 0 49-14 63-45z">
              <text:p/>
            </draw:path>
            <draw:path draw:style-name="gr41" draw:text-style-name="P35" draw:layer="layout" svg:width="0.164cm" svg:height="0.215cm" svg:x="16.066cm" svg:y="12.323cm" svg:viewBox="0 0 165 216" svg:d="M69 54c0-18 0-36 0-54-23 2-46 4-69 6 0 5 0 10 0 15 35 0 39 3 39 28 0 43 0 86 0 130 0 22-5 22-39 22 0 5 0 10 0 15 20 0 42-1 56-1 20 0 43 0 63 1 0-5 0-10 0-15-4 0-7 0-11 0-37 0-37-6-37-22 0-25 0-51 0-76 0-49 20-92 58-92 4 0 4 0 5 0-1 2-11 7-11 20 0 14 10 21 21 21 9 0 21-5 21-21s-15-31-36-31c-35 0-53 33-60 54z">
              <text:p/>
            </draw:path>
            <draw:path draw:style-name="gr41" draw:text-style-name="P35" draw:layer="layout" svg:width="0.16cm" svg:height="0.224cm" svg:x="16.261cm" svg:y="12.32cm" svg:viewBox="0 0 161 225" svg:d="M87 124c11 3 52 10 52 45 0 25-19 45-56 45-42 0-59-28-69-70-1-6-1-7-7-7-7 0-7 3-7 11 0 22 0 44 0 66 0 6 0 11 6 11 2 0 2 0 12-10 2-1 2-1 10-11 22 21 43 21 55 21 56 0 78-34 78-69 0-25-14-40-20-46-16-15-36-19-56-23-28-6-61-12-61-41 0-17 12-36 56-36 53 0 56 43 57 58 0 5 4 5 6 5 7 0 7-2 7-12 0-16 0-32 0-48 0-9 0-13-6-13-3 0-4 0-10 6-1 2-7 7-8 8-20-14-39-14-46-14-60 0-80 33-80 60 0 17 8 31 22 42 16 12 30 15 65 22z">
              <text:p/>
            </draw:path>
            <draw:path draw:style-name="gr41" draw:text-style-name="P35" draw:layer="layout" svg:width="0.104cm" svg:height="0.326cm" svg:x="16.619cm" svg:y="12.213cm" svg:viewBox="0 0 105 327" svg:d="M71 110c-22 2-45 4-68 6 0 5 0 10 0 15 31 0 36 3 36 27 0 43 0 87 0 131 0 22-5 22-39 22 0 5 0 10 0 16 15 0 42-2 55-2 16 0 33 2 50 2 0-6 0-11 0-16-32 0-34-3-34-21 0-60 0-120 0-180zM73 25c0-15-13-25-25-25-16 0-27 13-27 25 0 14 11 27 27 27 12 0 25-10 25-27z">
              <text:p/>
            </draw:path>
            <draw:path draw:style-name="gr41" draw:text-style-name="P35" draw:layer="layout" svg:width="0.247cm" svg:height="0.215cm" svg:x="16.755cm" svg:y="12.323cm" svg:viewBox="0 0 248 216" svg:d="M39 49c0 43 0 86 0 130 0 22-5 22-39 22 0 5 0 10 0 15 18 0 43-1 56-1s39 1 56 1c0-5 0-10 0-15-34 0-39 0-39-22 0-30 0-60 0-90 0-50 35-78 67-78 31 0 36 27 36 55 0 37 0 75 0 113 0 22-5 22-39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41" draw:text-style-name="P35" draw:layer="layout" svg:width="0.184cm" svg:height="0.21cm" svg:x="17.19cm" svg:y="12.328cm" svg:viewBox="0 0 185 211" svg:d="M179 15c4-5 4-7 4-8 0-7-4-7-12-7-53 0-106 0-158 0-2 26-4 52-6 78 4 0 8 0 13 0 2-49 12-67 67-67 18 0 37 0 56 0-46 62-92 123-137 184-6 6-6 6-6 9 0 7 4 7 14 7 54 0 108 0 162 0 3-31 6-61 9-91-4 0-9 0-13 0-4 57-15 78-73 78-19 0-38 0-57 0 46-61 91-122 137-183z">
              <text:p/>
            </draw:path>
            <draw:path draw:style-name="gr41" draw:text-style-name="P35" draw:layer="layout" svg:width="0.189cm" svg:height="0.224cm" svg:x="17.41cm" svg:y="12.32cm" svg:viewBox="0 0 190 225" svg:d="M41 96c2-72 44-85 61-85 51 0 55 66 55 85-39 0-78 0-116 0zM41 106c45 0 91 0 137 0 11 0 12 0 12-10 0-49-26-96-88-96-57 0-102 50-102 112 0 65 52 113 108 113 60 0 82-55 82-65 0-4-4-5-7-5-4 0-5 3-5 7-18 50-62 50-67 50-26 0-45-14-56-32-14-24-14-56-14-74z">
              <text:p/>
            </draw:path>
            <draw:path draw:style-name="gr41" draw:text-style-name="P35" draw:layer="layout" svg:width="0.164cm" svg:height="0.215cm" svg:x="17.628cm" svg:y="12.323cm" svg:viewBox="0 0 165 216" svg:d="M69 54c0-18 0-36 0-54-23 2-46 4-69 6 0 5 0 10 0 15 34 0 38 3 38 28 0 43 0 86 0 130 0 22-6 22-38 22 0 5 0 10 0 15 20 0 42-1 56-1 20 0 42 0 63 1 0-5 0-10 0-15-4 0-7 0-11 0-37 0-38-6-38-22 0-25 0-51 0-76 0-49 21-92 59-92 3 0 4 0 5 0-1 2-11 7-11 20 0 14 10 21 21 21 9 0 21-5 21-21s-15-31-36-31c-37 0-53 33-60 54z">
              <text:p/>
            </draw:path>
            <draw:path draw:style-name="gr41" draw:text-style-name="P35" draw:layer="layout" svg:width="0.217cm" svg:height="0.224cm" svg:x="17.82cm" svg:y="12.32cm" svg:viewBox="0 0 218 225" svg:d="M218 114c0-62-49-114-109-114s-109 53-109 114c0 63 52 111 109 111 60 0 109-48 109-111zM109 212c-21 0-42-10-56-32-11-22-11-52-11-70s0-44 11-67c14-22 37-32 56-32 23 0 44 11 56 32 13 21 13 49 13 67s0 45-11 66c-10 22-33 36-58 36z">
              <text:p/>
            </draw:path>
            <draw:path draw:style-name="gr41" draw:text-style-name="P35" draw:layer="layout" svg:width="0.153cm" svg:height="0.305cm" svg:x="18.226cm" svg:y="12.239cm" svg:viewBox="0 0 154 306" svg:d="M76 105c23 0 47 0 71 0 0-5 0-11 0-16-24 0-48 0-71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41" draw:text-style-name="P35" draw:layer="layout" svg:width="0.104cm" svg:height="0.326cm" svg:x="18.425cm" svg:y="12.213cm" svg:viewBox="0 0 105 327" svg:d="M70 110c-23 2-46 4-69 6 0 5 0 10 0 15 33 0 37 3 37 27 0 43 0 87 0 131 0 22-6 22-38 22 0 5 0 10 0 16 15 0 42-2 53-2 18 0 35 2 52 2 0-6 0-11 0-16-32 0-35-3-35-21 0-60 0-120 0-180zM73 25c0-15-13-25-27-25-15 0-26 13-26 25 0 14 11 27 26 27 14 0 27-10 27-27z">
              <text:p/>
            </draw:path>
            <draw:path draw:style-name="gr41" draw:text-style-name="P35" draw:layer="layout" svg:width="0.383cm" svg:height="0.215cm" svg:x="18.561cm" svg:y="12.323cm" svg:viewBox="0 0 384 216" svg:d="M38 49c0 43 0 86 0 130 0 22-4 22-38 22 0 5 0 10 0 15 17 0 42-1 56-1 13 0 38 1 55 1 0-5 0-10 0-15-33 0-38 0-38-22 0-30 0-60 0-90 0-50 35-78 66-78 30 0 36 27 36 55 0 37 0 75 0 113 0 22-6 22-38 22 0 5 0 10 0 15 17 0 42-1 55-1 14 0 39 1 56 1 0-5 0-10 0-15-34 0-39 0-39-22 0-30 0-60 0-90 0-50 35-78 67-78 31 0 36 27 36 55 0 37 0 75 0 113 0 22-5 22-39 22 0 5 0 10 0 15 18 0 43-1 56-1s38 1 55 1c0-5 0-10 0-15-26 0-38 0-38-14 0-31 0-62 0-94 0-41 0-57-16-75-7-8-22-18-51-18-41 0-63 29-72 49-7-43-43-49-64-49-37 0-60 21-73 52 0-18 0-35 0-52-23 2-47 4-70 6 0 5 0 10 0 15 35 0 38 3 38 28z">
              <text:p/>
            </draw:path>
            <draw:path draw:style-name="gr41" draw:text-style-name="P35" draw:layer="layout" svg:width="0.189cm" svg:height="0.224cm" svg:x="18.968cm" svg:y="12.32cm" svg:viewBox="0 0 190 225" svg:d="M42 96c3-72 45-85 62-85 50 0 54 66 54 85-39 0-77 0-116 0zM42 106c46 0 91 0 137 0 10 0 11 0 11-10 0-49-26-96-86-96-58 0-104 50-104 112 0 65 52 113 109 113 60 0 81-55 81-65 0-4-2-5-5-5-4 0-6 3-7 7-17 50-62 50-66 50-25 0-45-14-56-32-14-24-14-56-14-74z">
              <text:p/>
            </draw:path>
            <draw:path draw:style-name="gr41" draw:text-style-name="P35" draw:layer="layout" svg:width="0.241cm" svg:height="0.31cm" svg:x="19.351cm" svg:y="12.323cm" svg:viewBox="0 0 242 311" svg:d="M70 32c0-11 0-21 0-32-23 2-47 4-70 6 0 5 0 10 0 15 35 0 38 3 38 24 0 76 0 152 0 229 0 22-6 22-38 22 0 5 0 10 0 15 17 0 42-1 55-1 14 0 39 1 56 1 0-5 0-10 0-15-34 0-40 0-40-22 0-27 0-54 0-81 0-2 0-4 0-6 3 8 24 35 62 35 57 0 109-48 109-112 0-61-47-110-102-110-39 0-60 22-70 32zM71 160c0-36 0-72 0-108 16-25 40-39 65-39 35 0 66 43 66 97 0 60-35 101-72 101-19 0-38-10-52-30-7-11-7-11-7-21z">
              <text:p/>
            </draw:path>
            <draw:path draw:style-name="gr41" draw:text-style-name="P35" draw:layer="layout" svg:width="0.189cm" svg:height="0.224cm" svg:x="19.638cm" svg:y="12.32cm" svg:viewBox="0 0 190 225" svg:d="M41 96c2-72 44-85 61-85 51 0 56 66 56 85-39 0-78 0-117 0zM41 106c45 0 91 0 137 0 11 0 12 0 12-10 0-49-26-96-88-96-57 0-102 50-102 112 0 65 52 113 108 113 60 0 82-55 82-65 0-4-4-5-7-5-4 0-5 3-5 7-18 50-62 50-67 50-24 0-44-14-56-32-14-24-14-56-14-74z">
              <text:p/>
            </draw:path>
            <draw:path draw:style-name="gr41" draw:text-style-name="P35" draw:layer="layout" svg:width="0.164cm" svg:height="0.215cm" svg:x="19.857cm" svg:y="12.323cm" svg:viewBox="0 0 165 216" svg:d="M69 54c0-18 0-36 0-54-23 2-46 4-69 6 0 5 0 10 0 15 35 0 38 3 38 28 0 43 0 86 0 130 0 22-6 22-38 22 0 5 0 10 0 15 20 0 42-1 56-1 20 0 43 0 63 1 0-5 0-10 0-15-4 0-7 0-11 0-37 0-37-6-37-22 0-25 0-51 0-76 0-49 20-92 58-92 3 0 4 0 5 0-1 2-11 7-11 20 0 14 10 21 21 21 9 0 21-5 21-21s-15-31-36-31c-37 0-53 33-60 54z">
              <text:p/>
            </draw:path>
            <draw:path draw:style-name="gr41" draw:text-style-name="P35" draw:layer="layout" svg:width="0.105cm" svg:height="0.326cm" svg:x="20.051cm" svg:y="12.213cm" svg:viewBox="0 0 106 327" svg:d="M71 110c-22 2-45 4-68 6 0 5 0 10 0 15 32 0 36 3 36 27 0 43 0 87 0 131 0 22-5 22-39 22 0 5 0 10 0 16 17 0 43-2 55-2 16 0 35 2 51 2 0-6 0-11 0-16-33 0-35-3-35-21 0-60 0-120 0-180zM73 25c0-15-11-25-25-25-16 0-27 13-27 25 0 14 11 27 27 27 14 0 25-10 25-27z">
              <text:p/>
            </draw:path>
            <draw:path draw:style-name="gr41" draw:text-style-name="P35" draw:layer="layout" svg:width="0.217cm" svg:height="0.224cm" svg:x="20.186cm" svg:y="12.32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41" draw:text-style-name="P35" draw:layer="layout" svg:width="0.241cm" svg:height="0.344cm" svg:x="20.449cm" svg:y="12.2cm" svg:viewBox="0 0 242 345" svg:d="M169 313c0 10 0 21 0 32 25-2 49-4 73-6 0-5 0-10 0-15-35 0-38-3-38-27 0-99 0-198 0-297-23 2-47 4-71 6 0 5 0 10 0 15 35 0 38 3 38 26 0 36 0 71 0 107-14-19-35-31-62-31-57 0-109 49-109 111s48 111 104 111c32 0 54-17 65-32zM169 181c0 34 0 67 0 101 0 8 0 10-5 18-14 22-37 34-58 34-22 0-39-13-51-31-13-21-14-49-14-69 0-18 1-47 15-69 10-14 29-31 56-31 17 0 38 7 52 29 5 9 5 10 5 18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49">(</text:span><text:span text:style-name="T50">t</text:span><text:span text:style-name="T49">) and </text:span><text:span text:style-name="T50">P</text:span><text:span text:style-name="T125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4" draw:layer="layout" svg:width="3.893cm" svg:height="0.725cm" svg:x="20.201cm" svg:y="7.776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A40000001F2C967E8BB8918568.png" xlink:type="simple" xlink:show="embed" xlink:actuate="onLoad" draw:mime-type="image/png"/>
          </draw:frame>
        </draw:g>
        <draw:g>
          <svg:title>TexMaths</svg:title>
          <svg:desc>18§display§(P_1(t) =  t\lambda e^{-\lambda t})§svg§600§FALSE§</svg:desc>
          <draw:g>
            <draw:path draw:style-name="gr6" draw:text-style-name="P10" draw:layer="layout" svg:width="4.424cm" svg:height="0.658cm" svg:x="20.25cm" svg:y="8.934cm" svg:viewBox="0 0 4425 659" svg:d="M0 0c1475 0 2950 0 4425 0 0 220 0 440 0 659-1475 0-2950 0-4425 0 0-219 0-439 0-659z">
              <text:p/>
            </draw:path>
            <draw:path draw:style-name="gr7" draw:text-style-name="P11" draw:layer="layout" svg:width="0.145cm" svg:height="0.63cm" svg:x="20.281cm" svg:y="8.995cm" svg:viewBox="0 0 146 631" svg:d="M146 623c0-1 0-1-11-12-79-79-99-200-99-295 0-109 25-221 103-298 7-9 7-9 7-11 0-5-2-7-6-7-7 0-63 43-100 124-33 68-40 138-40 192 0 49 7 124 41 196 38 77 92 119 99 119 4 0 6-2 6-8z">
              <text:p/>
            </draw:path>
            <draw:path draw:style-name="gr7" draw:text-style-name="P11" draw:layer="layout" svg:width="0.449cm" svg:height="0.428cm" svg:x="20.489cm" svg:y="9.039cm" svg:viewBox="0 0 450 429" svg:d="M166 230c36 0 72 0 108 0 89 0 176-65 176-135 0-48-42-95-124-95-69 0-137 0-205 0-11 0-18 0-18 11 0 9 5 9 18 9 9 0 19 0 27 0 10 2 14 3 14 11 0 1 0 3-2 12-29 113-57 225-86 338-6 25-7 29-56 29-11 0-18 0-18 12 0 7 7 7 9 7 18 0 63-1 81-1 13 0 27 1 40 1 14 0 27 0 41 0 4 0 13 0 13-12 0-7-6-7-18-7-24 0-42 0-42-11 0-4 2-7 2-11 13-53 26-105 40-158zM211 43c7-21 7-23 34-23 20 0 40 0 61 0 52 0 86 16 86 59 0 25-12 79-38 102-30 27-70 33-97 33-30 0-60 0-90 0 15-57 29-114 44-171z">
              <text:p/>
            </draw:path>
            <draw:path draw:style-name="gr7" draw:text-style-name="P11" draw:layer="layout" svg:width="0.159cm" svg:height="0.292cm" svg:x="20.918cm" svg:y="9.27cm" svg:viewBox="0 0 160 293" svg:d="M101 13c0-13-2-13-15-13-28 27-68 29-86 29 0 5 0 9 0 14 11 0 40 0 65-11 0 75 0 150 0 225 0 14 0 20-45 20-6 0-11 0-16 0 0 5 0 10 0 16 7 0 61-2 77-2 14 0 70 2 79 2 0-6 0-11 0-16-5 0-11 0-16 0-43 0-43-6-43-20 0-82 0-163 0-244z">
              <text:p/>
            </draw:path>
            <draw:path draw:style-name="gr7" draw:text-style-name="P11" draw:layer="layout" svg:width="0.145cm" svg:height="0.63cm" svg:x="21.216cm" svg:y="8.995cm" svg:viewBox="0 0 146 631" svg:d="M146 623c0-1 0-1-11-12-79-79-99-200-99-295 0-109 23-221 101-298 9-9 9-9 9-11 0-5-2-7-6-7-7 0-64 43-100 124-33 68-40 138-40 192 0 49 5 124 41 196 38 77 92 119 99 119 4 0 6-2 6-8z">
              <text:p/>
            </draw:path>
            <draw:path draw:style-name="gr7" draw:text-style-name="P11" draw:layer="layout" svg:width="0.193cm" svg:height="0.4cm" svg:x="21.412cm" svg:y="9.074cm" svg:viewBox="0 0 194 401" svg:d="M117 142c20 0 40 0 59 0 13 0 18 0 18-13 0-7-5-7-18-7-18 0-36 0-54 0 22-90 26-102 26-106 0-11-8-16-18-16-2 0-20 0-26 22-8 33-16 67-25 100-20 0-39 0-59 0-13 0-20 0-20 13 0 7 5 7 18 7 19 0 37 0 56 0-45 180-47 190-47 201 0 34 23 58 58 58 64 0 100-92 100-97 0-6-5-6-9-6-5 0-5 2-9 9-27 65-61 79-81 79-14 0-19-7-19-28 0-15 0-20 3-31 16-62 31-123 47-185z">
              <text:p/>
            </draw:path>
            <draw:path draw:style-name="gr7" draw:text-style-name="P11" draw:layer="layout" svg:width="0.147cm" svg:height="0.63cm" svg:x="21.662cm" svg:y="8.995cm" svg:viewBox="0 0 148 631" svg:d="M148 316c0-50-8-126-42-197-39-78-93-119-99-119-3 0-7 4-7 7 0 2 0 2 13 15 61 61 97 161 97 294 0 108-24 218-101 298-9 8-9 8-9 9 0 6 4 8 7 8 6 0 63-44 101-123 32-70 40-140 40-192z">
              <text:p/>
            </draw:path>
            <draw:path draw:style-name="gr7" draw:text-style-name="P11" draw:layer="layout" svg:width="0.42cm" svg:height="0.146cm" svg:x="22.084cm" svg:y="9.238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7" draw:text-style-name="P11" draw:layer="layout" svg:width="0.193cm" svg:height="0.4cm" svg:x="22.73cm" svg:y="9.074cm" svg:viewBox="0 0 194 401" svg:d="M117 142c20 0 40 0 59 0 13 0 18 0 18-13 0-7-5-7-18-7-18 0-37 0-55 0 23-90 27-102 27-106 0-11-8-16-18-16-2 0-20 0-26 22-8 33-16 67-25 100-20 0-39 0-59 0-13 0-20 0-20 13 0 7 5 7 18 7 19 0 37 0 56 0-45 180-49 190-49 201 0 34 25 58 60 58 64 0 100-92 100-97 0-6-5-6-9-6-5 0-5 2-9 9-27 65-61 79-82 79-13 0-18-7-18-28 0-15 0-20 3-31 16-62 31-123 47-185z">
              <text:p/>
            </draw:path>
            <draw:path draw:style-name="gr7" draw:text-style-name="P11" draw:layer="layout" svg:width="0.312cm" svg:height="0.445cm" svg:x="22.978cm" svg:y="9.031cm" svg:viewBox="0 0 313 446" svg:d="M193 253c25 67 55 162 64 176 11 15 18 15 34 15 5 0 10 0 15 0s7-4 7-6c0-1-2-3-4-7-7-5-10-16-14-29-43-119-86-238-129-357-13-38-47-45-78-45-3 0-11 0-11 7 0 4 4 4 6 6 21 3 25 7 41 50 21 57 41 115 61 172-58 58-116 115-174 173-7 7-11 11-11 20 0 10 8 18 18 18s16-8 22-15c51-59 102-118 153-178z">
              <text:p/>
            </draw:path>
            <draw:path draw:style-name="gr7" draw:text-style-name="P11" draw:layer="layout" svg:width="0.242cm" svg:height="0.285cm" svg:x="23.341cm" svg:y="9.189cm" svg:viewBox="0 0 243 286" svg:d="M90 133c18 0 65 0 95-14 45-18 49-56 49-65 0-27-25-54-68-54-71 0-166 61-166 172 0 63 38 114 99 114 92 0 144-67 144-74 0-4-4-9-7-9-4 0-6 2-9 7-49 61-119 61-126 61-49 0-56-52-56-72 0-7 2-27 11-66 11 0 23 0 34 0zM59 120c26-97 90-106 107-106 30 0 46 18 46 40 0 66-100 66-126 66-9 0-18 0-27 0z">
              <text:p/>
            </draw:path>
            <draw:path draw:style-name="gr7" draw:text-style-name="P11" draw:layer="layout" svg:width="0.298cm" svg:height="0.021cm" svg:x="23.654cm" svg:y="9.087cm" svg:viewBox="0 0 299 22" svg:d="M282 22c6 0 17 0 17-11s-9-11-17-11c-88 0-176 0-264 0-7 0-18 0-18 11s11 11 18 11c88 0 176 0 264 0z">
              <text:p/>
            </draw:path>
            <draw:path draw:style-name="gr7" draw:text-style-name="P11" draw:layer="layout" svg:width="0.244cm" svg:height="0.31cm" svg:x="24.034cm" svg:y="8.902cm" svg:viewBox="0 0 245 311" svg:d="M148 180c21 50 46 115 52 120 7 11 16 11 23 11 3 0 5 0 7 0 9 0 15 0 15-6 0-1-2-3-4-5-5-4-9-14-11-18-36-85-72-170-108-255-3-7-12-27-59-27-5 0-11 0-11 5 0 6 4 8 7 8 9 1 17 1 29 27 18 41 35 82 52 123-43 39-87 78-131 117-5 6-9 9-9 16 0 11 9 15 16 15s13-6 15-7c39-42 78-83 117-124z">
              <text:p/>
            </draw:path>
            <draw:path draw:style-name="gr7" draw:text-style-name="P11" draw:layer="layout" svg:width="0.148cm" svg:height="0.279cm" svg:x="24.32cm" svg:y="8.933cm" svg:viewBox="0 0 149 280" svg:d="M90 101c15 0 30 0 45 0 9 0 14 0 14-9 0-6-5-6-12-6-15 0-29 0-43 0 6-22 12-44 18-66 0-2 0-4 0-6 0-9-6-14-15-14-11 0-18 7-21 20-2 11 3-11-17 66-15 0-30 0-45 0-9 0-14 0-14 9 0 6 5 6 13 6 14 0 28 0 43 0-9 34-18 69-27 104-2 12-6 27-6 34 0 25 22 41 47 41 49 0 78-62 78-68s-6-5-8-5c-5 0-5 1-9 9-12 27-36 52-59 52-9 0-16-6-16-22 0-3 2-14 3-18 11-42 21-85 31-127z">
              <text:p/>
            </draw:path>
            <draw:path draw:style-name="gr7" draw:text-style-name="P11" draw:layer="layout" svg:width="0.147cm" svg:height="0.63cm" svg:x="24.559cm" svg:y="8.995cm" svg:viewBox="0 0 148 631" svg:d="M148 316c0-50-8-126-42-197-38-78-92-119-99-119-3 0-7 4-7 7 0 2 0 2 13 15 63 61 99 161 99 294 0 108-24 218-103 298-9 8-9 8-9 9 0 6 4 8 7 8 7 0 63-44 101-123 32-70 40-140 40-192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49">(</text:span><text:span text:style-name="T50">t</text:span><text:span text:style-name="T49">) and </text:span><text:span text:style-name="T50">P</text:span><text:span text:style-name="T125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.§svg§600§FALSE§</svg:desc>
          <draw:frame draw:style-name="gr2" draw:text-style-name="P4" draw:layer="layout" svg:width="9.373cm" svg:height="1.354cm" svg:x="1.76cm" svg:y="11.946cm">
            <draw:image xlink:href="Pictures/1000710D00001458000002F14CD9BD7B89E29585.svg" xlink:type="simple" xlink:show="embed" xlink:actuate="onLoad" draw:mime-type="image/svg+xml">
              <text:p/>
            </draw:image>
            <draw:image xlink:href="Pictures/100000010000018A000000397D8B16DFDC4A3BD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49">(</text:span><text:span text:style-name="T50">t</text:span><text:span text:style-name="T49">) and </text:span><text:span text:style-name="T50">P</text:span><text:span text:style-name="T125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4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20B0000004111486F160BF3FEF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49">(</text:span><text:span text:style-name="T50">t</text:span><text:span text:style-name="T49">) and </text:span><text:span text:style-name="T50">P</text:span><text:span text:style-name="T125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4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20B0000004111486F160BF3FEFF.png" xlink:type="simple" xlink:show="embed" xlink:actuate="onLoad" draw:mime-type="image/png"/>
          </draw:frame>
        </draw:g>
        <draw:g>
          <svg:title>TexMaths</svg:title>
          <svg:desc>18§latex§\begin{eqnarray*}
&amp;\Rightarrow&amp; \int d(e^{\lambda t}P_n(t)) = \int \frac{\lambda^n t^{n-1}}{(n-1)!} dt\\
&amp;\Rightarrow&amp; e^{\lambda t}P_n(t) = \frac{\lambda^n t^{n-1}}{(n-1)!}\cdot \frac{t^n}{n} + C\\
&amp;\Rightarrow&amp; P_n(t) = e^{-\lambda t} \frac{\lambda^n t^n}{n!}.
\end{eqnarray*}§svg§600§FALSE§</svg:desc>
          <draw:frame draw:style-name="gr2" draw:text-style-name="P4" draw:layer="layout" svg:width="9.52cm" svg:height="4.891cm" svg:x="16.357cm" svg:y="6.336cm">
            <draw:image xlink:href="Pictures/10013492000014AA00000A9E499832A90CD5D1C6.svg" xlink:type="simple" xlink:show="embed" xlink:actuate="onLoad" draw:mime-type="image/svg+xml">
              <text:p/>
            </draw:image>
            <draw:image xlink:href="Pictures/1000000100000190000000CD98FC52903ECB07BA.png" xlink:type="simple" xlink:show="embed" xlink:actuate="onLoad" draw:mime-type="image/png"/>
          </draw:frame>
        </draw:g>
        <draw:custom-shape draw:style-name="gr42" draw:text-style-name="P4" draw:layer="layout" svg:width="11.4cm" svg:height="5.8cm" svg:x="15.8cm" svg:y="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extcolor{blue}{\mbox{(use } P_n(0) = 0\mbox{)}}§svg§600§FALSE§</svg:desc>
          <draw:frame draw:style-name="gr2" draw:text-style-name="P4" draw:layer="layout" svg:width="3.81cm" svg:height="0.603cm" svg:x="23.074cm" svg:y="10.344cm">
            <draw:image xlink:href="Pictures/10002E040000094E0000017AA421B3FCADEA379C.svg" xlink:type="simple" xlink:show="embed" xlink:actuate="onLoad" draw:mime-type="image/svg+xml">
              <text:p/>
            </draw:image>
            <draw:image xlink:href="Pictures/10000001000000B40000001D6571D5E2AED322E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Further related topic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Stochastic counting process: <text:span text:style-name="T126">point processes</text:span></text:p>
              </text:list-item>
              <text:list-item>
                <text:p>Hawkes (self-exciting) processes.</text:p>
                <text:list>
                  <text:list-item>
                    <text:p>Earthquake modeling, financial analysis.</text:p>
                  </text:list-item>
                  <text:list-item>
                    <text:p>A reference: <text:a xlink:href="https://arxiv.org/pdf/1507.02822.pdf" xlink:type="simple">https://arxiv.org/pdf/1507.02822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adornments="標準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" style:font-family-generic="roman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Concave_20_short" draw:display-name="Concave short" svg:viewBox="0 0 1131 754" svg:d="M566 0l-566 754 114-85 136-68 148-46 161-17 161 13 153 46 140 68 118 89z"/>
    <draw:marker draw:name="線條箭頭_20_1" draw:display-name="線條箭頭 1" svg:viewBox="0 0 20 20" svg:d="M0 20l10-20 10 20z"/>
    <draw:stroke-dash draw:name="Dash" draw:style="rect" draw:dots1="1" draw:dots1-length="300%" draw:distance="300%"/>
    <draw:stroke-dash draw:name="Dash_20_4" draw:display-name="Dash 4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middle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cccccc" loext:opacity="100%" style:font-name="Liberation Serif1" fo:font-size="11pt" fo:font-style="italic" style:font-name-asian="Liberation Serif1" style:font-size-asian="11pt" style:font-style-asian="italic" style:font-size-complex="11pt" style:font-style-complex="italic"/>
    </style:style>
    <style:style style:name="MT3" style:family="text">
      <style:text-properties fo:color="#808080" loext:opacity="100%" style:font-name="Liberation Serif1" fo:font-size="14pt" style:font-name-asian="Liberation Serif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3.4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2.1cm" svg:y="14.7cm" presentation:class="page-number">
        <draw:text-box>
          <text:p text:style-name="MP3"><text:span text:style-name="MT3"><text:page-number>59</text:page-number></text:span><text:span text:style-name="MT3">/59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21H46M24S</meta:editing-duration>
    <meta:editing-cycles>573</meta:editing-cycles>
    <meta:generator>LibreOffice/7.2.7.2$Windows_X86_64 LibreOffice_project/8d71d29d553c0f7dcbfa38fbfda25ee34cce99a2</meta:generator>
    <dc:title>Randomized Algorithms</dc:title>
    <dc:date>2026-05-12T19:58:14.441000000</dc:date>
    <meta:print-date>2021-03-03T15:30:49.955288135</meta:print-date>
    <dc:subject> Continuous Distributions and the Poisson Process</dc:subject>
    <meta:document-statistic meta:object-count="1090"/>
  </office:meta>
</office:document-meta>
</file>