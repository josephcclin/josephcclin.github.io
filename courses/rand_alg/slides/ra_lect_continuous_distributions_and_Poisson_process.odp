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E000000138CF982438B553411.png" manifest:media-type="image/png"/>
  <manifest:file-entry manifest:full-path="Pictures/100000010000002B0000000BEC10EC1B76146468.png" manifest:media-type="image/png"/>
  <manifest:file-entry manifest:full-path="Pictures/10000001000000A20000000DA5397F76F68C1603.png" manifest:media-type="image/png"/>
  <manifest:file-entry manifest:full-path="Pictures/10000001000000FE0000002198E3719C9E3485C8.png" manifest:media-type="image/png"/>
  <manifest:file-entry manifest:full-path="Pictures/10004A9400000FCD0000041EC350C91E1E90EF5A.svg" manifest:media-type="image/svg+xml"/>
  <manifest:file-entry manifest:full-path="Pictures/10000001000000F500000026578782454CC393EE.png" manifest:media-type="image/png"/>
  <manifest:file-entry manifest:full-path="Pictures/100010580000879200001508D21A14F0A9096EB5.svg" manifest:media-type="image/svg+xml"/>
  <manifest:file-entry manifest:full-path="Pictures/10000001000000BB0000001F20C250DDB42D57B6.png" manifest:media-type="image/png"/>
  <manifest:file-entry manifest:full-path="Pictures/1000000100000520000000CC093F928401AEAF2E.png" manifest:media-type="image/png"/>
  <manifest:file-entry manifest:full-path="Pictures/100000010000000600000009B2FBB145C32BF506.png" manifest:media-type="image/png"/>
  <manifest:file-entry manifest:full-path="Pictures/1000562E00000D2F0000017A49919DB838686F1A.svg" manifest:media-type="image/svg+xml"/>
  <manifest:file-entry manifest:full-path="Pictures/100000010000009900000028F3FF3DC009D9D203.png" manifest:media-type="image/png"/>
  <manifest:file-entry manifest:full-path="Pictures/100010A7000004730000012EAE2FE3CC8E090867.svg" manifest:media-type="image/svg+xml"/>
  <manifest:file-entry manifest:full-path="Pictures/10000000000001E1000000602DD713FE193946CE.png" manifest:media-type="image/png"/>
  <manifest:file-entry manifest:full-path="Pictures/10005203000010B60000015F6C64AEC6F9E79C59.svg" manifest:media-type="image/svg+xml"/>
  <manifest:file-entry manifest:full-path="Pictures/10003DB700000D810000015F9CBCE9B7BC7BB22E.svg" manifest:media-type="image/svg+xml"/>
  <manifest:file-entry manifest:full-path="Pictures/10000001000000830000000DAA2A4CCC65926C94.png" manifest:media-type="image/png"/>
  <manifest:file-entry manifest:full-path="Pictures/10005DDC00000DC10000015FE49A613886E6FB59.svg" manifest:media-type="image/svg+xml"/>
  <manifest:file-entry manifest:full-path="Pictures/10000001000000B40000000E05FD56CF839C8AA3.png" manifest:media-type="image/png"/>
  <manifest:file-entry manifest:full-path="Pictures/100050520000129C0000017A935002CDA1FC3A21.svg" manifest:media-type="image/svg+xml"/>
  <manifest:file-entry manifest:full-path="Pictures/10000001000000E8000000205C113AB1D785F0F0.png" manifest:media-type="image/png"/>
  <manifest:file-entry manifest:full-path="Pictures/100026750000087400000194D31375C18F8F5F6A.svg" manifest:media-type="image/svg+xml"/>
  <manifest:file-entry manifest:full-path="Pictures/10006CD600000B91000005506E0AA3EFECB30526.svg" manifest:media-type="image/svg+xml"/>
  <manifest:file-entry manifest:full-path="Pictures/100000010000010D0000000EDEA278C184A74F9A.png" manifest:media-type="image/png"/>
  <manifest:file-entry manifest:full-path="Pictures/100000010000007000000033E7C3ABD7885F4CEE.png" manifest:media-type="image/png"/>
  <manifest:file-entry manifest:full-path="Pictures/1000974A00001FCD000001BCE5C2913ADBCECF5E.svg" manifest:media-type="image/svg+xml"/>
  <manifest:file-entry manifest:full-path="Pictures/1000973600001A450000036FD7D683B84977DC9C.svg" manifest:media-type="image/svg+xml"/>
  <manifest:file-entry manifest:full-path="Pictures/10005577000010E000000375B43B17937FDD1AC1.svg" manifest:media-type="image/svg+xml"/>
  <manifest:file-entry manifest:full-path="Pictures/10000EC900000319000002E7A211E40C596092AE.svg" manifest:media-type="image/svg+xml"/>
  <manifest:file-entry manifest:full-path="Pictures/10000001000000A300000021422A488FB88A713D.png" manifest:media-type="image/png"/>
  <manifest:file-entry manifest:full-path="Pictures/1000DB1000000E85000007095369933F64B7B0A7.svg" manifest:media-type="image/svg+xml"/>
  <manifest:file-entry manifest:full-path="Pictures/100020F8000009160000014DFDC863AC0D5F6123.svg" manifest:media-type="image/svg+xml"/>
  <manifest:file-entry manifest:full-path="Pictures/100006E1000000AF0000009F125258D9ED598202.svg" manifest:media-type="image/svg+xml"/>
  <manifest:file-entry manifest:full-path="Pictures/10000001000000580000000D5AC04D43CFAD32D3.png" manifest:media-type="image/png"/>
  <manifest:file-entry manifest:full-path="Pictures/10000001000000850000000DB4BD415D9219F302.png" manifest:media-type="image/png"/>
  <manifest:file-entry manifest:full-path="Pictures/100074760000134E0000033747D91F61CD7866BE.svg" manifest:media-type="image/svg+xml"/>
  <manifest:file-entry manifest:full-path="Pictures/10008633000017F30000034A6D88BFD27C74BFB5.svg" manifest:media-type="image/svg+xml"/>
  <manifest:file-entry manifest:full-path="Pictures/10000001000001A100000052EB204A23813F9C4D.png" manifest:media-type="image/png"/>
  <manifest:file-entry manifest:full-path="Pictures/100079C1000019660000017A3CD3DDCD8FA84614.svg" manifest:media-type="image/svg+xml"/>
  <manifest:file-entry manifest:full-path="Pictures/100005D700000092000000F83795F20A1F607BC6.svg" manifest:media-type="image/svg+xml"/>
  <manifest:file-entry manifest:full-path="Pictures/10000001000000F60000000E3B19226CAF8678E1.png" manifest:media-type="image/png"/>
  <manifest:file-entry manifest:full-path="Pictures/100045A000000A7A0000017AD50BEC5811AC26A3.svg" manifest:media-type="image/svg+xml"/>
  <manifest:file-entry manifest:full-path="Pictures/10004E6F00000D14000001BC4BBA8897CC092C67.svg" manifest:media-type="image/svg+xml"/>
  <manifest:file-entry manifest:full-path="Pictures/100000010000013400000011D55988D60676C3C5.png" manifest:media-type="image/png"/>
  <manifest:file-entry manifest:full-path="Pictures/10000001000000650000000E9D60FC81D5BC5178.png" manifest:media-type="image/png"/>
  <manifest:file-entry manifest:full-path="Pictures/10000001000000B100000031D48BA6F4ED4946E6.png" manifest:media-type="image/png"/>
  <manifest:file-entry manifest:full-path="Pictures/10000001000001600000000DF2AFD1C2ECEBA458.png" manifest:media-type="image/png"/>
  <manifest:file-entry manifest:full-path="Pictures/100071150000172D000001BC0A825619F9D49EBB.svg" manifest:media-type="image/svg+xml"/>
  <manifest:file-entry manifest:full-path="Pictures/10000001000001D70000005E9B1E6BB97A160471.png" manifest:media-type="image/png"/>
  <manifest:file-entry manifest:full-path="Pictures/1000742500001BD20000017A6FC6E6BC0BC1EBD5.svg" manifest:media-type="image/svg+xml"/>
  <manifest:file-entry manifest:full-path="Pictures/10000001000000800000000EB069902E2EAE7802.png" manifest:media-type="image/png"/>
  <manifest:file-entry manifest:full-path="Pictures/10000001000003D00000030983B755FCA23E14B4.png" manifest:media-type="image/png"/>
  <manifest:file-entry manifest:full-path="Pictures/1000033100000093000000EA5795EF8A37F00334.svg" manifest:media-type="image/svg+xml"/>
  <manifest:file-entry manifest:full-path="Pictures/10000001000000520000000FEC0A4E22FD2AAE1D.png" manifest:media-type="image/png"/>
  <manifest:file-entry manifest:full-path="Pictures/10003E9400000D450000017618DD219B699B0EE2.svg" manifest:media-type="image/svg+xml"/>
  <manifest:file-entry manifest:full-path="Pictures/100000010000007F00000011F9438A0C4FC8DA97.png" manifest:media-type="image/png"/>
  <manifest:file-entry manifest:full-path="Pictures/100000010000001E0000001C6D5C72EF156B5CA4.png" manifest:media-type="image/png"/>
  <manifest:file-entry manifest:full-path="Pictures/1000937B00001BE000000194C8EA1FF61307F18C.svg" manifest:media-type="image/svg+xml"/>
  <manifest:file-entry manifest:full-path="Pictures/100000010000010E0000000FD2D4C1A6E59AE5F1.png" manifest:media-type="image/png"/>
  <manifest:file-entry manifest:full-path="Pictures/1000876F00001F2E000001F24987436C1C3B476C.svg" manifest:media-type="image/svg+xml"/>
  <manifest:file-entry manifest:full-path="Pictures/1004249D00002CA00000154AB75EE655135E93A2.svg" manifest:media-type="image/svg+xml"/>
  <manifest:file-entry manifest:full-path="Pictures/10000001000001B0000000CEDA9D1980B2E4E03B.png" manifest:media-type="image/png"/>
  <manifest:file-entry manifest:full-path="Pictures/10000001000000E000000011C00AF171C1C0681A.png" manifest:media-type="image/png"/>
  <manifest:file-entry manifest:full-path="Pictures/10000001000008E900000401549FADA00E209804.png" manifest:media-type="image/png"/>
  <manifest:file-entry manifest:full-path="Pictures/100000010000008C00000044178DD5B5B0D3E6AC.png" manifest:media-type="image/png"/>
  <manifest:file-entry manifest:full-path="Pictures/10000001000000070000000635B517A1F169F8B1.png" manifest:media-type="image/png"/>
  <manifest:file-entry manifest:full-path="Pictures/100000010000000600000009B7C359D758989C93.png" manifest:media-type="image/png"/>
  <manifest:file-entry manifest:full-path="Pictures/10008EB90000124D0000050B284E2E128A3DCDAB.svg" manifest:media-type="image/svg+xml"/>
  <manifest:file-entry manifest:full-path="Pictures/10008264000011CE000004F10D503B321AE467A2.svg" manifest:media-type="image/svg+xml"/>
  <manifest:file-entry manifest:full-path="Pictures/10000001000000AC0000003002FCE65B2F20875A.png" manifest:media-type="image/png"/>
  <manifest:file-entry manifest:full-path="Pictures/10000001000003CA0000031B82844C55EC89F850.png" manifest:media-type="image/png"/>
  <manifest:file-entry manifest:full-path="Pictures/100000000000025000000060E7B2099DD49A1270.png" manifest:media-type="image/png"/>
  <manifest:file-entry manifest:full-path="Pictures/10004C01000014E40000015FBE12EC57F83BB9F3.svg" manifest:media-type="image/svg+xml"/>
  <manifest:file-entry manifest:full-path="Pictures/1000E0F000002FAC000001B02785552BE982D74D.svg" manifest:media-type="image/svg+xml"/>
  <manifest:file-entry manifest:full-path="Pictures/10000001000000CA0000000D0D2B1B1C963D044B.png" manifest:media-type="image/png"/>
  <manifest:file-entry manifest:full-path="Pictures/100105E300001B8B00000CE8116C5C0162C527C5.svg" manifest:media-type="image/svg+xml"/>
  <manifest:file-entry manifest:full-path="Pictures/100000010000010A0000007D33467B1099A5EA3D.png" manifest:media-type="image/png"/>
  <manifest:file-entry manifest:full-path="Pictures/10001D77000004C4000001A43A55212582C90589.svg" manifest:media-type="image/svg+xml"/>
  <manifest:file-entry manifest:full-path="Pictures/100000010000002E00000010F597C0C2C946844A.png" manifest:media-type="image/png"/>
  <manifest:file-entry manifest:full-path="Pictures/10001E1A00000359000003C5AA4DA2E2AF4E6911.svg" manifest:media-type="image/svg+xml"/>
  <manifest:file-entry manifest:full-path="Pictures/100000010000002000000024E83B994D1A3B2776.png" manifest:media-type="image/png"/>
  <manifest:file-entry manifest:full-path="Pictures/100021FE000004F3000003C5E420CDA2A74949F8.svg" manifest:media-type="image/svg+xml"/>
  <manifest:file-entry manifest:full-path="Pictures/100000010000005E0000000E63912AF06B44053F.png" manifest:media-type="image/png"/>
  <manifest:file-entry manifest:full-path="Pictures/100025D7000009AB0000017AC8E8B7151F8AA987.svg" manifest:media-type="image/svg+xml"/>
  <manifest:file-entry manifest:full-path="Pictures/1000000100000030000000249F111F9AB9DCCB83.png" manifest:media-type="image/png"/>
  <manifest:file-entry manifest:full-path="Pictures/10000000000003E8000004953964B5B584655374.png" manifest:media-type="image/png"/>
  <manifest:file-entry manifest:full-path="Pictures/10000001000001E0000000303DD91AE8525D3081.png" manifest:media-type="image/png"/>
  <manifest:file-entry manifest:full-path="Pictures/10011D92000024190000081ABD98C798B26ABB55.svg" manifest:media-type="image/svg+xml"/>
  <manifest:file-entry manifest:full-path="Pictures/10003BAE00000D2E000003057153C13B800EAD50.svg" manifest:media-type="image/svg+xml"/>
  <manifest:file-entry manifest:full-path="Pictures/10000001000000800000001D6FC7569F0A602EB6.png" manifest:media-type="image/png"/>
  <manifest:file-entry manifest:full-path="Pictures/10003F8500000D11000003055580C953249E5672.svg" manifest:media-type="image/svg+xml"/>
  <manifest:file-entry manifest:full-path="Pictures/100000010000007E0000001DCB087369C21FF267.png" manifest:media-type="image/png"/>
  <manifest:file-entry manifest:full-path="Pictures/10007FDC00001C3E000002EAA11B16479CF41409.svg" manifest:media-type="image/svg+xml"/>
  <manifest:file-entry manifest:full-path="Pictures/10000001000001110000001C7C8E2C8B9A8E5263.png" manifest:media-type="image/png"/>
  <manifest:file-entry manifest:full-path="Pictures/10004A1A0000145F0000017A0CF4DCEAE070F040.svg" manifest:media-type="image/svg+xml"/>
  <manifest:file-entry manifest:full-path="Pictures/10000001000000C50000000E91A6DA18FEF5F00E.png" manifest:media-type="image/png"/>
  <manifest:file-entry manifest:full-path="Pictures/10006C030000158E0000032737BEB43B54B9B990.svg" manifest:media-type="image/svg+xml"/>
  <manifest:file-entry manifest:full-path="Pictures/10000001000000D10000001FAA64C6ACA2B818DE.png" manifest:media-type="image/png"/>
  <manifest:file-entry manifest:full-path="Pictures/10009AC400001952000003ED44C6A8BC0DC2EA8D.svg" manifest:media-type="image/svg+xml"/>
  <manifest:file-entry manifest:full-path="Pictures/100048990000139500000194B12DDDCA4F71A73B.svg" manifest:media-type="image/svg+xml"/>
  <manifest:file-entry manifest:full-path="Pictures/10000001000000BD0000000FFC51D45FFE934447.png" manifest:media-type="image/png"/>
  <manifest:file-entry manifest:full-path="Pictures/10004A51000014A300000194F9A28EAF4653EDAC.svg" manifest:media-type="image/svg+xml"/>
  <manifest:file-entry manifest:full-path="Pictures/10000001000000C80000000F1A41CB85D500A489.png" manifest:media-type="image/png"/>
  <manifest:file-entry manifest:full-path="Pictures/100000010000015D0000004ECFF340D60B8F643E.png" manifest:media-type="image/png"/>
  <manifest:file-entry manifest:full-path="Pictures/1000B26B0000245E0000015F2A5417A430C8D1E8.svg" manifest:media-type="image/svg+xml"/>
  <manifest:file-entry manifest:full-path="Pictures/1000000100000831000004A579B0CE54A1BE1BB1.png" manifest:media-type="image/png"/>
  <manifest:file-entry manifest:full-path="Pictures/10000001000008350000027B9F6F2326200229DC.png" manifest:media-type="image/png"/>
  <manifest:file-entry manifest:full-path="Pictures/10002E040000094E0000017AA421B3FCADEA379C.svg" manifest:media-type="image/svg+xml"/>
  <manifest:file-entry manifest:full-path="Pictures/1000461C00000F230000017A0F2D19933C097CB6.svg" manifest:media-type="image/svg+xml"/>
  <manifest:file-entry manifest:full-path="Pictures/10000001000000920000000E4F7C37C14CC96E65.png" manifest:media-type="image/png"/>
  <manifest:file-entry manifest:full-path="Pictures/10017AA600001BE7000010D1611FD8761B31DF21.svg" manifest:media-type="image/svg+xml"/>
  <manifest:file-entry manifest:full-path="Pictures/100000010000010E000000A32145FC3D45F72A0A.png" manifest:media-type="image/png"/>
  <manifest:file-entry manifest:full-path="Pictures/10000001000000800000000E290F770A031514BE.png" manifest:media-type="image/png"/>
  <manifest:file-entry manifest:full-path="Pictures/10007CA00000161D000003409C97119BCA70A1D8.svg" manifest:media-type="image/svg+xml"/>
  <manifest:file-entry manifest:full-path="Pictures/10000001000000D60000001F45F514D99C8BC994.png" manifest:media-type="image/png"/>
  <manifest:file-entry manifest:full-path="Pictures/100138DB00002B15000008828A41AD0ECA88929D.svg" manifest:media-type="image/svg+xml"/>
  <manifest:file-entry manifest:full-path="Pictures/1000000100000086000000203E00049EC7C1BE46.png" manifest:media-type="image/png"/>
  <manifest:file-entry manifest:full-path="Pictures/1001A78A000030B3000009C2AFCACF0E83C8B536.svg" manifest:media-type="image/svg+xml"/>
  <manifest:file-entry manifest:full-path="Pictures/10000001000001CD00000010FE47F4E678B6A219.png" manifest:media-type="image/png"/>
  <manifest:file-entry manifest:full-path="Pictures/10014BCF00003193000004F7B3502ED36910DBDE.svg" manifest:media-type="image/svg+xml"/>
  <manifest:file-entry manifest:full-path="Pictures/1001300D000015F300000AB6A0093998112BF5C3.svg" manifest:media-type="image/svg+xml"/>
  <manifest:file-entry manifest:full-path="Pictures/10000001000000D400000068F4E6FD9E408B7518.png" manifest:media-type="image/png"/>
  <manifest:file-entry manifest:full-path="Pictures/1000426100000B09000003056230BD13B6590275.svg" manifest:media-type="image/svg+xml"/>
  <manifest:file-entry manifest:full-path="Pictures/100000010000006B0000001D136E6BC784F249C6.png" manifest:media-type="image/png"/>
  <manifest:file-entry manifest:full-path="Pictures/100051B700000DDD0000035A50F5DB3C7B683C6E.svg" manifest:media-type="image/svg+xml"/>
  <manifest:file-entry manifest:full-path="Pictures/1000710D00001458000002F14CD9BD7B89E29585.svg" manifest:media-type="image/svg+xml"/>
  <manifest:file-entry manifest:full-path="Pictures/10000001000000C50000001C41BA499F38AA4C9A.png" manifest:media-type="image/png"/>
  <manifest:file-entry manifest:full-path="Pictures/10009DEF00001B0A0000035A70EE60369841B6E3.svg" manifest:media-type="image/svg+xml"/>
  <manifest:file-entry manifest:full-path="Pictures/100000010000010600000020CDD763D521FC80A6.png" manifest:media-type="image/png"/>
  <manifest:file-entry manifest:full-path="Pictures/10013492000014AA00000A9E499832A90CD5D1C6.svg" manifest:media-type="image/svg+xml"/>
  <manifest:file-entry manifest:full-path="Pictures/10000001000000C800000067299B63177FA58188.png" manifest:media-type="image/png"/>
  <manifest:file-entry manifest:full-path="Pictures/100000010000005A0000000EF3E0BC7E9870550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標準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TC" svg:font-family="'Noto Sans TC'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pitch="variable"/>
    <style:font-face style:name="思源黑體 TW2" svg:font-family="'思源黑體 TW'" style:font-family-generic="roman" style:font-pitch="variable"/>
    <style:font-face style:name="新細明體" svg:font-family="新細明體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無填入也無線條的物件">
      <style:graphic-properties draw:stroke="dash" draw:stroke-dash="Long_20_Dot" svg:stroke-width="0.05cm" svg:stroke-color="#ffffff" draw:marker-start-width="0.28cm" draw:marker-end-width="0.28cm" draw:fill="solid" draw:fill-color="#eeeee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8" style:family="graphic" style:parent-style-name="standard">
      <style:graphic-properties svg:stroke-width="0.053cm" svg:stroke-color="#729fcf" draw:marker-start-width="0.279cm" draw:marker-end-width="0.279cm" draw:fill-color="#729fcf" draw:textarea-horizontal-align="justify" draw:textarea-vertical-align="middle" draw:auto-grow-height="false" fo:min-height="0.529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729fcf" draw:marker-start-width="0.279cm" draw:marker-end-width="0.279cm" draw:fill-color="#729fcf" draw:textarea-horizontal-align="justify" draw:textarea-vertical-align="middle" draw:auto-grow-height="false" fo:min-height="0.477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11" style:family="graphic" style:parent-style-name="無填入也無線條的物件">
      <style:graphic-properties draw:stroke="solid" svg:stroke-width="0.08cm" svg:stroke-color="#b2b2b2" draw:marker-start-width="0.32cm" draw:marker-end-width="0.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35cm" draw:marker-start="Concave_20_short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-width="0.252cm" draw:marker-end="Concave_20_short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objectwithoutfill">
      <style:graphic-properties draw:stroke="dash" draw:stroke-dash="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8" style:family="graphic" style:parent-style-name="standard">
      <style:graphic-properties draw:stroke="none" draw:stroke-dash="Dash_20_Dot_20_4" svg:stroke-width="0cm" draw:stroke-linejoin="none" svg:stroke-linecap="butt" draw:fill="solid" draw:fill-color="#007091" draw:textarea-horizontal-align="center" draw:textarea-vertical-align="middle"/>
    </style:style>
    <style:style style:name="gr19" style:family="graphic" style:parent-style-name="standard">
      <style:graphic-properties svg:stroke-width="0.05cm" svg:stroke-color="#ffffff" draw:marker-start-width="0.28cm" draw:marker-end-width="0.28cm" draw:fill="solid" draw:fill-color="#729fcf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20" style:family="graphic" style:parent-style-name="standard">
      <style:graphic-properties svg:stroke-color="#ffffff" draw:fill="solid" draw:fill-color="#729fcf" draw:textarea-horizontal-align="justify" draw:textarea-vertical-align="middle" draw:auto-grow-height="false" fo:min-height="0.45cm" fo:min-width="0cm"/>
    </style:style>
    <style:style style:name="gr21" style:family="graphic" style:parent-style-name="standard">
      <style:graphic-properties svg:stroke-width="0.05cm" svg:stroke-color="#eeeeee" draw:marker-start-width="0.28cm" draw:marker-end-width="0.28cm" draw:fill="solid" draw:fill-color="#b3cac7" draw:textarea-horizontal-align="justify" draw:textarea-vertical-align="middle" draw:auto-grow-height="false" fo:min-height="0.439cm" fo:min-width="10.051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ffffff" draw:marker-start-width="0.28cm" draw:marker-end-width="0.28cm" draw:fill="solid" draw:fill-color="#b4c7dc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ffffff" draw:marker-start-width="0.28cm" draw:marker-end-width="0.28cm" draw:fill="solid" draw:fill-color="#b4c7dc" draw:textarea-horizontal-align="justify" draw:textarea-vertical-align="middle" draw:auto-grow-height="false" fo:min-height="1.1cm" fo:min-width="0.25cm" fo:padding-top="0.15cm" fo:padding-bottom="0.15cm" fo:padding-left="0.275cm" fo:padding-right="0.275cm"/>
    </style:style>
    <style:style style:name="gr24" style:family="graphic" style:parent-style-name="standard">
      <style:graphic-properties svg:stroke-color="#ffffff" draw:fill="solid" draw:fill-color="#cccccc" draw:textarea-horizontal-align="justify" draw:textarea-vertical-align="middle" draw:auto-grow-height="false" fo:min-height="0.351cm" fo:min-width="1.501cm" fo:wrap-option="no-wrap"/>
    </style:style>
    <style:style style:name="gr25" style:family="graphic" style:parent-style-name="standard">
      <style:graphic-properties draw:stroke="none" draw:stroke-dash="Dot" svg:stroke-width="0.05cm" svg:stroke-color="#cccccc" draw:marker-start-width="0.28cm" draw:marker-end-width="0.28cm" draw:fill="none" draw:fill-color="#ffffff" draw:auto-grow-height="true" draw:auto-grow-width="false" fo:max-height="0cm" fo:min-height="2.499cm" fo:padding-top="0.15cm" fo:padding-bottom="0.15cm" fo:padding-left="0.275cm" fo:padding-right="0.275cm"/>
      <style:paragraph-properties style:writing-mode="lr-tb"/>
    </style:style>
    <style:style style:name="gr26" style:family="graphic" style:parent-style-name="無填入也無線條的物件">
      <style:graphic-properties draw:stroke="none" draw:stroke-dash="Dot" svg:stroke-width="0.05cm" svg:stroke-color="#cccccc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vertical-align="middle" fo:min-height="1.882cm"/>
      <style:paragraph-properties style:writing-mode="lr-tb"/>
    </style:style>
    <style:style style:name="gr28" style:family="graphic" style:parent-style-name="standard">
      <style:graphic-properties draw:stroke="solid" draw:stroke-dash="Dot" svg:stroke-width="0.1cm" svg:stroke-color="#5983b0" draw:marker-start-width="0.35cm" draw:marker-end-width="0.35cm" draw:fill="solid" draw:fill-color="#5983b0" draw:auto-grow-height="true" draw:auto-grow-width="false" fo:max-height="0cm" fo:min-height="1.407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1.15cm" fo:min-width="8.1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1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1.2cm" fo:min-width="1.451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3" style:family="graphic" style:parent-style-name="standard">
      <style:graphic-properties svg:stroke-width="0.05cm" svg:stroke-color="#0000ff" draw:marker-start-width="0.355cm" draw:marker-end-width="0.355cm" draw:fill="solid" draw:fill-color="#0000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1.2cm" fo:min-width="0.051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cm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draw:textarea-vertical-align="middle" fo:min-height="1.255cm"/>
      <style:paragraph-properties style:writing-mode="lr-tb"/>
    </style:style>
    <style:style style:name="gr38" style:family="graphic" style:parent-style-name="standard">
      <style:graphic-properties svg:stroke-width="0.1cm" svg:stroke-color="#ff8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draw:fill="none" fo:min-height="0.68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1" style:family="graphic" style:parent-style-name="standard">
      <style:graphic-properties draw:stroke="dash" draw:stroke-dash="Long_20_Dash" svg:stroke-width="0.05cm" svg:stroke-color="#ff8000" draw:marker-start-width="0.28cm" draw:marker-end-width="0.28cm" draw:fill="none" draw:textarea-horizontal-align="justify" draw:textarea-vertical-align="middle" draw:auto-grow-height="false" fo:min-height="2.154cm" fo:min-width="5.3cm" fo:padding-top="0.15cm" fo:padding-bottom="0.15cm" fo:padding-left="0.275cm" fo:padding-right="0.275cm"/>
    </style:style>
    <style:style style:name="gr42" style:family="graphic" style:parent-style-name="objectwithoutfill">
      <style:graphic-properties draw:stroke="dash" draw:stroke-dash="Long_20_Dash" svg:stroke-width="0.05cm" svg:stroke-color="#ff8000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43" style:family="graphic" style:parent-style-name="無填入也無線條的物件">
      <style:graphic-properties draw:stroke="solid" svg:stroke-width="0.02cm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dash" draw:stroke-dash="Long_20_Dash" svg:stroke-width="0.05cm" draw:marker-start-width="0.28cm" draw:marker-end-width="0.28cm" draw:fill="none" draw:textarea-horizontal-align="justify" draw:textarea-vertical-align="middle" draw:auto-grow-height="false" fo:min-height="5.55cm" fo:min-width="10.9cm" fo:padding-top="0.15cm" fo:padding-bottom="0.15cm" fo:padding-left="0.275cm" fo:padding-right="0.275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 style:list-style-name="L1">
      <style:graphic-properties fo:min-height="2.6cm"/>
      <style:paragraph-properties style:writing-mode="lr-tb"/>
    </style:style>
    <style:style style:name="pr8" style:family="presentation" style:parent-style-name="BrightBlue-title" style:list-style-name="L1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6cm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paragraph-properties style:writing-mode="lr-tb"/>
      <style:text-properties style:font-name="Liberation Seri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solid" draw:fill-color="#0000ff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7" style:family="paragraph">
      <loext:graphic-properties draw:fill-color="#ffffff"/>
      <style:paragraph-properties style:writing-mode="lr-tb"/>
      <style:text-properties style:font-size-asian="24pt"/>
    </style:style>
    <style:style style:name="P18" style:family="paragraph">
      <loext:graphic-properties draw:fill="none" draw:fill-color="#ffffff"/>
      <style:paragraph-properties style:writing-mode="lr-tb"/>
      <style:text-properties fo:color="#666666" loext:opacity="100%" style:font-name="Liberation Serif"/>
    </style:style>
    <style:style style:name="P19" style:family="paragraph">
      <loext:graphic-properties draw:fill="none" draw:fill-color="#ffffff"/>
      <style:paragraph-properties style:writing-mode="lr-tb"/>
      <style:text-properties fo:color="#808080" loext:opacity="100%" style:font-name="Liberation Serif"/>
    </style:style>
    <style:style style:name="P20" style:family="paragraph">
      <style:paragraph-properties fo:margin-left="0cm" fo:margin-right="0cm" fo:margin-top="0cm" fo:margin-bottom="0.405cm" fo:text-indent="0cm"/>
    </style:style>
    <style:style style:name="P21" style:family="paragraph">
      <loext:graphic-properties draw:fill="solid" draw:fill-color="#007091"/>
      <style:paragraph-properties fo:text-align="center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solid" draw:fill-color="#b3cac7"/>
      <style:paragraph-properties fo:text-align="center"/>
    </style:style>
    <style:style style:name="P24" style:family="paragraph">
      <loext:graphic-properties draw:fill="solid" draw:fill-color="#b4c7dc"/>
      <style:paragraph-properties fo:text-align="center"/>
    </style:style>
    <style:style style:name="P25" style:family="paragraph">
      <loext:graphic-properties draw:fill="solid" draw:fill-color="#cccccc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ff8000" loext:opacity="100%" style:font-name="Liberation Serif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color="#999999" loext:opacity="100%" style:font-name="Liberation Serif"/>
    </style:style>
    <style:style style:name="P29" style:family="paragraph">
      <style:paragraph-properties fo:margin-left="0cm" fo:margin-right="0cm" fo:margin-top="0cm" fo:margin-bottom="0.324cm" fo:text-indent="0cm"/>
    </style:style>
    <style:style style:name="P30" style:family="paragraph">
      <loext:graphic-properties draw:fill="solid" draw:fill-color="#5983b0"/>
      <style:paragraph-properties style:writing-mode="lr-tb"/>
      <style:text-properties fo:color="#ffffff" loext:opacity="100%" style:font-name="Liberation Serif2" fo:font-size="18pt" style:font-size-asian="24pt" style:font-size-complex="24pt"/>
    </style:style>
    <style:style style:name="P31" style:family="paragraph">
      <style:paragraph-properties style:writing-mode="lr-tb"/>
      <style:text-properties style:font-name="Liberation Serif" fo:font-size="24pt" style:font-size-asian="24pt" style:font-size-complex="24pt"/>
    </style:style>
    <style:style style:name="P32" style:family="paragraph">
      <loext:graphic-properties draw:fill="none" draw:fill-color="#ffffff"/>
      <style:paragraph-properties style:writing-mode="lr-tb"/>
      <style:text-properties fo:color="#999999" loext:opacity="100%" style:font-name="Liberation Serif" fo:font-size="18pt" style:font-size-asian="24pt" style:font-size-complex="24pt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style:paragraph-properties style:writing-mode="lr-tb"/>
      <style:text-properties fo:font-style="normal" style:font-style-asian="normal" style:font-style-complex="normal"/>
    </style:style>
    <style:style style:name="P35" style:family="paragraph">
      <loext:graphic-properties draw:fill="none"/>
      <style:paragraph-properties fo:text-align="center" style:writing-mode="lr-tb"/>
      <style:text-properties fo:font-size="16pt"/>
    </style:style>
    <style:style style:name="P36" style:family="paragraph">
      <loext:graphic-properties draw:fill="none"/>
      <style:paragraph-properties style:writing-mode="lr-tb"/>
      <style:text-properties fo:color="#ff8000" loext:opacity="100%" fo:font-size="16pt"/>
    </style:style>
    <style:style style:name="P37" style:family="paragraph">
      <style:paragraph-properties style:writing-mode="lr-tb"/>
      <style:text-properties fo:font-size="3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" style:font-name-asian="Liberation Serif1" style:font-name-complex="Liberation Seri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font-size="18pt" style:font-size-asian="16pt" style:font-size-complex="16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style:font-size-asian="22pt" style:font-size-complex="22pt"/>
    </style:style>
    <style:style style:name="T15" style:family="text">
      <style:text-properties fo:font-size="24pt" fo:font-style="italic" style:text-underline-style="none" style:font-size-asian="22pt" style:font-style-asian="italic" style:font-size-complex="22pt" style:font-style-complex="italic"/>
    </style:style>
    <style:style style:name="T16" style:family="text">
      <style:text-properties fo:font-size="24pt" fo:font-style="italic" style:font-size-asian="22pt" style:font-style-asian="italic" style:font-size-complex="22pt" style:font-style-complex="italic"/>
    </style:style>
    <style:style style:name="T17" style:family="text">
      <style:text-properties fo:color="#2a6099" loext:opacity="100%" fo:font-size="24pt" style:font-size-asian="22pt" style:font-size-complex="22pt"/>
    </style:style>
    <style:style style:name="T18" style:family="text">
      <style:text-properties fo:font-size="24pt" fo:font-style="normal" style:font-size-asian="22pt" style:font-style-asian="normal" style:font-size-complex="22pt" style:font-style-complex="normal"/>
    </style:style>
    <style:style style:name="T19" style:family="text">
      <style:text-properties style:font-name="Liberation Serif" fo:font-size="22pt" style:font-size-asian="28pt" style:font-size-complex="28pt"/>
    </style:style>
    <style:style style:name="T20" style:family="text">
      <style:text-properties style:use-window-font-color="true" loext:opacity="0%" style:text-outline="false" style:text-line-through-style="none" style:text-line-through-type="none" fo:font-size="24pt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fo:font-size="24pt" fo:font-style="italic" fo:text-shadow="none" style:text-underline-style="none" fo:font-weight="normal" style:letter-kerning="true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text-position="-15% 75%" fo:font-size="24pt" fo:font-style="italic" fo:text-shadow="none" style:text-underline-style="none" fo:font-weight="normal" style:letter-kerning="true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2pt" style:font-name-complex="Liberation Serif1" style:font-size-complex="22pt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1" style:font-size-asian="22pt" style:font-name-complex="Liberation Serif1" style:font-size-complex="22pt" style:text-emphasize="none" style:font-relief="none" style:text-overline-style="none" style:text-overline-color="font-color"/>
    </style:style>
    <style:style style:name="T26" style:family="text">
      <style:text-properties style:font-name="Liberation Serif" fo:font-size="24pt" fo:font-style="italic" style:font-name-asian="Liberation Serif1" style:font-size-asian="22pt" style:font-style-asian="italic" style:font-name-complex="Liberation Serif1" style:font-size-complex="22pt" style:font-style-complex="italic"/>
    </style:style>
    <style:style style:name="T27" style:family="text">
      <style:text-properties style:text-position="-15% 75%" style:font-name="Liberation Serif" fo:font-size="24pt" fo:font-style="italic" style:font-name-asian="Liberation Serif1" style:font-size-asian="22pt" style:font-style-asian="italic" style:font-name-complex="Liberation Serif1" style:font-size-complex="22pt" style:font-style-complex="italic"/>
    </style:style>
    <style:style style:name="T28" style:family="text">
      <style:text-properties style:font-name="Liberation Serif" fo:font-size="24pt" style:font-name-asian="Liberation Serif1" style:font-size-asian="22pt" style:font-name-complex="Liberation Serif1" style:font-size-complex="22pt"/>
    </style:style>
    <style:style style:name="T29" style:family="text">
      <style:text-properties style:font-name="Liberation Serif1" fo:font-size="24pt" style:font-name-asian="Liberation Serif1" style:font-size-asian="22pt" style:font-name-complex="Liberation Serif1" style:font-size-complex="22pt"/>
    </style:style>
    <style:style style:name="T30" style:family="text">
      <style:text-properties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style:font-name="Liberation Serif1" fo:font-size="24pt" fo:font-style="italic" style:font-name-asian="Liberation Serif1" style:font-size-asian="22pt" style:font-style-asian="italic" style:font-name-complex="Liberation Serif1" style:font-size-complex="22pt" style:font-style-complex="italic"/>
    </style:style>
    <style:style style:name="T32" style:family="text">
      <style:text-properties fo:color="#666666" loext:opacity="100%" style:font-name="Liberation Serif" fo:font-size="15pt" style:font-size-asian="20pt" style:font-size-complex="20pt"/>
    </style:style>
    <style:style style:name="T33" style:family="text">
      <style:text-properties fo:color="#808080" loext:opacity="100%" style:font-name="Liberation Serif" fo:font-size="20pt" style:font-size-asian="26pt" style:font-size-complex="26pt"/>
    </style:style>
    <style:style style:name="T34" style:family="text">
      <style:text-properties fo:font-size="36pt" style:font-size-asian="24pt" style:font-size-complex="24pt"/>
    </style:style>
    <style:style style:name="T35" style:family="text">
      <style:text-properties fo:color="#ffff00" loext:opacity="100%" fo:font-size="36pt" style:font-size-asian="24pt" style:font-size-complex="24pt"/>
    </style:style>
    <style:style style:name="T36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solid" style:text-underline-width="auto" style:text-underline-color="font-color" fo:font-weight="bold" style:letter-kerning="true" style:font-name-asian="Liberation Serif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4pt" fo:font-style="normal" fo:text-shadow="none" style:text-underline-style="none" fo:font-weight="normal" style:letter-kerning="true" style:font-name-asian="Liberation Serif1" style:font-size-asian="22pt" style:font-style-asian="normal" style:font-name-complex="Liberation Serif1" style:font-size-complex="22pt" style:font-style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4pt" fo:font-style="italic" fo:text-shadow="none" style:text-underline-style="none" fo:font-weight="normal" style:letter-kerning="true" style:font-name-asian="Liberation Serif1" style:font-size-asian="22pt" style:font-style-asian="italic" style:font-name-complex="Liberation Serif1" style:font-size-complex="22pt" style:font-style-complex="italic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name-asian="Liberation Serif1" style:font-size-asian="22pt" style:font-style-asian="italic" style:font-name-complex="Liberation Serif1" style:font-size-complex="22pt" style:font-style-complex="italic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2pt" style:font-style-asian="normal" style:font-name-complex="Liberation Serif1" style:font-size-complex="22pt" style:font-style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bold" style:letter-kerning="true" style:font-name-asian="Liberation Serif1" style:font-size-asian="22pt" style:font-style-asian="normal" style:font-weight-asian="bold" style:font-name-complex="Liberation Serif1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bold" style:letter-kerning="true" style:font-name-asian="Liberation Serif" style:font-size-asian="22pt" style:font-style-asian="italic" style:font-weight-asian="bold" style:font-name-complex="Liberation Serif1" style:font-size-complex="22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4pt" fo:font-style="normal" fo:text-shadow="none" style:text-underline-style="none" fo:font-weight="bold" style:letter-kerning="true" style:font-name-asian="Liberation Serif1" style:font-size-asian="22pt" style:font-style-asian="normal" style:font-weight-asian="bold" style:font-name-complex="Liberation Serif1" style:font-size-complex="2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name-asian="Liberation Serif" style:font-size-asian="22pt" style:font-style-asian="normal" style:font-weight-asian="bold" style:font-name-complex="Liberation Serif1" style:font-size-complex="2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4pt" fo:font-style="italic" fo:text-shadow="none" style:text-underline-style="none" fo:font-weight="bold" style:letter-kerning="true" style:font-name-asian="Liberation Serif1" style:font-size-asian="22pt" style:font-style-asian="italic" style:font-weight-asian="bold" style:font-name-complex="Liberation Serif1" style:font-size-complex="22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Liberation Serif1" fo:font-size="24pt" fo:font-style="normal" fo:font-weight="bold" style:font-name-asian="Liberation Serif1" style:font-size-asian="22pt" style:font-style-asian="normal" style:font-weight-asian="bold" style:font-name-complex="Liberation Serif1" style:font-size-complex="22pt" style:font-style-complex="normal" style:font-weight-complex="bold"/>
    </style:style>
    <style:style style:name="T49" style:family="text">
      <style:text-properties style:font-name="Liberation Serif1" fo:font-size="24pt" fo:font-style="normal" style:font-name-asian="Liberation Serif1" style:font-size-asian="22pt" style:font-style-asian="normal" style:font-name-complex="Liberation Serif1" style:font-size-complex="22pt" style:font-style-complex="normal"/>
    </style:style>
    <style:style style:name="T50" style:family="text">
      <style:text-properties fo:font-size="22pt" style:font-size-asian="20pt" style:font-size-complex="20pt"/>
    </style:style>
    <style:style style:name="T51" style:family="text">
      <style:text-properties fo:font-size="22pt" fo:font-style="italic" style:font-size-asian="20pt" style:font-style-asian="italic" style:font-size-complex="20pt" style:font-style-complex="italic"/>
    </style:style>
    <style:style style:name="T52" style:family="text">
      <style:text-properties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" style:font-size-asian="16pt" style:font-size-complex="16pt" style:text-emphasize="none" style:font-relief="none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style:font-name-asian="Liberation Serif1" style:font-size-asian="18pt" style:font-style-asian="italic" style:font-name-complex="Liberation Serif1" style:font-size-complex="18pt" style:font-style-complex="italic" style:text-emphasize="none" style:font-relief="none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0pt" fo:font-style="italic" fo:text-shadow="none" style:text-underline-style="none" fo:font-weight="normal" style:letter-kerning="true" style:font-name-asian="Liberation Serif1" style:font-size-asian="18pt" style:font-style-asian="italic" style:font-name-complex="Liberation Serif1" style:font-size-complex="18pt" style:font-style-complex="italic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6pt" fo:font-style="normal" fo:text-shadow="none" style:text-underline-style="none" fo:font-weight="normal" style:letter-kerning="true" style:font-name-asian="Liberation Serif1" style:font-size-asian="24pt" style:font-style-asian="normal" style:font-name-complex="Liberation Serif1" style:font-size-complex="24pt" style:font-style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2pt" fo:font-style="normal" fo:text-shadow="none" style:text-underline-style="none" fo:font-weight="normal" style:letter-kerning="true" style:font-name-asian="Liberation Serif1" style:font-size-asian="20pt" style:font-style-asian="normal" style:font-name-complex="Liberation Serif1" style:font-size-complex="20pt" style:font-style-complex="normal" style:text-emphasize="none" style:font-relief="none" style:text-overline-style="none" style:text-overline-color="font-color"/>
    </style:style>
    <style:style style:name="T57" style:family="text">
      <style:text-properties fo:color="#ff8000" loext:opacity="100%" style:font-name="Liberation Serif"/>
    </style:style>
    <style:style style:name="T58" style:family="text">
      <style:text-properties fo:color="#ff8000" loext:opacity="100%" style:font-name="Liberation Serif" fo:font-size="10pt" style:font-size-asian="10pt" style:font-size-complex="10pt"/>
    </style:style>
    <style:style style:name="T59" style:family="text">
      <style:text-properties fo:font-size="20pt" style:font-size-asian="18pt" style:font-size-complex="18pt"/>
    </style:style>
    <style:style style:name="T60" style:family="text">
      <style:text-properties fo:color="#5983b0" loext:opacity="100%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name-asian="Liberation Serif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61" style:family="text">
      <style:text-properties fo:color="#999999" loext:opacity="100%" style:font-name="Liberation Serif" fo:font-size="16pt" style:font-size-asian="22pt" style:font-size-complex="22pt"/>
    </style:style>
    <style:style style:name="T62" style:family="text">
      <style:text-properties fo:color="#999999" loext:opacity="100%" style:font-name="Liberation Serif" fo:font-size="16pt" style:font-name-asian="Liberation Serif1" style:font-size-asian="22pt" style:font-name-complex="Liberation Serif1" style:font-size-complex="22pt"/>
    </style:style>
    <style:style style:name="T63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erif" style:font-size-asian="18pt" style:font-size-complex="18pt" style:text-emphasize="none" style:font-relief="none" style:text-overline-style="none" style:text-overline-color="font-color"/>
    </style:style>
    <style:style style:name="T64" style:family="text">
      <style:text-properties fo:color="#ff4000" loext:opacity="100%" style:text-outline="false" style:text-line-through-style="none" style:text-line-through-type="none" style:font-name="Liberation Serif" fo:font-size="20pt" fo:font-style="normal" fo:text-shadow="none" style:text-underline-style="none" fo:font-weight="bold" style:letter-kerning="true" style:font-name-asian="Liberation Serif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0pt" fo:font-style="italic" style:font-size-asian="18pt" style:font-style-asian="italic" style:font-size-complex="18pt" style:font-style-complex="italic"/>
    </style:style>
    <style:style style:name="T66" style:family="text">
      <style:text-properties style:font-name="Liberation Serif1" fo:font-size="20pt" style:font-name-asian="Liberation Serif1" style:font-size-asian="18pt" style:font-name-complex="Liberation Serif1" style:font-size-complex="18pt"/>
    </style:style>
    <style:style style:name="T67" style:family="text">
      <style:text-properties style:font-name="Liberation Serif" fo:font-size="20pt" style:font-name-asian="Liberation Serif1" style:font-size-asian="18pt" style:font-name-complex="Liberation Serif1" style:font-size-complex="18pt"/>
    </style:style>
    <style:style style:name="T68" style:family="text">
      <style:text-properties style:font-name="Liberation Serif1" fo:font-size="20pt" fo:font-style="italic" style:font-name-asian="Liberation Serif1" style:font-size-asian="18pt" style:font-style-asian="italic" style:font-name-complex="Liberation Serif1" style:font-size-complex="18pt" style:font-style-complex="italic"/>
    </style:style>
    <style:style style:name="T69" style:family="text">
      <style:text-properties fo:font-size="20pt" fo:font-style="normal" style:font-size-asian="18pt" style:font-style-asian="normal" style:font-size-complex="18pt" style:font-style-complex="normal"/>
    </style:style>
    <style:style style:name="T70" style:family="text">
      <style:text-properties style:use-window-font-color="true" loext:opacity="0%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style:font-name-asian="Liberation Serif" style:font-size-asian="18pt" style:font-style-asian="italic" style:font-size-complex="18pt" style:font-style-complex="italic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text-outline="false" style:text-line-through-style="none" style:text-line-through-type="none" style:text-position="-8% 58%" style:font-name="Liberation Serif" fo:font-size="20pt" fo:font-style="normal" fo:text-shadow="none" style:text-underline-style="none" fo:font-weight="normal" style:letter-kerning="true" style:font-name-asian="Liberation Serif" style:font-size-asian="18pt" style:font-size-complex="18pt" style:text-emphasize="none" style:font-relief="none" style:text-overline-style="none" style:text-overline-color="font-color"/>
    </style:style>
    <style:style style:name="T72" style:family="text">
      <style:text-properties style:text-position="-8% 58%" fo:font-size="20pt" style:font-size-asian="18pt" style:font-size-complex="18pt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color="#ffffff" loext:opacity="100%" style:font-name="Liberation Serif2" fo:font-size="18pt" style:font-size-asian="24pt" style:font-size-complex="24pt"/>
    </style:style>
    <style:style style:name="T75" style:family="text">
      <style:text-properties fo:color="#ffffff" loext:opacity="100%" style:font-name="Liberation Serif2" fo:font-size="18pt" fo:font-weight="bold" style:font-size-asian="24pt" style:font-weight-asian="bold" style:font-size-complex="24pt" style:font-weight-complex="bold"/>
    </style:style>
    <style:style style:name="T76" style:family="text">
      <style:text-properties fo:font-size="32pt" style:font-size-asian="22pt" style:font-size-complex="22pt"/>
    </style:style>
    <style:style style:name="T77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solid" style:text-underline-width="auto" style:text-underline-color="font-color" fo:font-weight="bold" style:letter-kerning="true" style:font-name-asian="Liberation Serif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size-complex="24pt" style:text-emphasize="none" style:font-relief="none" style:text-overline-style="none" style:text-overline-color="font-color"/>
    </style:style>
    <style:style style:name="T79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80" style:family="text">
      <style:text-properties style:use-window-font-color="true" loext:opacity="0%" style:text-outline="false" style:text-line-through-style="none" style:text-line-through-type="none" style:font-name="Liberation Serif" fo:font-size="24pt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2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1" style:font-size-asian="24pt" style:font-name-complex="Liberation Serif1" style:font-size-complex="24pt" style:text-emphasize="none" style:font-relief="none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1" style:font-size-asian="24pt" style:font-style-asian="italic" style:font-name-complex="Liberation Serif1" style:font-size-complex="24pt" style:font-style-complex="italic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1" style:font-size-asian="24pt" style:font-style-asian="normal" style:font-name-complex="Liberation Serif1" style:font-size-complex="24pt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Liberation Serif1" fo:font-size="24pt" fo:font-style="normal" style:font-name-asian="Liberation Serif1" style:font-size-asian="24pt" style:font-style-asian="normal" style:font-name-complex="Liberation Serif1" style:font-size-complex="24pt" style:font-style-complex="normal"/>
    </style:style>
    <style:style style:name="T86" style:family="text">
      <style:text-properties style:font-name="Liberation Serif" fo:font-size="24pt" fo:font-style="normal" style:font-name-asian="Liberation Serif1" style:font-size-asian="24pt" style:font-style-asian="normal" style:font-name-complex="Liberation Serif1" style:font-size-complex="24pt" style:font-style-complex="normal"/>
    </style:style>
    <style:style style:name="T87" style:family="text">
      <style:text-properties style:font-name="Liberation Serif" fo:font-size="24pt" fo:font-style="italic" style:font-name-asian="Liberation Serif1" style:font-size-asian="24pt" style:font-style-asian="italic" style:font-name-complex="Liberation Serif1" style:font-size-complex="24pt" style:font-style-complex="italic"/>
    </style:style>
    <style:style style:name="T88" style:family="text">
      <style:text-properties fo:color="#999999" loext:opacity="100%" style:font-name="Liberation Serif" fo:font-size="18pt" style:font-size-asian="24pt" style:font-size-complex="24pt"/>
    </style:style>
    <style:style style:name="T89" style:family="text">
      <style:text-properties fo:color="#999999" loext:opacity="100%" style:font-name="Liberation Serif" fo:font-size="18pt" fo:font-style="italic" style:font-size-asian="24pt" style:font-style-asian="italic" style:font-size-complex="24pt" style:font-style-complex="italic"/>
    </style:style>
    <style:style style:name="T90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solid" style:text-underline-width="auto" style:text-underline-color="font-color" fo:font-weight="bold" style:letter-kerning="true" style:font-name-asian="Liberation Serif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91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92" style:family="text">
      <style:text-properties style:use-window-font-color="true" loext:opacity="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Liberation Serif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93" style:family="text">
      <style:text-properties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94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95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bold" style:letter-kerning="true" style:font-name-asian="Liberation Serif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96" style:family="text">
      <style:text-properties fo:font-size="22pt" fo:font-style="normal" style:font-size-asian="20pt" style:font-style-asian="normal" style:font-size-complex="20pt" style:font-style-complex="normal"/>
    </style:style>
    <style:style style:name="T97" style:family="text">
      <style:text-properties style:use-window-font-color="true" loext:opacity="0%" style:text-outline="false" style:text-line-through-style="none" style:text-line-through-type="none" style:text-position="-8% 58%" style:font-name="Liberation Serif" fo:font-size="22pt" fo:font-style="normal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98" style:family="text">
      <style:text-properties style:text-position="-8% 58%" fo:font-size="22pt" style:font-size-asian="20pt" style:font-size-complex="20pt"/>
    </style:style>
    <style:style style:name="T99" style:family="text">
      <style:text-properties style:font-name="Liberation Serif1" fo:font-size="22pt" style:font-name-asian="Liberation Serif1" style:font-size-asian="20pt" style:font-name-complex="Liberation Serif1" style:font-size-complex="20pt"/>
    </style:style>
    <style:style style:name="T100" style:family="text">
      <style:text-properties style:font-name="Liberation Serif" fo:font-size="22pt" style:font-name-asian="Liberation Serif1" style:font-size-asian="20pt" style:font-name-complex="Liberation Serif1" style:font-size-complex="20pt"/>
    </style:style>
    <style:style style:name="T101" style:family="text">
      <style:text-properties style:font-name="Liberation Serif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102" style:family="text">
      <style:text-properties style:font-name="Liberation Serif1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103" style:family="text">
      <style:text-properties style:use-window-font-color="true" loext:opacity="0%" style:text-outline="false" style:text-line-through-style="none" style:text-line-through-type="none" style:font-name="Liberation Serif1" fo:font-size="22pt" fo:font-style="italic" fo:text-shadow="none" style:text-underline-style="none" fo:font-weight="normal" style:letter-kerning="true" style:font-name-asian="Liberation Serif1" style:font-size-asian="20pt" style:font-style-asian="italic" style:font-name-complex="Liberation Serif1" style:font-size-complex="20pt" style:font-style-complex="italic" style:text-emphasize="none" style:font-relief="none" style:text-overline-style="none" style:text-overline-color="font-color"/>
    </style:style>
    <style:style style:name="T104" style:family="text">
      <style:text-properties fo:color="#ff0000" loext:opacity="100%" style:font-name="Liberation Serif" fo:font-size="22pt" fo:font-style="italic" fo:font-weight="bold" fo:background-color="transparent" style:font-name-asian="Liberation Serif1" style:font-size-asian="20pt" style:font-style-asian="italic" style:font-weight-asian="bold" style:font-name-complex="Liberation Serif1" style:font-size-complex="20pt" style:font-style-complex="italic" style:font-weight-complex="bold"/>
    </style:style>
    <style:style style:name="T105" style:family="text">
      <style:text-properties fo:color="#ff0000" loext:opacity="100%" style:font-name="Liberation Serif1" fo:font-size="22pt" fo:font-style="italic" fo:font-weight="bold" style:font-name-asian="Liberation Serif1" style:font-size-asian="20pt" style:font-style-asian="italic" style:font-weight-asian="bold" style:font-name-complex="Liberation Serif1" style:font-size-complex="20pt" style:font-style-complex="italic" style:font-weight-complex="bold"/>
    </style:style>
    <style:style style:name="T106" style:family="text">
      <style:text-properties fo:font-size="24pt" style:font-size-asian="32pt" style:font-size-complex="32pt"/>
    </style:style>
    <style:style style:name="T107" style:family="text">
      <style:text-properties style:text-position="-15% 75%" fo:font-size="22pt" fo:font-style="italic" style:font-size-asian="20pt" style:font-style-asian="italic" style:font-size-complex="20pt" style:font-style-complex="italic"/>
    </style:style>
    <style:style style:name="T108" style:family="text">
      <style:text-properties fo:color="#5983b0" loext:opacity="100%" fo:font-size="22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9" style:family="text">
      <style:text-properties style:use-window-font-color="true" loext:opacity="0%" style:text-outline="false" style:text-line-through-style="none" style:text-line-through-type="none" style:font-name="Liberation Serif" fo:font-size="16pt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110" style:family="text">
      <style:text-properties style:use-window-font-color="true" loext:opacity="0%" style:text-outline="false" style:text-line-through-style="none" style:text-line-through-type="none" style:font-name="Liberation Serif" fo:font-size="16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1" style:family="text">
      <style:text-properties fo:color="#ff8000" loext:opacity="100%" style:text-outline="false" style:text-line-through-style="none" style:text-line-through-type="none" style:font-name="Liberation Serif" fo:font-size="16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2" style:family="text">
      <style:text-properties fo:color="#ff8000" loext:opacity="100%" style:text-outline="false" style:text-line-through-style="none" style:text-line-through-type="none" style:text-position="-15% 75%" style:font-name="Liberation Serif" fo:font-size="16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3" style:family="text">
      <style:text-properties fo:color="#ff8000" loext:opacity="100%" style:text-outline="false" style:text-line-through-style="none" style:text-line-through-type="none" style:font-name="Liberation Serif" fo:font-size="16pt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114" style:family="text">
      <style:text-properties style:font-name="Liberation Serif"/>
    </style:style>
    <style:style style:name="T115" style:family="text">
      <style:text-properties style:text-position="-15% 75%" fo:font-size="24pt" style:font-size-asian="22pt" style:font-size-complex="22pt"/>
    </style:style>
    <style:style style:name="T116" style:family="text">
      <style:text-properties style:text-position="-15% 75%" fo:font-size="24pt" fo:font-style="italic" style:font-size-asian="22pt" style:font-style-asian="italic" style:font-size-complex="22pt" style:font-style-complex="italic"/>
    </style:style>
    <style:style style:name="T117" style:family="text">
      <style:text-properties fo:font-size="24pt" style:font-size-asian="16pt" style:font-size-complex="16pt"/>
    </style:style>
    <style:style style:name="T118" style:family="text">
      <style:text-properties fo:font-size="24pt" fo:font-style="italic" style:font-size-asian="16pt" style:font-style-asian="italic" style:font-size-complex="16pt" style:font-style-complex="italic"/>
    </style:style>
    <style:style style:name="T119" style:family="text">
      <style:text-properties style:text-position="-15% 75%" fo:font-size="24pt" fo:font-style="italic" style:font-size-asian="16pt" style:font-style-asian="italic" style:font-size-complex="16pt" style:font-style-complex="italic"/>
    </style:style>
    <style:style style:name="T120" style:family="text">
      <style:text-properties style:text-position="-15% 75%"/>
    </style:style>
    <style:style style:name="T121" style:family="text">
      <style:text-properties fo:color="#3465a4" loext:opacity="100%" fo:font-size="22pt" style:font-size-asian="20pt" style:font-size-complex="20pt"/>
    </style:style>
    <style:style style:name="T122" style:family="text">
      <style:text-properties style:text-position="-15% 75%" fo:font-style="italic" style:font-style-asian="italic" style:font-style-complex="italic"/>
    </style:style>
    <style:style style:name="T123" style:family="text">
      <style:text-properties style:use-window-font-color="true" loext:opacity="0%" style:text-outline="false" style:text-line-through-style="none" style:text-line-through-type="none" style:font-name="Liberation Serif" fo:font-size="22pt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124" style:family="text">
      <style:text-properties style:use-window-font-color="true" loext:opacity="0%" style:text-outline="false" style:text-line-through-style="none" style:text-line-through-type="none" style:text-position="-15% 75%" style:font-name="Liberation Serif" fo:font-size="22pt" fo:font-style="normal" fo:text-shadow="none" style:text-underline-style="none" fo:font-weight="normal" style:letter-kerning="true" style:font-name-asian="Liberation Serif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25" style:family="text">
      <style:text-properties style:text-position="-15% 75%" fo:font-size="22pt" style:font-size-asian="20pt" style:font-size-complex="20pt"/>
    </style:style>
    <style:style style:name="T12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footer-decl presentation:name="ftr1">Randomized Algorithms, CSE, NTO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4" draw:layer="layout" svg:width="25.2cm" svg:height="10.463cm" svg:x="0.9cm" svg:y="4.468cm" presentation:class="subtitle" presentation:user-transformed="true">
          <draw:text-box>
            <text:p/>
            <text:p>Continuous Distributions and Poisson Processes</text:p>
            <text:p><text:line-break/></text:p>
            <text:p><text:span text:style-name="T1"/></text:p>
            <text:p text:style-name="P2"><text:span text:style-name="T1">Joseph Chuang-Chieh Lin</text:span><text:span text:style-name="T1"><text:line-break/></text:span><text:span text:style-name="T1"/></text:p>
            <text:p text:style-name="P3"><text:span text:style-name="T1">Dept. CSE, </text:span><text:span text:style-name="T1"><text:line-break/></text:span><text:span text:style-name="T1">National Taiwan Ocean University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2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Outline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Continuous Random Variables</text:p>
              </text:list-item>
              <text:list-item>
                <text:p>The Uniform Distribution</text:p>
              </text:list-item>
              <text:list-item>
                <text:p>The Exponential Distribution</text:p>
              </text:list-item>
              <text:list-item>
                <text:p>The Poisson Proc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Recall: Probability function</text:p>
          </draw:text-box>
        </draw:frame>
        <draw:frame presentation:style-name="pr5" draw:text-style-name="P1" draw:layer="layout" svg:width="25.2cm" svg:height="9.134cm" svg:x="0.579cm" svg:y="3.8cm" presentation:class="outline" presentation:user-transformed="true">
          <draw:text-box>
            <text:list text:style-name="L3">
              <text:list-item>
                <text:p>Pr(<text:span text:style-name="T3">Ω</text:span><text:span text:style-name="T4">) = 1</text:span> </text:p>
              </text:list-item>
              <text:list-item>
                <text:p>For any event <text:span text:style-name="T5">E</text:span>, 0 <text:span text:style-name="T3">≤ Pr[</text:span><text:span text:style-name="T6">E</text:span><text:span text:style-name="T7">]</text:span><text:span text:style-name="T3"> ≤</text:span> 1.</text:p>
              </text:list-item>
              <text:list-item>
                <text:p>For any finite or enumerable collection <text:span text:style-name="T8">B</text:span> of disjoint events, <text:s/></text:p>
              </text:list-item>
            </text:list>
          </draw:text-box>
        </draw:frame>
        <draw:g>
          <svg:title>TexMaths</svg:title>
          <svg:desc>24§display§\Pr\left( \bigcup_{E\in\mathbf{B}} E\right) = \sum_{E\in\mathbf{B}} \Pr[E].§svg§600§FALSE§</svg:desc>
          <draw:frame draw:style-name="gr2" draw:text-style-name="P6" draw:layer="layout" svg:width="9.706cm" svg:height="2.527cm" svg:x="8.4cm" svg:y="8.483cm">
            <draw:image xlink:href="Pictures/10004A9400000FCD0000041EC350C91E1E90EF5A.svg" xlink:type="simple" xlink:show="embed" xlink:actuate="onLoad" draw:mime-type="image/svg+xml">
              <text:p/>
            </draw:image>
            <draw:image xlink:href="Pictures/100000010000009900000028F3FF3DC009D9D20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6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001000000830000000DAA2A4CCC65926C9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  <text:p/>
                <text:p/>
              </text:list-item>
              <text:list-item>
                <text:p><text:span text:style-name="T5">k</text:span> can be any number!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6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001000000830000000DAA2A4CCC65926C9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  <text:p/>
                <text:p/>
              </text:list-item>
              <text:list-item>
                <text:p><text:span text:style-name="T5">k</text:span> can be any number!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6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001000000830000000DAA2A4CCC65926C94.png" xlink:type="simple" xlink:show="embed" xlink:actuate="onLoad" draw:mime-type="image/png"/>
          </draw:frame>
        </draw:g>
        <draw:g>
          <svg:title>TexMaths</svg:title>
          <svg:desc>28§display§\therefore p = 0§svg§600§FALSE§</svg:desc>
          <draw:frame draw:style-name="gr2" draw:text-style-name="P6" draw:layer="layout" svg:width="3.186cm" svg:height="0.843cm" svg:x="11.368cm" svg:y="11.107cm">
            <draw:image xlink:href="Pictures/100010A7000004730000012EAE2FE3CC8E090867.svg" xlink:type="simple" xlink:show="embed" xlink:actuate="onLoad" draw:mime-type="image/svg+xml">
              <text:p/>
            </draw:image>
            <draw:image xlink:href="Pictures/100000010000002B0000000BEC10EC1B7614646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Probabilities are assigned to <text:span text:style-name="T9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</text:list-item>
            </text:list>
          </draw:text-box>
        </draw:frame>
        <draw:g>
          <svg:title>TexMaths</svg:title>
          <svg:desc>24§display§\mbox{For any }x\in \mathbb{R}, §svg§600§TRUE§</svg:desc>
          <draw:g>
            <draw:path draw:style-name="gr3" draw:text-style-name="P7" draw:layer="layout" svg:width="0.486cm" svg:height="0.568cm" svg:x="1.845cm" svg:y="6.412cm" svg:viewBox="0 0 487 569" svg:d="M463 0c-154 0-309 0-463 0 0 9 0 18 0 26 6 0 13 0 19 0 65 0 67 10 67 39 0 146 0 293 0 440 0 28-2 38-67 38-6 0-13 0-19 0 0 9 0 17 0 26 29-2 96-2 127-2 36 0 113 0 142 2 0-9 0-17 0-26-9 0-18 0-27 0-81 0-81-10-81-41 0-68 0-137 0-205 25 0 49 0 74 0 79 0 89 26 89 98 7 0 14 0 21 0 0-75 0-149 0-223-7 0-14 0-21 0 0 72-10 98-89 98-25 0-49 0-74 0 0-70 0-140 0-210 0-29 2-34 41-34 34 0 68 0 103 0 124 0 146 46 160 163 8 0 15 0 22 0-8-63-16-126-24-189z">
              <text:p/>
            </draw:path>
            <draw:path draw:style-name="gr3" draw:text-style-name="P7" draw:layer="layout" svg:width="0.373cm" svg:height="0.384cm" svg:x="2.32cm" svg:y="6.605cm" svg:viewBox="0 0 374 385" svg:d="M374 196c0-108-84-196-187-196-105 0-187 91-187 196 0 108 89 189 187 189 101 0 187-81 187-189zM187 364c-36 0-72-17-96-55-21-39-21-89-21-120s0-77 21-115c22-38 63-55 96-55 36 0 73 19 96 55s22 84 22 115 0 76-20 112c-19 39-55 63-98 63z">
              <text:p/>
            </draw:path>
            <draw:path draw:style-name="gr3" draw:text-style-name="P7" draw:layer="layout" svg:width="0.282cm" svg:height="0.37cm" svg:x="2.742cm" svg:y="6.61cm" svg:viewBox="0 0 283 371" svg:d="M118 93c0-31 0-62 0-93-40 3-79 6-118 10 0 8 0 17 0 26 58 0 65 5 65 48 0 74 0 148 0 222 0 38-10 38-65 38 0 9 0 18 0 27 34 0 72-3 96-3 34 0 72 0 108 3 0-9 0-18 0-27-6 0-13 0-19 0-63 0-65-9-65-38 0-43 0-86 0-129 0-84 36-158 101-158 5 0 7 0 9 0-2 3-19 12-19 34 0 24 17 35 36 35 14 0 36-8 36-35 0-28-26-53-62-53-63 0-91 57-103 93z">
              <text:p/>
            </draw:path>
            <draw:path draw:style-name="gr3" draw:text-style-name="P7" draw:layer="layout" svg:width="0.38cm" svg:height="0.384cm" svg:x="3.364cm" svg:y="6.605cm" svg:viewBox="0 0 381 385" svg:d="M247 311c2 33 26 69 65 69 19 0 69-12 69-79 0-16 0-32 0-47-7 0-14 0-21 0 0 15 0 31 0 47 0 48-22 53-29 53-29 0-31-36-31-41 0-56 0-111 0-167 0-36 0-69-31-101-34-31-75-45-115-45-70 0-128 41-128 96 0 24 17 38 39 38 24 0 38-17 38-38 0-10-5-39-43-39 24-28 65-38 91-38 41 0 89 34 89 108 0 10 0 20 0 31-43 2-101 5-154 29-64 28-86 71-86 110 0 67 84 88 137 88 55 0 93-33 110-74zM240 175c0 27 0 55 0 83 0 79-60 108-98 108-41 0-75-29-75-72 0-45 34-115 173-119z">
              <text:p/>
            </draw:path>
            <draw:path draw:style-name="gr3" draw:text-style-name="P7" draw:layer="layout" svg:width="0.421cm" svg:height="0.37cm" svg:x="3.779cm" svg:y="6.61cm" svg:viewBox="0 0 422 371" svg:d="M65 84c0 74 0 148 0 222 0 38-10 38-65 38 0 9 0 18 0 27 29 0 72-3 94-3 24 0 67 3 96 3 0-9 0-18 0-27-58 0-68 0-68-38 0-51 0-102 0-153 0-86 60-134 116-134 52 0 62 46 62 93 0 65 0 130 0 194 0 38-10 38-67 38 0 9 0 18 0 27 31 0 74-3 96-3 21 0 64 3 93 3 0-9 0-18 0-27-43 0-65 0-65-24 0-53 0-106 0-160 0-72 0-98-26-129-12-14-38-31-89-31-60 0-100 36-124 88 0-29 0-59 0-88-40 3-79 6-118 10 0 8 0 17 0 26 58 0 65 5 65 48z">
              <text:p/>
            </draw:path>
            <draw:path draw:style-name="gr3" draw:text-style-name="P7" draw:layer="layout" svg:width="0.409cm" svg:height="0.532cm" svg:x="4.213cm" svg:y="6.62cm" svg:viewBox="0 0 410 533" svg:d="M333 79c22-53 65-53 77-53 0-8 0-17 0-26-19 2-43 2-62 2-15 0-55-2-75-2 0 9 0 18 0 26 27 0 41 15 41 36 0 10 0 10-5 19-28 70-57 139-86 208-31-75-62-151-93-227-3-7-5-12-5-14 0-22 31-22 48-22 0-8 0-17 0-26-22 0-77 2-91 2-24 0-58 0-82-2 0 9 0 18 0 26 38 0 55 0 67 29 43 102 85 204 127 306-4 12-16 38-21 50-19 46-43 103-96 103-5 0-24 0-41-14 26-5 34-22 34-36 0-22-17-36-36-36-17 0-34 12-34 36 0 38 34 69 77 69 53 0 86-47 108-95 49-120 99-239 148-359z">
              <text:p/>
            </draw:path>
            <draw:path draw:style-name="gr3" draw:text-style-name="P7" draw:layer="layout" svg:width="0.419cm" svg:height="0.379cm" svg:x="4.947cm" svg:y="6.61cm" svg:viewBox="0 0 420 380" svg:d="M257 117c4-21 24-98 84-98 2 0 24 0 40 12-24 2-40 24-40 43 0 14 9 31 33 31 17 0 46-17 46-50 0-43-51-55-79-55-48 0-80 45-89 65-22-55-67-65-91-65-87 0-135 108-135 129 0 10 8 10 10 10 7 0 10-3 10-10 28-88 84-110 112-110 17 0 46 7 46 55 0 26-14 84-46 201-12 50-43 86-79 86-5 0-24 0-43-9 22-5 41-22 41-46s-19-31-31-31c-27 0-46 24-46 50 0 39 41 55 79 55 55 0 84-60 89-64 10 31 38 64 89 64 88 0 136-107 136-129 0-9-7-9-12-9-7 0-7 4-9 9-29 91-87 110-113 110-33 0-45-26-45-55 0-19 4-36 14-74s19-77 29-115z">
              <text:p/>
            </draw:path>
            <draw:path draw:style-name="gr3" draw:text-style-name="P7" draw:layer="layout" svg:width="0.421cm" svg:height="0.485cm" svg:x="5.707cm" svg:y="6.529cm" svg:viewBox="0 0 422 486" svg:d="M391 261c14 0 31-2 31-19 0-18-17-17-31-17-119 0-238 0-357 0 12-110 108-192 227-192 44 0 87 0 130 0 14 0 31 0 31-16 0-17-17-17-31-17-44 0-88 0-132 0-144 0-259 106-259 242 0 135 115 244 259 244 44 0 88 0 132 0 14 0 31 0 31-17s-17-17-31-17c-43 0-86 0-130 0-119 0-215-81-227-191 119 0 238 0 357 0z">
              <text:p/>
            </draw:path>
            <draw:path draw:style-name="gr3" draw:text-style-name="P7" draw:layer="layout" svg:width="0.58cm" svg:height="0.573cm" svg:x="6.446cm" svg:y="6.407cm" svg:viewBox="0 0 581 574" svg:d="M214 311c9 0 19 0 28 0 43 64 85 129 127 194 10 14 29 47 39 59 5 10 9 10 29 10 38 0 76 0 115 0 14 0 29 0 29-14 0-8-5-15-15-15-31-7-72-62-91-88-7-10-48-65-106-156 75-12 149-45 149-143 0-117-125-158-223-158-89 0-177 0-266 0-15 0-29 0-29 14 0 15 17 15 24 15 48 0 53 7 53 48 0 140 0 280 0 420 0 41-5 48-53 48-7 0-24 0-24 15 0 14 14 14 29 14 77 0 155 0 232 0 15 0 27 0 27-14 0-15-15-15-24-15-48 0-50-7-50-48 0-62 0-124 0-186zM377 270c24-31 26-76 26-112 0-41-7-84-34-120 36 7 118 34 118 120 0 52-24 96-110 112zM214 74c0-17 0-45 52-45 70 0 106 31 106 129 0 107-27 124-158 124 0-69 0-139 0-208zM98 545c8-16 8-38 8-45 0-141 0-282 0-423 0-10 0-32-8-48 32 0 64 0 96 0-9 14-9 31-9 43 0 142 0 285 0 428 0 7 0 29 5 45-31 0-61 0-92 0zM278 311c5 0 10-2 17-2 12 0 31 0 43-3 12 19 103 170 173 239-27 0-54 0-82 0-50-78-100-156-151-234z">
              <text:p/>
            </draw:path>
            <draw:path draw:style-name="gr3" draw:text-style-name="P7" draw:layer="layout" svg:width="0.097cm" svg:height="0.25cm" svg:x="7.116cm" svg:y="6.892cm" svg:viewBox="0 0 98 251" svg:d="M98 88c0-55-21-88-55-88-26 0-43 22-43 43 0 24 17 45 43 45 12 0 22-2 31-11 3 0 2-2 3-3 2 0 2 3 2 14 0 63-29 113-57 139-10 9-10 12-10 15 0 4 5 9 10 9 9 0 76-64 76-163z">
              <text:p/>
            </draw:path>
          </draw:g>
        </draw:g>
        <draw:g>
          <svg:title>TexMaths</svg:title>
          <svg:desc>24§inline§\textcolor{red}{F(x)} = \Pr[X\leq x] = \Pr[X \textcolor{OliveGreen}{&lt;}\, x]. §svg§600§FALSE§</svg:desc>
          <draw:frame draw:style-name="gr2" draw:text-style-name="P6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001000000B40000000E05FD56CF839C8AA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Probabilities are assigned to <text:span text:style-name="T9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  <text:p><text:span text:style-name="T10"/></text:p>
              </text:list-item>
              <text:list-item>
                <text:p>For all <text:span text:style-name="T3">−∞ &lt; </text:span><text:span text:style-name="T6">a</text:span><text:span text:style-name="T3"> &lt; ∞, </text:span></text:p>
              </text:list-item>
            </text:list>
          </draw:text-box>
        </draw:frame>
        <draw:g>
          <svg:title>TexMaths</svg:title>
          <svg:desc>24§inline§\textcolor{red}{F(x)} = \Pr[X\leq x] = \Pr[X \textcolor{OliveGreen}{&lt;}\, x]. §svg§600§FALSE§</svg:desc>
          <draw:frame draw:style-name="gr2" draw:text-style-name="P6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001000000B40000000E05FD56CF839C8AA3.png" xlink:type="simple" xlink:show="embed" xlink:actuate="onLoad" draw:mime-type="image/png"/>
          </draw:frame>
        </draw:g>
        <draw:g>
          <svg:title>TexMaths</svg:title>
          <svg:desc>24§latex§\begin{eqnarray*}
&amp;&amp; F(a) = \int_{-\infty}^{a} f(t) dt.\\
&amp;&amp; f(x) = F'(x)
\end{eqnarray*}§svg§600§FALSE§</svg:desc>
          <draw:frame draw:style-name="gr2" draw:text-style-name="P6" draw:layer="layout" svg:width="7.104cm" svg:height="3.262cm" svg:x="9.06cm" svg:y="10.842cm">
            <draw:image xlink:href="Pictures/10006CD600000B91000005506E0AA3EFECB30526.svg" xlink:type="simple" xlink:show="embed" xlink:actuate="onLoad" draw:mime-type="image/svg+xml">
              <text:p/>
            </draw:image>
            <draw:image xlink:href="Pictures/100000010000007000000033E7C3ABD7885F4CEE.png" xlink:type="simple" xlink:show="embed" xlink:actuate="onLoad" draw:mime-type="image/png"/>
          </draw:frame>
        </draw:g>
        <draw:g>
          <svg:title>TexMaths</svg:title>
          <svg:desc>24§display§\mbox{For any }x\in \mathbb{R}, §svg§600§TRUE§</svg:desc>
          <draw:g>
            <draw:path draw:style-name="gr3" draw:text-style-name="P7" draw:layer="layout" svg:width="0.486cm" svg:height="0.568cm" svg:x="1.846cm" svg:y="6.412cm" svg:viewBox="0 0 487 569" svg:d="M463 0c-154 0-309 0-463 0 0 9 0 18 0 26 6 0 13 0 19 0 65 0 67 10 67 39 0 146 0 293 0 440 0 28-2 38-67 38-6 0-13 0-19 0 0 9 0 17 0 26 29-2 96-2 127-2 36 0 113 0 142 2 0-9 0-17 0-26-9 0-18 0-27 0-81 0-81-10-81-41 0-68 0-137 0-205 25 0 49 0 74 0 79 0 89 26 89 98 7 0 14 0 21 0 0-75 0-149 0-223-7 0-14 0-21 0 0 72-10 98-89 98-25 0-49 0-74 0 0-70 0-140 0-210 0-29 2-34 41-34 34 0 68 0 103 0 124 0 146 46 160 163 8 0 15 0 22 0-8-63-16-126-24-189z">
              <text:p/>
            </draw:path>
            <draw:path draw:style-name="gr3" draw:text-style-name="P7" draw:layer="layout" svg:width="0.373cm" svg:height="0.384cm" svg:x="2.321cm" svg:y="6.605cm" svg:viewBox="0 0 374 385" svg:d="M374 196c0-108-84-196-187-196-105 0-187 91-187 196 0 108 89 189 187 189 101 0 187-81 187-189zM187 364c-36 0-72-17-96-55-21-39-21-89-21-120s0-77 21-115c22-38 63-55 96-55 36 0 73 19 96 55s22 84 22 115 0 76-20 112c-19 39-55 63-98 63z">
              <text:p/>
            </draw:path>
            <draw:path draw:style-name="gr3" draw:text-style-name="P7" draw:layer="layout" svg:width="0.282cm" svg:height="0.37cm" svg:x="2.743cm" svg:y="6.61cm" svg:viewBox="0 0 283 371" svg:d="M118 93c0-31 0-62 0-93-40 3-79 6-118 10 0 8 0 17 0 26 58 0 65 5 65 48 0 74 0 148 0 222 0 38-10 38-65 38 0 9 0 18 0 27 34 0 72-3 96-3 34 0 72 0 108 3 0-9 0-18 0-27-6 0-13 0-19 0-63 0-65-9-65-38 0-43 0-86 0-129 0-84 36-158 101-158 5 0 7 0 9 0-2 3-19 12-19 34 0 24 17 35 36 35 14 0 36-8 36-35 0-28-26-53-62-53-63 0-91 57-103 93z">
              <text:p/>
            </draw:path>
            <draw:path draw:style-name="gr3" draw:text-style-name="P7" draw:layer="layout" svg:width="0.38cm" svg:height="0.384cm" svg:x="3.365cm" svg:y="6.605cm" svg:viewBox="0 0 381 385" svg:d="M247 311c2 33 26 69 65 69 19 0 69-12 69-79 0-16 0-32 0-47-7 0-14 0-21 0 0 15 0 31 0 47 0 48-22 53-29 53-29 0-31-36-31-41 0-56 0-111 0-167 0-36 0-69-31-101-34-31-75-45-115-45-70 0-128 41-128 96 0 24 17 38 39 38 24 0 38-17 38-38 0-10-5-39-43-39 24-28 65-38 91-38 41 0 89 34 89 108 0 10 0 20 0 31-43 2-101 5-154 29-64 28-86 71-86 110 0 67 84 88 137 88 55 0 93-33 110-74zM240 175c0 27 0 55 0 83 0 79-60 108-98 108-41 0-75-29-75-72 0-45 34-115 173-119z">
              <text:p/>
            </draw:path>
            <draw:path draw:style-name="gr3" draw:text-style-name="P7" draw:layer="layout" svg:width="0.421cm" svg:height="0.37cm" svg:x="3.78cm" svg:y="6.61cm" svg:viewBox="0 0 422 371" svg:d="M65 84c0 74 0 148 0 222 0 38-10 38-65 38 0 9 0 18 0 27 29 0 72-3 94-3 24 0 67 3 96 3 0-9 0-18 0-27-58 0-68 0-68-38 0-51 0-102 0-153 0-86 60-134 116-134 52 0 62 46 62 93 0 65 0 130 0 194 0 38-10 38-67 38 0 9 0 18 0 27 31 0 74-3 96-3 21 0 64 3 93 3 0-9 0-18 0-27-43 0-65 0-65-24 0-53 0-106 0-160 0-72 0-98-26-129-12-14-38-31-89-31-60 0-100 36-124 88 0-29 0-59 0-88-40 3-79 6-118 10 0 8 0 17 0 26 58 0 65 5 65 48z">
              <text:p/>
            </draw:path>
            <draw:path draw:style-name="gr3" draw:text-style-name="P7" draw:layer="layout" svg:width="0.409cm" svg:height="0.532cm" svg:x="4.214cm" svg:y="6.62cm" svg:viewBox="0 0 410 533" svg:d="M333 79c22-53 65-53 77-53 0-8 0-17 0-26-19 2-43 2-62 2-15 0-55-2-75-2 0 9 0 18 0 26 27 0 41 15 41 36 0 10 0 10-5 19-28 70-57 139-86 208-31-75-62-151-93-227-3-7-5-12-5-14 0-22 31-22 48-22 0-8 0-17 0-26-22 0-77 2-91 2-24 0-58 0-82-2 0 9 0 18 0 26 38 0 55 0 67 29 43 102 85 204 127 306-4 12-16 38-21 50-19 46-43 103-96 103-5 0-24 0-41-14 26-5 34-22 34-36 0-22-17-36-36-36-17 0-34 12-34 36 0 38 34 69 77 69 53 0 86-47 108-95 49-120 99-239 148-359z">
              <text:p/>
            </draw:path>
            <draw:path draw:style-name="gr3" draw:text-style-name="P7" draw:layer="layout" svg:width="0.419cm" svg:height="0.379cm" svg:x="4.948cm" svg:y="6.61cm" svg:viewBox="0 0 420 380" svg:d="M257 117c4-21 24-98 84-98 2 0 24 0 40 12-24 2-40 24-40 43 0 14 9 31 33 31 17 0 46-17 46-50 0-43-51-55-79-55-48 0-80 45-89 65-22-55-67-65-91-65-87 0-135 108-135 129 0 10 8 10 10 10 7 0 10-3 10-10 28-88 84-110 112-110 17 0 46 7 46 55 0 26-14 84-46 201-12 50-43 86-79 86-5 0-24 0-43-9 22-5 41-22 41-46s-19-31-31-31c-27 0-46 24-46 50 0 39 41 55 79 55 55 0 84-60 89-64 10 31 38 64 89 64 88 0 136-107 136-129 0-9-7-9-12-9-7 0-7 4-9 9-29 91-87 110-113 110-33 0-45-26-45-55 0-19 4-36 14-74s19-77 29-115z">
              <text:p/>
            </draw:path>
            <draw:path draw:style-name="gr3" draw:text-style-name="P7" draw:layer="layout" svg:width="0.421cm" svg:height="0.485cm" svg:x="5.708cm" svg:y="6.529cm" svg:viewBox="0 0 422 486" svg:d="M391 261c14 0 31-2 31-19 0-18-17-17-31-17-119 0-238 0-357 0 12-110 108-192 227-192 44 0 87 0 130 0 14 0 31 0 31-16 0-17-17-17-31-17-44 0-88 0-132 0-144 0-259 106-259 242 0 135 115 244 259 244 44 0 88 0 132 0 14 0 31 0 31-17s-17-17-31-17c-43 0-86 0-130 0-119 0-215-81-227-191 119 0 238 0 357 0z">
              <text:p/>
            </draw:path>
            <draw:path draw:style-name="gr3" draw:text-style-name="P7" draw:layer="layout" svg:width="0.58cm" svg:height="0.573cm" svg:x="6.447cm" svg:y="6.407cm" svg:viewBox="0 0 581 574" svg:d="M214 311c9 0 19 0 28 0 43 64 85 129 127 194 10 14 29 47 39 59 5 10 9 10 29 10 38 0 76 0 115 0 14 0 29 0 29-14 0-8-5-15-15-15-31-7-72-62-91-88-7-10-48-65-106-156 75-12 149-45 149-143 0-117-125-158-223-158-89 0-177 0-266 0-15 0-29 0-29 14 0 15 17 15 24 15 48 0 53 7 53 48 0 140 0 280 0 420 0 41-5 48-53 48-7 0-24 0-24 15 0 14 14 14 29 14 77 0 155 0 232 0 15 0 27 0 27-14 0-15-15-15-24-15-48 0-50-7-50-48 0-62 0-124 0-186zM377 270c24-31 26-76 26-112 0-41-7-84-34-120 36 7 118 34 118 120 0 52-24 96-110 112zM214 74c0-17 0-45 52-45 70 0 106 31 106 129 0 107-27 124-158 124 0-69 0-139 0-208zM98 545c8-16 8-38 8-45 0-141 0-282 0-423 0-10 0-32-8-48 32 0 64 0 96 0-9 14-9 31-9 43 0 142 0 285 0 428 0 7 0 29 5 45-31 0-61 0-92 0zM278 311c5 0 10-2 17-2 12 0 31 0 43-3 12 19 103 170 173 239-27 0-54 0-82 0-50-78-100-156-151-234z">
              <text:p/>
            </draw:path>
            <draw:path draw:style-name="gr3" draw:text-style-name="P7" draw:layer="layout" svg:width="0.097cm" svg:height="0.25cm" svg:x="7.117cm" svg:y="6.892cm" svg:viewBox="0 0 98 251" svg:d="M98 88c0-55-21-88-55-88-26 0-43 22-43 43 0 24 17 45 43 45 12 0 22-2 31-11 3 0 2-2 3-3 2 0 2 3 2 14 0 63-29 113-57 139-10 9-10 12-10 15 0 4 5 9 10 9 9 0 76-64 76-163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Probabilities are assigned to <text:span text:style-name="T9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  <text:p><text:span text:style-name="T10"/></text:p>
              </text:list-item>
              <text:list-item>
                <text:p>For all <text:span text:style-name="T3">−∞ &lt; </text:span><text:span text:style-name="T6">a</text:span><text:span text:style-name="T3"> &lt; ∞, </text:span></text:p>
              </text:list-item>
            </text:list>
          </draw:text-box>
        </draw:frame>
        <draw:g>
          <svg:title>TexMaths</svg:title>
          <svg:desc>24§inline§\textcolor{red}{F(x)} = \Pr[X\leq x] = \Pr[X \textcolor{OliveGreen}{&lt;}\, x]. §svg§600§FALSE§</svg:desc>
          <draw:frame draw:style-name="gr2" draw:text-style-name="P6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001000000B40000000E05FD56CF839C8AA3.png" xlink:type="simple" xlink:show="embed" xlink:actuate="onLoad" draw:mime-type="image/png"/>
          </draw:frame>
        </draw:g>
        <draw:g>
          <svg:title>TexMaths</svg:title>
          <svg:desc>16§latex§\textcolor{orange}{
\begin{eqnarray*}
\Pr[x&lt;X\leq x+dx] &amp;=&amp; F(x+dx) - F(x) \\
&amp;\approx&amp; \textcolor{blue}{f(x)dx}.
\end{eqnarray*}}§svg§600§FALSE§</svg:desc>
          <draw:frame draw:style-name="gr4" draw:text-style-name="P8" draw:layer="layout" svg:width="10.758cm" svg:height="1.405cm" svg:x="16.602cm" svg:y="12.349cm">
            <draw:image xlink:href="Pictures/1000973600001A450000036FD7D683B84977DC9C.svg" xlink:type="simple" xlink:show="embed" xlink:actuate="onLoad" draw:mime-type="image/svg+xml">
              <text:p/>
            </draw:image>
            <draw:image xlink:href="Pictures/10000001000000FE0000002198E3719C9E3485C8.png" xlink:type="simple" xlink:show="embed" xlink:actuate="onLoad" draw:mime-type="image/png"/>
          </draw:frame>
        </draw:g>
        <draw:g>
          <svg:title>TexMaths</svg:title>
          <svg:desc>24§latex§\begin{eqnarray*}
&amp;&amp; F(a) = \int_{-\infty}^{a} f(t) dt.\\
&amp;&amp; f(x) = F'(x)
\end{eqnarray*}§svg§600§FALSE§</svg:desc>
          <draw:frame draw:style-name="gr2" draw:text-style-name="P6" draw:layer="layout" svg:width="7.104cm" svg:height="3.262cm" svg:x="9.06cm" svg:y="10.842cm">
            <draw:image xlink:href="Pictures/10006CD600000B91000005506E0AA3EFECB30526.svg" xlink:type="simple" xlink:show="embed" xlink:actuate="onLoad" draw:mime-type="image/svg+xml">
              <text:p/>
            </draw:image>
            <draw:image xlink:href="Pictures/100000010000007000000033E7C3ABD7885F4CEE.png" xlink:type="simple" xlink:show="embed" xlink:actuate="onLoad" draw:mime-type="image/png"/>
          </draw:frame>
        </draw:g>
        <draw:g>
          <svg:title>TexMaths</svg:title>
          <svg:desc>24§display§\mbox{For any }x\in \mathbb{R}, §svg§600§TRUE§</svg:desc>
          <draw:g>
            <draw:path draw:style-name="gr3" draw:text-style-name="P7" draw:layer="layout" svg:width="0.486cm" svg:height="0.568cm" svg:x="1.846cm" svg:y="6.412cm" svg:viewBox="0 0 487 569" svg:d="M463 0c-154 0-309 0-463 0 0 9 0 18 0 26 6 0 13 0 19 0 65 0 67 10 67 39 0 146 0 293 0 440 0 28-2 38-67 38-6 0-13 0-19 0 0 9 0 17 0 26 29-2 96-2 127-2 36 0 113 0 142 2 0-9 0-17 0-26-9 0-18 0-27 0-81 0-81-10-81-41 0-68 0-137 0-205 25 0 49 0 74 0 79 0 89 26 89 98 7 0 14 0 21 0 0-75 0-149 0-223-7 0-14 0-21 0 0 72-10 98-89 98-25 0-49 0-74 0 0-70 0-140 0-210 0-29 2-34 41-34 34 0 68 0 103 0 124 0 146 46 160 163 8 0 15 0 22 0-8-63-16-126-24-189z">
              <text:p/>
            </draw:path>
            <draw:path draw:style-name="gr3" draw:text-style-name="P7" draw:layer="layout" svg:width="0.373cm" svg:height="0.384cm" svg:x="2.321cm" svg:y="6.605cm" svg:viewBox="0 0 374 385" svg:d="M374 196c0-108-84-196-187-196-105 0-187 91-187 196 0 108 89 189 187 189 101 0 187-81 187-189zM187 364c-36 0-72-17-96-55-21-39-21-89-21-120s0-77 21-115c22-38 63-55 96-55 36 0 73 19 96 55s22 84 22 115 0 76-20 112c-19 39-55 63-98 63z">
              <text:p/>
            </draw:path>
            <draw:path draw:style-name="gr3" draw:text-style-name="P7" draw:layer="layout" svg:width="0.282cm" svg:height="0.37cm" svg:x="2.743cm" svg:y="6.61cm" svg:viewBox="0 0 283 371" svg:d="M118 93c0-31 0-62 0-93-40 3-79 6-118 10 0 8 0 17 0 26 58 0 65 5 65 48 0 74 0 148 0 222 0 38-10 38-65 38 0 9 0 18 0 27 34 0 72-3 96-3 34 0 72 0 108 3 0-9 0-18 0-27-6 0-13 0-19 0-63 0-65-9-65-38 0-43 0-86 0-129 0-84 36-158 101-158 5 0 7 0 9 0-2 3-19 12-19 34 0 24 17 35 36 35 14 0 36-8 36-35 0-28-26-53-62-53-63 0-91 57-103 93z">
              <text:p/>
            </draw:path>
            <draw:path draw:style-name="gr3" draw:text-style-name="P7" draw:layer="layout" svg:width="0.38cm" svg:height="0.384cm" svg:x="3.365cm" svg:y="6.605cm" svg:viewBox="0 0 381 385" svg:d="M247 311c2 33 26 69 65 69 19 0 69-12 69-79 0-16 0-32 0-47-7 0-14 0-21 0 0 15 0 31 0 47 0 48-22 53-29 53-29 0-31-36-31-41 0-56 0-111 0-167 0-36 0-69-31-101-34-31-75-45-115-45-70 0-128 41-128 96 0 24 17 38 39 38 24 0 38-17 38-38 0-10-5-39-43-39 24-28 65-38 91-38 41 0 89 34 89 108 0 10 0 20 0 31-43 2-101 5-154 29-64 28-86 71-86 110 0 67 84 88 137 88 55 0 93-33 110-74zM240 175c0 27 0 55 0 83 0 79-60 108-98 108-41 0-75-29-75-72 0-45 34-115 173-119z">
              <text:p/>
            </draw:path>
            <draw:path draw:style-name="gr3" draw:text-style-name="P7" draw:layer="layout" svg:width="0.421cm" svg:height="0.37cm" svg:x="3.78cm" svg:y="6.61cm" svg:viewBox="0 0 422 371" svg:d="M65 84c0 74 0 148 0 222 0 38-10 38-65 38 0 9 0 18 0 27 29 0 72-3 94-3 24 0 67 3 96 3 0-9 0-18 0-27-58 0-68 0-68-38 0-51 0-102 0-153 0-86 60-134 116-134 52 0 62 46 62 93 0 65 0 130 0 194 0 38-10 38-67 38 0 9 0 18 0 27 31 0 74-3 96-3 21 0 64 3 93 3 0-9 0-18 0-27-43 0-65 0-65-24 0-53 0-106 0-160 0-72 0-98-26-129-12-14-38-31-89-31-60 0-100 36-124 88 0-29 0-59 0-88-40 3-79 6-118 10 0 8 0 17 0 26 58 0 65 5 65 48z">
              <text:p/>
            </draw:path>
            <draw:path draw:style-name="gr3" draw:text-style-name="P7" draw:layer="layout" svg:width="0.409cm" svg:height="0.532cm" svg:x="4.214cm" svg:y="6.62cm" svg:viewBox="0 0 410 533" svg:d="M333 79c22-53 65-53 77-53 0-8 0-17 0-26-19 2-43 2-62 2-15 0-55-2-75-2 0 9 0 18 0 26 27 0 41 15 41 36 0 10 0 10-5 19-28 70-57 139-86 208-31-75-62-151-93-227-3-7-5-12-5-14 0-22 31-22 48-22 0-8 0-17 0-26-22 0-77 2-91 2-24 0-58 0-82-2 0 9 0 18 0 26 38 0 55 0 67 29 43 102 85 204 127 306-4 12-16 38-21 50-19 46-43 103-96 103-5 0-24 0-41-14 26-5 34-22 34-36 0-22-17-36-36-36-17 0-34 12-34 36 0 38 34 69 77 69 53 0 86-47 108-95 49-120 99-239 148-359z">
              <text:p/>
            </draw:path>
            <draw:path draw:style-name="gr3" draw:text-style-name="P7" draw:layer="layout" svg:width="0.419cm" svg:height="0.379cm" svg:x="4.948cm" svg:y="6.61cm" svg:viewBox="0 0 420 380" svg:d="M257 117c4-21 24-98 84-98 2 0 24 0 40 12-24 2-40 24-40 43 0 14 9 31 33 31 17 0 46-17 46-50 0-43-51-55-79-55-48 0-80 45-89 65-22-55-67-65-91-65-87 0-135 108-135 129 0 10 8 10 10 10 7 0 10-3 10-10 28-88 84-110 112-110 17 0 46 7 46 55 0 26-14 84-46 201-12 50-43 86-79 86-5 0-24 0-43-9 22-5 41-22 41-46s-19-31-31-31c-27 0-46 24-46 50 0 39 41 55 79 55 55 0 84-60 89-64 10 31 38 64 89 64 88 0 136-107 136-129 0-9-7-9-12-9-7 0-7 4-9 9-29 91-87 110-113 110-33 0-45-26-45-55 0-19 4-36 14-74s19-77 29-115z">
              <text:p/>
            </draw:path>
            <draw:path draw:style-name="gr3" draw:text-style-name="P7" draw:layer="layout" svg:width="0.421cm" svg:height="0.485cm" svg:x="5.708cm" svg:y="6.529cm" svg:viewBox="0 0 422 486" svg:d="M391 261c14 0 31-2 31-19 0-18-17-17-31-17-119 0-238 0-357 0 12-110 108-192 227-192 44 0 87 0 130 0 14 0 31 0 31-16 0-17-17-17-31-17-44 0-88 0-132 0-144 0-259 106-259 242 0 135 115 244 259 244 44 0 88 0 132 0 14 0 31 0 31-17s-17-17-31-17c-43 0-86 0-130 0-119 0-215-81-227-191 119 0 238 0 357 0z">
              <text:p/>
            </draw:path>
            <draw:path draw:style-name="gr3" draw:text-style-name="P7" draw:layer="layout" svg:width="0.58cm" svg:height="0.573cm" svg:x="6.447cm" svg:y="6.407cm" svg:viewBox="0 0 581 574" svg:d="M214 311c9 0 19 0 28 0 43 64 85 129 127 194 10 14 29 47 39 59 5 10 9 10 29 10 38 0 76 0 115 0 14 0 29 0 29-14 0-8-5-15-15-15-31-7-72-62-91-88-7-10-48-65-106-156 75-12 149-45 149-143 0-117-125-158-223-158-89 0-177 0-266 0-15 0-29 0-29 14 0 15 17 15 24 15 48 0 53 7 53 48 0 140 0 280 0 420 0 41-5 48-53 48-7 0-24 0-24 15 0 14 14 14 29 14 77 0 155 0 232 0 15 0 27 0 27-14 0-15-15-15-24-15-48 0-50-7-50-48 0-62 0-124 0-186zM377 270c24-31 26-76 26-112 0-41-7-84-34-120 36 7 118 34 118 120 0 52-24 96-110 112zM214 74c0-17 0-45 52-45 70 0 106 31 106 129 0 107-27 124-158 124 0-69 0-139 0-208zM98 545c8-16 8-38 8-45 0-141 0-282 0-423 0-10 0-32-8-48 32 0 64 0 96 0-9 14-9 31-9 43 0 142 0 285 0 428 0 7 0 29 5 45-31 0-61 0-92 0zM278 311c5 0 10-2 17-2 12 0 31 0 43-3 12 19 103 170 173 239-27 0-54 0-82 0-50-78-100-156-151-234z">
              <text:p/>
            </draw:path>
            <draw:path draw:style-name="gr3" draw:text-style-name="P7" draw:layer="layout" svg:width="0.097cm" svg:height="0.25cm" svg:x="7.117cm" svg:y="6.892cm" svg:viewBox="0 0 98 251" svg:d="M98 88c0-55-21-88-55-88-26 0-43 22-43 43 0 24 17 45 43 45 12 0 22-2 31-11 3 0 2-2 3-3 2 0 2 3 2 14 0 63-29 113-57 139-10 9-10 12-10 15 0 4 5 9 10 9 9 0 76-64 76-163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0" draw:layer="layout" svg:width="19.5cm" svg:height="2.6cm" svg:x="0.8cm" svg:y="0.6cm" presentation:class="title">
          <draw:text-box>
            <text:p text:style-name="P9">Continuous distribution</text:p>
          </draw:text-box>
        </draw:frame>
        <draw:g>
          <svg:title>TexMaths</svg:title>
          <svg:desc>20§display§\Pr[a\leq X\leq b] = \int_a^b f(x)dx.§svg§600§FALSE§</svg:desc>
          <draw:frame draw:style-name="gr2" draw:text-style-name="P6" draw:layer="layout" svg:width="8.638cm" svg:height="1.768cm" svg:x="2.5cm" svg:y="4.7cm">
            <draw:image xlink:href="Pictures/10005577000010E000000375B43B17937FDD1AC1.svg" xlink:type="simple" xlink:show="embed" xlink:actuate="onLoad" draw:mime-type="image/svg+xml">
              <text:p/>
            </draw:image>
            <draw:image xlink:href="Pictures/10000001000000A300000021422A488FB88A713D.png" xlink:type="simple" xlink:show="embed" xlink:actuate="onLoad" draw:mime-type="image/png"/>
          </draw:frame>
        </draw:g>
        <draw:g>
          <svg:title>TexMaths</svg:title>
          <svg:desc>20§display§\mathbb{E}[X^i] = \int_{-\infty}^{\infty} x^i \textcolor{blue}{f(x)dx}.§svg§600§TRUE§</svg:desc>
          <draw:g>
            <draw:path draw:style-name="gr3" draw:text-style-name="P7" draw:layer="layout" svg:width="0.437cm" svg:height="0.48cm" svg:x="2.56cm" svg:y="7.747cm" svg:viewBox="0 0 438 481" svg:d="M172 246c18 0 52 0 76 14 34 22 36 60 36 64 2 10 3 18 14 18s10-10 10-22c0-64 0-127 0-190 0-12 1-22-10-22s-14 10-14 16c-4 90-76 96-112 96 0-50 0-99 0-148 0-48 14-48 30-48 11 0 23 0 34 0 94 0 142 50 146 98 0 6 2 16 12 16 12 0 12-12 12-24 0-30 0-60 0-90 0-22 0-24-22-24-120 0-240 0-360 0-12 0-24 0-24 12s14 12 18 12c40 0 44 6 44 40 0 117 0 234 0 351 0 34-2 40-40 40-10 0-22 0-22 12 0 14 12 14 24 14 124 0 248 0 372 0 14 0 20 0 22-10 2-2 20-117 20-121 0-8-6-12-10-12-10 0-14 8-14 10-4 18-10 46-62 75-36 22-72 32-112 32-13 0-25 0-38 0-16 0-30 0-30-45 0-55 0-110 0-164zM382 24c0 11 0 23 0 34-12-12-26-24-40-34 13 0 27 0 40 0zM246 230c10-4 26-16 38-30 0 20 0 40 0 60-16-20-25-19-38-28 0-1 0-2 0-2zM86 64c0-10 0-26-6-40 25 0 51 0 76 0-8 16-8 40-8 46 0 113 0 226 0 340 0 25 4 39 8 45-25 0-51 0-76 0 6-12 6-30 6-38 0-117 0-235 0-353zM348 455c22-12 42-26 56-38-2 2-6 32-8 38-16 0-32 0-48 0z">
              <text:p/>
            </draw:path>
            <draw:path draw:style-name="gr3" draw:text-style-name="P7" draw:layer="layout" svg:width="0.095cm" svg:height="0.7cm" svg:x="3.102cm" svg:y="7.701cm" svg:viewBox="0 0 96 701" svg:d="M96 701c0-9 0-18 0-28-23 0-45 0-68 0 0-215 0-430 0-645 23 0 45 0 68 0 0-9 0-19 0-28-32 0-64 0-96 0 0 234 0 467 0 701 32 0 64 0 96 0z">
              <text:p/>
            </draw:path>
            <draw:path draw:style-name="gr3" draw:text-style-name="P7" draw:layer="layout" svg:width="0.579cm" svg:height="0.478cm" svg:x="3.232cm" svg:y="7.749cm" svg:viewBox="0 0 580 479" svg:d="M322 190c-19-47-39-93-58-140-2-4-3-5-4-8 0-4 12-18 42-20 6-2 14-2 14-14 0-8-10-8-12-8-28 0-58 2-88 2-18 0-60-2-78-2-4 0-14 0-14 14 0 8 8 8 18 8 42 0 46 6 52 22 27 65 55 130 82 196-49 53-99 106-148 160-3 2-5 4-8 6-36 37-68 49-104 51-10 0-16 0-16 14 3 3 0 8 10 8 20 0 44-2 66-2 26 0 54 2 78 2 4 0 14 0 14-14 0-8-8-8-10-8-6-2-28-2-28-22 0-12 12-22 20-31 24-26 48-51 72-76 21-23 41-46 62-68 24 56 48 112 72 167 2 6 2 8 2 10 0 4-12 16-40 20-8 0-14 0-14 12 0 10 8 10 10 10 20 0 70-2 90-2 16 0 60 2 78 2 4 0 12 0 12-14 0-8-6-8-12-8-48-2-48-4-60-32-28-63-76-173-92-215 48-50 122-134 144-152s48-34 90-36c10-2 16-2 16-14 0-2 0-8-10-8-20 0-44 2-66 2-26 0-52-2-78-2-4 0-12 0-12 14 0 4 2 6 8 8 6 0 28 2 28 22 0 8-8 18-14 24-38 41-76 81-114 122z">
              <text:p/>
            </draw:path>
            <draw:path draw:style-name="gr3" draw:text-style-name="P7" draw:layer="layout" svg:width="0.147cm" svg:height="0.329cm" svg:x="3.874cm" svg:y="7.614cm" svg:viewBox="0 0 148 330" svg:d="M136 18c0-8-6-18-20-18-12 0-28 12-28 26 0 8 8 18 20 18 14 0 28-12 28-26zM36 268c-2 6-4 12-4 20 0 24 20 42 46 42 50 0 70-68 70-76 0-6-4-4-6-6-8 0-8 4-10 8-12 40-34 60-52 60-10 0-12-6-12-16 0-12 2-22 8-32 4-14 10-26 14-40 6-12 24-56 26-62 0-6 2-10 2-16 0-22-20-42-46-42-50 0-72 68-72 76 0 6 6 6 8 6 8 0 8-2 10-8 12-42 34-60 52-60 8 0 12 4 12 18 0 10-2 18-16 48-10 26-20 53-30 80z">
              <text:p/>
            </draw:path>
            <draw:path draw:style-name="gr3" draw:text-style-name="P7" draw:layer="layout" svg:width="0.095cm" svg:height="0.7cm" svg:x="4.1cm" svg:y="7.701cm" svg:viewBox="0 0 96 701" svg:d="M96 0c-32 0-64 0-96 0 0 9 0 19 0 28 23 0 45 0 68 0 0 215 0 430 0 645-23 0-45 0-68 0 0 10 0 19 0 28 32 0 64 0 96 0 0-234 0-467 0-701z">
              <text:p/>
            </draw:path>
            <draw:path draw:style-name="gr3" draw:text-style-name="P7" draw:layer="layout" svg:width="0.467cm" svg:height="0.163cm" svg:x="4.513cm" svg:y="7.971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623cm" svg:height="1.557cm" svg:x="5.255cm" svg:y="7.274cm" svg:viewBox="0 0 624 1558" svg:d="M34 1526c22-2 34-16 34-34 0-24-18-34-34-34s-34 10-34 34c0 36 36 66 78 66 106 0 146-164 196-367 54-222 100-446 138-672 26-149 52-289 76-379 8-34 32-126 60-126 22 0 40 14 42 16-22 2-34 18-34 36 0 22 16 34 32 34 18 0 36-10 36-36 0-38-38-64-78-64-52 0-92 76-130 220-2 6-98 359-176 817-18 108-38 225-62 323-12 50-44 182-102 182-24 0-28-11-42-16z">
              <text:p/>
            </draw:path>
            <draw:path draw:style-name="gr3" draw:text-style-name="P7" draw:layer="layout" svg:width="0.483cm" svg:height="0.221cm" svg:x="5.957cm" svg:y="7.23cm" svg:viewBox="0 0 484 222" svg:d="M246 82c-26-30-34-38-52-52-30-22-62-30-90-30-60 0-104 52-104 112 0 56 42 110 104 110 68 0 116-56 132-82 26 30 34 38 54 52 30 22 60 30 88 30 60 0 106-52 106-112 0-56-44-110-104-110-68 0-116 56-134 82zM262 100c20-32 62-82 122-82 50 0 86 45 86 92s-38 84-84 84-78-36-124-94zM222 122c-20 32-64 82-124 82-50 0-84-45-84-92s38-84 82-84c46 0 78 36 126 94z">
              <text:p/>
            </draw:path>
            <draw:path draw:style-name="gr3" draw:text-style-name="P7" draw:layer="layout" svg:width="0.331cm" svg:height="0.023cm" svg:x="5.659cm" svg:y="8.732cm" svg:viewBox="0 0 332 24" svg:d="M314 24c6 0 18 0 18-12s-10-12-18-12c-98 0-196 0-294 0-8 0-20 0-20 12s12 12 20 12c98 0 196 0 294 0z">
              <text:p/>
            </draw:path>
            <draw:path draw:style-name="gr3" draw:text-style-name="P7" draw:layer="layout" svg:width="0.483cm" svg:height="0.221cm" svg:x="6.083cm" svg:y="8.65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 76 36 124 94z">
              <text:p/>
            </draw:path>
            <draw:path draw:style-name="gr3" draw:text-style-name="P7" draw:layer="layout" svg:width="0.347cm" svg:height="0.317cm" svg:x="6.779cm" svg:y="7.917cm" svg:viewBox="0 0 348 318" svg:d="M214 100c4-20 20-84 68-84 4 0 22 0 36 10-20 2-34 20-34 38 0 10 8 24 26 24 16 0 38-12 38-40 0-38-40-48-64-48-42 0-66 38-74 54-18-46-56-54-76-54-74 0-114 92-114 108 0 8 8 8 10 8 4 0 6-2 8-8 24-74 70-92 94-92 14 0 38 6 38 48 0 22-12 68-38 166-10 44-36 74-66 74-4 0-20 0-36-10 18-4 34-18 34-38 0-18-16-24-26-24-22 0-38 18-38 40 0 32 34 46 66 46 46 0 70-48 72-52 10 26 34 52 76 52 74 0 114-90 114-108 0-6-8-6-10-6-6 0-8 2-8 8-24 74-72 92-94 92-28 0-38-24-38-46 0-16 4-32 12-62 8-32 16-64 24-96z">
              <text:p/>
            </draw:path>
            <draw:path draw:style-name="gr3" draw:text-style-name="P7" draw:layer="layout" svg:width="0.147cm" svg:height="0.329cm" svg:x="7.183cm" svg:y="7.614cm" svg:viewBox="0 0 148 330" svg:d="M136 18c0-8-6-18-20-18s-28 12-28 26c0 8 6 18 20 18s28-12 28-26zM36 268c-2 6-6 12-6 20 0 24 20 42 48 42 48 0 70-68 70-76 0-6-6-6-8-6-6 0-6 4-8 8-12 40-34 60-52 60-10 0-14-6-14-16 0-12 4-22 8-32 6-14 10-26 16-40 4-12 22-56 24-62s4-10 4-16c0-22-20-42-48-42-48 0-70 68-70 76 0 6 6 6 8 6 6 0 8-2 8-8 14-42 34-60 54-60 8 0 12 4 12 18 0 10-4 18-16 48-10 26-20 53-30 80z">
              <text:p/>
            </draw:path>
            <draw:path draw:style-name="gr5" draw:text-style-name="P11" draw:layer="layout" svg:width="0.349cm" svg:height="0.638cm" svg:x="7.431cm" svg:y="7.733cm" svg:viewBox="0 0 350 639" svg:d="M220 214c20 0 40 0 60 0 14 0 22 0 22-14 0-8-8-8-20-8-19 0-39 0-58 0 5-27 9-54 14-80 4-14 14-64 18-72 6-14 18-24 32-24 4 0 22 0 36 12-32 2-38 28-38 38 0 16 12 24 26 24 18 0 38-14 38-42 0-32-32-48-62-48-24 0-68 12-88 82-4 14-6 22-24 110-16 0-32 0-48 0-14 0-22 0-22 14 0 8 8 8 20 8 15 0 31 0 46 0-17 92-35 185-52 277-12 68-24 132-60 132-4 0-22 0-34-12 32-4 38-28 38-38 0-18-12-26-26-26-18 0-38 16-38 42 0 32 30 50 60 50 38 0 66-42 78-68 22-46 40-130 40-136 14-73 28-147 42-221z">
              <text:p/>
            </draw:path>
            <draw:path draw:style-name="gr5" draw:text-style-name="P11" draw:layer="layout" svg:width="0.161cm" svg:height="0.7cm" svg:x="7.883cm" svg:y="7.701cm" svg:viewBox="0 0 162 701" svg:d="M162 695c0-2 0-4-12-16-88-88-110-220-110-327 0-122 26-244 114-332 8-10 8-10 8-12 0-6-2-8-6-8-8 0-70 48-112 138-36 76-44 154-44 214 0 54 8 139 46 217 42 88 102 132 110 132 4 0 6-2 6-6z">
              <text:p/>
            </draw:path>
            <draw:path draw:style-name="gr5" draw:text-style-name="P11" draw:layer="layout" svg:width="0.349cm" svg:height="0.317cm" svg:x="8.106cm" svg:y="7.917cm" svg:viewBox="0 0 350 318" svg:d="M214 100c4-20 20-84 70-84 2 0 20 0 34 10-20 2-34 20-34 38 0 10 8 24 28 24 14 0 38-12 38-40 0-38-42-48-66-48-40 0-66 38-74 54-18-46-56-54-76-54-72 0-112 92-112 108 0 8 6 8 8 8 6 0 8-2 8-8 24-74 70-92 94-92 14 0 38 6 38 48 0 22-12 68-38 166-10 44-34 74-66 74-4 0-20 0-36-10 18-4 34-18 34-38 0-18-16-24-26-24-22 0-38 18-38 40 0 32 34 46 66 46 46 0 72-48 74-52 8 26 32 52 76 52 72 0 112-90 112-108 0-6-6-6-8-6-8 0-8 2-10 8-24 74-72 92-94 92-26 0-38-24-38-46 0-16 4-32 12-62 8-32 16-64 24-96z">
              <text:p/>
            </draw:path>
            <draw:path draw:style-name="gr5" draw:text-style-name="P11" draw:layer="layout" svg:width="0.163cm" svg:height="0.7cm" svg:x="8.526cm" svg:y="7.701cm" svg:viewBox="0 0 164 701" svg:d="M164 352c0-56-8-140-46-220-42-86-104-132-110-132-4 0-8 4-8 8 0 2 0 2 14 16 68 70 108 180 108 328 0 119-26 243-112 331-10 8-10 10-10 12 0 4 4 6 8 6 6 0 70-48 112-136 36-78 44-155 44-213z">
              <text:p/>
            </draw:path>
            <draw:path draw:style-name="gr5" draw:text-style-name="P11" draw:layer="layout" svg:width="0.333cm" svg:height="0.492cm" svg:x="8.788cm" svg:y="7.741cm" svg:viewBox="0 0 334 493" svg:d="M334 8c0-2 0-8-8-8-12 0-78 6-90 8-6 0-10 4-10 12 0 10 6 10 18 10 32 0 34 4 34 12-1 5-1 9-2 14-14 55-28 110-42 166-12-26-34-46-64-46-82 0-170 104-170 206 0 65 38 111 94 111 14 0 48-2 90-52 6 30 30 52 64 52 26 0 42-16 52-38 12-26 22-67 22-69 0-6-6-6-8-6-8 0-8 2-10 12-12 45-26 87-54 87-18 0-22-18-22-32 0-18 2-22 6-34 33-135 67-270 100-405zM188 404c-4 11-4 13-14 25-30 38-60 50-80 50-34 0-44-40-44-66 0-35 22-121 38-153 22-42 54-68 82-68 46 0 56 58 56 62s-2 8-2 12c-12 46-24 92-36 138z">
              <text:p/>
            </draw:path>
            <draw:path draw:style-name="gr5" draw:text-style-name="P11" draw:layer="layout" svg:width="0.349cm" svg:height="0.317cm" svg:x="9.146cm" svg:y="7.917cm" svg:viewBox="0 0 350 318" svg:d="M214 100c4-20 20-84 70-84 4 0 20 0 34 10-18 2-32 20-32 38 0 10 6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  <text:p/>
            </draw:path>
            <draw:path draw:style-name="gr3" draw:text-style-name="P7" draw:layer="layout" svg:width="0.073cm" svg:height="0.075cm" svg:x="9.588cm" svg:y="8.153cm" svg:viewBox="0 0 74 76" svg:d="M74 38c0-20-17-38-38-38s-36 18-36 38 15 38 36 38 38-18 38-38z">
              <text:p/>
            </draw:path>
          </draw:g>
        </draw:g>
        <draw:g>
          <svg:title>TexMaths</svg:title>
          <svg:desc>20§display§\mathbb{E}[g(X)] = \int_{-\infty}^{\infty} g(x) \textcolor{blue}{f(x)dx}.§svg§600§TRUE§</svg:desc>
          <draw:g>
            <draw:path draw:style-name="gr3" draw:text-style-name="P7" draw:layer="layout" svg:width="0.439cm" svg:height="0.481cm" svg:x="2.56cm" svg:y="9.947cm" svg:viewBox="0 0 440 482" svg:d="M172 246c18 0 52 0 76 14 34 22 36 60 36 64 2 10 2 18 14 18s12-10 12-22c0-63 0-127 0-190 0-12 0-22-12-22s-14 10-14 16c-4 90-76 96-112 96 0-49 0-99 0-148 0-48 14-48 30-48 11 0 23 0 34 0 94 0 142 50 146 98 0 6 2 16 12 16 12 0 12-12 12-24 0-30 0-60 0-90 0-22 0-24-22-24-120 0-240 0-360 0-12 0-24 0-24 12s14 12 18 12c40 0 44 6 44 40 0 117 0 235 0 352 0 34-2 40-40 40-10 0-22 0-22 12 0 14 12 14 24 14 124 0 248 0 372 0 14 0 20 0 22-10 2-2 22-118 22-122 0-8-8-12-12-12-10 0-14 8-14 10-4 18-10 46-62 76-36 22-72 32-112 32-13 0-25 0-38 0-16 0-30 0-30-46 0-55 0-109 0-164zM382 24c0 11 0 23 0 34-12-12-26-24-40-34 13 0 27 0 40 0zM246 230c10-4 26-16 38-30 0 20 0 40 0 60-16-20-25-19-38-28 0-1 0-1 0-2zM86 64c0-10 0-26-6-40 25 0 51 0 76 0-8 16-8 40-8 46 0 113 0 227 0 340 0 26 4 40 8 46-25 0-51 0-76 0 6-12 6-30 6-38 0-118 0-236 0-354zM348 456c22-12 42-26 56-38-2 2-6 32-8 38-16 0-32 0-48 0z">
              <text:p/>
            </draw:path>
            <draw:path draw:style-name="gr3" draw:text-style-name="P7" draw:layer="layout" svg:width="0.095cm" svg:height="0.701cm" svg:x="3.102cm" svg:y="9.901cm" svg:viewBox="0 0 96 702" svg:d="M96 702c0-9 0-19 0-28-23 0-45 0-68 0 0-215 0-431 0-646 23 0 45 0 68 0 0-9 0-19 0-28-32 0-64 0-96 0 0 234 0 468 0 702 32 0 64 0 96 0z">
              <text:p/>
            </draw:path>
            <draw:path draw:style-name="gr3" draw:text-style-name="P7" draw:layer="layout" svg:width="0.321cm" svg:height="0.455cm" svg:x="3.224cm" svg:y="10.117cm" svg:viewBox="0 0 322 456" svg:d="M320 46c2-4 2-8 2-12 0-12-8-20-20-20-6 0-26 6-28 30-12-26-38-44-66-44-80 0-166 100-166 200 0 70 42 112 92 112 42 0 76-34 82-42 0 1 0 1 0 2-14 62-22 90-22 92-4 6-28 76-102 76-12 0-36-2-56-8 22-6 28-24 28-36s-6-24-26-24c-16 0-38 12-38 40 0 30 26 44 94 44 88 0 138-56 148-98 26-104 52-208 78-312zM230 222c-4 18-20 36-36 48-16 14-36 26-58 26-34 0-46-36-46-64 0-34 22-118 40-154 20-34 50-62 80-62 46 0 56 57 56 60s-2 8-2 12c-11 45-23 89-34 134z">
              <text:p/>
            </draw:path>
            <draw:path draw:style-name="gr3" draw:text-style-name="P7" draw:layer="layout" svg:width="0.161cm" svg:height="0.701cm" svg:x="3.644cm" svg:y="9.901cm" svg:viewBox="0 0 162 702" svg:d="M162 696c0-2 0-4-12-16-86-88-110-220-110-328 0-122 28-244 114-332 8-10 8-10 8-12 0-6-2-8-6-8-8 0-70 48-112 138-36 76-44 154-44 214 0 54 8 140 46 218 42 88 102 132 110 132 4 0 6-2 6-6z">
              <text:p/>
            </draw:path>
            <draw:path draw:style-name="gr3" draw:text-style-name="P7" draw:layer="layout" svg:width="0.579cm" svg:height="0.479cm" svg:x="3.866cm" svg:y="9.949cm" svg:viewBox="0 0 580 480" svg:d="M322 190c-19-47-39-93-58-140-2-4-3-5-4-8 0-4 12-18 42-20 6-2 14-2 14-14 0-8-10-8-12-8-28 0-58 2-88 2-18 0-60-2-78-2-4 0-14 0-14 14 0 8 8 8 18 8 42 0 46 6 52 22 27 65 55 131 82 196-49 53-99 107-148 160-3 2-5 4-8 6-36 38-68 50-104 52-10 0-16 0-16 14 3 3 0 8 10 8 20 0 44-2 66-2 26 0 54 2 78 2 4 0 14 0 14-14 0-8-8-8-10-8-6-2-28-2-28-22 0-12 12-22 20-32 24-25 48-51 72-76 21-23 41-45 62-68 24 56 48 112 72 168 2 6 2 8 2 10 0 4-12 16-40 20-8 0-14 0-14 12 0 10 8 10 10 10 20 0 70-2 90-2 16 0 60 2 78 2 4 0 12 0 12-14 0-8-6-8-12-8-48-2-48-4-60-32-28-64-76-174-92-216 48-50 122-134 144-152s48-34 90-36c10-2 16-2 16-14 0-2 0-8-10-8-20 0-44 2-66 2-26 0-52-2-78-2-4 0-12 0-12 14 0 4 2 6 8 8 6 0 28 2 28 22 0 8-8 18-14 24-38 41-76 81-114 122z">
              <text:p/>
            </draw:path>
            <draw:path draw:style-name="gr3" draw:text-style-name="P7" draw:layer="layout" svg:width="0.163cm" svg:height="0.701cm" svg:x="4.524cm" svg:y="9.901cm" svg:viewBox="0 0 164 702" svg:d="M164 352c0-56-8-140-46-220-42-86-102-132-110-132-4 0-8 4-8 8 0 2 0 2 14 16 70 70 110 180 110 328 0 120-26 244-114 332-10 8-10 10-10 12 0 4 4 6 8 6 8 0 70-48 112-136 36-78 44-156 44-214z">
              <text:p/>
            </draw:path>
            <draw:path draw:style-name="gr3" draw:text-style-name="P7" draw:layer="layout" svg:width="0.095cm" svg:height="0.701cm" svg:x="4.774cm" svg:y="9.901cm" svg:viewBox="0 0 96 702" svg:d="M96 0c-32 0-64 0-96 0 0 9 0 19 0 28 23 0 45 0 68 0 0 215 0 431 0 646-23 0-45 0-68 0 0 9 0 19 0 28 32 0 64 0 96 0 0-234 0-468 0-702z">
              <text:p/>
            </draw:path>
            <draw:path draw:style-name="gr3" draw:text-style-name="P7" draw:layer="layout" svg:width="0.467cm" svg:height="0.163cm" svg:x="5.188cm" svg:y="10.171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623cm" svg:height="1.559cm" svg:x="5.93cm" svg:y="9.473cm" svg:viewBox="0 0 624 1560" svg:d="M34 1528c22-2 34-16 34-34 0-24-18-34-34-34s-34 10-34 34c0 36 36 66 78 66 106 0 146-164 196-368 54-222 100-446 138-672 26-150 52-290 76-380 8-34 32-126 60-126 22 0 40 14 42 16-22 2-34 18-34 36 0 22 16 34 32 34 18 0 36-10 36-36 0-38-38-64-78-64-52 0-92 76-130 220-2 6-98 360-176 818-18 108-38 226-62 324-12 50-44 182-102 182-24 0-28-11-42-16z">
              <text:p/>
            </draw:path>
            <draw:path draw:style-name="gr3" draw:text-style-name="P7" draw:layer="layout" svg:width="0.483cm" svg:height="0.221cm" svg:x="6.632cm" svg:y="9.429cm" svg:viewBox="0 0 484 222" svg:d="M246 82c-26-30-34-38-52-52-30-22-62-30-90-30-60 0-104 52-104 112 0 56 42 110 104 110 68 0 116-56 132-82 26 30 34 38 54 52 30 22 60 30 88 30 62 0 106-52 106-112 0-56-42-110-104-110-68 0-116 56-134 82zM262 100c20-32 62-82 122-82 50 0 86 45 86 92s-38 84-84 84-78-36-124-94zM222 122c-20 32-64 82-124 82-50 0-86-45-86-92s40-84 84-84c46 0 78 36 126 94z">
              <text:p/>
            </draw:path>
            <draw:path draw:style-name="gr3" draw:text-style-name="P7" draw:layer="layout" svg:width="0.331cm" svg:height="0.023cm" svg:x="6.334cm" svg:y="10.933cm" svg:viewBox="0 0 332 24" svg:d="M314 24c6 0 18 0 18-12s-10-12-18-12c-98 0-196 0-294 0-8 0-20 0-20 12s12 12 20 12c98 0 196 0 294 0z">
              <text:p/>
            </draw:path>
            <draw:path draw:style-name="gr3" draw:text-style-name="P7" draw:layer="layout" svg:width="0.483cm" svg:height="0.221cm" svg:x="6.758cm" svg:y="10.851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c-44 0-76-36-124-94zM222 122c-20 32-62 82-122 82-52 0-86-45-86-92s38-84 84-84 76 36 124 94z">
              <text:p/>
            </draw:path>
            <draw:path draw:style-name="gr3" draw:text-style-name="P7" draw:layer="layout" svg:width="0.321cm" svg:height="0.455cm" svg:x="7.444cm" svg:y="10.117cm" svg:viewBox="0 0 322 456" svg:d="M320 46c0-4 2-8 2-12 0-12-8-20-20-20-8 0-26 6-30 30-12-26-36-44-64-44-80 0-168 100-168 200 0 70 42 112 94 112 42 0 74-34 82-42 0 1 0 1 0 2-14 62-24 90-24 92-2 6-26 76-100 76-14 0-38-2-56-8 20-6 28-24 28-36s-8-24-26-24c-16 0-38 12-38 40 0 30 26 44 92 44 88 0 140-56 150-98 26-104 52-208 78-312zM228 222c-4 18-20 36-36 48-14 14-36 26-56 26-36 0-46-36-46-64 0-34 20-118 40-154 18-34 48-62 78-62 46 0 56 57 56 60s-2 8-2 12c-11 45-23 89-34 134z">
              <text:p/>
            </draw:path>
            <draw:path draw:style-name="gr3" draw:text-style-name="P7" draw:layer="layout" svg:width="0.163cm" svg:height="0.701cm" svg:x="7.862cm" svg:y="9.901cm" svg:viewBox="0 0 164 702" svg:d="M164 696c0-2 0-4-12-16-88-88-110-220-110-328 0-122 26-244 112-332 10-10 10-10 10-12 0-6-2-8-8-8s-70 48-110 138c-36 76-46 154-46 214 0 54 8 140 48 218 42 88 102 132 108 132s8-2 8-6z">
              <text:p/>
            </draw:path>
            <draw:path draw:style-name="gr3" draw:text-style-name="P7" draw:layer="layout" svg:width="0.349cm" svg:height="0.317cm" svg:x="8.086cm" svg:y="10.117cm" svg:viewBox="0 0 350 318" svg:d="M216 100c4-20 20-84 68-84 4 0 22 0 36 10-20 2-34 20-34 38 0 10 8 24 26 24 16 0 38-12 38-40 0-38-40-48-64-48-42 0-66 38-74 54-18-46-56-54-76-54-74 0-114 92-114 108 0 8 8 8 10 8 4 0 6-2 8-8 24-74 70-92 94-92 14 0 38 6 38 48 0 22-12 68-38 166-10 44-36 74-66 74-4 0-20 0-36-10 18-4 34-18 34-38 0-18-16-24-26-24-22 0-40 18-40 40 0 32 36 46 68 46 46 0 70-48 72-52 10 26 34 52 76 52 74 0 114-90 114-108 0-6-8-6-10-6-6 0-8 2-8 8-24 74-72 92-94 92-28 0-38-24-38-46 0-16 4-32 12-62 8-32 16-64 24-96z">
              <text:p/>
            </draw:path>
            <draw:path draw:style-name="gr3" draw:text-style-name="P7" draw:layer="layout" svg:width="0.163cm" svg:height="0.701cm" svg:x="8.508cm" svg:y="9.901cm" svg:viewBox="0 0 164 702" svg:d="M164 352c0-56-8-140-48-220-42-86-102-132-108-132-4 0-8 4-8 8 0 2 0 2 14 16 68 70 108 180 108 328 0 120-26 244-112 332-10 8-10 10-10 12 0 4 4 6 8 6 6 0 70-48 112-136 34-78 44-156 44-214z">
              <text:p/>
            </draw:path>
            <draw:path draw:style-name="gr5" draw:text-style-name="P11" draw:layer="layout" svg:width="0.351cm" svg:height="0.639cm" svg:x="8.778cm" svg:y="9.933cm" svg:viewBox="0 0 352 640" svg:d="M222 214c20 0 40 0 60 0 14 0 22 0 22-14 0-8-8-8-20-8-19 0-39 0-58 0 5-27 9-53 14-80 4-14 14-64 18-72 6-14 18-24 32-24 4 0 22 0 34 12-30 2-38 28-38 38 0 16 14 24 26 24 20 0 40-14 40-42 0-32-32-48-62-48-24 0-68 12-88 82-6 14-8 22-24 110-16 0-32 0-48 0-14 0-22 0-22 14 0 8 6 8 20 8 15 0 31 0 46 0-17 93-35 185-52 278-12 68-24 132-62 132-2 0-20 0-34-12 34-4 40-28 40-38 0-18-14-26-26-26-18 0-40 16-40 42 0 32 32 50 60 50 40 0 68-42 80-68 22-46 38-130 40-136 14-74 28-148 42-222z">
              <text:p/>
            </draw:path>
            <draw:path draw:style-name="gr5" draw:text-style-name="P11" draw:layer="layout" svg:width="0.163cm" svg:height="0.701cm" svg:x="9.23cm" svg:y="9.901cm" svg:viewBox="0 0 164 702" svg:d="M164 696c0-2 0-4-12-16-88-88-110-220-110-328 0-122 26-244 112-332 10-10 10-10 10-12 0-6-2-8-8-8s-70 48-110 138c-36 76-46 154-46 214 0 54 8 140 48 218 42 88 102 132 108 132s8-2 8-6z">
              <text:p/>
            </draw:path>
            <draw:path draw:style-name="gr5" draw:text-style-name="P11" draw:layer="layout" svg:width="0.349cm" svg:height="0.317cm" svg:x="9.454cm" svg:y="10.117cm" svg:viewBox="0 0 350 318" svg:d="M216 100c4-20 20-84 68-84 4 0 22 0 36 10-20 2-34 20-34 38 0 10 8 24 28 24 14 0 36-12 36-40 0-38-40-48-64-48-42 0-66 38-74 54-18-46-56-54-76-54-74 0-114 92-114 108 0 8 8 8 10 8 4 0 6-2 8-8 24-74 70-92 94-92 14 0 38 6 38 48 0 22-12 68-38 166-10 44-36 74-66 74-4 0-20 0-36-10 18-4 34-18 34-38 0-18-16-24-26-24-22 0-40 18-40 40 0 32 36 46 68 46 46 0 70-48 72-52 10 26 34 52 76 52 74 0 114-90 114-108 0-6-8-6-10-6-6 0-6 2-8 8-24 74-72 92-94 92-28 0-38-24-38-46 0-16 4-32 12-62 8-32 16-64 24-96z">
              <text:p/>
            </draw:path>
            <draw:path draw:style-name="gr5" draw:text-style-name="P11" draw:layer="layout" svg:width="0.163cm" svg:height="0.701cm" svg:x="9.876cm" svg:y="9.901cm" svg:viewBox="0 0 164 702" svg:d="M164 352c0-56-8-140-48-220-42-86-102-132-108-132-4 0-8 4-8 8 0 2 0 2 14 16 68 70 108 180 108 328 0 120-26 244-112 332-10 8-10 10-10 12 0 4 4 6 8 6 6 0 70-48 112-136 34-78 44-156 44-214z">
              <text:p/>
            </draw:path>
            <draw:path draw:style-name="gr5" draw:text-style-name="P11" draw:layer="layout" svg:width="0.333cm" svg:height="0.493cm" svg:x="10.138cm" svg:y="9.941cm" svg:viewBox="0 0 334 494" svg:d="M334 8c0-2 0-8-8-8-12 0-78 6-90 8-6 0-10 4-10 12 0 10 6 10 16 10 34 0 36 4 36 12-1 5-1 9-2 14-14 55-28 111-42 166-12-26-34-46-64-46-84 0-170 104-170 206 0 66 38 112 94 112 14 0 48-2 90-52 6 30 30 52 64 52 26 0 42-16 52-38 12-26 22-68 22-70 0-6-6-6-8-6-8 0-8 2-10 12-12 46-26 88-54 88-20 0-22-18-22-32 0-18 2-22 6-34 33-135 67-271 100-406zM188 404c-4 12-4 14-14 26-30 38-60 50-80 50-34 0-44-40-44-66 0-36 22-122 38-154 22-42 54-68 82-68 46 0 56 58 56 62s-2 8-2 12c-12 46-24 92-36 138z">
              <text:p/>
            </draw:path>
            <draw:path draw:style-name="gr5" draw:text-style-name="P11" draw:layer="layout" svg:width="0.349cm" svg:height="0.317cm" svg:x="10.496cm" svg:y="10.117cm" svg:viewBox="0 0 350 318" svg:d="M214 100c4-20 20-84 70-84 4 0 20 0 34 10-18 2-32 20-32 38 0 10 6 24 26 24 16 0 38-12 38-40 0-38-42-48-66-48-40 0-64 38-74 54-16-46-54-54-76-54-72 0-112 92-112 108 0 8 6 8 8 8 6 0 8-2 10-8 24-74 70-92 94-92 12 0 38 6 38 48 0 22-12 68-38 166-12 44-36 74-68 74-4 0-20 0-34-10 16-4 32-18 32-38 0-18-16-24-26-24-20 0-38 18-38 40 0 32 34 46 66 46 46 0 72-48 74-52 8 26 34 52 76 52 72 0 112-90 112-108 0-6-6-6-8-6-6 0-8 2-10 8-22 74-70 92-94 92-26 0-38-24-38-46 0-16 4-32 12-62 8-32 16-64 24-96z">
              <text:p/>
            </draw:path>
            <draw:path draw:style-name="gr3" draw:text-style-name="P7" draw:layer="layout" svg:width="0.073cm" svg:height="0.075cm" svg:x="10.938cm" svg:y="10.353cm" svg:viewBox="0 0 74 76" svg:d="M74 38c0-20-17-38-38-38s-36 18-36 38 15 38 36 38 38-18 38-38z">
              <text:p/>
            </draw:path>
          </draw:g>
        </draw:g>
        <draw:g>
          <svg:title>TexMaths</svg:title>
          <svg:desc>20§latex§\begin{eqnarray*}
\mathbf{Var}[X] &amp;=&amp; \mathbb{E}[(X-\mathbb{E}[X])^2]\\
&amp;=&amp;\int_{-\infty}^{\infty} (x-\mathbb{E}[x])^2 \textcolor{blue}{f(x)dx}\\
&amp;=&amp; \mathbb{E}[X^2] - (\mathbb{E}[X])^2.
\end{eqnarray*}
§svg§600§TRUE§</svg:desc>
          <draw:g>
            <draw:path draw:style-name="gr3" draw:text-style-name="P7" draw:layer="layout" svg:width="0.573cm" svg:height="0.487cm" svg:x="13cm" svg:y="6.453cm" svg:viewBox="0 0 574 488" svg:d="M502 50c4-10 8-16 58-16 5 0 9 0 14 0 0-11 0-23 0-34-26 2-60 2-80 2-28 0-64 0-92-2 0 11 0 23 0 34 6 0 62 0 62 8 0 2-2 6-2 8-47 107-95 213-142 320-50-112-100-224-150-336 22 0 44 0 66 0 0-11 0-23 0-34-26 2-94 2-124 2-28 0-88 0-112-2 0 11 0 23 0 34 21 0 43 0 64 0 65 145 129 290 194 436 6 12 10 18 30 18 10 0 20 0 28-16 62-141 124-281 186-422z">
              <text:p/>
            </draw:path>
            <draw:path draw:style-name="gr3" draw:text-style-name="P7" draw:layer="layout" svg:width="0.369cm" svg:height="0.321cm" svg:x="13.548cm" svg:y="6.617cm" svg:viewBox="0 0 370 322" svg:d="M240 264c0 22 0 54 74 54 11 0 23 0 34 0 14 0 22 0 22-16s-10-16-18-16c-44-2-44-10-44-26 0-51 0-101 0-152 0-62-50-108-154-108-40 0-126 4-126 66 0 30 24 44 44 44 22 0 44-16 44-44 0-22-14-34-16-36 20-4 42-4 52-4 52 0 76 30 76 82 0 8 0 16 0 24-50 2-228 8-228 110 0 68 88 80 136 80 56 0 90-28 104-58zM228 154c0 22 0 44 0 66 0 68-64 78-82 78-36 0-64-26-64-56 0-76 112-86 146-88z">
              <text:p/>
            </draw:path>
            <draw:path draw:style-name="gr3" draw:text-style-name="P7" draw:layer="layout" svg:width="0.285cm" svg:height="0.315cm" svg:x="13.944cm" svg:y="6.619cm" svg:viewBox="0 0 286 316" svg:d="M118 80c0-27 0-53 0-80-39 2-79 4-118 6 0 11 0 23 0 34 44 0 50 0 50 26 0 73 0 145 0 218-17 0-33 0-50 0 0 11 0 21 0 32 26 0 56-2 90-2 26 0 70 0 96 2 0-11 0-21 0-32-21 0-41 0-62 0 0-41 0-83 0-124 0-48 18-134 88-134-4 11-12 12-12 32 0 28 22 42 42 42s44-14 44-42c0-38-38-58-76-58-48 0-76 36-92 80z">
              <text:p/>
            </draw:path>
            <draw:path draw:style-name="gr3" draw:text-style-name="P7" draw:layer="layout" svg:width="0.095cm" svg:height="0.701cm" svg:x="14.334cm" svg:y="6.409cm" svg:viewBox="0 0 96 702" svg:d="M96 702c0-10 0-19 0-28-23 0-45 0-68 0 0-216 0-431 0-646 23 0 45 0 68 0 0-9 0-19 0-28-32 0-64 0-96 0 0 234 0 468 0 702 32 0 64 0 96 0z">
              <text:p/>
            </draw:path>
            <draw:path draw:style-name="gr3" draw:text-style-name="P7" draw:layer="layout" svg:width="0.577cm" svg:height="0.479cm" svg:x="14.466cm" svg:y="6.455cm" svg:viewBox="0 0 578 480" svg:d="M322 192c-20-47-40-93-60-140-2-6-4-8-4-10 0-4 12-16 42-20 8 0 14 0 14-12 0-10-8-10-10-10-28 0-60 2-88 2-18 0-62-2-80-2-4 0-12 0-12 14 0 8 8 8 16 8 42 0 46 8 52 24 28 65 56 131 84 196-49 53-99 105-148 158-3 2-7 5-10 8-34 38-68 48-102 50-10 2-16 2-16 14 0 2 0 8 8 8 22 0 46-2 66-2 26 0 54 2 80 2 4 0 12 0 12-14 0-6-6-8-8-8-6 0-28-2-28-20 0-12 10-24 18-32 24-26 48-51 72-76 21-23 43-47 64-70 23 56 47 112 70 168 4 8 3 6 4 10 0 6-14 18-40 20-8 2-14 2-14 14 0 8 6 8 10 8 20 0 68-2 88-2 18 0 60 2 78 2 6 0 14 0 14-12 0-10-8-10-12-10-48 0-50-2-62-30-26-66-74-174-90-218 48-48 122-132 144-152 20-16 48-34 90-36 8 0 14 0 14-14-3-3 0-8-8-8-22 0-44 2-66 2-26 0-54-2-78-2-4 0-14 0-14 14 0 6 4 8 8 8 6 2 28 2 28 22 0 10-8 20-12 26-38 41-76 81-114 122z">
              <text:p/>
            </draw:path>
            <draw:path draw:style-name="gr3" draw:text-style-name="P7" draw:layer="layout" svg:width="0.095cm" svg:height="0.701cm" svg:x="15.1cm" svg:y="6.409cm" svg:viewBox="0 0 96 702" svg:d="M96 0c-32 0-64 0-96 0 0 9 0 19 0 28 23 0 45 0 68 0 0 215 0 430 0 646-23 0-45 0-68 0 0 9 0 18 0 28 32 0 64 0 96 0 0-234 0-468 0-702z">
              <text:p/>
            </draw:path>
            <draw:path draw:style-name="gr3" draw:text-style-name="P7" draw:layer="layout" svg:width="0.465cm" svg:height="0.165cm" svg:x="16.021cm" svg:y="6.677cm" svg:viewBox="0 0 466 166" svg:d="M442 28c12 0 24 0 24-14s-12-14-22-14c-141 0-281 0-422 0-10 0-22 0-22 14s12 14 24 14c139 0 279 0 418 0zM444 166c10 0 22 0 22-14s-12-14-24-14c-139 0-279 0-418 0-12 0-24 0-24 14s12 14 22 14c141 0 281 0 422 0z">
              <text:p/>
            </draw:path>
            <draw:path draw:style-name="gr3" draw:text-style-name="P7" draw:layer="layout" svg:width="0.437cm" svg:height="0.479cm" svg:x="17.241cm" svg:y="6.455cm" svg:viewBox="0 0 438 480" svg:d="M172 244c18 0 50 0 76 16 34 22 36 60 36 64 0 10 0 18 12 18s12-10 12-22c0-63 0-127 0-190 0-12 0-24-12-24s-12 12-12 18c-4 90-76 94-112 96 0-49 0-99 0-148 0-48 12-48 30-48 11 0 23 0 34 0 94 0 142 48 146 96 0 6 2 18 12 18 12 0 12-12 12-24 0-31 0-61 0-92 0-22-2-22-22-22-120 0-240 0-360 0-14 0-24 0-24 12s12 12 18 12c40 0 44 6 44 40 0 117 0 235 0 352 0 34-2 40-40 40-10 0-22 0-22 12s10 12 24 12c124 0 248 0 372 0 14 0 20 0 22-10 7-40 20-118 20-120 0-8-6-14-12-14-10 0-8 6-12 10-4 18-12 48-62 78-38 22-72 32-112 32-13 0-25 0-38 0-18 0-30 0-30-48 0-55 0-109 0-164zM382 24c0 11 0 23 0 34-12-14-26-24-40-34 13 0 27 0 40 0zM244 230c12-6 28-16 40-30 0 19 0 39 0 58-16-18-38-28-40-28zM86 62c0-8 0-26-6-38 25 0 49 0 74 0-8 16-8 40-8 46 0 113 0 227 0 340 0 26 6 40 8 46-25 0-49 0-74 0 6-12 6-30 6-38 0-119 0-237 0-356zM348 456c22-12 40-26 54-40 0 4-4 34-6 40-16 0-32 0-48 0z">
              <text:p/>
            </draw:path>
            <draw:path draw:style-name="gr3" draw:text-style-name="P7" draw:layer="layout" svg:width="0.097cm" svg:height="0.701cm" svg:x="17.781cm" svg:y="6.409cm" svg:viewBox="0 0 98 702" svg:d="M98 702c0-10 0-19 0-28-23 0-45 0-68 0 0-216 0-431 0-646 23 0 45 0 68 0 0-9 0-19 0-28-33 0-65 0-98 0 0 234 0 468 0 702 33 0 65 0 98 0z">
              <text:p/>
            </draw:path>
            <draw:path draw:style-name="gr3" draw:text-style-name="P7" draw:layer="layout" svg:width="0.163cm" svg:height="0.701cm" svg:x="17.963cm" svg:y="6.409cm" svg:viewBox="0 0 164 702" svg:d="M164 696c0-2 0-4-12-16-88-88-110-222-110-330 0-122 26-244 112-332 10-8 10-10 10-12 0-4-2-6-8-6s-70 48-110 136c-36 78-46 156-46 214 0 56 8 140 48 220 42 86 102 132 108 132s8-2 8-6z">
              <text:p/>
            </draw:path>
            <draw:path draw:style-name="gr3" draw:text-style-name="P7" draw:layer="layout" svg:width="0.577cm" svg:height="0.479cm" svg:x="18.187cm" svg:y="6.455cm" svg:viewBox="0 0 578 480" svg:d="M322 192c-20-47-40-93-60-140-2-6-4-8-4-10 0-4 12-16 42-20 8 0 14 0 14-12 0-10-8-10-10-10-28 0-60 2-88 2-18 0-62-2-80-2-4 0-12 0-12 14 0 8 6 8 16 8 42 0 46 8 52 24 28 65 56 131 84 196-49 53-99 105-148 158-3 2-7 5-10 8-34 38-68 48-104 50-8 2-14 2-14 14 0 2 0 8 8 8 22 0 44-2 66-2 26 0 54 2 80 2 4 0 12 0 12-14 0-6-6-8-8-8-6 0-28-2-28-20 0-12 10-24 18-32 24-26 48-51 72-76 21-23 43-47 64-70 23 56 47 112 70 168 4 8 3 6 4 10 0 6-14 18-40 20-8 2-14 2-14 14 0 8 6 8 10 8 20 0 68-2 88-2 18 0 60 2 78 2 6 0 14 0 14-12 0-10-8-10-14-10-46 0-48-2-60-30-26-66-74-174-90-218 48-48 122-132 144-152 20-16 48-34 90-36 8 0 14 0 14-14-3-3 0-8-8-8-22 0-44 2-66 2-26 0-54-2-78-2-4 0-14 0-14 14 0 6 4 8 8 8 6 2 28 2 28 22 0 10-8 20-12 26-38 41-76 81-114 122z">
              <text:p/>
            </draw:path>
            <draw:path draw:style-name="gr3" draw:text-style-name="P7" draw:layer="layout" svg:width="0.429cm" svg:height="0.029cm" svg:x="19.019cm" svg:y="6.745cm" svg:viewBox="0 0 430 30" svg:d="M406 30c12 0 24-1 24-16s-12-14-24-14c-127 0-253 0-380 0-12 0-26-1-26 14s14 16 26 16c127 0 253 0 380 0z">
              <text:p/>
            </draw:path>
            <draw:path draw:style-name="gr3" draw:text-style-name="P7" draw:layer="layout" svg:width="0.439cm" svg:height="0.479cm" svg:x="19.673cm" svg:y="6.455cm" svg:viewBox="0 0 440 480" svg:d="M172 244c18 0 52 0 76 16 34 22 38 60 38 64 0 10 0 18 12 18s12-10 12-22c0-63 0-127 0-190 0-12 0-24-12-24s-12 12-12 18c-4 90-76 94-114 96 0-49 0-99 0-148 0-48 14-48 32-48 11 0 21 0 32 0 96 0 142 48 148 96 0 6 0 18 12 18s12-12 12-24c0-31 0-61 0-92 0-22-2-22-24-22-120 0-240 0-360 0-12 0-24 0-24 12s14 12 20 12c40 0 42 6 42 40 0 117 0 235 0 352 0 34-2 40-38 40-12 0-24 0-24 12s12 12 24 12c125 0 249 0 374 0 12 0 20 0 22-10 7-40 20-118 20-120 0-8-6-14-12-14-10 0-8 6-12 10-4 18-12 48-64 78-36 22-72 32-110 32-13 0-25 0-38 0-18 0-32 0-32-48 0-55 0-109 0-164zM384 24c0 11 0 23 0 34-12-14-26-24-40-34 13 0 27 0 40 0zM246 230c12-6 26-16 40-30 0 19 0 39 0 58-18-18-27-19-40-28zM88 62c0-8 0-26-6-38 25 0 49 0 74 0-8 16-8 40-8 46 0 113 0 227 0 340 0 26 6 40 8 46-25 0-49 0-74 0 6-12 6-30 6-38 0-119 0-237 0-356zM348 456c24-12 42-26 56-40 0 4-6 34-6 40-17 0-33 0-50 0z">
              <text:p/>
            </draw:path>
            <draw:path draw:style-name="gr3" draw:text-style-name="P7" draw:layer="layout" svg:width="0.095cm" svg:height="0.701cm" svg:x="20.215cm" svg:y="6.409cm" svg:viewBox="0 0 96 702" svg:d="M96 702c0-10 0-19 0-28-23 0-45 0-68 0 0-216 0-431 0-646 23 0 45 0 68 0 0-9 0-19 0-28-32 0-64 0-96 0 0 234 0 468 0 702 32 0 64 0 96 0z">
              <text:p/>
            </draw:path>
            <draw:path draw:style-name="gr3" draw:text-style-name="P7" draw:layer="layout" svg:width="0.577cm" svg:height="0.479cm" svg:x="20.347cm" svg:y="6.455cm" svg:viewBox="0 0 578 480" svg:d="M322 192c-20-47-40-93-60-140-2-6-4-8-4-10 0-4 12-16 42-20 8 0 14 0 14-12 0-10-8-10-10-10-28 0-60 2-88 2-18 0-62-2-80-2-4 0-12 0-12 14 0 8 8 8 16 8 42 0 46 8 52 24 28 65 56 131 84 196-49 53-99 105-148 158-3 2-7 5-10 8-34 38-68 48-102 50-10 2-16 2-16 14 0 2 0 8 8 8 22 0 46-2 66-2 26 0 54 2 80 2 4 0 12 0 12-14 0-6-6-8-8-8-6 0-28-2-28-20 0-12 10-24 18-32 24-26 48-51 72-76 21-23 43-47 64-70 23 56 47 112 70 168 4 8 3 6 4 10 0 6-14 18-40 20-8 2-14 2-14 14 0 8 6 8 10 8 20 0 68-2 88-2 18 0 60 2 78 2 6 0 14 0 14-12 0-10-8-10-12-10-48 0-50-2-62-30-26-66-74-174-90-218 48-48 122-132 144-152 20-16 48-34 90-36 8 0 14 0 14-14-3-3 0-8-8-8-22 0-44 2-66 2-26 0-54-2-78-2-4 0-14 0-14 14 0 6 4 8 8 8 6 2 28 2 28 22 0 10-6 20-12 26-38 41-76 81-114 122z">
              <text:p/>
            </draw:path>
            <draw:path draw:style-name="gr3" draw:text-style-name="P7" draw:layer="layout" svg:width="0.095cm" svg:height="0.701cm" svg:x="20.981cm" svg:y="6.409cm" svg:viewBox="0 0 96 702" svg:d="M96 0c-32 0-64 0-96 0 0 9 0 19 0 28 23 0 45 0 68 0 0 215 0 430 0 646-23 0-45 0-68 0 0 9 0 18 0 28 32 0 64 0 96 0 0-234 0-468 0-702z">
              <text:p/>
            </draw:path>
            <draw:path draw:style-name="gr3" draw:text-style-name="P7" draw:layer="layout" svg:width="0.161cm" svg:height="0.701cm" svg:x="21.201cm" svg:y="6.409cm" svg:viewBox="0 0 162 702" svg:d="M162 350c0-54-8-138-46-218-42-86-102-132-110-132-4 0-6 2-6 6 0 2 0 4 12 16 70 70 110 182 110 328 0 122-26 244-114 334-8 8-8 10-8 12 0 4 2 6 6 6 8 0 70-48 112-136 36-78 44-156 44-216z">
              <text:p/>
            </draw:path>
            <draw:path draw:style-name="gr3" draw:text-style-name="P7" draw:layer="layout" svg:width="0.217cm" svg:height="0.325cm" svg:x="21.464cm" svg:y="6.319cm" svg:viewBox="0 0 218 326" svg:d="M218 238c-6 0-12 0-18 0-2 10-6 38-12 44-4 2-42 2-50 2-30 0-60 0-90 0 52-44 70-58 98-82 38-28 72-60 72-106 0-60-54-96-116-96s-102 42-102 88c0 26 20 28 26 28 12 0 26-8 26-26 0-10-4-26-30-26 16-36 50-46 72-46 50 0 76 38 76 78 0 42-32 76-46 94-40 39-80 79-120 118-4 4-4 4-4 18 67 0 135 0 202 0 5-29 11-59 16-88z">
              <text:p/>
            </draw:path>
            <draw:path draw:style-name="gr3" draw:text-style-name="P7" draw:layer="layout" svg:width="0.095cm" svg:height="0.701cm" svg:x="21.764cm" svg:y="6.409cm" svg:viewBox="0 0 96 702" svg:d="M96 0c-32 0-64 0-96 0 0 9 0 19 0 28 23 0 45 0 68 0 0 215 0 430 0 646-23 0-45 0-68 0 0 9 0 18 0 28 32 0 64 0 96 0 0-234 0-468 0-702z">
              <text:p/>
            </draw:path>
            <draw:path draw:style-name="gr3" draw:text-style-name="P7" draw:layer="layout" svg:width="0.465cm" svg:height="0.163cm" svg:x="16.021cm" svg:y="8.128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7" draw:layer="layout" svg:width="0.623cm" svg:height="1.558cm" svg:x="17.269cm" svg:y="7.43cm" svg:viewBox="0 0 624 1559" svg:d="M34 1527c24 0 36-16 36-34 0-22-18-34-34-34-18 0-36 10-36 36 0 34 36 64 78 64 108 0 148-164 198-368 54-222 100-445 138-671 26-148 52-290 76-380 8-34 32-126 60-126 20 0 38 14 42 16-24 2-36 18-36 36 0 22 18 34 34 34s34-10 34-36c0-38-38-64-76-64-54 0-94 76-132 220-2 6-98 360-174 819-20 106-40 224-62 322-14 50-46 184-102 184-26 0-42-18-44-18z">
              <text:p/>
            </draw:path>
            <draw:path draw:style-name="gr3" draw:text-style-name="P7" draw:layer="layout" svg:width="0.483cm" svg:height="0.221cm" svg:x="17.971cm" svg:y="7.38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c-44 0-76-36-124-94zM222 122c-20 32-62 82-122 82-52 0-86-45-86-92s38-84 84-84 76 36 124 94z">
              <text:p/>
            </draw:path>
            <draw:path draw:style-name="gr3" draw:text-style-name="P7" draw:layer="layout" svg:width="0.331cm" svg:height="0.023cm" svg:x="17.675cm" svg:y="8.89cm" svg:viewBox="0 0 332 24" svg:d="M312 24c8 0 20 0 20-12s-12-12-20-12c-98 0-196 0-294 0-8 0-18 0-18 12s10 12 18 12c98 0 196 0 294 0z">
              <text:p/>
            </draw:path>
            <draw:path draw:style-name="gr3" draw:text-style-name="P7" draw:layer="layout" svg:width="0.483cm" svg:height="0.221cm" svg:x="18.099cm" svg:y="8.808cm" svg:viewBox="0 0 484 222" svg:d="M246 84c-26-32-34-40-54-54-30-20-60-30-88-30-60 0-104 54-104 112s42 110 102 110c70 0 116-56 134-82 26 32 34 40 54 52 30 22 60 30 88 30 60 0 106-52 106-110s-44-112-104-112c-70 0-116 56-134 84zM262 102c18-32 62-82 122-82 50 0 86 45 86 92s-38 84-84 84-78-38-124-94zM220 122c-18 32-62 82-122 82-50 0-86-44-86-92s40-84 84-84c46 0 78 38 124 94z">
              <text:p/>
            </draw:path>
            <draw:path draw:style-name="gr3" draw:text-style-name="P7" draw:layer="layout" svg:width="0.163cm" svg:height="0.703cm" svg:x="18.725cm" svg:y="7.858cm" svg:viewBox="0 0 164 704" svg:d="M164 696c0-2 0-4-12-16-88-88-112-220-112-328 0-122 28-244 114-332 10-8 10-10 10-12 0-6-4-8-8-8-6 0-70 48-112 138-36 76-44 154-44 214 0 54 8 140 46 220 42 86 104 132 110 132 4 0 8-2 8-8z">
              <text:p/>
            </draw:path>
            <draw:path draw:style-name="gr3" draw:text-style-name="P7" draw:layer="layout" svg:width="0.349cm" svg:height="0.317cm" svg:x="18.949cm" svg:y="8.076cm" svg:viewBox="0 0 350 318" svg:d="M214 98c4-18 22-84 70-84 4 0 20 0 36 10-20 4-34 20-34 38 0 10 8 24 26 24 16 0 38-12 38-40 0-38-42-46-66-46-40 0-64 36-72 52-18-46-56-52-76-52-74 0-114 90-114 108 0 6 5 4 8 6 6 0 8-2 10-8 24-74 70-92 94-92 14 0 38 6 38 48 0 22-12 68-38 166-12 44-36 74-66 74-6 0-22 0-36-10 18-2 32-18 32-38 0-18-14-24-26-24-20 0-38 18-38 40 0 34 36 48 66 48 46 0 72-50 74-54 8 26 34 54 76 54 72 0 112-92 112-108 0-8-6-8-8-8-6 0-8 2-10 8-22 76-70 92-92 92-28 0-40-22-40-46 0-16 6-32 12-62 8-32 16-64 24-96z">
              <text:p/>
            </draw:path>
            <draw:path draw:style-name="gr3" draw:text-style-name="P7" draw:layer="layout" svg:width="0.429cm" svg:height="0.027cm" svg:x="19.545cm" svg:y="8.196cm" svg:viewBox="0 0 430 28" svg:d="M404 28c12 0 26 0 26-14s-14-14-26-14c-127 0-253 0-380 0-12 0-24 0-24 14s12 14 24 14c127 0 253 0 380 0z">
              <text:p/>
            </draw:path>
            <draw:path draw:style-name="gr3" draw:text-style-name="P7" draw:layer="layout" svg:width="0.439cm" svg:height="0.481cm" svg:x="20.199cm" svg:y="7.904cm" svg:viewBox="0 0 440 482" svg:d="M172 246c18 0 52 0 76 14 34 22 38 60 38 64 0 10 0 20 12 20s12-10 12-24c0-63 0-127 0-190 0-10 0-22-12-22s-12 10-12 16c-6 90-76 96-114 96 0-49 0-99 0-148 0-48 14-48 30-48 11 0 23 0 34 0 96 0 142 50 146 98 2 6 2 16 14 16s12-12 12-24c0-30 0-60 0-90 0-22-2-24-24-24-120 0-240 0-360 0-12 0-24 0-24 14 0 10 14 10 20 10 40 0 42 6 42 42 0 117 0 235 0 352 0 32-2 40-40 40-10 0-22 0-22 10 0 14 12 14 24 14 124 0 248 0 372 0 14 0 22 0 24-10 7-41 20-118 20-122 0-8-6-12-12-12-10 0-12 8-12 10-6 18-12 48-64 78-36 22-72 32-110 32-13 0-27 0-40 0-16 0-30 0-30-48 0-55 0-109 0-164zM382 24c0 11 0 23 0 34-12-12-24-24-40-34 13 0 27 0 40 0zM246 230c10-4 26-14 40-30 0 20 0 40 0 60-18-20-27-19-40-28 0-1 0-1 0-2zM86 64c0-8 0-26-4-40 25 0 49 0 74 0-8 18-8 40-8 46 0 114 0 228 0 342 0 24 4 38 8 46-25 0-49 0-74 0 4-14 4-32 4-40 0-118 0-236 0-354zM348 458c0-1 0-2 0-2 22-10 42-26 56-38 0 2-6 34-6 40-17 0-33 0-50 0z">
              <text:p/>
            </draw:path>
            <draw:path draw:style-name="gr3" draw:text-style-name="P7" draw:layer="layout" svg:width="0.095cm" svg:height="0.703cm" svg:x="20.741cm" svg:y="7.858cm" svg:viewBox="0 0 96 704" svg:d="M96 704c0-10 0-19 0-28-23 0-45 0-68 0 0-216 0-432 0-648 23 0 45 0 68 0 0-9 0-19 0-28-32 0-64 0-96 0 0 235 0 469 0 704 32 0 64 0 96 0z">
              <text:p/>
            </draw:path>
            <draw:path draw:style-name="gr3" draw:text-style-name="P7" draw:layer="layout" svg:width="0.349cm" svg:height="0.317cm" svg:x="20.873cm" svg:y="8.076cm" svg:viewBox="0 0 350 318" svg:d="M216 98c4-18 20-84 68-84 4 0 22 0 36 10-20 4-34 20-34 38 0 10 8 24 26 24 16 0 38-12 38-40 0-38-40-46-64-46-42 0-66 36-74 52-18-46-56-52-76-52-74 0-114 90-114 108 0 6 5 4 8 6 6 0 8-2 10-8 24-74 70-92 94-92 14 0 38 6 38 48 0 22-12 68-38 166-12 44-36 74-66 74-4 0-20 0-36-10 18-2 34-18 34-38 0-18-16-24-26-24-22 0-40 18-40 40 0 34 36 48 66 48 48 0 72-50 74-54 8 26 34 54 76 54 72 0 112-92 112-108 0-8-6-8-8-8-6 0-8 2-8 8-24 76-72 92-94 92-28 0-38-22-38-46 0-16 4-32 12-62 8-32 16-64 24-96z">
              <text:p/>
            </draw:path>
            <draw:path draw:style-name="gr3" draw:text-style-name="P7" draw:layer="layout" svg:width="0.095cm" svg:height="0.703cm" svg:x="21.271cm" svg:y="7.858cm" svg:viewBox="0 0 96 704" svg:d="M96 0c-32 0-64 0-96 0 0 9 0 19 0 28 23 0 45 0 68 0 0 216 0 432 0 648-23 0-45 0-68 0 0 9 0 18 0 28 32 0 64 0 96 0 0-235 0-469 0-704z">
              <text:p/>
            </draw:path>
            <draw:path draw:style-name="gr3" draw:text-style-name="P7" draw:layer="layout" svg:width="0.161cm" svg:height="0.703cm" svg:x="21.49cm" svg:y="7.858cm" svg:viewBox="0 0 162 704" svg:d="M162 352c0-54-8-140-46-220-42-86-102-132-110-132-4 0-6 4-6 8 0 2 0 4 12 16 70 70 110 182 110 328 0 120-26 244-114 332-8 8-8 10-8 12 0 4 2 8 6 8 8 0 70-48 112-138 36-78 44-154 44-214z">
              <text:p/>
            </draw:path>
            <draw:path draw:style-name="gr3" draw:text-style-name="P7" draw:layer="layout" svg:width="0.215cm" svg:height="0.325cm" svg:x="21.754cm" svg:y="7.77cm" svg:viewBox="0 0 216 326" svg:d="M216 236c-5 0-11 0-16 0-2 10-6 40-12 44-4 4-42 4-50 4-30 0-60 0-90 0 52-46 70-60 98-82 38-30 70-60 70-108 0-58-52-94-114-94s-102 42-102 88c0 24 20 26 26 26 12 0 26-8 26-26 0-8-4-26-30-26 16-34 50-46 72-46 50 0 76 40 76 78 0 44-32 78-48 96-39 39-79 77-118 116-4 4-4 6-4 20 67 0 135 0 202 0 5-30 9-60 14-90z">
              <text:p/>
            </draw:path>
            <draw:path draw:style-name="gr5" draw:text-style-name="P11" draw:layer="layout" svg:width="0.349cm" svg:height="0.639cm" svg:x="22.076cm" svg:y="7.89cm" svg:viewBox="0 0 350 640" svg:d="M220 214c20 0 40 0 60 0 14 0 22 0 22-14 0-8-8-8-20-8-19 0-39 0-58 0 5-27 9-53 14-80 4-14 14-64 18-72 6-14 18-24 32-24 4 0 22 0 36 12-32 4-38 28-38 38 0 16 12 24 26 24 18 0 38-14 38-42 0-32-32-48-62-48-24 0-68 12-88 82-4 16-6 22-24 110-16 0-32 0-48 0-14 0-22 0-22 14 0 8 6 8 20 8 15 0 31 0 46 0-17 93-35 185-52 278-12 68-24 132-62 132-2 0-20 0-32-12 32-2 38-28 38-38 0-16-12-24-26-24-18 0-38 14-38 42 0 30 30 48 58 48 40 0 68-42 80-68 22-44 38-130 40-134 14-75 28-149 42-224z">
              <text:p/>
            </draw:path>
            <draw:path draw:style-name="gr5" draw:text-style-name="P11" draw:layer="layout" svg:width="0.161cm" svg:height="0.703cm" svg:x="22.528cm" svg:y="7.858cm" svg:viewBox="0 0 162 704" svg:d="M162 696c0-2 0-4-12-16-88-88-110-220-110-328 0-122 26-244 114-332 8-8 8-10 8-12 0-6-2-8-6-8-8 0-72 48-112 138-36 76-44 154-44 214 0 54 6 140 46 220 42 86 102 132 110 132 4 0 6-2 6-8z">
              <text:p/>
            </draw:path>
            <draw:path draw:style-name="gr5" draw:text-style-name="P11" draw:layer="layout" svg:width="0.349cm" svg:height="0.317cm" svg:x="22.752cm" svg:y="8.076cm" svg:viewBox="0 0 350 318" svg:d="M214 98c4-18 20-84 70-84 2 0 20 0 34 10-20 4-34 20-34 38 0 10 8 24 28 24 14 0 38-12 38-40 0-38-42-46-66-46-40 0-66 36-74 52-18-46-56-52-76-52-72 0-112 90-112 108 0 6 6 6 8 6 6 0 8-2 8-8 24-74 70-92 94-92 14 0 38 6 38 48 0 22-12 68-38 166-10 44-36 74-66 74-4 0-20 0-36-10 18-2 34-18 34-38 0-18-16-24-26-24-22 0-38 18-38 40 0 34 34 48 66 48 46 0 70-50 74-54 8 26 32 54 74 54 74 0 114-92 114-108 0-8-6-8-8-8-8 0-8 2-10 8-24 76-72 92-94 92-28 0-38-22-38-46 0-16 4-32 12-62 8-32 16-64 24-96z">
              <text:p/>
            </draw:path>
            <draw:path draw:style-name="gr5" draw:text-style-name="P11" draw:layer="layout" svg:width="0.163cm" svg:height="0.703cm" svg:x="23.172cm" svg:y="7.858cm" svg:viewBox="0 0 164 704" svg:d="M164 352c0-54-8-140-46-220-42-86-104-132-110-132-4 0-8 4-8 8 0 2 0 4 14 16 68 70 108 182 108 328 0 120-26 244-112 332-10 8-10 10-10 12 0 4 4 8 8 8 6 0 70-48 112-138 36-78 44-154 44-214z">
              <text:p/>
            </draw:path>
            <draw:path draw:style-name="gr5" draw:text-style-name="P11" draw:layer="layout" svg:width="0.333cm" svg:height="0.495cm" svg:x="23.434cm" svg:y="7.898cm" svg:viewBox="0 0 334 496" svg:d="M334 8c-3-3 0-8-8-8-12 0-78 6-90 8-6 0-10 4-10 14 0 8 6 8 18 8 32 0 34 4 34 12-1 5-1 9-2 14-14 55-28 111-42 166-12-26-34-44-64-44-82 0-170 102-170 204 0 66 38 114 94 114 14 0 48-4 90-54 6 30 30 54 64 54 26 0 42-16 52-40 12-24 15-46 22-68 0-8-6-8-8-8-8 0-8 2-10 12-12 46-26 88-54 88-18 0-20-18-20-32 0-18 0-22 4-34 33-135 67-271 100-406zM188 404c-4 12-4 14-14 26-30 38-60 50-80 50-34 0-44-38-44-66 0-36 22-122 38-154 22-42 54-68 82-68 46 0 56 58 56 62s-2 8-2 12c-12 46-24 92-36 138z">
              <text:p/>
            </draw:path>
            <draw:path draw:style-name="gr5" draw:text-style-name="P11" draw:layer="layout" svg:width="0.349cm" svg:height="0.317cm" svg:x="23.792cm" svg:y="8.076cm" svg:viewBox="0 0 350 318" svg:d="M214 98c4-18 20-84 70-84 4 0 20 0 36 10-20 4-34 20-34 38 0 10 8 24 26 24 16 0 38-12 38-40 0-38-42-46-66-46-40 0-64 36-74 52-16-46-54-52-76-52-72 0-112 90-112 108 0 6 6 6 8 6 6 0 8-2 10-8 24-74 70-92 94-92 12 0 38 6 38 48 0 22-12 68-38 166-12 44-36 74-68 74-4 0-20 0-34-10 18-2 32-18 32-38 0-18-14-24-26-24-20 0-38 18-38 40 0 34 36 48 66 48 46 0 72-50 74-54 8 26 34 54 76 54 72 0 112-92 112-108 0-8-6-8-8-8-6 0-8 2-10 8-22 76-70 92-92 92-28 0-40-22-40-46 0-16 4-32 12-62 8-32 16-64 24-96z">
              <text:p/>
            </draw:path>
            <draw:path draw:style-name="gr3" draw:text-style-name="P7" draw:layer="layout" svg:width="0.465cm" svg:height="0.163cm" svg:x="16.021cm" svg:y="9.713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7" draw:layer="layout" svg:width="0.437cm" svg:height="0.479cm" svg:x="17.241cm" svg:y="9.491cm" svg:viewBox="0 0 438 480" svg:d="M172 244c18 0 50 0 76 16 34 20 36 58 36 62 0 10 0 20 12 20s12-10 12-22c0-63 0-127 0-190 0-12 0-24-12-24s-12 12-12 16c-4 92-76 96-112 98 0-50 0-100 0-150 0-46 12-46 30-46 11 0 23 0 34 0 94 0 142 48 146 96 0 6 2 16 12 16 12 0 12-10 12-22 0-31 0-61 0-92 0-22-2-22-22-22-120 0-240 0-360 0-14 0-24 0-24 12s12 12 18 12c40 0 44 6 44 40 0 117 0 235 0 352 0 32-2 40-40 40-10 0-22 0-22 12s10 12 24 12c124 0 248 0 372 0 14 0 20 0 22-10 7-41 20-118 20-122 0-6-6-12-12-12-10 0-8 6-12 10-4 18-12 48-62 78-38 22-72 32-112 32-13 0-25 0-38 0-18 0-30 0-30-48 0-55 0-109 0-164zM382 24c0 11 0 23 0 34-12-14-26-26-40-34 13 0 27 0 40 0zM244 230c12-6 28-16 40-30 0 19 0 39 0 58-16-18-38-28-40-28zM86 62c0-8 0-26-6-38 25 0 49 0 74 0-8 16-8 40-8 46 0 113 0 227 0 340 0 26 6 40 8 46-25 0-49 0-74 0 6-12 6-30 6-38 0-119 0-237 0-356zM348 456c22-12 40-26 54-40 0 4-4 34-6 40-16 0-32 0-48 0z">
              <text:p/>
            </draw:path>
            <draw:path draw:style-name="gr3" draw:text-style-name="P7" draw:layer="layout" svg:width="0.097cm" svg:height="0.701cm" svg:x="17.781cm" svg:y="9.445cm" svg:viewBox="0 0 98 702" svg:d="M98 702c0-10 0-19 0-28-23 0-45 0-68 0 0-216 0-431 0-646 23 0 45 0 68 0 0-9 0-19 0-28-33 0-65 0-98 0 0 234 0 468 0 702 33 0 65 0 98 0z">
              <text:p/>
            </draw:path>
            <draw:path draw:style-name="gr3" draw:text-style-name="P7" draw:layer="layout" svg:width="0.579cm" svg:height="0.479cm" svg:x="17.913cm" svg:y="9.491cm" svg:viewBox="0 0 580 480" svg:d="M322 192c-19-47-39-93-58-140-4-6-4-8-4-10 0-4 12-16 42-20 6 0 14-2 14-14 0-8-10-8-12-8-28 0-58 2-88 2-18 0-62-2-78-2-4 0-14 0-14 14 0 8 8 8 16 8 42 0 48 8 54 22 27 65 55 131 82 196-49 53-99 106-148 160-3 2-7 5-10 8-34 38-66 48-102 50-10 2-16 2-16 14 0 2 0 8 10 8 20 0 44-2 66-2 26 0 52 2 78 2 4 0 12 0 12-14 0-6-6-8-8-8-6 0-28-2-28-22 0-10 10-22 20-30 23-26 47-51 70-76 21-23 43-47 64-70 24 56 48 112 72 168 2 8 2 8 2 10 0 6-12 18-40 20-8 2-14 2-14 14 0 8 8 8 10 8 20 0 70-2 88-2s62 2 78 2c6 0 14 0 14-12 0-10-6-10-12-10-48 0-48-2-60-30-28-66-76-176-92-218 48-48 122-132 144-152 20-16 48-34 90-36 8 0 16 0 16-14-3-3 0-8-10-8-20 0-44 2-66 2-26 0-52-2-78-2-4 0-14 0-14 14 0 6 4 8 10 8s28 2 28 22c0 10-8 20-14 26-38 41-76 81-114 122z">
              <text:p/>
            </draw:path>
            <draw:path draw:style-name="gr3" draw:text-style-name="P7" draw:layer="layout" svg:width="0.217cm" svg:height="0.325cm" svg:x="18.563cm" svg:y="9.355cm" svg:viewBox="0 0 218 326" svg:d="M218 236c-6 0-12 0-18 0-2 12-6 40-12 46-4 2-42 2-50 2-30 0-60 0-90 0 52-46 70-60 98-82 38-30 72-60 72-106 0-60-54-96-116-96s-102 42-102 88c0 24 20 28 26 28 12 0 26-10 26-26 0-10-4-26-30-26 16-36 50-46 72-46 50 0 76 38 76 78 0 42-32 76-46 94-40 39-80 79-120 118-4 4-4 4-4 18 67 0 135 0 202 0 5-30 11-60 16-90z">
              <text:p/>
            </draw:path>
            <draw:path draw:style-name="gr3" draw:text-style-name="P7" draw:layer="layout" svg:width="0.095cm" svg:height="0.701cm" svg:x="18.863cm" svg:y="9.445cm" svg:viewBox="0 0 96 702" svg:d="M96 0c-32 0-64 0-96 0 0 9 0 19 0 28 23 0 45 0 68 0 0 215 0 430 0 646-23 0-45 0-68 0 0 9 0 18 0 28 32 0 64 0 96 0 0-234 0-468 0-702z">
              <text:p/>
            </draw:path>
            <draw:path draw:style-name="gr3" draw:text-style-name="P7" draw:layer="layout" svg:width="0.429cm" svg:height="0.027cm" svg:x="19.257cm" svg:y="9.781cm" svg:viewBox="0 0 430 28" svg:d="M404 28c12 0 26 0 26-14s-14-14-26-14c-127 0-253 0-380 0-12 0-24 0-24 14s12 14 24 14c127 0 253 0 380 0z">
              <text:p/>
            </draw:path>
            <draw:path draw:style-name="gr3" draw:text-style-name="P7" draw:layer="layout" svg:width="0.161cm" svg:height="0.701cm" svg:x="19.971cm" svg:y="9.445cm" svg:viewBox="0 0 162 702" svg:d="M162 694c0-2 0-2-12-14-88-90-110-222-110-330 0-122 28-244 114-332 8-8 8-10 8-12 0-4-2-6-6-6-8 0-70 48-112 136-36 78-44 156-44 214 0 56 8 140 46 220 42 86 102 132 110 132 4 0 6-2 6-8z">
              <text:p/>
            </draw:path>
            <draw:path draw:style-name="gr3" draw:text-style-name="P7" draw:layer="layout" svg:width="0.437cm" svg:height="0.479cm" svg:x="20.185cm" svg:y="9.491cm" svg:viewBox="0 0 438 480" svg:d="M172 244c18 0 50 0 76 16 34 20 36 58 36 62 0 10 0 20 12 20s12-10 12-22c0-63 0-127 0-190 0-12 0-24-12-24s-12 12-12 16c-4 92-76 96-112 98 0-50 0-100 0-150 0-46 12-46 30-46 11 0 23 0 34 0 94 0 142 48 146 96 0 6 0 16 12 16s12-10 12-22c0-31 0-61 0-92 0-22-2-22-24-22-119 0-239 0-358 0-14 0-24 0-24 12s12 12 18 12c40 0 44 6 44 40 0 117 0 235 0 352 0 32-2 40-40 40-10 0-22 0-22 12s10 12 24 12c124 0 248 0 372 0 14 0 20 0 22-10 7-41 20-118 20-122 0-6-6-12-12-12-10 0-8 6-12 10-4 18-12 48-62 78-38 22-74 32-112 32-13 0-25 0-38 0-18 0-30 0-30-48 0-55 0-109 0-164zM382 24c0 11 0 23 0 34-12-14-26-26-40-34 13 0 27 0 40 0zM244 230c12-6 28-16 40-30 0 19 0 39 0 58-16-18-38-28-40-28zM86 62c0-8 0-26-6-38 25 0 49 0 74 0-8 16-8 40-8 46 0 113 0 227 0 340 0 26 6 40 8 46-25 0-49 0-74 0 6-12 6-30 6-38 0-119 0-237 0-356zM348 456c22-12 40-26 54-40 0 4-4 34-6 40-16 0-32 0-48 0z">
              <text:p/>
            </draw:path>
            <draw:path draw:style-name="gr3" draw:text-style-name="P7" draw:layer="layout" svg:width="0.097cm" svg:height="0.701cm" svg:x="20.725cm" svg:y="9.445cm" svg:viewBox="0 0 98 702" svg:d="M98 702c0-10 0-19 0-28-23 0-45 0-68 0 0-216 0-431 0-646 23 0 45 0 68 0 0-9 0-19 0-28-33 0-65 0-98 0 0 234 0 468 0 702 33 0 65 0 98 0z">
              <text:p/>
            </draw:path>
            <draw:path draw:style-name="gr3" draw:text-style-name="P7" draw:layer="layout" svg:width="0.579cm" svg:height="0.479cm" svg:x="20.857cm" svg:y="9.491cm" svg:viewBox="0 0 580 480" svg:d="M322 192c-19-47-39-93-58-140-4-6-4-8-4-10 0-4 12-16 40-20 8 0 16-2 16-14 0-8-10-8-12-8-28 0-58 2-88 2-18 0-62-2-78-2-6 0-14 0-14 14 0 8 8 8 16 8 42 0 48 8 54 22 27 65 55 131 82 196-49 53-99 106-148 160-3 2-7 5-10 8-34 38-66 48-102 50-10 2-16 2-16 14 0 2 0 8 10 8 20 0 44-2 66-2 26 0 52 2 78 2 4 0 12 0 12-14 0-6-6-8-8-8-6 0-28-2-28-22 0-10 10-22 20-30 23-26 47-51 70-76 21-23 43-47 64-70 24 56 48 112 72 168 2 8 2 8 2 10 0 6-12 18-40 20-8 2-14 2-14 14 0 8 8 8 10 8 20 0 70-2 88-2s62 2 78 2c6 0 14 0 14-12 0-10-6-10-12-10-48 0-48-2-60-30-28-66-76-176-92-218 48-48 122-132 144-152 20-16 48-34 90-36 8 0 16 0 16-14-3-3 0-8-10-8-20 0-44 2-66 2-26 0-52-2-78-2-4 0-14 0-14 14 0 6 4 8 10 8s28 2 28 22c0 10-8 20-14 26-38 41-76 81-114 122z">
              <text:p/>
            </draw:path>
            <draw:path draw:style-name="gr3" draw:text-style-name="P7" draw:layer="layout" svg:width="0.095cm" svg:height="0.701cm" svg:x="21.49cm" svg:y="9.445cm" svg:viewBox="0 0 96 702" svg:d="M96 0c-32 0-64 0-96 0 0 9 0 19 0 28 23 0 45 0 68 0 0 215 0 430 0 646-23 0-45 0-68 0 0 9 0 18 0 28 32 0 64 0 96 0 0-234 0-468 0-702z">
              <text:p/>
            </draw:path>
            <draw:path draw:style-name="gr3" draw:text-style-name="P7" draw:layer="layout" svg:width="0.161cm" svg:height="0.701cm" svg:x="21.71cm" svg:y="9.445cm" svg:viewBox="0 0 162 702" svg:d="M162 350c0-54-6-140-46-218-42-86-102-132-110-132-4 0-6 2-6 6 0 2 0 4 14 16 68 70 108 182 108 328 0 120-26 244-112 334-10 8-10 8-10 10 0 6 2 8 6 8 8 0 72-48 112-138 36-76 44-154 44-214z">
              <text:p/>
            </draw:path>
            <draw:path draw:style-name="gr3" draw:text-style-name="P7" draw:layer="layout" svg:width="0.217cm" svg:height="0.325cm" svg:x="21.974cm" svg:y="9.355cm" svg:viewBox="0 0 218 326" svg:d="M218 236c-6 0-12 0-18 0 0 12-6 40-12 46-4 2-42 2-48 2-31 0-61 0-92 0 52-46 70-60 100-82 36-30 70-60 70-106 0-60-52-96-116-96-60 0-102 42-102 88 0 24 22 28 26 28 12 0 26-10 26-26 0-10-4-26-28-26 14-36 48-46 72-46 48 0 74 38 74 78 0 42-30 76-46 94-39 39-79 79-118 118-6 4-6 4-6 18 67 0 135 0 202 0 5-30 11-60 16-90z">
              <text:p/>
            </draw:path>
            <draw:path draw:style-name="gr3" draw:text-style-name="P7" draw:layer="layout" svg:width="0.075cm" svg:height="0.073cm" svg:x="22.318cm" svg:y="9.897cm" svg:viewBox="0 0 76 74" svg:d="M76 38c0-22-18-38-38-38s-38 17-38 38 18 36 38 36 38-16 38-36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ercis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1">Lemma</text:span>. Let <text:span text:style-name="T5">X</text:span> <text:span text:style-name="T3">≥ </text:span><text:span text:style-name="T4">0</text:span> be a continuous random variable. Then </text:p>
              </text:list-item>
            </text:list>
          </draw:text-box>
        </draw:frame>
        <draw:g>
          <svg:title>TexMaths</svg:title>
          <svg:desc>24§display§\mathbb{E}[X] = \int_0^{\infty} \Pr[X\geq x] dx.§svg§600§TRUE§</svg:desc>
          <draw:g>
            <draw:path draw:style-name="gr3" draw:text-style-name="P7" draw:layer="layout" svg:width="0.527cm" svg:height="0.574cm" svg:x="7.881cm" svg:y="6.044cm" svg:viewBox="0 0 528 575" svg:d="M206 292c22 0 63 0 92 20 40 26 43 71 43 76 2 12 2 22 17 22 14 0 14-12 14-27 0-75 0-151 0-227 0-15 0-27-14-27-15 0-17 12-17 20-5 107-91 112-135 115 0-59 0-119 0-178 0-57 17-57 36-57 14 0 28 0 41 0 113 0 171 57 175 117 0 5 3 19 15 19 14 0 14-14 14-28 0-37 0-74 0-111 0-24 0-26-26-26-144 0-288 0-432 0-15 0-29 0-29 14 0 15 17 15 22 15 48 0 52 7 52 48 0 140 0 281 0 422 0 40-2 47-48 47-12 0-26 0-26 15 0 14 14 14 29 14 149 0 297 0 446 0 17 0 24 0 26-12 3 0 27-141 27-144 0-9-10-16-15-16-12 0-11 8-16 12-5 21-12 57-75 93-43 26-86 38-134 38-15 0-30 0-46 0-19 0-36 0-36-55 0-66 0-132 0-199zM458 29c0 13 0 27 0 41-14-17-31-29-48-41 16 0 32 0 48 0zM295 276c12-5 31-20 46-36 0 23 0 46 0 69-19-21-31-22-46-33zM103 74c0-9 0-31-7-45 30 0 61 0 91 0-9 19-9 48-9 55 0 136 0 272 0 407 0 32 4 48 9 55-30 0-61 0-91 0 7-14 7-35 7-45 0-142 0-284 0-427zM418 546c26-14 50-31 67-47-3 4-8 40-10 47-19 0-38 0-57 0z">
              <text:p/>
            </draw:path>
            <draw:path draw:style-name="gr3" draw:text-style-name="P7" draw:layer="layout" svg:width="0.114cm" svg:height="0.84cm" svg:x="8.531cm" svg:y="5.989cm" svg:viewBox="0 0 115 841" svg:d="M115 841c0-11 0-22 0-33-27 0-54 0-81 0 0-258 0-516 0-774 27 0 54 0 81 0 0-12 0-23 0-34-38 0-77 0-115 0 0 280 0 561 0 841 38 0 77 0 115 0z">
              <text:p/>
            </draw:path>
            <draw:path draw:style-name="gr3" draw:text-style-name="P7" draw:layer="layout" svg:width="0.695cm" svg:height="0.572cm" svg:x="8.687cm" svg:y="6.046cm" svg:viewBox="0 0 696 573" svg:d="M386 228c-23-56-46-112-69-168-3-7-3-6-5-10 0-4 14-21 50-26 8 0 17 0 17-14 0-10-12-10-14-10-34 0-70 2-106 2-21 0-72-2-93-2-5 0-17 0-17 17 0 7 9 7 21 7 51 0 56 10 63 29 33 78 65 156 98 235-59 63-118 126-177 189-4 3-7 6-10 10-43 45-82 57-125 59-12 3-19 3-19 17 0 3 0 10 12 10 24 0 53-3 79-3 31 0 65 3 94 3 5 0 17 0 17-17 0-7-10-10-12-10-8 0-34-2-34-23 0-15 14-29 24-39 29-30 58-61 86-91 25-28 50-56 75-84 29 67 57 134 86 202 3 9 2 8 3 12 0 7-15 21-48 23-10 3-17 3-17 17 0 10 9 10 12 10 24 0 84-3 108-3 19 0 72 3 93 3 5 0 15 0 15-15 0-12-8-12-15-12-57 0-57-2-72-35-33-80-88-209-110-259 58-60 146-161 173-185 26-19 57-38 108-43 12 0 19 0 19-17-4-2 0-7-12-7-24 0-53 2-79 2-32 0-63-2-94-2-5 0-14 0-14 17 0 5 2 7 9 7 7 2 34 5 34 26 0 12-10 24-17 31-46 49-91 98-137 147z">
              <text:p/>
            </draw:path>
            <draw:path draw:style-name="gr3" draw:text-style-name="P7" draw:layer="layout" svg:width="0.114cm" svg:height="0.84cm" svg:x="9.448cm" svg:y="5.989cm" svg:viewBox="0 0 115 841" svg:d="M115 0c-38 0-77 0-115 0 0 11 0 22 0 34 27 0 54 0 82 0 0 258 0 516 0 774-28 0-55 0-82 0 0 11 0 22 0 33 38 0 77 0 115 0 0-280 0-561 0-841z">
              <text:p/>
            </draw:path>
            <draw:path draw:style-name="gr3" draw:text-style-name="P7" draw:layer="layout" svg:width="0.56cm" svg:height="0.198cm" svg:x="9.945cm" svg:y="6.31cm" svg:viewBox="0 0 561 199" svg:d="M533 36c12 0 28 1 28-17s-16-19-28-19c-168 0-336 0-504 0-12 0-29 1-29 19s17 17 29 17c168 0 336 0 504 0zM533 199c12 0 28 0 28-17s-16-17-28-17c-168 0-336 0-504 0-12 0-29 0-29 17s17 17 29 17c168 0 336 0 504 0z">
              <text:p/>
            </draw:path>
            <draw:path draw:style-name="gr3" draw:text-style-name="P7" draw:layer="layout" svg:width="0.748cm" svg:height="1.866cm" svg:x="10.835cm" svg:y="5.476cm" svg:viewBox="0 0 749 1867" svg:d="M41 1831c26-2 41-21 41-43 0-26-22-41-41-41s-41 15-41 43c0 44 43 77 94 77 129 0 177-196 237-438 65-267 118-535 163-806 31-180 63-347 91-455 12-41 41-151 72-151 27 0 48 17 51 19-27 2-41 22-41 43 0 26 22 41 41 41s41-12 41-43c0-46-46-77-92-77-64 0-112 91-158 261-2 10-117 432-211 983-22 129-46 268-74 386-15 62-53 220-123 220-29 0-33-12-50-19z">
              <text:p/>
            </draw:path>
            <draw:path draw:style-name="gr3" draw:text-style-name="P7" draw:layer="layout" svg:width="0.58cm" svg:height="0.265cm" svg:x="11.677cm" svg:y="5.423cm" svg:viewBox="0 0 581 266" svg:d="M295 98c-31-36-41-45-62-62-36-26-75-36-108-36-72 0-125 62-125 134 0 67 50 132 125 132 81 0 139-67 161-98 31 36 40 45 62 62 36 26 74 36 106 36 74 0 127-62 127-134 0-67-51-132-125-132-82 0-139 67-161 98zM314 120c24-39 75-98 147-98 60 0 103 54 103 110s-46 100-101 100-93-43-149-112zM266 146c-24 39-76 96-148 96-60 0-101-51-101-108 0-56 45-100 98-100 55 0 94 43 151 112z">
              <text:p/>
            </draw:path>
            <draw:path draw:style-name="gr3" draw:text-style-name="P7" draw:layer="layout" svg:width="0.275cm" svg:height="0.402cm" svg:x="11.286cm" svg:y="6.995cm" svg:viewBox="0 0 276 403" svg:d="M276 204c0-65-10-113-36-154-19-26-55-50-101-50-139 0-139 162-139 204s1 199 139 199 137-159 137-199zM139 386c-29 0-65-17-77-65-7-33-7-81-7-124 0-44 0-89 10-123 12-45 48-57 74-57 31 0 63 19 72 53 10 31 10 74 10 127 0 43 0 86-7 122-12 55-53 67-75 67z">
              <text:p/>
            </draw:path>
            <draw:path draw:style-name="gr3" draw:text-style-name="P7" draw:layer="layout" svg:width="0.496cm" svg:height="0.572cm" svg:x="12.514cm" svg:y="6.046cm" svg:viewBox="0 0 497 573" svg:d="M163 307c47 0 95 0 142 0 101 0 192-67 192-151s-82-156-199-156c-100 0-199 0-298 0 0 8 0 16 0 24 7 0 14 0 22 0 64 0 67 10 67 41 0 148 0 295 0 443 0 31-3 38-67 38-8 0-15 0-22 0 0 9 0 18 0 27 31-3 94-3 125-3s96 0 125 3c0-9 0-18 0-27-7 0-13 0-20 0-64 0-67-7-67-38 0-67 0-134 0-201zM161 285c0-75 0-150 0-225 0-29 0-36 41-36 24 0 49 0 74 0 134 0 134 91 134 132 0 38 0 129-134 129-38 0-77 0-115 0z">
              <text:p/>
            </draw:path>
            <draw:path draw:style-name="gr3" draw:text-style-name="P7" draw:layer="layout" svg:width="0.282cm" svg:height="0.371cm" svg:x="13.083cm" svg:y="6.248cm" svg:viewBox="0 0 283 372" svg:d="M118 93c0-31 0-62 0-93-40 3-79 6-118 10 0 8 0 17 0 26 60 0 65 5 65 48 0 75 0 150 0 225 0 36-7 36-65 36 0 9 0 18 0 27 34 0 72-3 96-3 34 0 74 0 108 3 0-9 0-18 0-27-6 0-13 0-19 0-63 0-63-7-63-38 0-43 0-86 0-130 0-84 34-158 99-158 7 0 7 0 9 0-2 3-19 12-19 34 0 24 17 36 36 36 15 0 36-9 36-36 0-28-26-53-62-53-63 0-91 58-103 93z">
              <text:p/>
            </draw:path>
            <draw:path draw:style-name="gr3" draw:text-style-name="P7" draw:layer="layout" svg:width="0.114cm" svg:height="0.84cm" svg:x="13.489cm" svg:y="5.989cm" svg:viewBox="0 0 115 841" svg:d="M115 841c0-11 0-22 0-33-27 0-54 0-81 0 0-258 0-516 0-774 27 0 54 0 81 0 0-12 0-23 0-34-38 0-77 0-115 0 0 280 0 561 0 841 38 0 77 0 115 0z">
              <text:p/>
            </draw:path>
            <draw:path draw:style-name="gr3" draw:text-style-name="P7" draw:layer="layout" svg:width="0.692cm" svg:height="0.572cm" svg:x="13.647cm" svg:y="6.046cm" svg:viewBox="0 0 693 573" svg:d="M386 228c-24-56-48-112-72-168-2-7-1-6-2-10 0-4 12-21 48-26 10 0 17 0 17-14 0-10-10-10-12-10-34 0-72 2-106 2-21 0-74-2-96-2-5 0-14 0-14 17 0 7 9 7 19 7 50 0 55 10 62 29 34 78 68 156 101 235-59 63-118 126-177 189-4 3-8 6-12 10-41 45-80 57-123 59-12 3-19 3-19 17 0 3 0 10 10 10 26 0 55-3 79-3 31 0 65 3 96 3 5 0 14 0 14-17 0-7-7-10-9-10-8 0-34-2-34-23 0-15 12-29 22-39 28-30 57-61 86-91 26-28 51-56 77-84 28 67 56 134 84 202 5 9 3 8 5 12 0 7-17 21-48 23-10 3-17 3-17 17 0 10 9 10 12 10 24 0 81-3 105-3 22 0 72 3 94 3 7 0 17 0 17-15 0-12-10-12-15-12-57 0-60-2-74-35-31-80-89-209-108-259 58-60 146-161 173-185 24-19 57-38 108-43 9 0 16 0 16-17-3-2 0-7-9-7-27 0-53 2-79 2-32 0-65-2-94-2-5 0-17 0-17 17 0 5 5 7 10 7 7 2 33 5 33 26 0 12-7 24-14 31-46 49-91 98-137 147z">
              <text:p/>
            </draw:path>
            <draw:path draw:style-name="gr3" draw:text-style-name="P7" draw:layer="layout" svg:width="0.512cm" svg:height="0.649cm" svg:x="14.693cm" svg:y="6.085cm" svg:viewBox="0 0 513 650" svg:d="M497 264c12-8 16-12 16-20 0-9-2-14-16-19-155-72-309-145-463-218-12-7-15-7-17-7-10 0-17 7-17 17 0 9 7 14 14 19 148 69 296 139 444 208-147 69-294 138-441 207-17 7-17 14-17 19 0 9 7 17 17 17 2 0 5 0 14-5 155-73 311-146 466-218zM485 650c14 0 28 0 28-17s-16-17-28-17c-152 0-304 0-456 0-12 0-29 0-29 17s14 17 29 17c152 0 304 0 456 0z">
              <text:p/>
            </draw:path>
            <draw:path draw:style-name="gr3" draw:text-style-name="P7" draw:layer="layout" svg:width="0.419cm" svg:height="0.38cm" svg:x="15.538cm" svg:y="6.248cm" svg:viewBox="0 0 420 381" svg:d="M257 117c5-21 24-98 84-98 2 0 24 0 41 10-24 5-41 26-41 45 0 15 9 31 33 31 17 0 46-16 46-50 0-43-50-55-79-55-48 0-79 46-89 65-22-55-67-65-91-65-87 0-135 108-135 129 0 10 8 10 10 10 7 0 10-2 10-10 28-88 84-110 112-110 17 0 46 7 46 55 0 27-14 84-46 202-12 52-40 86-79 86-5 0-24 0-43-10 22-4 41-21 41-45s-19-29-31-29c-27 0-46 22-46 48 0 38 41 55 79 55 55 0 87-57 89-65 10 32 38 65 91 65 87 0 135-108 135-129 0-8-8-8-10-8-10 0-10 3-12 8-29 91-86 110-113 110-31 0-45-26-45-55 0-17 4-36 14-75 10-38 19-76 29-115z">
              <text:p/>
            </draw:path>
            <draw:path draw:style-name="gr3" draw:text-style-name="P7" draw:layer="layout" svg:width="0.114cm" svg:height="0.84cm" svg:x="16.013cm" svg:y="5.989cm" svg:viewBox="0 0 115 841" svg:d="M115 0c-38 0-77 0-115 0 0 11 0 22 0 34 27 0 54 0 82 0 0 258 0 516 0 774-28 0-55 0-82 0 0 11 0 22 0 33 38 0 77 0 115 0 0-280 0-561 0-841z">
              <text:p/>
            </draw:path>
            <draw:path draw:style-name="gr3" draw:text-style-name="P7" draw:layer="layout" svg:width="0.4cm" svg:height="0.591cm" svg:x="16.262cm" svg:y="6.037cm" svg:viewBox="0 0 401 592" svg:d="M401 10c0-3 0-10-10-10-14 0-93 7-108 10-7 0-12 4-12 14s7 10 19 10c41 0 44 7 44 14-1 6-2 11-3 17-17 67-33 134-50 201-15-31-41-55-77-55-101 0-204 125-204 247 0 79 46 134 113 134 17 0 57-2 108-62 7 36 36 62 77 62 31 0 50-19 62-46 14-31 26-81 26-83 0-8-7-8-9-8-10 0-10 3-12 15-15 55-31 103-65 103-22 0-26-22-26-39 0-19 2-26 7-40 40-162 80-323 120-484zM226 484c-5 15-5 17-17 31-36 46-72 58-96 58-41 0-53-46-53-79 0-41 26-144 46-182 26-51 64-82 98-82 55 0 67 70 67 74 0 5-2 10-2 15-15 55-29 110-43 165z">
              <text:p/>
            </draw:path>
            <draw:path draw:style-name="gr3" draw:text-style-name="P7" draw:layer="layout" svg:width="0.419cm" svg:height="0.38cm" svg:x="16.692cm" svg:y="6.248cm" svg:viewBox="0 0 420 381" svg:d="M257 117c5-21 24-98 84-98 5 0 24 0 41 10-22 5-39 26-39 45 0 15 7 31 31 31 20 0 46-16 46-50 0-43-50-55-79-55-48 0-77 46-89 65-19-55-65-65-91-65-87 0-135 108-135 129 0 10 8 10 10 10 7 0 10-2 12-10 29-88 84-110 113-110 14 0 45 7 45 55 0 27-14 84-45 202-15 52-43 86-82 86-5 0-24 0-41-10 22-4 39-21 39-45s-17-29-31-29c-24 0-46 22-46 48 0 38 41 55 79 55 55 0 87-57 89-65 10 32 41 65 91 65 87 0 135-108 135-129 0-8-8-8-10-8-7 0-10 3-12 8-26 91-84 110-113 110-31 0-45-26-45-55 0-17 4-36 14-75 10-38 19-76 29-115z">
              <text:p/>
            </draw:path>
            <draw:path draw:style-name="gr3" draw:text-style-name="P7" draw:layer="layout" svg:width="0.088cm" svg:height="0.088cm" svg:x="17.222cm" svg:y="6.53cm" svg:viewBox="0 0 89 89" svg:d="M89 46c0-24-21-46-46-46s-43 22-43 46 18 43 43 43 46-19 46-43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ercise</text:p>
          </draw:text-box>
        </draw:frame>
        <draw:g>
          <svg:title>TexMaths</svg:title>
          <svg:desc>20§latex§\begin{eqnarray*}
\mathbb{E}[X] &amp;=&amp; \int_0^{\infty}\textcolor{blue}{y}\cdot f(y)dy\\
&amp;=&amp; \int_{y=0}^{\infty} f(y)\textcolor{blue}{\int_{x=0}^y dx} dy\\
&amp;=&amp;\int_{\textcolor{red}{x=0}}^{\infty}\int_{\textcolor{red}{y=x}}^{\infty} f(y) dy dx\\
&amp;=&amp; \int_{x=0}^{\infty} (1-F(x)) dx\\
&amp;=&amp; \int_{x=0}^{\infty} \Pr[X\geq x] dx.
\end{eqnarray*}§svg§600§FALSE§</svg:desc>
          <draw:g>
            <draw:path draw:style-name="gr6" draw:text-style-name="P12" draw:layer="layout" svg:width="9.349cm" svg:height="9.431cm" svg:x="4.026cm" svg:y="4.23cm" svg:viewBox="0 0 9350 9432" svg:d="M0 0c3117 0 6233 0 9350 0 0 3144 0 6288 0 9432-3117 0-6233 0-9350 0 0-3144 0-6288 0-9432z">
              <text:p/>
            </draw:path>
            <draw:path draw:style-name="gr3" draw:text-style-name="P7" draw:layer="layout" svg:width="0.439cm" svg:height="0.481cm" svg:x="4cm" svg:y="4.712cm" svg:viewBox="0 0 440 482" svg:d="M172 246c18 0 52 0 76 14 34 22 36 60 36 64 2 10 2 20 14 20s12-10 12-24c0-63 0-127 0-190 0-10 0-22-12-22s-14 10-14 16c-4 90-76 96-112 96 0-49 0-99 0-148 0-48 14-48 30-48 11 0 23 0 34 0 94 0 142 50 146 98 0 6 2 16 12 16 12 0 12-12 12-24 0-30 0-60 0-90 0-22 0-24-22-24-120 0-240 0-360 0-12 0-24 0-24 14 0 10 14 10 18 10 40 0 44 6 44 42 0 117 0 235 0 352 0 32-2 40-40 40-10 0-22 0-22 12s12 12 24 12c124 0 248 0 372 0 14 0 20 0 22-10 2 0 22-118 22-122 0-8-8-12-12-12-10 0-14 8-14 10-4 18-10 48-62 78-36 22-72 32-112 32-13 0-25 0-38 0-16 0-30 0-30-48 0-55 0-109 0-164zM382 24c0 11 0 23 0 34-12-12-26-24-40-34 13 0 27 0 40 0zM246 230c10-4 26-14 38-30 0 20 0 40 0 60-16-20-25-19-38-28 0-1 0-1 0-2zM86 64c0-8 0-26-6-40 25 0 51 0 76 0-8 18-8 40-8 46 0 114 0 228 0 342 0 24 4 38 8 46-25 0-51 0-76 0 6-14 6-30 6-40 0-118 0-236 0-354zM348 458c0-1 0-1 0-2 22-10 42-26 56-38-2 2-6 34-8 40-16 0-32 0-48 0z">
              <text:p/>
            </draw:path>
            <draw:path draw:style-name="gr3" draw:text-style-name="P7" draw:layer="layout" svg:width="0.095cm" svg:height="0.703cm" svg:x="4.542cm" svg:y="4.666cm" svg:viewBox="0 0 96 704" svg:d="M96 704c0-9 0-19 0-28-23 0-45 0-68 0 0-216 0-432 0-648 23 0 45 0 68 0 0-9 0-19 0-28-32 0-64 0-96 0 0 235 0 469 0 704 32 0 64 0 96 0z">
              <text:p/>
            </draw:path>
            <draw:path draw:style-name="gr3" draw:text-style-name="P7" draw:layer="layout" svg:width="0.579cm" svg:height="0.479cm" svg:x="4.672cm" svg:y="4.714cm" svg:viewBox="0 0 580 480" svg:d="M322 190c-19-46-39-92-58-138-2-6-3-7-4-10 0-4 12-18 42-20 6-2 14-2 14-14 0-8-8-8-12-8-28 0-58 2-88 2-18 0-60-2-78-2-4 0-12 0-12 14 0 8 6 8 16 8 42 0 46 6 52 22 27 65 55 131 82 196-49 53-99 107-148 160-3 3-5 5-8 8-36 36-68 48-104 50-10 0-16 0-16 14 3 3 0 8 10 8 20 0 44-2 66-2 26 0 54 2 78 2 4 0 14 0 14-14 0-8-8-8-10-8-6 0-28-2-28-22 0-10 12-22 20-32 24-25 48-51 72-76 21-23 41-45 62-68 24 56 48 112 72 168 2 8 4 8 4 10 0 6-14 18-42 20-8 0-14 2-14 14 0 8 8 8 10 8 20 0 70-2 90-2 16 0 60 2 78 2 4 0 12 0 12-14 0-8-6-8-12-8-48 0-48-2-60-30-28-66-74-176-92-218 48-50 122-132 144-152 22-18 48-34 90-36 10-2 16-2 16-14 0-2 0-8-10-8-20 0-44 2-66 2-26 0-52-2-78-2-4 0-12 0-12 14 0 4 2 6 8 8 6 0 28 2 28 22 0 10-8 18-14 24-38 41-76 81-114 122z">
              <text:p/>
            </draw:path>
            <draw:path draw:style-name="gr3" draw:text-style-name="P7" draw:layer="layout" svg:width="0.095cm" svg:height="0.703cm" svg:x="5.306cm" svg:y="4.666cm" svg:viewBox="0 0 96 704" svg:d="M96 0c-32 0-64 0-96 0 0 9 0 19 0 28 23 0 45 0 68 0 0 216 0 432 0 648-23 0-45 0-68 0 0 9 0 19 0 28 32 0 64 0 96 0 0-235 0-469 0-704z">
              <text:p/>
            </draw:path>
            <draw:path draw:style-name="gr3" draw:text-style-name="P7" draw:layer="layout" svg:width="0.467cm" svg:height="0.163cm" svg:x="6.228cm" svg:y="4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621cm" svg:height="1.559cm" svg:x="7.477cm" svg:y="4.238cm" svg:viewBox="0 0 622 1560" svg:d="M34 1530c22-2 34-18 34-36 0-22-18-34-34-34s-34 10-34 36c0 36 34 64 78 64 106 0 146-164 196-368 54-222 100-446 138-672 26-150 52-290 76-380 8-34 32-126 60-126 22 0 40 14 42 16-24 2-36 18-36 36 0 22 18 34 34 34 18 0 34-10 34-36 0-38-38-64-76-64-54 0-92 76-132 220-2 6-96 360-174 820-18 106-38 224-62 322-12 52-44 184-102 184-26 0-28-11-42-16z">
              <text:p/>
            </draw:path>
            <draw:path draw:style-name="gr3" draw:text-style-name="P7" draw:layer="layout" svg:width="0.483cm" svg:height="0.221cm" svg:x="8.177cm" svg:y="4.194cm" svg:viewBox="0 0 484 222" svg:d="M248 82c-26-30-34-38-54-52-30-22-60-30-88-30-60 0-106 52-106 112 0 56 44 110 104 110 68 0 116-56 134-82 26 30 34 38 54 52 30 22 60 30 88 30 60 0 104-52 104-112 0-56-42-110-102-110-70 0-118 56-134 82zM264 100c18-32 62-82 122-82 50 0 86 45 86 92s-40 84-84 84c-46 0-78-36-124-94zM222 122c-20 32-62 82-122 82-50 0-86-45-86-92s38-84 84-84 78 36 124 94z">
              <text:p/>
            </draw:path>
            <draw:path draw:style-name="gr3" draw:text-style-name="P7" draw:layer="layout" svg:width="0.227cm" svg:height="0.335cm" svg:x="7.853cm" svg:y="5.508cm" svg:viewBox="0 0 228 336" svg:d="M228 170c0-54-6-94-28-128-16-22-46-42-86-42-114 0-114 135-114 170s0 166 114 166 114-132 114-166zM114 322c-22 0-52-14-62-54-8-28-8-68-8-106 0-36 0-72 8-100 10-38 42-48 62-48 26 0 52 16 62 44 8 26 8 62 8 104 0 38 0 74-6 104-10 46-44 56-64 56z">
              <text:p/>
            </draw:path>
            <draw:path draw:style-name="gr5" draw:text-style-name="P11" draw:layer="layout" svg:width="0.323cm" svg:height="0.453cm" svg:x="8.873cm" svg:y="4.884cm" svg:viewBox="0 0 324 454" svg:d="M320 42c4-10 4-12 4-16 0-12-10-20-20-20-8 0-18 6-26 16 0 4-6 24-10 38-4 18-8 36-14 56-10 42-20 84-30 126-4 10-34 60-80 60-36 0-44-30-44-56 0-34 12-76 36-138 12-30 14-38 14-52 0-30-22-56-58-56-66 0-92 102-92 108s6 6 8 6c8 0 8 0 12-12 18-66 46-88 70-88 6 0 18 0 18 24 0 16-8 34-12 48-28 74-40 114-40 148 0 62 44 84 86 84 26 0 50-12 70-32-10 36-18 70-46 108-18 24-44 44-76 44-10 0-42-2-54-30 10 0 20 0 30-8 6-6 14-14 14-28 0-22-20-24-26-24-16 0-40 10-40 44 0 36 32 62 76 62 72 0 144-64 164-144 22-89 44-179 66-268z">
              <text:p/>
            </draw:path>
            <draw:path draw:style-name="gr3" draw:text-style-name="P7" draw:layer="layout" svg:width="0.073cm" svg:height="0.075cm" svg:x="9.439cm" svg:y="4.98cm" svg:viewBox="0 0 74 76" svg:d="M74 38c0-20-15-38-36-38s-38 18-38 38 17 38 38 38 36-18 36-38z">
              <text:p/>
            </draw:path>
            <draw:path draw:style-name="gr3" draw:text-style-name="P7" draw:layer="layout" svg:width="0.349cm" svg:height="0.639cm" svg:x="9.767cm" svg:y="4.698cm" svg:viewBox="0 0 350 640" svg:d="M220 214c21 0 41 0 62 0 14 0 20 0 20-14 0-8-6-8-18-8-20 0-40 0-60 0 5-27 11-53 16-80 2-14 12-64 16-72 6-14 18-24 34-24 2 0 20 0 34 12-32 4-38 28-38 38 0 16 12 26 26 26 18 0 38-16 38-44 0-32-32-48-60-48-24 0-68 12-90 82-4 16-6 22-22 110-17 0-33 0-50 0-12 0-20 0-20 14 0 8 6 8 20 8 15 0 31 0 46 0-18 93-36 185-54 278-12 68-24 132-60 132-4 0-20 0-34-12 32-2 38-28 38-38 0-16-12-24-26-24-18 0-38 14-38 42 0 32 30 48 60 48 38 0 66-42 80-68 22-44 38-130 38-134 14-75 28-149 42-224z">
              <text:p/>
            </draw:path>
            <draw:path draw:style-name="gr3" draw:text-style-name="P7" draw:layer="layout" svg:width="0.161cm" svg:height="0.703cm" svg:x="10.219cm" svg:y="4.666cm" svg:viewBox="0 0 162 704" svg:d="M162 696c0-2 0-4-10-14-88-90-112-222-112-330 0-122 28-244 114-332 8-8 8-10 8-12 0-6-2-8-6-8-8 0-70 48-112 138-36 78-44 156-44 214 0 54 8 140 46 220 42 86 102 132 110 132 4 0 6-2 6-8z">
              <text:p/>
            </draw:path>
            <draw:path draw:style-name="gr3" draw:text-style-name="P7" draw:layer="layout" svg:width="0.323cm" svg:height="0.453cm" svg:x="10.443cm" svg:y="4.884cm" svg:viewBox="0 0 324 454" svg:d="M322 42c2-10 2-12 2-16 0-12-10-20-20-20-8 0-18 6-24 16-2 4-8 24-10 38-6 18-10 36-14 56-11 42-21 84-32 126-4 10-34 60-80 60-36 0-44-30-44-56 0-34 12-76 36-138 12-30 14-38 14-52 0-30-22-56-58-56-66 0-92 102-92 108s5 4 8 6c8 0 8 0 12-12 18-66 46-88 70-88 6 0 18 0 18 24 0 16-6 34-12 48-28 74-40 114-40 148 0 62 44 84 86 84 26 0 50-12 70-32-8 36-18 70-46 108-18 24-44 44-76 44-10 0-42-2-54-30 12 0 20 0 30-8 8-6 14-14 14-28 0-22-18-24-26-24-16 0-40 10-40 44 0 36 32 62 76 62 72 0 144-64 164-144 23-89 45-179 68-268z">
              <text:p/>
            </draw:path>
            <draw:path draw:style-name="gr3" draw:text-style-name="P7" draw:layer="layout" svg:width="0.161cm" svg:height="0.703cm" svg:x="10.833cm" svg:y="4.666cm" svg:viewBox="0 0 162 704" svg:d="M162 352c0-54-8-140-46-220-42-86-102-132-110-132-4 0-6 4-6 8 0 2 0 4 12 16 70 70 110 182 110 328 0 120-26 244-114 332-8 8-8 10-8 12 0 4 2 8 6 8 8 0 70-48 112-138 36-76 44-154 44-214z">
              <text:p/>
            </draw:path>
            <draw:path draw:style-name="gr3" draw:text-style-name="P7" draw:layer="layout" svg:width="0.335cm" svg:height="0.495cm" svg:x="11.092cm" svg:y="4.706cm" svg:viewBox="0 0 336 496" svg:d="M336 8c-3-3 0-8-10-8s-78 6-90 8c-4 0-8 4-8 14 0 8 6 8 16 8 34 0 36 4 36 12-1 5-3 9-4 14-14 55-28 111-42 166-12-26-32-44-64-44-82 0-170 102-170 206 0 66 40 112 94 112 14 0 50-4 92-54 6 30 30 54 64 54 24 0 40-16 52-40s13-45 20-68c0-8-6-8-8-8-6 0-8 4-10 12-12 46-24 88-54 88-18 0-20-18-20-32 0-18 2-22 4-34 34-135 68-271 102-406zM190 404c-4 12-4 14-14 26-32 38-60 50-80 50-36 0-46-38-46-66 0-36 24-122 40-154 22-42 52-68 80-68 46 0 56 58 56 62s-2 8-2 12c-11 46-23 92-34 138z">
              <text:p/>
            </draw:path>
            <draw:path draw:style-name="gr3" draw:text-style-name="P7" draw:layer="layout" svg:width="0.323cm" svg:height="0.453cm" svg:x="11.45cm" svg:y="4.884cm" svg:viewBox="0 0 324 454" svg:d="M322 42c2-10 2-12 2-16 0-12-10-20-20-20-6 0-18 6-24 16-2 4-8 24-10 38-4 18-10 36-14 56-11 42-21 84-32 126-2 10-32 60-80 60-34 0-42-30-42-56 0-34 12-76 36-138 10-30 14-38 14-52 0-30-24-56-58-56-68 0-94 102-94 108s8 6 10 6c6 0 6 0 10-12 20-66 48-88 72-88 6 0 18 0 18 24 0 16-8 34-12 48-30 74-42 114-42 148 0 62 44 84 86 84 28 0 52-12 72-32-10 36-18 70-46 108-18 24-46 44-78 44-10 0-42-2-54-30 12 0 22 0 30-8 8-6 14-14 14-28 0-22-18-24-26-24-16 0-38 10-38 44 0 36 30 62 74 62 72 0 144-64 164-144 23-89 45-179 68-268z">
              <text:p/>
            </draw:path>
            <draw:path draw:style-name="gr3" draw:text-style-name="P7" draw:layer="layout" svg:width="0.467cm" svg:height="0.163cm" svg:x="6.228cm" svg:y="6.851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621cm" svg:height="1.561cm" svg:x="7.477cm" svg:y="6.154cm" svg:viewBox="0 0 622 1562" svg:d="M34 1530c22-2 34-18 34-36 0-22-18-34-34-34s-34 12-34 36c0 36 34 66 78 66 106 0 146-166 196-370 54-222 100-446 138-672 26-148 52-290 76-380 8-34 32-126 60-126 22 0 40 14 42 18-24 0-36 16-36 34 0 22 18 34 34 34 18 0 34-10 34-36 0-38-38-64-76-64-54 0-92 76-132 220-2 8-96 360-174 820-18 108-38 224-62 322-12 52-44 184-102 184-26 0-28-11-42-16z">
              <text:p/>
            </draw:path>
            <draw:path draw:style-name="gr3" draw:text-style-name="P7" draw:layer="layout" svg:width="0.483cm" svg:height="0.221cm" svg:x="8.177cm" svg:y="6.11cm" svg:viewBox="0 0 484 222" svg:d="M248 82c-26-30-34-38-54-52-30-22-60-30-88-30-60 0-106 52-106 112 0 56 44 110 104 110 68 0 116-56 134-82 26 30 34 38 54 52 30 22 60 30 88 30 60 0 104-52 104-112 0-56-42-110-102-110-70 0-118 56-134 82zM264 100c18-32 62-82 122-82 50 0 86 45 86 92s-40 84-84 84c-46 0-78-36-124-94zM222 122c-20 32-62 82-122 82-50 0-86-45-86-92s38-84 84-84 78 36 124 94z">
              <text:p/>
            </draw:path>
            <draw:path draw:style-name="gr3" draw:text-style-name="P7" draw:layer="layout" svg:width="0.251cm" svg:height="0.315cm" svg:x="7.851cm" svg:y="7.533cm" svg:viewBox="0 0 252 316" svg:d="M250 30c2-6 2-8 2-10 0-10-8-16-16-16-6 0-14 2-20 12-2 4-6 18-8 28-3 14-7 28-10 42-4 12-18 74-20 78-20 15-22 44-60 44-34 0-34-32-34-42 0-26 12-56 26-94 6-16 8-22 8-30 0-24-20-42-46-42-50 0-72 66-72 74s6 8 8 8c6 0 8-4 8-8 14-42 34-60 54-60 8 0 12 4 12 16s-4 22-6 28c-24 60-30 80-30 100 0 10 0 32 20 48 16 12 36 16 50 16 20 0 36-8 52-22-6 26-10 46-32 72-12 14-32 30-58 30-4 0-28 0-38-16 28-2 19-17 28-26 0-16-16-20-20-20-12 0-28 10-28 34s24 42 58 42c50 0 110-38 126-100 15-62 31-124 46-186z">
              <text:p/>
            </draw:path>
            <draw:path draw:style-name="gr3" draw:text-style-name="P7" draw:layer="layout" svg:width="0.361cm" svg:height="0.133cm" svg:x="8.165cm" svg:y="7.559cm" svg:viewBox="0 0 362 134" svg:d="M344 26c6 0 18 0 18-14 0-12-12-12-18-12-109 0-217 0-326 0-6 0-18 0-18 12 0 14 12 14 18 14 109 0 217 0 326 0zM344 134c6 0 18 0 18-12s-12-12-18-12c-109 0-217 0-326 0-6 0-18 0-18 12s12 12 18 12c109 0 217 0 326 0z">
              <text:p/>
            </draw:path>
            <draw:path draw:style-name="gr3" draw:text-style-name="P7" draw:layer="layout" svg:width="0.227cm" svg:height="0.335cm" svg:x="8.587cm" svg:y="7.423cm" svg:viewBox="0 0 228 336" svg:d="M228 170c0-54-6-94-28-128-16-22-46-42-86-42-114 0-114 135-114 170s0 166 114 166 114-132 114-166zM114 322c-22 0-52-12-62-54-6-28-6-68-6-104s0-74 6-102c10-38 42-48 62-48 26 0 52 16 62 44 8 26 8 62 8 106 0 36 0 72-6 102-10 46-44 56-64 56z">
              <text:p/>
            </draw:path>
            <draw:path draw:style-name="gr3" draw:text-style-name="P7" draw:layer="layout" svg:width="0.349cm" svg:height="0.639cm" svg:x="9.031cm" svg:y="6.613cm" svg:viewBox="0 0 350 640" svg:d="M220 214c21 0 41 0 62 0 14 0 20 0 20-14 0-6-6-6-18-6-19 0-39 0-58 0 5-27 9-55 14-82 2-14 12-64 16-72 8-14 20-24 34-24 2 0 20 0 34 12-30 4-38 28-38 38 0 16 12 26 26 26 18 0 38-16 38-42 0-34-32-50-60-50-24 0-68 14-90 82-4 16-6 22-22 112-17 0-33 0-50 0-12 0-20 0-20 12 0 8 6 8 20 8 15 0 31 0 46 0-17 93-35 185-52 278-14 68-26 132-62 132-2 0-20 0-34-12 32-2 38-28 38-38 0-16-12-24-26-24-18 0-38 14-38 42 0 32 32 48 60 48 38 0 66-42 80-68 22-44 38-130 38-134 14-75 28-149 42-224z">
              <text:p/>
            </draw:path>
            <draw:path draw:style-name="gr3" draw:text-style-name="P7" draw:layer="layout" svg:width="0.163cm" svg:height="0.703cm" svg:x="9.483cm" svg:y="6.581cm" svg:viewBox="0 0 164 704" svg:d="M164 696c0-2 0-2-12-14-88-90-110-222-110-330 0-122 26-244 112-332 10-8 10-10 10-12 0-6-4-8-8-8-6 0-70 48-112 138-36 78-44 156-44 214 0 56 8 140 46 220 42 86 104 132 110 132 4 0 8-2 8-8z">
              <text:p/>
            </draw:path>
            <draw:path draw:style-name="gr3" draw:text-style-name="P7" draw:layer="layout" svg:width="0.323cm" svg:height="0.453cm" svg:x="9.707cm" svg:y="6.799cm" svg:viewBox="0 0 324 454" svg:d="M322 42c2-10 2-12 2-16 0-12-10-18-20-18-8 0-18 4-24 14-2 4-8 26-10 38-6 18-10 38-14 56-11 42-21 84-32 126-2 12-34 60-80 60-36 0-44-30-44-56 0-32 12-76 36-138 12-30 14-36 14-52 0-30-22-56-56-56-68 0-94 102-94 108s5 4 8 6c8 0 8 0 12-12 20-66 48-88 72-88 4 0 16 0 16 24 0 16-6 36-12 48-28 74-40 116-40 148 0 62 44 84 86 84 28 0 50-12 70-32-8 36-16 72-46 108-18 24-44 44-76 44-10 0-42-2-54-28 12 0 20 0 30-10 8-6 14-14 14-28 0-22-18-24-26-24-16 0-38 10-38 44 0 36 30 62 74 62 72 0 144-64 164-144 23-89 45-179 68-268z">
              <text:p/>
            </draw:path>
            <draw:path draw:style-name="gr3" draw:text-style-name="P7" draw:layer="layout" svg:width="0.161cm" svg:height="0.703cm" svg:x="10.097cm" svg:y="6.581cm" svg:viewBox="0 0 162 704" svg:d="M162 352c0-54-6-140-46-218-42-88-102-134-110-134-4 0-6 4-6 8 0 2 0 4 14 16 68 70 108 182 108 328 0 120-26 244-114 332-8 10-8 10-8 12 0 4 2 8 6 8 8 0 72-48 112-138 36-76 44-154 44-214z">
              <text:p/>
            </draw:path>
            <draw:path draw:style-name="gr5" draw:text-style-name="P11" draw:layer="layout" svg:width="0.623cm" svg:height="1.561cm" svg:x="10.369cm" svg:y="6.154cm" svg:viewBox="0 0 624 1562" svg:d="M34 1530c22-2 34-18 34-36 0-22-18-34-34-34s-34 12-34 36c0 36 36 66 78 66 108 0 148-166 198-370 54-222 98-446 136-672 26-148 52-290 76-380 10-34 34-126 60-126 22 0 40 14 42 18-22 0-34 16-34 34 0 22 18 34 34 34s34-10 34-36c0-38-38-64-76-64-54 0-94 76-132 220-2 8-98 360-176 820-18 108-38 224-62 322-12 52-44 184-102 184-24 0-28-11-42-16z">
              <text:p/>
            </draw:path>
            <draw:path draw:style-name="gr5" draw:text-style-name="P11" draw:layer="layout" svg:width="0.253cm" svg:height="0.317cm" svg:x="11.055cm" svg:y="6.11cm" svg:viewBox="0 0 254 318" svg:d="M252 32c2-8 2-8 2-12 0-10-8-14-18-14-4 0-14 2-20 10 0 4-4 20-8 30-3 13-7 27-10 40-2 12-18 74-20 80-20 14-22 42-60 42-34 0-34-32-34-40 0-28 12-58 28-96 4-16 8-22 8-30 0-24-20-42-48-42-48 0-72 68-72 76 0 6 8 6 10 6 6 0 6-2 8-8 12-40 34-60 54-60 8 0 12 6 12 18 0 10-4 22-8 28-22 60-28 78-28 100 0 8 0 32 20 46 14 14 36 16 48 16 20 0 38-8 54-22-6 26-12 48-32 72-14 16-34 32-60 32-2 0-26 0-36-16 26-4 17-19 26-28 0-16-14-18-18-18-14 0-30 10-30 32 0 26 24 44 60 44 48 0 110-38 124-100 16-62 32-124 48-186z">
              <text:p/>
            </draw:path>
            <draw:path draw:style-name="gr5" draw:text-style-name="P11" draw:layer="layout" svg:width="0.261cm" svg:height="0.221cm" svg:x="10.745cm" svg:y="7.533cm" svg:viewBox="0 0 262 222" svg:d="M98 164c-6 16-22 44-46 44-2 0-16 0-26-8 20-6 20-24 20-26 0-12-8-18-18-18-14 0-28 12-28 30 0 24 26 36 50 36s44-16 56-36c12 26 38 36 58 36 56 0 86-62 86-76 0-6-4-4-6-6-8 0-8 2-10 8-10 34-40 60-68 60-20 0-30-14-30-32 0-14 12-58 26-112 10-38 32-50 48-50 2 0 16 0 26 6-16 4-22 18-22 28s9 18 20 18 28-10 28-30c0-28-32-36-50-36-26 0-46 16-56 34-8-20-32-34-60-34-54 0-86 60-86 74 0 8 5 5 8 8 8 0 8-2 10-10 12-38 44-58 68-58 16 0 28 8 28 32 0 10-4 34-10 50-5 23-11 45-16 68z">
              <text:p/>
            </draw:path>
            <draw:path draw:style-name="gr5" draw:text-style-name="P11" draw:layer="layout" svg:width="0.361cm" svg:height="0.133cm" svg:x="11.072cm" svg:y="7.559cm" svg:viewBox="0 0 362 134" svg:d="M344 26c8 0 18 0 18-14 0-12-12-12-18-12-109 0-217 0-326 0-6 0-18 0-18 12 0 14 12 14 20 14 108 0 216 0 324 0zM344 134c6 0 18 0 18-12s-10-12-18-12c-108 0-216 0-324 0-8 0-20 0-20 12s12 12 18 12c109 0 217 0 326 0z">
              <text:p/>
            </draw:path>
            <draw:path draw:style-name="gr5" draw:text-style-name="P11" draw:layer="layout" svg:width="0.227cm" svg:height="0.335cm" svg:x="11.496cm" svg:y="7.423cm" svg:viewBox="0 0 228 336" svg:d="M228 170c0-54-8-94-30-128-14-22-46-42-84-42-114 0-114 135-114 170s0 166 114 166 114-132 114-166zM114 322c-24 0-54-12-64-54-6-28-6-68-6-104s0-74 8-102c10-38 42-48 62-48 26 0 52 16 60 44 8 26 8 62 8 106 0 36 0 72-6 102-10 46-44 56-62 56z">
              <text:p/>
            </draw:path>
            <draw:path draw:style-name="gr5" draw:text-style-name="P11" draw:layer="layout" svg:width="0.333cm" svg:height="0.495cm" svg:x="11.93cm" svg:y="6.621cm" svg:viewBox="0 0 334 496" svg:d="M334 8c-3-3 0-8-8-8-12 0-78 6-90 8-6 0-10 4-10 14 0 8 6 8 18 8 32 0 34 4 34 12-1 5-1 9-2 14-14 55-28 111-42 166-12-26-34-44-64-44-82 0-170 102-170 206 0 66 38 112 94 112 14 0 48-4 90-52 6 28 30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  <text:p/>
            </draw:path>
            <draw:path draw:style-name="gr5" draw:text-style-name="P11" draw:layer="layout" svg:width="0.349cm" svg:height="0.317cm" svg:x="12.288cm" svg:y="6.799cm" svg:viewBox="0 0 350 318" svg:d="M214 98c4-18 20-84 70-84 4 0 20 0 36 10-20 4-34 22-34 38 0 12 8 24 26 24 16 0 38-12 38-40 0-36-42-46-66-46-40 0-64 36-74 52-16-46-54-52-76-52-72 0-112 90-112 108 0 6 6 6 8 6 6 0 8 0 10-8 24-74 70-92 94-92 12 0 38 8 38 48 0 22-12 68-38 168-12 42-36 72-68 72-4 0-20 0-34-8 18-4 32-20 32-38 0-20-14-26-26-26-20 0-38 18-38 42 0 32 36 46 66 46 46 0 72-50 74-54 8 26 34 54 76 54 72 0 112-90 112-108 0-8-6-8-8-8-6 0-8 4-10 8-22 76-70 92-92 92-28 0-40-22-40-46 0-16 4-32 12-62 8-32 16-64 24-96z">
              <text:p/>
            </draw:path>
            <draw:path draw:style-name="gr3" draw:text-style-name="P7" draw:layer="layout" svg:width="0.333cm" svg:height="0.495cm" svg:x="12.698cm" svg:y="6.621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10 14-12 44-24 86-52 86-20 0-22-18-22-32 0-16 2-22 4-34 34-135 68-271 102-406zM188 404c-4 14-4 14-14 26-32 40-60 50-80 50-34 0-44-38-44-66 0-34 22-122 38-154 22-42 54-68 82-68 46 0 54 58 54 62s0 10-2 12c-11 46-23 92-34 138z">
              <text:p/>
            </draw:path>
            <draw:path draw:style-name="gr3" draw:text-style-name="P7" draw:layer="layout" svg:width="0.323cm" svg:height="0.453cm" svg:x="13.056cm" svg:y="6.799cm" svg:viewBox="0 0 324 454" svg:d="M320 42c4-10 4-12 4-16 0-12-10-18-22-18-6 0-18 4-24 14-2 4-6 26-10 38-4 18-10 38-14 56-11 42-21 84-32 126-2 12-32 60-78 60-36 0-44-30-44-56 0-32 12-76 36-138 10-30 14-36 14-52 0-30-22-56-58-56-66 0-92 102-92 108s6 6 8 6c6 0 8 0 12-12 18-66 46-88 70-88 6 0 18 0 18 24 0 16-8 36-12 48-28 74-42 116-42 148 0 62 46 84 86 84 28 0 52-12 72-32-10 36-18 72-46 108-18 24-46 44-78 44-10 0-40-2-52-28 10 0 20 0 30-10 6-6 14-14 14-28 0-22-20-24-26-24-16 0-40 10-40 44 0 36 32 62 74 62 72 0 146-64 166-144 22-89 44-179 66-268z">
              <text:p/>
            </draw:path>
            <draw:path draw:style-name="gr3" draw:text-style-name="P7" draw:layer="layout" svg:width="0.467cm" svg:height="0.163cm" svg:x="6.228cm" svg:y="8.863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621cm" svg:height="1.559cm" svg:x="7.477cm" svg:y="8.165cm" svg:viewBox="0 0 622 1560" svg:d="M34 1530c22-2 34-18 34-36 0-22-18-34-34-34s-34 10-34 36c0 36 34 64 78 64 106 0 146-164 196-368 54-222 100-446 138-672 26-150 52-290 76-380 8-34 32-126 60-126 22 0 40 14 42 16-24 2-36 18-36 36 0 22 18 34 34 34 18 0 34-10 34-36 0-38-38-64-76-64-54 0-92 76-132 220-2 6-96 360-174 820-18 106-38 224-62 322-12 52-44 184-102 184-26 0-28-11-42-16z">
              <text:p/>
            </draw:path>
            <draw:path draw:style-name="gr3" draw:text-style-name="P7" draw:layer="layout" svg:width="0.483cm" svg:height="0.221cm" svg:x="8.177cm" svg:y="8.121cm" svg:viewBox="0 0 484 222" svg:d="M248 82c-26-30-34-38-54-52-30-22-60-30-88-30-60 0-106 52-106 112 0 56 44 110 104 110 68 0 116-56 134-82 26 30 34 38 54 52 30 22 60 30 88 30 60 0 104-52 104-112 0-56-42-110-102-110-70 0-118 56-134 82zM264 100c18-32 62-82 122-82 50 0 86 45 86 92s-40 84-84 84c-46 0-78-36-124-94zM222 122c-20 32-62 82-122 82-50 0-86-45-86-92s38-84 84-84 78 36 124 94z">
              <text:p/>
            </draw:path>
            <draw:path draw:style-name="gr7" draw:text-style-name="P13" draw:layer="layout" svg:width="0.263cm" svg:height="0.221cm" svg:x="7.851cm" svg:y="9.545cm" svg:viewBox="0 0 264 222" svg:d="M100 164c-6 16-22 44-48 44-9-3-16 0-26-8 20-6 22-24 22-26 0-12-8-18-20-18-14 0-28 10-28 30 0 24 28 36 52 36 22 0 42-16 54-36 12 26 40 36 60 36 56 0 86-62 86-76 0-6-6-6-8-6-6 0-8 2-10 8-10 34-38 60-66 60-20 0-30-14-30-32 0-14 12-58 26-112 8-38 32-52 48-52 9 3 16 0 26 8-16 4-22 18-22 26 0 12 8 20 20 20s28-10 28-30c0-28-32-36-52-36-24 0-44 16-54 34-10-20-32-34-60-34-54 0-86 60-86 74 0 6 6 6 8 6 6 0 6-2 10-8 12-38 42-60 66-60 16 0 30 10 30 34 0 10-6 34-10 50-5 23-11 45-16 68z">
              <text:p/>
            </draw:path>
            <draw:path draw:style-name="gr7" draw:text-style-name="P13" draw:layer="layout" svg:width="0.361cm" svg:height="0.133cm" svg:x="8.181cm" svg:y="9.571cm" svg:viewBox="0 0 362 134" svg:d="M344 24c6 0 18 0 18-12s-12-12-18-12c-109 0-217 0-326 0-6 0-18 0-18 12s12 12 18 12c109 0 217 0 326 0zM344 134c6 0 18 0 18-12 0-14-12-14-18-14-109 0-217 0-326 0-6 0-18 0-18 14 0 12 12 12 18 12 109 0 217 0 326 0z">
              <text:p/>
            </draw:path>
            <draw:path draw:style-name="gr7" draw:text-style-name="P13" draw:layer="layout" svg:width="0.227cm" svg:height="0.335cm" svg:x="8.603cm" svg:y="9.435cm" svg:viewBox="0 0 228 336" svg:d="M228 170c0-54-6-94-28-128-16-22-46-42-86-42-114 0-114 135-114 170s0 166 114 166 114-132 114-166zM114 322c-22 0-52-14-62-54-6-28-6-68-6-106 0-36 0-72 6-100 10-38 42-48 62-48 26 0 52 16 62 44 8 26 8 62 8 104 0 38 0 74-6 104-10 46-44 56-64 56z">
              <text:p/>
            </draw:path>
            <draw:path draw:style-name="gr3" draw:text-style-name="P7" draw:layer="layout" svg:width="0.623cm" svg:height="1.559cm" svg:x="9.049cm" svg:y="8.165cm" svg:viewBox="0 0 624 1560" svg:d="M34 1530c22-2 34-18 34-36 0-22-16-34-34-34-16 0-34 10-34 36 0 36 36 64 78 64 108 0 148-164 198-368 54-222 98-446 136-672 26-150 52-290 76-380 10-34 34-126 60-126 22 0 40 14 42 16-22 2-34 18-34 36 0 22 18 34 34 34s34-10 34-36c0-38-38-64-76-64-54 0-94 76-132 220-2 6-98 360-176 820-18 106-38 224-62 322-12 52-44 184-100 184-26 0-29-11-44-16z">
              <text:p/>
            </draw:path>
            <draw:path draw:style-name="gr3" draw:text-style-name="P7" draw:layer="layout" svg:width="0.483cm" svg:height="0.221cm" svg:x="9.751cm" svg:y="8.121cm" svg:viewBox="0 0 484 222" svg:d="M246 82c-26-30-34-38-52-52-30-22-62-30-90-30-60 0-104 52-104 112 0 56 42 110 104 110 68 0 116-56 134-82 26 30 34 38 52 52 30 22 62 30 88 30 62 0 106-52 106-112 0-56-42-110-104-110-68 0-116 56-134 82zM262 100c20-32 62-82 122-82 50 0 86 45 86 92s-38 84-84 84-76-36-124-94zM222 122c-20 32-62 82-122 82-52 0-86-45-86-92s38-84 84-84c44 0 76 36 124 94z">
              <text:p/>
            </draw:path>
            <draw:path draw:style-name="gr7" draw:text-style-name="P13" draw:layer="layout" svg:width="0.251cm" svg:height="0.315cm" svg:x="9.423cm" svg:y="9.545cm" svg:viewBox="0 0 252 316" svg:d="M250 30c2-6 2-8 2-10 0-10-6-16-16-16-4 0-14 2-20 12 0 2-4 18-8 28-3 14-7 28-10 42-2 12-18 74-20 78-20 15-22 44-60 44-34 0-34-32-34-42 0-26 12-58 26-94 6-16 10-22 10-30 0-24-22-42-48-42-50 0-72 66-72 74 0 6 5 4 8 6 8 0 8-2 10-6 12-42 34-62 52-62 10 0 14 6 14 18s-6 22-8 28c-24 60-28 78-28 100 0 8 0 32 18 48 16 12 36 16 50 16 20 0 38-8 54-24-6 28-12 48-32 74-14 14-34 30-60 30-4 0-26 0-36-16 26-2 17-17 26-26 0-16-14-20-20-20-12 0-28 10-28 34s24 42 58 42c50 0 110-38 126-100 15-62 31-124 46-186z">
              <text:p/>
            </draw:path>
            <draw:path draw:style-name="gr7" draw:text-style-name="P13" draw:layer="layout" svg:width="0.361cm" svg:height="0.133cm" svg:x="9.737cm" svg:y="9.571cm" svg:viewBox="0 0 362 134" svg:d="M344 24c8 0 18 0 18-12s-12-12-18-12c-109 0-217 0-326 0-6 0-18 0-18 12s12 12 20 12c108 0 216 0 324 0zM344 134c6 0 18 0 18-12 0-14-10-14-18-14-108 0-216 0-324 0-8 0-20 0-20 14 0 12 12 12 18 12 109 0 217 0 326 0z">
              <text:p/>
            </draw:path>
            <draw:path draw:style-name="gr7" draw:text-style-name="P13" draw:layer="layout" svg:width="0.261cm" svg:height="0.221cm" svg:x="10.159cm" svg:y="9.545cm" svg:viewBox="0 0 262 222" svg:d="M98 164c-4 16-22 44-46 44-2 0-16 0-26-8 20-6 20-24 20-26 0-12-8-18-18-18-14 0-28 10-28 30 0 24 26 36 50 36s44-16 56-36c12 26 38 36 58 36 56 0 86-62 86-76 0-6-4-4-6-6-8 0-8 2-10 8-10 34-40 60-68 60-20 0-30-14-30-32 0-14 12-58 26-112 10-38 32-52 48-52 2 0 16 0 26 8-16 4-20 18-20 26 0 12 7 20 18 20s28-10 28-30c0-28-32-36-50-36-26 0-46 16-56 34-8-20-32-34-60-34-54 0-86 60-86 74 0 6 5 4 8 6 8 0 8-2 10-8 12-38 44-60 68-60 16 0 30 10 30 34 0 10-6 34-12 50-5 23-11 45-16 68z">
              <text:p/>
            </draw:path>
            <draw:path draw:style-name="gr3" draw:text-style-name="P7" draw:layer="layout" svg:width="0.349cm" svg:height="0.639cm" svg:x="10.643cm" svg:y="8.625cm" svg:viewBox="0 0 350 640" svg:d="M220 214c20 0 40 0 60 0 14 0 22 0 22-14 0-8-8-8-20-8-19 0-39 0-58 0 5-27 11-53 16-80 2-14 12-64 16-72 6-14 18-24 34-24 2 0 20 0 34 12-32 4-38 28-38 38 0 16 12 24 26 24 18 0 38-14 38-42 0-32-32-48-60-48-24 0-68 12-90 82-4 16-6 22-24 110-16 0-32 0-48 0-14 0-20 0-20 14 0 8 6 8 18 8 16 0 32 0 48 0-18 93-36 185-54 278-12 68-24 132-60 132-4 0-20 0-34-12 32-2 38-28 38-38 0-16-12-24-26-24-18 0-38 14-38 42 0 32 30 48 60 48 38 0 66-42 78-68 24-44 40-130 40-134 14-75 28-149 42-224z">
              <text:p/>
            </draw:path>
            <draw:path draw:style-name="gr3" draw:text-style-name="P7" draw:layer="layout" svg:width="0.161cm" svg:height="0.703cm" svg:x="11.094cm" svg:y="8.593cm" svg:viewBox="0 0 162 704" svg:d="M162 696c0-2 0-4-12-14-88-90-110-222-110-330 0-122 28-244 114-332 8-8 8-10 8-12 0-6-2-8-6-8-8 0-70 48-112 138-36 78-44 156-44 214 0 54 8 140 46 220 42 86 102 132 110 132 4 0 6-2 6-8z">
              <text:p/>
            </draw:path>
            <draw:path draw:style-name="gr3" draw:text-style-name="P7" draw:layer="layout" svg:width="0.323cm" svg:height="0.453cm" svg:x="11.318cm" svg:y="8.811cm" svg:viewBox="0 0 324 454" svg:d="M320 42c4-10 4-12 4-16 0-12-10-20-20-20-8 0-18 6-26 16 0 4-6 24-10 38-4 18-8 36-14 56-10 42-20 84-30 126-4 10-34 60-80 60-36 0-44-30-44-56 0-34 12-76 36-138 12-30 14-38 14-52 0-30-22-56-58-56-66 0-92 102-92 108s6 6 8 6c8 0 8 0 12-12 18-66 46-88 70-88 6 0 18 0 18 24 0 16-8 34-12 48-28 74-40 114-40 148 0 62 44 84 86 84 26 0 50-12 70-32-10 36-18 70-46 108-18 24-44 44-76 44-10 0-42-2-54-30 10 0 20 0 30-8 6-6 14-14 14-28 0-22-20-24-26-24-16 0-40 10-40 44 0 36 32 62 76 62 72 0 144-64 164-144 22-89 44-179 66-268z">
              <text:p/>
            </draw:path>
            <draw:path draw:style-name="gr3" draw:text-style-name="P7" draw:layer="layout" svg:width="0.161cm" svg:height="0.703cm" svg:x="11.708cm" svg:y="8.593cm" svg:viewBox="0 0 162 704" svg:d="M162 352c0-54-8-140-46-220-42-86-102-132-110-132-4 0-6 4-6 8 0 2 0 4 12 16 70 70 110 182 110 328 0 120-26 244-114 332-8 8-8 10-8 12 0 4 2 8 6 8 8 0 70-48 112-138 36-76 44-154 44-214z">
              <text:p/>
            </draw:path>
            <draw:path draw:style-name="gr3" draw:text-style-name="P7" draw:layer="layout" svg:width="0.335cm" svg:height="0.495cm" svg:x="11.968cm" svg:y="8.633cm" svg:viewBox="0 0 336 496" svg:d="M336 8c-3-3 0-8-10-8s-78 6-90 8c-4 0-10 4-10 14 0 8 8 8 18 8 34 0 34 4 34 12-1 5-1 9-2 14-14 55-28 111-42 166-12-26-32-44-64-44-82 0-170 102-170 206 0 66 40 112 94 112 14 0 50-4 92-54 4 30 30 54 64 54 24 0 40-16 52-40s13-45 20-68c0-8-6-8-8-8-8 0-8 4-10 12-12 46-24 88-54 88-18 0-20-18-20-32 0-18 2-22 4-34 34-135 68-271 102-406zM188 404c-2 12-2 14-14 26-30 38-58 50-78 50-36 0-46-38-46-66 0-36 22-122 40-154 20-42 52-68 80-68 46 0 56 58 56 62s-2 8-2 12c-12 46-24 92-36 138z">
              <text:p/>
            </draw:path>
            <draw:path draw:style-name="gr3" draw:text-style-name="P7" draw:layer="layout" svg:width="0.323cm" svg:height="0.453cm" svg:x="12.326cm" svg:y="8.811cm" svg:viewBox="0 0 324 454" svg:d="M322 42c2-10 2-12 2-16 0-12-10-20-20-20-6 0-18 6-24 16-2 4-8 24-10 38-6 18-10 36-14 56-11 42-21 84-32 126-2 10-34 60-80 60-36 0-42-30-42-56 0-34 10-76 34-138 12-30 14-38 14-52 0-30-22-56-56-56-68 0-94 102-94 108s5 4 8 6c8 0 8 0 12-12 20-66 48-88 72-88 4 0 16 0 16 24 0 16-6 34-12 48-28 74-40 114-40 148 0 62 44 84 86 84 28 0 52-12 70-32-8 36-16 70-44 108-20 24-46 44-78 44-10 0-42-2-54-30 12 0 20 0 30-8 8-6 14-14 14-28 0-22-18-24-26-24-16 0-38 10-38 44 0 36 30 62 74 62 72 0 144-64 164-144 23-89 45-179 68-268z">
              <text:p/>
            </draw:path>
            <draw:path draw:style-name="gr3" draw:text-style-name="P7" draw:layer="layout" svg:width="0.333cm" svg:height="0.495cm" svg:x="12.704cm" svg:y="8.633cm" svg:viewBox="0 0 334 496" svg:d="M334 8c-3-3 0-8-8-8-12 0-78 6-90 8-6 0-10 4-10 14 0 8 6 8 18 8 32 0 34 4 34 12-1 5-1 9-2 14-14 55-28 111-42 166-12-26-34-44-64-44-82 0-170 102-170 206 0 66 38 112 94 112 14 0 48-4 90-54 6 30 32 54 64 54 26 0 42-16 52-40 12-24 15-45 22-68 0-8-6-8-8-8-8 0-8 4-10 12-12 46-26 88-54 88-18 0-20-18-20-32 0-18 0-22 4-34 33-135 67-271 100-406zM188 404c-4 12-4 14-14 26-30 38-60 50-80 50-34 0-44-38-44-66 0-36 22-122 38-154 22-42 54-68 82-68 46 0 56 58 56 62s-2 8-2 12c-12 46-24 92-36 138z">
              <text:p/>
            </draw:path>
            <draw:path draw:style-name="gr3" draw:text-style-name="P7" draw:layer="layout" svg:width="0.349cm" svg:height="0.317cm" svg:x="13.062cm" svg:y="8.811cm" svg:viewBox="0 0 350 318" svg:d="M214 98c4-18 20-84 70-84 4 0 20 0 36 10-20 4-34 20-34 38 0 10 8 24 26 24 16 0 38-12 38-40 0-36-42-46-66-46-40 0-64 36-74 52-16-46-54-52-76-52-72 0-112 90-112 108 0 6 6 6 8 6 6 0 8 0 10-8 24-74 70-92 94-92 12 0 38 6 38 48 0 22-12 68-38 166-12 44-36 74-68 74-4 0-20 0-34-10 18-2 32-18 32-38 0-18-14-24-26-24-20 0-38 18-38 42 0 32 36 46 66 46 46 0 72-50 74-54 8 26 34 54 76 54 72 0 112-92 112-108 0-8-6-8-8-8-6 0-8 4-10 8-22 76-70 92-92 92-28 0-40-22-40-46 0-16 4-32 12-62 8-32 16-64 24-96z">
              <text:p/>
            </draw:path>
            <draw:path draw:style-name="gr3" draw:text-style-name="P7" draw:layer="layout" svg:width="0.467cm" svg:height="0.163cm" svg:x="6.228cm" svg:y="10.8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621cm" svg:height="1.559cm" svg:x="7.477cm" svg:y="10.177cm" svg:viewBox="0 0 622 1560" svg:d="M34 1530c22-2 34-18 34-36 0-22-18-34-34-34s-34 10-34 36c0 36 34 64 78 64 106 0 146-164 196-368 54-222 100-446 138-672 26-150 52-290 76-380 8-34 32-126 60-126 22 0 40 14 42 16-24 2-36 18-36 36 0 22 18 34 34 34 18 0 34-12 34-36 0-38-38-64-76-64-54 0-92 76-132 220-2 6-96 360-174 820-18 106-38 224-62 322-12 52-44 184-102 184-26 0-28-11-42-16z">
              <text:p/>
            </draw:path>
            <draw:path draw:style-name="gr3" draw:text-style-name="P7" draw:layer="layout" svg:width="0.483cm" svg:height="0.221cm" svg:x="8.177cm" svg:y="10.133cm" svg:viewBox="0 0 484 222" svg:d="M248 82c-26-30-34-38-54-52-30-22-60-30-88-30-60 0-106 52-106 112 0 56 44 110 104 110 68 0 116-56 134-82 26 30 34 38 54 52 30 22 60 30 88 30 60 0 104-52 104-112 0-58-42-110-102-110-70 0-118 56-134 82zM264 100c18-32 62-82 122-82 50 0 86 45 86 92s-40 84-84 84c-46 0-78-36-124-94zM222 122c-20 32-62 82-122 82-50 0-86-45-86-92s38-86 84-86 78 38 124 96z">
              <text:p/>
            </draw:path>
            <draw:path draw:style-name="gr3" draw:text-style-name="P7" draw:layer="layout" svg:width="0.263cm" svg:height="0.219cm" svg:x="7.851cm" svg:y="11.556cm" svg:viewBox="0 0 264 220" svg:d="M100 164c-6 16-22 44-48 44-9-3-16 0-26-8 20-6 22-24 22-26 0-12-8-20-20-20-14 0-28 12-28 32 0 24 28 34 52 34 22 0 42-14 54-34 12 26 40 34 60 34 56 0 86-60 86-74 0-6-6-6-8-6-6 0-8 2-10 8-10 34-38 60-66 60-20 0-30-14-30-32 0-14 12-58 26-114 8-36 32-50 48-50 9 3 16 0 26 8-16 4-22 18-22 26 0 12 8 18 20 18s28-8 28-30c0-26-32-34-52-34-24 0-44 16-54 34-10-20-32-34-60-34-54 0-86 60-86 74 0 6 6 6 8 6 6 0 6-2 10-8 12-38 42-60 66-60 16 0 30 10 30 34 0 10-6 34-10 50-5 23-11 45-16 68z">
              <text:p/>
            </draw:path>
            <draw:path draw:style-name="gr3" draw:text-style-name="P7" draw:layer="layout" svg:width="0.361cm" svg:height="0.131cm" svg:x="8.181cm" svg:y="11.582cm" svg:viewBox="0 0 362 132" svg:d="M344 24c6 0 18 0 18-12s-12-12-18-12c-109 0-217 0-326 0-6 0-18 0-18 12s12 12 18 12c109 0 217 0 326 0zM344 132c6 0 18 0 18-10 0-14-12-14-18-14-109 0-217 0-326 0-6 0-18 0-18 14 0 10 12 10 18 10 109 0 217 0 326 0z">
              <text:p/>
            </draw:path>
            <draw:path draw:style-name="gr3" draw:text-style-name="P7" draw:layer="layout" svg:width="0.227cm" svg:height="0.335cm" svg:x="8.603cm" svg:y="11.446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  <text:p/>
            </draw:path>
            <draw:path draw:style-name="gr3" draw:text-style-name="P7" draw:layer="layout" svg:width="0.161cm" svg:height="0.703cm" svg:x="8.963cm" svg:y="10.605cm" svg:viewBox="0 0 162 704" svg:d="M162 696c0-2 0-4-12-16-88-88-110-220-110-328 0-122 26-244 114-332 8-8 8-10 8-12 0-6-2-8-6-8-8 0-70 48-112 138-36 76-44 154-44 214 0 54 8 140 46 220 42 86 102 132 110 132 4 0 6-2 6-8z">
              <text:p/>
            </draw:path>
            <draw:path draw:style-name="gr3" draw:text-style-name="P7" draw:layer="layout" svg:width="0.231cm" svg:height="0.467cm" svg:x="9.229cm" svg:y="10.665cm" svg:viewBox="0 0 232 468" svg:d="M144 18c0-18 0-18-16-18-44 44-106 44-128 44 0 7 0 15 0 22 14 0 56 0 92-18 0 121 0 243 0 364 0 26-2 34-66 34-7 0-15 0-22 0 0 7 0 15 0 22 24-2 86-2 114-2s90 0 114 2c0-7 0-15 0-22-7 0-15 0-22 0-64 0-66-8-66-34 0-131 0-263 0-394z">
              <text:p/>
            </draw:path>
            <draw:path draw:style-name="gr3" draw:text-style-name="P7" draw:layer="layout" svg:width="0.427cm" svg:height="0.027cm" svg:x="9.733cm" svg:y="10.943cm" svg:viewBox="0 0 428 28" svg:d="M404 28c12 0 24 0 24-14s-12-14-24-14c-127 0-253 0-380 0-12 0-24 0-24 14s12 14 24 14c127 0 253 0 380 0z">
              <text:p/>
            </draw:path>
            <draw:path draw:style-name="gr3" draw:text-style-name="P7" draw:layer="layout" svg:width="0.499cm" svg:height="0.477cm" svg:x="10.403cm" svg:y="10.655cm" svg:viewBox="0 0 500 478" svg:d="M186 250c23 0 45 0 68 0 54 0 58 10 58 30 0 6 0 14-4 36-2 2-2 6-2 8 0 4 4 8 8 8 8 0 8-2 10-16 13-51 27-101 40-152 2-8 2-8 2-12-3-2-1-6-8-6s-8 2-12 14c-14 54-30 68-90 68-21 0-43 0-64 0 15-60 29-120 44-180 8-24 8-26 38-26 31 0 63 0 94 0 86 0 102 22 102 76 0 16 0 20-2 38-2 10-2 12-2 14s2 8 10 8c6 0 8-4 10-18 5-41 9-81 14-122 2-18-2-18-20-18-115 0-229 0-344 0-14 0-22 0-22 14 0 8 8 8 20 8 26 0 46 0 46 12 0 2 0 4-4 18-31 123-61 247-92 370-8 28-8 34-64 34-12 0-20 0-20 14 0 8 8 8 10 8 22 0 74-2 94-2 22 0 80 2 104 2 6 0 14 0 14-14 0-6-4-6-4-8-2 0-2 0-18 0s-20 0-38-2c-20-2-22-4-22-14 0-2 0-6 2-16 15-58 29-116 44-174z">
              <text:p/>
            </draw:path>
            <draw:path draw:style-name="gr3" draw:text-style-name="P7" draw:layer="layout" svg:width="0.163cm" svg:height="0.703cm" svg:x="10.995cm" svg:y="10.605cm" svg:viewBox="0 0 164 704" svg:d="M164 696c0-2 0-4-12-16-88-88-110-220-110-328 0-122 26-244 112-332 10-8 10-10 10-12 0-6-4-8-8-8-6 0-70 48-112 138-36 76-44 154-44 214 0 54 8 140 46 220 44 86 104 132 110 132 4 0 8-2 8-8z">
              <text:p/>
            </draw:path>
            <draw:path draw:style-name="gr3" draw:text-style-name="P7" draw:layer="layout" svg:width="0.349cm" svg:height="0.319cm" svg:x="11.218cm" svg:y="10.821cm" svg:viewBox="0 0 350 320" svg:d="M214 100c6-18 22-84 70-84 4 0 20 0 36 10-20 4-34 20-34 38 0 10 8 24 26 24 16 0 38-12 38-40 0-38-40-48-64-48-42 0-66 38-74 54-18-46-56-54-76-54-74 0-114 92-114 110 0 6 5 4 8 6 6 0 8-2 10-8 24-74 70-92 94-92 14 0 38 6 38 48 0 22-12 68-38 166-12 44-36 74-66 74-4 0-22 0-36-10 18-2 34-18 34-38 0-18-16-24-26-24-22 0-40 18-40 40 0 34 36 48 66 48 48 0 72-50 74-54 8 26 34 54 76 54 72 0 112-92 112-108 0-8-6-8-8-8-6 0-8 2-8 8-24 76-72 92-94 92-28 0-38-22-38-46 0-16 4-32 12-62 7-32 15-64 22-96z">
              <text:p/>
            </draw:path>
            <draw:path draw:style-name="gr3" draw:text-style-name="P7" draw:layer="layout" svg:width="0.161cm" svg:height="0.703cm" svg:x="11.64cm" svg:y="10.605cm" svg:viewBox="0 0 162 704" svg:d="M162 352c0-54-6-140-46-220-42-86-102-132-110-132-4 0-6 4-6 8 0 2 0 4 14 16 68 70 108 182 108 328 0 120-26 244-112 332-10 8-10 10-10 12 0 4 2 8 6 8 8 0 72-48 112-138 36-78 44-156 44-214z">
              <text:p/>
            </draw:path>
            <draw:path draw:style-name="gr3" draw:text-style-name="P7" draw:layer="layout" svg:width="0.161cm" svg:height="0.703cm" svg:x="11.914cm" svg:y="10.605cm" svg:viewBox="0 0 162 704" svg:d="M162 352c0-54-8-140-46-220-42-86-102-132-110-132-4 0-6 4-6 8 0 2 0 4 12 16 70 70 110 182 110 328 0 120-26 244-114 332-8 8-8 10-8 12 0 4 2 8 6 8 8 0 70-48 112-138 36-78 44-156 44-214z">
              <text:p/>
            </draw:path>
            <draw:path draw:style-name="gr3" draw:text-style-name="P7" draw:layer="layout" svg:width="0.335cm" svg:height="0.495cm" svg:x="12.174cm" svg:y="10.645cm" svg:viewBox="0 0 336 496" svg:d="M336 8c0-2 0-8-10-8s-78 6-90 8c-4 0-10 4-10 12 0 10 8 10 18 10 34 0 34 4 34 12-1 5-1 9-2 14-14 55-28 111-42 166-12-26-32-46-64-46-82 0-170 104-170 206 0 66 40 114 94 114 14 0 50-4 92-54 4 30 30 54 64 54 24 0 40-16 52-40s13-45 20-68c0-8-6-8-8-8-8 0-8 2-10 12-12 46-24 88-54 88-18 0-20-18-20-32 0-18 2-22 4-34 34-135 68-271 102-406zM188 404c-2 12-2 14-14 26-30 38-58 50-78 50-36 0-46-38-46-66 0-36 22-122 40-154 20-42 52-68 80-68 46 0 56 58 56 62s-2 8-2 12c-12 46-24 92-36 138z">
              <text:p/>
            </draw:path>
            <draw:path draw:style-name="gr3" draw:text-style-name="P7" draw:layer="layout" svg:width="0.349cm" svg:height="0.319cm" svg:x="12.532cm" svg:y="10.821cm" svg:viewBox="0 0 350 320" svg:d="M214 100c6-18 22-84 70-84 4 0 20 0 36 10-20 4-34 20-34 38 0 10 8 24 26 24 16 0 38-12 38-40 0-38-40-48-64-48-42 0-66 38-74 54-18-46-56-54-76-54-74 0-114 92-114 110 0 6 5 4 8 6 6 0 8-2 10-8 24-74 70-92 94-92 14 0 38 6 38 48 0 22-12 68-38 166-12 44-36 74-66 74-4 0-22 0-36-10 18-2 34-18 34-38 0-18-16-24-26-24-22 0-40 18-40 40 0 34 36 48 66 48 46 0 72-50 74-54 8 26 34 54 76 54 72 0 112-92 112-108 0-8-6-8-8-8-6 0-8 2-8 8-24 76-72 92-94 92-28 0-38-22-38-46 0-16 4-32 10-62 8-32 16-64 24-96z">
              <text:p/>
            </draw:path>
            <draw:path draw:style-name="gr3" draw:text-style-name="P7" draw:layer="layout" svg:width="0.467cm" svg:height="0.163cm" svg:x="6.228cm" svg:y="12.79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621cm" svg:height="1.559cm" svg:x="7.477cm" svg:y="12.092cm" svg:viewBox="0 0 622 1560" svg:d="M34 1530c22-2 34-18 34-36 0-22-18-34-34-34s-34 10-34 36c0 36 34 64 78 64 106 0 146-164 196-368 54-222 100-446 138-672 26-150 52-290 76-380 8-34 32-126 60-126 22 0 40 14 42 16-24 2-36 18-36 36 0 22 18 34 34 34 18 0 34-10 34-36 0-38-38-64-76-64-54 0-92 76-132 220-2 6-96 360-174 820-18 106-38 224-62 322-12 52-44 184-102 184-26 0-28-11-42-16z">
              <text:p/>
            </draw:path>
            <draw:path draw:style-name="gr3" draw:text-style-name="P7" draw:layer="layout" svg:width="0.483cm" svg:height="0.221cm" svg:x="8.177cm" svg:y="12.048cm" svg:viewBox="0 0 484 222" svg:d="M248 82c-26-30-34-38-54-52-30-22-60-30-88-30-60 0-106 52-106 112 0 56 44 110 104 110 68 0 116-56 134-82 26 30 34 38 54 52 30 22 60 30 88 30 60 0 104-52 104-112 0-56-42-110-102-110-70 0-118 56-134 82zM264 100c18-32 62-82 122-82 50 0 86 45 86 92s-40 84-84 84c-46 0-78-36-124-94zM222 122c-20 32-62 82-122 82-50 0-86-45-86-92s38-84 84-84 78 36 124 94z">
              <text:p/>
            </draw:path>
            <draw:path draw:style-name="gr3" draw:text-style-name="P7" draw:layer="layout" svg:width="0.263cm" svg:height="0.221cm" svg:x="7.851cm" svg:y="13.472cm" svg:viewBox="0 0 264 222" svg:d="M100 164c-6 16-22 44-48 44-9-3-16 0-26-8 20-6 22-24 22-26 0-12-8-18-20-18-14 0-28 10-28 30 0 24 28 36 52 36 22 0 42-16 54-36 12 26 40 36 60 36 56 0 86-62 86-76 0-6-6-6-8-6-6 0-8 2-10 8-10 34-38 60-66 60-20 0-30-14-30-32 0-14 12-58 26-112 8-38 32-52 48-52 9 3 16 0 26 8-16 4-22 18-22 26 0 12 8 20 20 20s28-10 28-30c0-28-32-36-52-36-24 0-44 16-54 34-10-20-32-34-60-34-54 0-86 60-86 74 0 6 6 6 8 6 6 0 6-2 10-8 12-38 42-60 66-60 16 0 30 10 30 34 0 10-6 34-10 50-5 23-11 45-16 68z">
              <text:p/>
            </draw:path>
            <draw:path draw:style-name="gr3" draw:text-style-name="P7" draw:layer="layout" svg:width="0.361cm" svg:height="0.133cm" svg:x="8.181cm" svg:y="13.498cm" svg:viewBox="0 0 362 134" svg:d="M344 24c6 0 18 0 18-12s-12-12-18-12c-109 0-217 0-326 0-6 0-18 0-18 12s12 12 18 12c109 0 217 0 326 0zM344 134c6 0 18 0 18-12 0-14-12-14-18-14-109 0-217 0-326 0-6 0-18 0-18 14 0 12 12 12 18 12 109 0 217 0 326 0z">
              <text:p/>
            </draw:path>
            <draw:path draw:style-name="gr3" draw:text-style-name="P7" draw:layer="layout" svg:width="0.227cm" svg:height="0.335cm" svg:x="8.603cm" svg:y="13.362cm" svg:viewBox="0 0 228 336" svg:d="M228 170c0-54-6-94-28-128-16-22-46-42-86-42-114 0-114 135-114 170s0 166 114 166 114-132 114-166zM114 322c-22 0-52-14-62-54-6-28-6-68-6-106 0-36 0-72 6-100 10-38 42-48 62-48 26 0 52 16 62 44 8 26 8 62 8 104 0 38 0 74-6 104-10 46-44 56-64 56z">
              <text:p/>
            </draw:path>
            <draw:path draw:style-name="gr3" draw:text-style-name="P7" draw:layer="layout" svg:width="0.413cm" svg:height="0.479cm" svg:x="9.035cm" svg:y="12.568cm" svg:viewBox="0 0 414 480" svg:d="M134 258c40 0 80 0 120 0 84 0 160-58 160-128 0-68-70-130-166-130-83 0-165 0-248 0 0 7 0 15 0 22 5 0 11 0 16 0 54 0 56 8 56 32 0 123 0 247 0 370 0 26-2 34-56 34-5 0-11 0-16 0 0 7 0 15 0 22 24-2 75-2 102-2s80 0 104 2c0-7 0-15 0-22-5 0-11 0-16 0-54 0-56-8-56-34 0-55 0-111 0-166zM132 240c0-63 0-127 0-190 0-24 2-28 34-28 21 0 43 0 64 0 112 0 112 74 112 108s0 110-112 110c-33 0-65 0-98 0z">
              <text:p/>
            </draw:path>
            <draw:path draw:style-name="gr3" draw:text-style-name="P7" draw:layer="layout" svg:width="0.237cm" svg:height="0.309cm" svg:x="9.507cm" svg:y="12.738cm" svg:viewBox="0 0 238 310" svg:d="M98 76c0-25 0-51 0-76-33 2-65 4-98 6 0 7 0 15 0 22 50 0 56 6 56 40 0 63 0 125 0 188 0 32-8 32-56 32 0 7 0 15 0 22 28 0 62-2 82-2 28 0 60 0 88 2 0-7 0-15 0-22-5 0-9 0-14 0-52 0-54-8-54-34 0-36 0-72 0-108 0-68 30-132 84-132 4 0 6 0 6 2-2 0-16 8-16 26 0 20 16 30 30 30s32-8 32-30-22-42-52-42c-52 0-78 46-88 76z">
              <text:p/>
            </draw:path>
            <draw:path draw:style-name="gr3" draw:text-style-name="P7" draw:layer="layout" svg:width="0.095cm" svg:height="0.703cm" svg:x="9.847cm" svg:y="12.52cm" svg:viewBox="0 0 96 704" svg:d="M96 704c0-9 0-19 0-28-23 0-45 0-68 0 0-216 0-432 0-648 23 0 45 0 68 0 0-9 0-19 0-28-32 0-64 0-96 0 0 235 0 469 0 704 32 0 64 0 96 0z">
              <text:p/>
            </draw:path>
            <draw:path draw:style-name="gr3" draw:text-style-name="P7" draw:layer="layout" svg:width="0.579cm" svg:height="0.479cm" svg:x="9.977cm" svg:y="12.568cm" svg:viewBox="0 0 580 480" svg:d="M322 190c-19-46-39-92-58-138-2-6-3-7-4-10 0-4 12-18 42-20 6-2 14-2 14-14 0-8-8-8-12-8-28 0-58 2-88 2-18 0-60-2-78-2-4 0-12 0-12 14 0 8 6 8 16 8 42 0 46 6 52 22 27 65 55 131 82 196-49 53-99 107-148 160-3 3-5 5-8 8-34 36-68 48-104 50-8 0-16 0-16 14 3 3 0 8 10 8 20 0 44-2 66-2 26 0 54 2 78 2 4 0 14 0 14-14 0-8-8-8-10-8-6 0-28-2-28-22 0-12 12-22 20-32 24-25 48-51 72-76 21-23 41-45 62-68 24 56 48 112 72 168 2 8 4 8 4 10 0 6-14 18-42 20-8 0-14 2-14 14 0 8 8 8 10 8 20 0 70-2 90-2 16 0 60 2 78 2 4 0 12 0 12-14 0-8-6-8-12-8-48 0-48-2-60-30-28-66-74-176-92-218 48-50 122-132 146-152 20-18 46-34 88-36 10-2 16-2 16-14 0-2 0-8-10-8-20 0-44 2-66 2-26 0-52-2-78-2-4 0-12 0-12 14 0 4 2 6 8 8 6 0 28 2 28 22 0 10-8 18-14 24-38 41-76 81-114 122z">
              <text:p/>
            </draw:path>
            <draw:path draw:style-name="gr3" draw:text-style-name="P7" draw:layer="layout" svg:width="0.429cm" svg:height="0.543cm" svg:x="10.849cm" svg:y="12.6cm" svg:viewBox="0 0 430 544" svg:d="M416 220c10-4 14-10 14-16s-2-10-14-16c-129-61-259-121-388-182-10-6-12-6-14-6-8 0-14 8-14 14 0 10 6 12 14 16 123 58 245 116 368 174-122 58-244 116-366 174-14 6-16 12-16 16 0 8 6 14 14 14 2 0 4 0 14-6 129-61 259-121 388-182zM406 544c12 0 24 0 24-14s-14-14-26-14c-126 0-252 0-378 0-10 0-26 0-26 14s14 14 26 14c127 0 253 0 380 0z">
              <text:p/>
            </draw:path>
            <draw:path draw:style-name="gr3" draw:text-style-name="P7" draw:layer="layout" svg:width="0.349cm" svg:height="0.317cm" svg:x="11.552cm" svg:y="12.738cm" svg:viewBox="0 0 350 318" svg:d="M214 98c4-18 22-84 70-84 4 0 20 0 36 10-20 4-34 20-34 38 0 10 8 24 26 24 16 0 38-12 38-40 0-36-42-46-66-46-40 0-64 36-72 52-18-46-56-52-76-52-74 0-114 90-114 108 0 6 5 4 8 6 6 0 8 0 10-8 24-74 70-92 94-92 14 0 38 6 38 48 0 22-12 68-38 166-12 44-36 74-66 74-6 0-22 0-36-10 18-2 34-18 34-38 0-18-16-24-26-24-22 0-40 18-40 42 0 32 36 46 66 46 46 0 72-50 74-54 8 26 34 54 76 54 72 0 112-92 112-108 0-8-6-8-8-8-6 0-8 4-10 8-22 76-70 92-92 92-28 0-40-22-40-46 0-16 6-32 12-62 8-32 16-64 24-96z">
              <text:p/>
            </draw:path>
            <draw:path draw:style-name="gr3" draw:text-style-name="P7" draw:layer="layout" svg:width="0.095cm" svg:height="0.703cm" svg:x="11.95cm" svg:y="12.52cm" svg:viewBox="0 0 96 704" svg:d="M96 0c-32 0-64 0-96 0 0 9 0 19 0 28 23 0 45 0 68 0 0 216 0 432 0 648-23 0-45 0-68 0 0 9 0 19 0 28 32 0 64 0 96 0 0-235 0-469 0-704z">
              <text:p/>
            </draw:path>
            <draw:path draw:style-name="gr3" draw:text-style-name="P7" draw:layer="layout" svg:width="0.335cm" svg:height="0.495cm" svg:x="12.156cm" svg:y="12.56cm" svg:viewBox="0 0 336 496" svg:d="M336 8c-3-3 0-8-10-8s-76 6-88 8c-6 0-10 4-10 14 0 8 6 8 16 8 34 0 36 4 36 12-1 5-1 9-2 14-15 55-29 111-44 166-12-26-32-44-64-44-82 0-170 102-170 206 0 66 40 112 94 112 14 0 50-4 92-54 6 30 30 54 64 54 24 0 40-16 52-40s13-45 20-68c0-8-6-8-8-8-6 0-8 4-10 12-12 46-24 88-52 88-20 0-22-18-22-32 0-18 2-22 4-34 34-135 68-271 102-406zM190 404c-4 12-4 14-14 26-32 38-60 50-80 50-36 0-46-38-46-66 0-36 24-122 40-154 22-42 52-68 82-68 44 0 54 58 54 62s0 8-2 12c-11 46-23 92-34 138z">
              <text:p/>
            </draw:path>
            <draw:path draw:style-name="gr3" draw:text-style-name="P7" draw:layer="layout" svg:width="0.349cm" svg:height="0.317cm" svg:x="12.514cm" svg:y="12.738cm" svg:viewBox="0 0 350 318" svg:d="M216 98c4-18 20-84 68-84 4 0 22 0 36 10-20 4-34 20-34 38 0 10 8 24 26 24 16 0 38-12 38-40 0-36-40-46-64-46-42 0-66 36-74 52-18-46-56-52-76-52-74 0-114 90-114 108 0 6 8 6 10 6 4 0 6 0 8-8 24-74 70-92 94-92 14 0 38 6 38 48 0 22-12 68-38 166-10 44-36 74-66 74-4 0-20 0-36-10 18-2 34-18 34-38 0-18-16-24-26-24-22 0-40 18-40 42 0 32 36 46 68 46 46 0 70-50 72-54 10 26 34 54 76 54 74 0 114-92 114-108 0-8-8-8-10-8-6 0-8 4-8 8-24 76-72 92-94 92-28 0-38-22-38-46 0-16 4-32 12-62 8-32 16-64 24-96z">
              <text:p/>
            </draw:path>
            <draw:path draw:style-name="gr3" draw:text-style-name="P7" draw:layer="layout" svg:width="0.075cm" svg:height="0.073cm" svg:x="12.956cm" svg:y="12.974cm" svg:viewBox="0 0 76 74" svg:d="M76 36c0-20-18-36-38-36s-38 16-38 36 18 38 38 38 38-18 38-38z">
              <text:p/>
            </draw:path>
          </draw:g>
        </draw:g>
        <draw:g>
          <svg:title>TexMaths</svg:title>
          <svg:desc>18§display§\textcolor{Gray}{0\leq x\leq y &lt; \infty}§svg§600§FALSE§</svg:desc>
          <draw:frame draw:style-name="gr2" draw:text-style-name="P6" draw:layer="layout" svg:width="4.185cm" svg:height="0.598cm" svg:x="16.916cm" svg:y="8.8cm">
            <draw:image xlink:href="Pictures/100020F8000009160000014DFDC863AC0D5F6123.svg" xlink:type="simple" xlink:show="embed" xlink:actuate="onLoad" draw:mime-type="image/svg+xml">
              <text:p/>
            </draw:image>
            <draw:image xlink:href="Pictures/10000001000000580000000D5AC04D43CFAD32D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Joint Distribution</text:p>
          </draw:text-box>
        </draw:frame>
        <draw:frame presentation:style-name="pr5" draw:text-style-name="P14" draw:layer="layout" svg:width="25.2cm" svg:height="9.8cm" svg:x="0.6cm" svg:y="3.8cm" presentation:class="outline" presentation:user-transformed="true">
          <draw:text-box>
            <text:list text:style-name="L3">
              <text:list-item>
                <text:p><text:span text:style-name="T12">The joint distribution function of </text:span><text:span text:style-name="T13">X</text:span><text:span text:style-name="T12"> and </text:span><text:span text:style-name="T13">Y</text:span><text:span text:style-name="T12">: </text:span></text:p>
                <text:p><text:span text:style-name="T12"/></text:p>
                <text:p><text:span text:style-name="T12"/></text:p>
              </text:list-item>
              <text:list-item>
                <text:p><text:span text:style-name="T13">X</text:span><text:span text:style-name="T12"> and </text:span><text:span text:style-name="T13">Y</text:span><text:span text:style-name="T12"> have joint density function </text:span><text:span text:style-name="T13">f</text:span><text:span text:style-name="T12"> if for all </text:span><text:span text:style-name="T13">x</text:span><text:span text:style-name="T12">, </text:span><text:span text:style-name="T13">y, </text:span></text:p>
              </text:list-item>
            </text:list>
          </draw:text-box>
        </draw:frame>
        <draw:g>
          <svg:title>TexMaths</svg:title>
          <svg:desc>22§display§F(x, y) = \Pr[X\leq x, Y\leq y].§svg§600§FALSE§</svg:desc>
          <draw:frame draw:style-name="gr2" draw:text-style-name="P6" draw:layer="layout" svg:width="9.409cm" svg:height="0.77cm" svg:x="7.687cm" svg:y="5.861cm">
            <draw:image xlink:href="Pictures/10005203000010B60000015F6C64AEC6F9E79C59.svg" xlink:type="simple" xlink:show="embed" xlink:actuate="onLoad" draw:mime-type="image/svg+xml">
              <text:p/>
            </draw:image>
            <draw:image xlink:href="Pictures/10000001000000A20000000DA5397F76F68C1603.png" xlink:type="simple" xlink:show="embed" xlink:actuate="onLoad" draw:mime-type="image/png"/>
          </draw:frame>
        </draw:g>
        <draw:g>
          <svg:title>TexMaths</svg:title>
          <svg:desc>22§display§F(x, y) = \int_{-\infty}^y \int_{-\infty}^x f(u,v) du dv.§svg§600§FALSE§</svg:desc>
          <draw:frame draw:style-name="gr2" draw:text-style-name="P6" draw:layer="layout" svg:width="10.87cm" svg:height="1.808cm" svg:x="6.588cm" svg:y="9.796cm">
            <draw:image xlink:href="Pictures/100074760000134E0000033747D91F61CD7866BE.svg" xlink:type="simple" xlink:show="embed" xlink:actuate="onLoad" draw:mime-type="image/svg+xml">
              <text:p/>
            </draw:image>
            <draw:image xlink:href="Pictures/10000001000000BB0000001F20C250DDB42D57B6.png" xlink:type="simple" xlink:show="embed" xlink:actuate="onLoad" draw:mime-type="image/png"/>
          </draw:frame>
        </draw:g>
        <draw:g>
          <svg:title>TexMaths</svg:title>
          <svg:desc>22§display§\mbox{We denote that }\; f(x, y) = \frac{\partial^2}{\partial x\partial y}F(x,y). §svg§600§FALSE§</svg:desc>
          <draw:frame draw:style-name="gr2" draw:text-style-name="P6" draw:layer="layout" svg:width="13.486cm" svg:height="1.85cm" svg:x="3.783cm" svg:y="12.256cm">
            <draw:image xlink:href="Pictures/10008633000017F30000034A6D88BFD27C74BFB5.svg" xlink:type="simple" xlink:show="embed" xlink:actuate="onLoad" draw:mime-type="image/svg+xml">
              <text:p/>
            </draw:image>
            <draw:image xlink:href="Pictures/10000001000000E8000000205C113AB1D785F0F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arginal Distribution Func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4">Given a joint distribution function </text:span><text:span text:style-name="T15">F</text:span><text:span text:style-name="T14">(</text:span><text:span text:style-name="T16">x</text:span><text:span text:style-name="T14">, </text:span><text:span text:style-name="T16">y</text:span><text:span text:style-name="T14">) over </text:span><text:span text:style-name="T16">X</text:span><text:span text:style-name="T14"> and </text:span><text:span text:style-name="T16">Y</text:span><text:span text:style-name="T14">, we have the </text:span><text:span text:style-name="T17">marginal distribution functions</text:span><text:span text:style-name="T14">:</text:span></text:p>
                <text:p><text:span text:style-name="T14"/></text:p>
                <text:p><text:span text:style-name="T14"/></text:p>
                <text:p><text:span text:style-name="T14">The corresponding </text:span><text:span text:style-name="T17">marginal density functions</text:span><text:span text:style-name="T14">: </text:span></text:p>
              </text:list-item>
            </text:list>
          </draw:text-box>
        </draw:frame>
        <draw:g>
          <svg:title>TexMaths</svg:title>
          <svg:desc>22§display§F_X(x) = \Pr[X\leq x], \quad F_Y(y) = \Pr[Y\leq y].§svg§600§FALSE§</svg:desc>
          <draw:frame draw:style-name="gr2" draw:text-style-name="P6" draw:layer="layout" svg:width="14.302cm" svg:height="0.829cm" svg:x="5.166cm" svg:y="6.567cm">
            <draw:image xlink:href="Pictures/100079C1000019660000017A3CD3DDCD8FA84614.svg" xlink:type="simple" xlink:show="embed" xlink:actuate="onLoad" draw:mime-type="image/svg+xml">
              <text:p/>
            </draw:image>
            <draw:image xlink:href="Pictures/10000001000000F60000000E3B19226CAF8678E1.png" xlink:type="simple" xlink:show="embed" xlink:actuate="onLoad" draw:mime-type="image/png"/>
          </draw:frame>
        </draw:g>
        <draw:g>
          <svg:title>TexMaths</svg:title>
          <svg:desc>22§display§f_X(x)\mbox{ and } f_Y(y).§svg§600§FALSE§</svg:desc>
          <draw:frame draw:style-name="gr2" draw:text-style-name="P6" draw:layer="layout" svg:width="5.898cm" svg:height="0.829cm" svg:x="9.068cm" svg:y="10.467cm">
            <draw:image xlink:href="Pictures/100045A000000A7A0000017AD50BEC5811AC26A3.svg" xlink:type="simple" xlink:show="embed" xlink:actuate="onLoad" draw:mime-type="image/svg+xml">
              <text:p/>
            </draw:image>
            <draw:image xlink:href="Pictures/10000001000000650000000E9D60FC81D5BC517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Independenc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4">The random variables </text:span><text:span text:style-name="T16">X</text:span><text:span text:style-name="T14"> and </text:span><text:span text:style-name="T16">Y</text:span><text:span text:style-name="T14"> are independent if, for all </text:span><text:span text:style-name="T16">x</text:span><text:span text:style-name="T14"> and </text:span><text:span text:style-name="T16">y</text:span><text:span text:style-name="T14">, </text:span></text:p>
              </text:list-item>
            </text:list>
          </draw:text-box>
        </draw:frame>
        <draw:g>
          <svg:title>TexMaths</svg:title>
          <svg:desc>22§display§\Pr[(X\leq x)\cap (Y\leq y)] = \Pr[X\leq x] \Pr[Y\leq y].§svg§600§FALSE§</svg:desc>
          <draw:frame draw:style-name="gr2" draw:text-style-name="P6" draw:layer="layout" svg:width="15.666cm" svg:height="0.829cm" svg:x="4.8cm" svg:y="5.4cm">
            <draw:image xlink:href="Pictures/1000742500001BD20000017A6FC6E6BC0BC1EBD5.svg" xlink:type="simple" xlink:show="embed" xlink:actuate="onLoad" draw:mime-type="image/svg+xml">
              <text:p/>
            </draw:image>
            <draw:image xlink:href="Pictures/100000010000010D0000000EDEA278C184A74F9A.png" xlink:type="simple" xlink:show="embed" xlink:actuate="onLoad" draw:mime-type="image/png"/>
          </draw:frame>
        </draw:g>
        <draw:g>
          <svg:title>TexMaths</svg:title>
          <svg:desc>22§display§F(x,y) = F_X(x) F_Y(y).§svg§600§FALSE§</svg:desc>
          <draw:frame draw:style-name="gr2" draw:text-style-name="P6" draw:layer="layout" svg:width="7.744cm" svg:height="0.77cm" svg:x="9.045cm" svg:y="7.996cm">
            <draw:image xlink:href="Pictures/10005DDC00000DC10000015FE49A613886E6FB59.svg" xlink:type="simple" xlink:show="embed" xlink:actuate="onLoad" draw:mime-type="image/svg+xml">
              <text:p/>
            </draw:image>
            <draw:image xlink:href="Pictures/10000001000000850000000DB4BD415D9219F302.png" xlink:type="simple" xlink:show="embed" xlink:actuate="onLoad" draw:mime-type="image/png"/>
          </draw:frame>
        </draw:g>
        <draw:custom-shape draw:style-name="gr8" draw:text-style-name="P15" draw:layer="layout" svg:width="0.4cm" svg:height="0.971cm" svg:x="12.4cm" svg:y="6.6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5" draw:layer="layout" svg:width="0.4cm" svg:height="0.971cm" svg:x="12.401cm" svg:y="9.1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2§display§f(x,y) = f_X(x) f_Y(y).§svg§600§FALSE§</svg:desc>
          <draw:frame draw:style-name="gr2" draw:text-style-name="P6" draw:layer="layout" svg:width="7.423cm" svg:height="0.829cm" svg:x="9.046cm" svg:y="10.797cm">
            <draw:image xlink:href="Pictures/1000562E00000D2F0000017A49919DB838686F1A.svg" xlink:type="simple" xlink:show="embed" xlink:actuate="onLoad" draw:mime-type="image/svg+xml">
              <text:p/>
            </draw:image>
            <draw:image xlink:href="Pictures/10000001000000800000000EB069902E2EAE780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8">For </text:span><text:span text:style-name="T16">a</text:span><text:span text:style-name="T14">, </text:span><text:span text:style-name="T16">b</text:span><text:span text:style-name="T14"> &gt; 0, consider the joint distribution function of two random variables </text:span><text:span text:style-name="T16">X</text:span><text:span text:style-name="T14"> and </text:span><text:span text:style-name="T16">Y</text:span><text:span text:style-name="T14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6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13400000011D55988D60676C3C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9.134cm" svg:x="0.6cm" svg:y="3.866cm" presentation:class="outline" presentation:user-transformed="true">
          <draw:text-box>
            <text:list text:style-name="L3">
              <text:list-item>
                <text:p><text:span text:style-name="T18">For </text:span><text:span text:style-name="T16">a</text:span><text:span text:style-name="T14">, </text:span><text:span text:style-name="T16">b</text:span><text:span text:style-name="T14"> &gt; 0, consider the joint distribution function of two random variables </text:span><text:span text:style-name="T16">X</text:span><text:span text:style-name="T14"> and </text:span><text:span text:style-name="T16">Y</text:span><text:span text:style-name="T14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6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13400000011D55988D60676C3C5.png" xlink:type="simple" xlink:show="embed" xlink:actuate="onLoad" draw:mime-type="image/png"/>
          </draw:frame>
        </draw:g>
        <draw:g>
          <svg:title>TexMaths</svg:title>
          <svg:desc>22§display§F_X(x) = F(x, \infty) = 1 - e^{-ax}, \, F_Y(y) = F(\infty, y) = 1 - e^{-by}.§svg§600§TRUE§</svg:desc>
          <draw:g>
            <draw:path draw:style-name="gr3" draw:text-style-name="P7" draw:layer="layout" svg:width="0.549cm" svg:height="0.521cm" svg:x="4.12cm" svg:y="8.008cm" svg:viewBox="0 0 550 522" svg:d="M205 272c25 0 51 0 77 0 57 0 63 13 63 35 0 7 0 15-6 37 0 5-2 7-2 9 0 7 4 9 8 9 9 0 9-2 14-15 14-56 27-112 41-167 3-9 3-11 3-13-3-3-2-9-9-9-8 0-9 4-11 17-18 60-35 73-101 73-24 0-47 0-71 0 17-65 34-130 51-195 6-27 6-29 42-29 33 0 67 0 101 0 94 0 112 24 112 83 0 18 0 22-2 42 0 11 0 11 0 13 0 5 2 11 9 11 8 0 8-4 11-19 5-45 10-90 15-134 2-20-2-20-22-20-126 0-252 0-378 0-16 0-22 0-22 15 0 9 6 9 19 9 29 0 51 0 51 13 0 2 0 5-2 18-35 136-69 272-104 408-6 31-8 35-70 35-13 0-22 0-22 15 0 9 11 9 13 9 22 0 79-2 101-2 27 0 91 2 115 2 9 0 17 0 17-13 0-7-3-6-4-9-2-2-4-2-22-2s-22 0-40 0c-24-2-26-7-26-15 0-3 0-7 4-18 16-64 31-129 47-193z">
              <text:p/>
            </draw:path>
            <draw:path draw:style-name="gr3" draw:text-style-name="P7" draw:layer="layout" svg:width="0.476cm" svg:height="0.368cm" svg:x="4.615cm" svg:y="8.278cm" svg:viewBox="0 0 477 369" svg:d="M275 162c17-16 34-33 51-50 70-68 90-90 138-92 9 0 13 0 13-11 0-7-4-9-6-9-16 0-35 2-51 2-13 0-48-2-64-2-4 0-11 2-11 13 3 2 0 7 9 7 5 0 20 2 20 13 0 9-9 17-15 22-5 4-73 70-93 92-18-35-36-70-55-105 0-3-2-7-2-9 0-4 11-11 29-13 4 0 11 0 11-11 0-2 0-9-9-9-11 0-23 2-35 2-13 0-25 0-36 0s-24 0-33 0c-8 0-19-2-28-2-2 0-11 0-11 13 0 7 6 7 15 7 31 0 33 4 40 15 25 50 50 100 75 149-11 10-21 21-31 31-9 9-35 33-44 44-66 66-88 88-139 90-6 0-13 0-13 11 0 2 2 9 9 9 15 0 33-3 50-3 9 0 22 0 31 0 11 0 22 3 31 3 2 0 11 0 11-11 0-9-7-9-9-9-6 0-17-2-17-13 0-9 6-16 19-29 37-35 74-70 110-105 22 42 44 85 66 127 3 4 2 4 3 7 0 2-9 11-29 13-4 0-11 0-11 11 0 2 0 9 9 9 11 0 24-3 35-3s24 0 35 0c9 0 22 0 33 0 9 0 20 3 29 3 2 0 11 0 11-11 0-9-7-9-16-9-30 0-33-7-39-16-29-57-57-114-86-171z">
              <text:p/>
            </draw:path>
            <draw:path draw:style-name="gr3" draw:text-style-name="P7" draw:layer="layout" svg:width="0.177cm" svg:height="0.769cm" svg:x="5.253cm" svg:y="7.953cm" svg:viewBox="0 0 178 770" svg:d="M178 761c0-2 0-2-13-15-95-97-121-244-121-360 0-134 31-270 125-364 9-11 9-11 9-13 0-7-2-9-6-9-9 0-77 53-124 151-39 84-48 169-48 235 0 59 9 151 51 239 46 94 112 145 121 145 4 0 6-2 6-9z">
              <text:p/>
            </draw:path>
            <draw:path draw:style-name="gr3" draw:text-style-name="P7" draw:layer="layout" svg:width="0.384cm" svg:height="0.348cm" svg:x="5.499cm" svg:y="8.19cm" svg:viewBox="0 0 385 349" svg:d="M235 107c5-19 22-89 77-89 5 0 22 0 40 11-22 2-37 21-37 39 0 13 8 29 28 29 18 0 42-16 42-47 0-39-46-50-73-50-44 0-70 42-81 59-18-50-59-59-84-59-79 0-123 99-123 118 0 9 7 9 9 9 7 0 9-2 11-9 26-81 77-100 103-100 14 0 42 6 42 50 0 24-13 77-42 184-13 49-39 79-74 79-5 0-22 0-38-9 20-4 35-19 35-41s-15-27-28-27c-22 0-42 20-42 44 0 35 40 51 73 51 50 0 79-53 81-59 9 28 37 59 84 59 79 0 123-99 123-119 0-6-7-6-9-6-7 0-9 2-11 6-24 84-77 101-101 101-31 0-44-24-44-50 0-16 4-33 13-68s18-70 26-106z">
              <text:p/>
            </draw:path>
            <draw:path draw:style-name="gr3" draw:text-style-name="P7" draw:layer="layout" svg:width="0.177cm" svg:height="0.769cm" svg:x="5.963cm" svg:y="7.953cm" svg:viewBox="0 0 178 770" svg:d="M178 386c0-61-9-153-50-241-47-95-113-145-121-145-5 0-7 4-7 9 0 2 0 2 13 17 77 75 121 198 121 360 0 132-28 265-125 364-9 9-9 9-9 11 0 7 2 9 7 9 8 0 77-53 123-149 39-86 48-171 48-235z">
              <text:p/>
            </draw:path>
            <draw:path draw:style-name="gr3" draw:text-style-name="P7" draw:layer="layout" svg:width="0.512cm" svg:height="0.179cm" svg:x="6.478cm" svg:y="8.249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3" draw:text-style-name="P7" draw:layer="layout" svg:width="0.549cm" svg:height="0.521cm" svg:x="7.279cm" svg:y="8.008cm" svg:viewBox="0 0 550 522" svg:d="M205 272c25 0 49 0 74 0 60 0 66 13 66 35 0 7 0 15-6 37-2 5-2 7-2 9 0 7 4 9 8 9 9 0 9-2 14-15 14-56 27-112 41-167 3-9 3-11 3-13-3-3-2-9-9-9-8 0-9 4-13 17-16 60-33 73-99 73-24 0-47 0-71 0 17-65 34-130 51-195 6-27 6-29 42-29 33 0 67 0 101 0 94 0 112 24 112 83 0 18 0 22-2 42 0 11 0 11 0 13 0 5 2 11 9 11 8 0 8-4 11-19 5-45 10-90 15-134 2-20-2-20-22-20-126 0-252 0-378 0-16 0-25 0-25 15 0 9 9 9 22 9 29 0 51 0 51 13 0 2 0 5-4 18-34 136-68 272-102 408-8 31-8 35-70 35-13 0-22 0-22 15 0 9 9 9 11 9 24 0 81-2 103-2 25 0 91 2 115 2 6 0 17 0 17-13 0-7-4-6-6-9-2-2-2-2-20-2s-22 0-42 0c-22-2-24-7-24-15 0-3 0-7 4-18 16-64 31-129 47-193z">
              <text:p/>
            </draw:path>
            <draw:path draw:style-name="gr3" draw:text-style-name="P7" draw:layer="layout" svg:width="0.179cm" svg:height="0.769cm" svg:x="7.93cm" svg:y="7.953cm" svg:viewBox="0 0 180 770" svg:d="M180 761c0-2 0-2-13-15-97-97-121-244-121-360 0-134 29-270 123-364 11-11 11-11 11-13 0-7-2-9-8-9-7 0-77 53-121 151-40 84-51 169-51 235 0 59 9 151 53 239 46 94 112 145 119 145 6 0 8-2 8-9z">
              <text:p/>
            </draw:path>
            <draw:path draw:style-name="gr3" draw:text-style-name="P7" draw:layer="layout" svg:width="0.384cm" svg:height="0.348cm" svg:x="8.176cm" svg:y="8.19cm" svg:viewBox="0 0 385 349" svg:d="M238 107c4-19 22-89 74-89 5 0 25 0 40 11-22 2-37 21-37 39 0 13 8 29 28 29 18 0 42-16 42-47 0-39-44-50-70-50-47 0-73 42-82 59-20-50-61-59-83-59-82 0-126 99-126 118 0 9 9 9 11 9 5 0 7-2 9-9 26-81 77-100 103-100 16 0 42 6 42 50 0 24-13 77-42 184-11 49-39 79-72 79-5 0-22 0-40-9 20-4 38-19 38-41s-18-27-29-27c-24 0-44 20-44 44 0 35 40 51 73 51 52 0 79-53 81-59 11 28 37 59 84 59 81 0 125-99 125-119 0-6-9-6-11-6-7 0-9 2-9 6-26 84-79 101-103 101-31 0-42-24-42-50 0-16 4-33 13-68s18-70 27-106z">
              <text:p/>
            </draw:path>
            <draw:path draw:style-name="gr3" draw:text-style-name="P7" draw:layer="layout" svg:width="0.089cm" svg:height="0.229cm" svg:x="8.663cm" svg:y="8.449cm" svg:viewBox="0 0 90 230" svg:d="M90 81c0-50-17-81-48-81-27 0-42 20-42 42 0 19 15 39 42 39 9 0 20-2 26-9 2-2 3-1 5-2 0 4 2 0 2 11 0 57-28 104-53 130-8 7-9 8-9 11 0 6 5 8 7 8 9 0 70-59 70-149z">
              <text:p/>
            </draw:path>
            <draw:path draw:style-name="gr3" draw:text-style-name="P7" draw:layer="layout" svg:width="0.685cm" svg:height="0.348cm" svg:x="8.984cm" svg:y="8.19cm" svg:viewBox="0 0 686 349" svg:d="M350 132c-42-53-51-64-75-84-44-33-88-48-128-48-90 0-147 86-147 175 0 88 57 174 145 174s154-70 192-132c41 53 50 64 74 84 44 35 86 48 126 48 90 0 149-84 149-174 0-89-56-175-145-175s-154 70-191 132zM370 158c30-55 88-134 176-134 81 0 123 81 123 151 0 75-51 136-119 136-46 0-79-30-97-48-20-20-37-44-83-105zM317 191c-33 55-90 134-176 134-84 0-126-82-126-150 0-76 53-138 121-138 44 0 80 33 95 49 20 21 37 46 86 105z">
              <text:p/>
            </draw:path>
            <draw:path draw:style-name="gr3" draw:text-style-name="P7" draw:layer="layout" svg:width="0.177cm" svg:height="0.769cm" svg:x="9.758cm" svg:y="7.953cm" svg:viewBox="0 0 178 770" svg:d="M178 386c0-61-9-153-50-241-47-95-113-145-121-145-5 0-7 4-7 9 0 2 0 2 13 17 77 75 121 198 121 360 0 132-28 265-125 364-9 9-9 9-9 11 0 7 2 9 7 9 8 0 77-53 123-149 39-86 48-171 48-235z">
              <text:p/>
            </draw:path>
            <draw:path draw:style-name="gr3" draw:text-style-name="P7" draw:layer="layout" svg:width="0.512cm" svg:height="0.179cm" svg:x="10.273cm" svg:y="8.249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3" draw:text-style-name="P7" draw:layer="layout" svg:width="0.254cm" svg:height="0.51cm" svg:x="11.113cm" svg:y="8.019cm" svg:viewBox="0 0 255 511" svg:d="M158 20c0-20 0-20-17-20-49 48-117 48-141 48 0 8 0 16 0 24 15 0 62 0 101-19 0 133 0 266 0 399 0 26-2 35-70 35-9 0-18 0-27 0 0 8 0 16 0 24 29-2 95-2 126-2s99 0 125 2c0-8 0-16 0-24-8 0-16 0-24 0-70 0-73-7-73-35 0-144 0-288 0-432z">
              <text:p/>
            </draw:path>
            <draw:path draw:style-name="gr3" draw:text-style-name="P7" draw:layer="layout" svg:width="0.472cm" svg:height="0.03cm" svg:x="11.668cm" svg:y="8.324cm" svg:viewBox="0 0 473 31" svg:d="M444 31c14 0 29 0 29-16 0-15-15-15-29-15-139 0-278 0-418 0-13 0-26 0-26 15 0 16 13 16 26 16 140 0 279 0 418 0z">
              <text:p/>
            </draw:path>
            <draw:path draw:style-name="gr3" draw:text-style-name="P7" draw:layer="layout" svg:width="0.296cm" svg:height="0.348cm" svg:x="12.411cm" svg:y="8.19cm" svg:viewBox="0 0 297 349" svg:d="M110 162c22 0 79 0 119-17 53-22 57-68 57-79 0-33-29-66-84-66-85 0-202 75-202 211 0 76 46 138 121 138 112 0 176-81 176-90 0-5-4-11-9-11-4 0-4 2-11 9-59 74-145 74-154 74-59 0-66-63-66-88 0-8 0-32 11-81 14 0 28 0 42 0zM73 147c30-118 110-129 129-129 38 0 58 21 58 48 0 81-124 81-154 81-11 0-22 0-33 0z">
              <text:p/>
            </draw:path>
            <draw:path draw:style-name="gr3" draw:text-style-name="P7" draw:layer="layout" svg:width="0.366cm" svg:height="0.025cm" svg:x="12.794cm" svg:y="8.065cm" svg:viewBox="0 0 367 26" svg:d="M345 26c9 0 22 0 22-13s-13-13-22-13c-107 0-215 0-323 0-9 0-22 0-22 13s13 13 22 13c108 0 216 0 323 0z">
              <text:p/>
            </draw:path>
            <draw:path draw:style-name="gr3" draw:text-style-name="P7" draw:layer="layout" svg:width="0.276cm" svg:height="0.242cm" svg:x="13.251cm" svg:y="7.975cm" svg:viewBox="0 0 277 243" svg:d="M196 33c-11-18-29-33-55-33-71 0-141 77-141 154 0 52 35 89 81 89 31 0 58-17 77-37 11 31 42 37 58 37 19 0 33-13 41-28 14-22 20-53 20-55 0-6-6-6-9-6-8 0-8 2-13 17-4 26-15 57-39 57-14 0-18-11-18-26 0-9 4-29 9-42 4-15 9-37 11-50 3-13 7-27 11-40 4-15 11-39 11-41 0-14-11-18-20-18s-20 7-24 22zM161 171c-3 15-16 26-27 35-4 5-26 22-50 22-20 0-40-13-40-53 0-28 15-87 29-109 24-42 52-51 68-51 37 0 48 42 48 46 0 3-2 7-2 9-9 34-18 67-26 101z">
              <text:p/>
            </draw:path>
            <draw:path draw:style-name="gr3" draw:text-style-name="P7" draw:layer="layout" svg:width="0.287cm" svg:height="0.242cm" svg:x="13.581cm" svg:y="7.975cm" svg:viewBox="0 0 288 243" svg:d="M108 180c-5 20-24 48-51 48-2 0-17 0-28-6 22-9 22-27 22-31 0-11-9-20-20-20-16 0-31 13-31 33 0 26 29 39 55 39s48-15 62-39c13 29 41 39 63 39 64 0 97-68 97-83 0-6-6-4-9-6-8 0-8 2-11 8-11 38-44 66-74 66-22 0-33-15-33-35 0-13 13-64 28-123 11-41 35-55 53-55 2 0 18 0 29 7-16 7-22 22-22 31 0 11 7 19 19 19s31-11 31-33c0-30-35-39-55-39-28 0-50 18-61 39-9-21-36-39-64-39-62 0-97 66-97 83 0 7 6 5 9 7 9 0 9-2 11-9 13-42 48-66 75-66 17 0 33 9 33 35 0 11-7 38-14 57-5 25-11 49-17 73z">
              <text:p/>
            </draw:path>
            <draw:path draw:style-name="gr3" draw:text-style-name="P7" draw:layer="layout" svg:width="0.089cm" svg:height="0.229cm" svg:x="14.01cm" svg:y="8.449cm" svg:viewBox="0 0 90 230" svg:d="M90 81c0-50-20-81-48-81-27 0-42 20-42 42 0 19 15 39 42 39 9 0 17-2 26-9 2-2 2-2 5-2 0 4 0 0 0 11 0 57-27 103-53 130-7 6-7 8-7 11 0 6 2 8 7 8 9 0 70-59 70-149z">
              <text:p/>
            </draw:path>
            <draw:path draw:style-name="gr3" draw:text-style-name="P7" draw:layer="layout" svg:width="0.547cm" svg:height="0.521cm" svg:x="14.446cm" svg:y="8.008cm" svg:viewBox="0 0 548 522" svg:d="M205 272c25 0 49 0 74 0 58 0 64 13 64 35 0 7 0 15-4 37-2 5-2 7-2 9 0 7 4 9 8 9 7 0 7-2 11-15 14-56 28-112 42-167 5-9 5-11 5-13-4-3-4-9-11-9-8 0-9 4-11 17-16 60-33 73-99 73-24 0-47 0-71 0 16-65 32-130 49-195 6-27 8-29 41-29 35 0 69 0 104 0 94 0 112 24 112 83 0 18 0 22-2 42-2 11-2 11-2 13 0 5 2 11 8 11 9 0 11-4 11-19 5-45 11-90 16-134 2-20 0-20-20-20-126 0-252 0-378 0-16 0-25 0-25 15 0 9 7 9 22 9 29 0 51 0 51 13 0 2 0 5-4 18-34 136-68 272-102 408-8 31-11 35-70 35-13 0-22 0-22 15 0 9 9 9 11 9 22 0 79-2 101-2 27 0 90 2 117 2 6 0 15 0 15-13 0-7-3-6-4-9-2-2-5-2-22-2-16 0-20 0-40 0-22-2-24-7-24-15 0-3 0-7 2-18 16-64 32-129 49-193z">
              <text:p/>
            </draw:path>
            <draw:path draw:style-name="gr3" draw:text-style-name="P7" draw:layer="layout" svg:width="0.428cm" svg:height="0.368cm" svg:x="14.945cm" svg:y="8.278cm" svg:viewBox="0 0 429 369" svg:d="M334 66c11-11 22-22 33-29 22-15 42-17 51-17 4 0 11 0 11-11 0-5-2-9-7-9-13 0-30 2-44 2-17 0-39-2-57-2-2 0-11 0-11 13 0 7 9 7 11 7 16 2 16 6 16 11 0 4-5 8-7 13-4 4-7 9-9 11-45 47-91 95-136 142-24-52-47-105-71-158-4-8-4-8-4-10 0-9 26-9 29-9 6 0 15 0 15-11 0-2 0-9-9-9-17 0-57 2-72 2-16 0-49-2-62-2-4 0-11 2-11 13 0 7 7 7 13 7 33 0 35 4 40 17 28 62 56 123 83 185-8 32-16 65-24 98-6 27-6 29-50 29-9 0-16 0-16 11 0 6 5 9 9 9 11 0 22-3 33-3s26 0 37 0c9 0 22 0 33 0s27 3 38 3c2 0 11 0 11-11 0-9-7-9-18-9-9 0-11 0-22 0-9-2-11-2-11-9 0-2 7-29 11-44 5-17 16-63 16-66 2-8 2-8 8-15 48-50 96-99 143-149z">
              <text:p/>
            </draw:path>
            <draw:path draw:style-name="gr3" draw:text-style-name="P7" draw:layer="layout" svg:width="0.179cm" svg:height="0.769cm" svg:x="15.524cm" svg:y="7.953cm" svg:viewBox="0 0 180 770" svg:d="M180 761c0-2 0-2-13-15-97-97-121-244-121-360 0-134 29-270 123-364 11-11 11-11 11-13 0-7-2-9-6-9-9 0-79 53-123 151-40 84-51 169-51 235 0 59 9 151 53 239 46 94 112 145 121 145 4 0 6-2 6-9z">
              <text:p/>
            </draw:path>
            <draw:path draw:style-name="gr3" draw:text-style-name="P7" draw:layer="layout" svg:width="0.355cm" svg:height="0.497cm" svg:x="15.772cm" svg:y="8.19cm" svg:viewBox="0 0 356 498" svg:d="M352 48c4-11 4-13 4-17 0-16-11-22-24-22-6 0-20 4-26 15-2 5-7 29-11 42-5 22-11 41-16 61-11 47-23 94-35 141-2 11-35 63-86 63-39 0-48-33-48-61 0-35 13-84 40-152 11-30 15-39 15-54 0-35-24-64-64-64-72 0-101 112-101 118 0 9 7 9 9 9 6 0 9-2 11-15 22-73 53-94 79-94 7 0 20 0 20 24 0 19-9 39-13 55-31 81-47 125-47 160 0 70 49 92 95 92 31 0 57-13 79-35-11 41-20 79-50 118-20 26-51 48-86 48-11 0-46-2-60-30 14 0 25 0 36-9 6-9 15-18 15-33 0-24-22-26-29-26-17 0-44 11-44 50 0 37 33 66 82 66 79 0 160-70 180-156 25-98 50-196 75-294z">
              <text:p/>
            </draw:path>
            <draw:path draw:style-name="gr3" draw:text-style-name="P7" draw:layer="layout" svg:width="0.179cm" svg:height="0.769cm" svg:x="16.199cm" svg:y="7.953cm" svg:viewBox="0 0 180 770" svg:d="M180 386c0-61-8-153-50-241-46-95-115-145-121-145-5 0-9 4-9 9 0 2 0 2 15 17 75 75 119 198 119 360 0 132-28 265-123 364-11 9-11 9-11 11 0 7 4 9 9 9 6 0 77-53 123-149 40-86 48-171 48-235z">
              <text:p/>
            </draw:path>
            <draw:path draw:style-name="gr3" draw:text-style-name="P7" draw:layer="layout" svg:width="0.514cm" svg:height="0.179cm" svg:x="16.714cm" svg:y="8.249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3" draw:text-style-name="P7" draw:layer="layout" svg:width="0.547cm" svg:height="0.521cm" svg:x="17.517cm" svg:y="8.008cm" svg:viewBox="0 0 548 522" svg:d="M205 272c25 0 49 0 74 0 58 0 64 13 64 35 0 7 0 15-4 37-2 5-2 7-2 9 0 7 4 9 8 9 7 0 7-2 11-15 14-56 28-112 42-167 5-9 5-11 5-13-4-3-4-9-11-9-8 0-9 4-11 17-16 60-33 73-99 73-24 0-47 0-71 0 16-65 32-130 49-195 6-27 8-29 41-29 35 0 69 0 104 0 94 0 112 24 112 83 0 18 0 22-2 42-2 11-2 11-2 13 0 5 2 11 8 11 9 0 11-4 11-19 5-45 11-90 16-134 2-20 0-20-20-20-126 0-252 0-378 0-16 0-25 0-25 15 0 9 7 9 22 9 29 0 51 0 51 13 0 2 0 5-4 18-34 136-68 272-102 408-8 31-11 35-70 35-13 0-22 0-22 15 0 9 9 9 11 9 22 0 79-2 101-2 27 0 90 2 117 2 6 0 15 0 15-13 0-7-3-6-4-9-2-2-5-2-22-2-16 0-20 0-40 0-22-2-24-7-24-15 0-3 0-7 2-18 16-64 32-129 49-193z">
              <text:p/>
            </draw:path>
            <draw:path draw:style-name="gr3" draw:text-style-name="P7" draw:layer="layout" svg:width="0.179cm" svg:height="0.769cm" svg:x="18.168cm" svg:y="7.953cm" svg:viewBox="0 0 180 770" svg:d="M180 761c0-2 0-2-13-15-97-97-123-244-123-360 0-134 31-270 125-364 11-11 11-11 11-13 0-7-4-9-8-9-7 0-77 53-124 151-39 84-48 169-48 235 0 59 9 151 51 239 46 94 114 145 121 145 4 0 8-2 8-9z">
              <text:p/>
            </draw:path>
            <draw:path draw:style-name="gr3" draw:text-style-name="P7" draw:layer="layout" svg:width="0.688cm" svg:height="0.348cm" svg:x="18.434cm" svg:y="8.19cm" svg:viewBox="0 0 689 349" svg:d="M350 132c-42-53-51-64-75-84-42-33-86-48-125-48-91 0-150 86-150 175 0 88 58 174 147 174s152-70 190-132c41 53 52 64 77 84 41 35 85 48 125 48 90 0 150-84 150-174 0-89-59-175-148-175s-152 70-191 132zM372 158c31-55 88-134 176-134 81 0 123 81 123 151 0 75-53 136-121 136-44 0-79-30-95-48-19-20-37-44-83-105zM317 191c-31 55-88 134-176 134-82 0-123-82-123-150 0-76 50-138 118-138 47 0 82 33 97 49 20 21 38 46 84 105z">
              <text:p/>
            </draw:path>
            <draw:path draw:style-name="gr3" draw:text-style-name="P7" draw:layer="layout" svg:width="0.089cm" svg:height="0.229cm" svg:x="19.233cm" svg:y="8.449cm" svg:viewBox="0 0 90 230" svg:d="M90 81c0-50-20-81-50-81-25 0-40 20-40 42 0 19 15 39 40 39 8 0 19-2 26-9 4-2 3-1 4-2 3 0 3 0 3 11 0 57-27 103-53 130-9 6-9 8-9 11 0 6 4 8 9 8 9 0 70-59 70-149z">
              <text:p/>
            </draw:path>
            <draw:path draw:style-name="gr3" draw:text-style-name="P7" draw:layer="layout" svg:width="0.355cm" svg:height="0.497cm" svg:x="19.532cm" svg:y="8.19cm" svg:viewBox="0 0 356 498" svg:d="M352 48c4-11 4-13 4-17 0-16-11-22-24-22-6 0-20 4-26 15-2 5-7 29-11 42-5 22-11 41-16 61-11 47-23 94-35 141-2 11-35 63-86 63-39 0-48-33-48-61 0-35 13-84 40-152 11-30 15-39 15-54 0-35-24-64-64-64-72 0-101 112-101 118 0 9 7 9 9 9 6 0 9-2 13-15 20-73 51-94 77-94 7 0 20 0 20 24 0 19-9 39-13 55-31 81-47 125-47 160 0 70 51 92 95 92 31 0 57-13 79-35-11 41-20 79-50 118-20 26-51 48-86 48-11 0-44-2-57-30 11 0 22 0 33-9 6-9 15-18 15-33 0-24-22-26-29-26-17 0-44 11-44 50 0 37 36 66 82 66 81 0 160-70 182-156 25-98 49-196 73-294z">
              <text:p/>
            </draw:path>
            <draw:path draw:style-name="gr3" draw:text-style-name="P7" draw:layer="layout" svg:width="0.179cm" svg:height="0.769cm" svg:x="19.959cm" svg:y="7.953cm" svg:viewBox="0 0 180 770" svg:d="M180 386c0-61-8-153-50-241-46-95-115-145-121-145-5 0-9 4-9 9 0 2 0 2 15 17 77 75 121 198 121 360 0 132-28 265-125 364-11 9-11 9-11 11 0 7 4 9 9 9 6 0 77-53 123-149 40-86 48-171 48-235z">
              <text:p/>
            </draw:path>
            <draw:path draw:style-name="gr3" draw:text-style-name="P7" draw:layer="layout" svg:width="0.514cm" svg:height="0.179cm" svg:x="20.473cm" svg:y="8.249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3" draw:text-style-name="P7" draw:layer="layout" svg:width="0.254cm" svg:height="0.51cm" svg:x="21.316cm" svg:y="8.019cm" svg:viewBox="0 0 255 511" svg:d="M158 20c0-20 0-20-17-20-49 48-117 48-141 48 0 8 0 16 0 24 15 0 62 0 101-19 0 133 0 266 0 399 0 26-2 35-72 35-8 0-17 0-25 0 0 8 0 16 0 24 27-2 95-2 126-2s99 0 125 2c0-8 0-16 0-24-8 0-16 0-24 0-70 0-73-7-73-35 0-144 0-288 0-432z">
              <text:p/>
            </draw:path>
            <draw:path draw:style-name="gr3" draw:text-style-name="P7" draw:layer="layout" svg:width="0.47cm" svg:height="0.03cm" svg:x="21.87cm" svg:y="8.324cm" svg:viewBox="0 0 471 31" svg:d="M444 31c14 0 27 0 27-16 0-15-13-15-27-15-139 0-278 0-418 0-13 0-26 0-26 15 0 16 13 16 26 16 140 0 279 0 418 0z">
              <text:p/>
            </draw:path>
            <draw:path draw:style-name="gr3" draw:text-style-name="P7" draw:layer="layout" svg:width="0.296cm" svg:height="0.348cm" svg:x="22.614cm" svg:y="8.19cm" svg:viewBox="0 0 297 349" svg:d="M108 162c24 0 81 0 119-17 55-22 59-68 59-79 0-33-31-66-84-66-85 0-202 75-202 211 0 76 46 138 121 138 110 0 176-81 176-90 0-5-4-11-9-11-4 0-6 2-11 9-61 74-145 74-154 74-61 0-68-63-68-88 0-8 2-32 13-81 13 0 27 0 40 0zM73 147c30-118 110-129 129-129 38 0 58 21 58 48 0 81-124 81-157 81-10 0-20 0-30 0z">
              <text:p/>
            </draw:path>
            <draw:path draw:style-name="gr3" draw:text-style-name="P7" draw:layer="layout" svg:width="0.364cm" svg:height="0.025cm" svg:x="22.997cm" svg:y="8.065cm" svg:viewBox="0 0 365 26" svg:d="M343 26c9 0 22 0 22-13s-11-13-22-13c-107 0-214 0-321 0-9 0-22 0-22 13s13 13 22 13c107 0 214 0 321 0z">
              <text:p/>
            </draw:path>
            <draw:path draw:style-name="gr3" draw:text-style-name="P7" draw:layer="layout" svg:width="0.219cm" svg:height="0.378cm" svg:x="23.456cm" svg:y="7.839cm" svg:viewBox="0 0 220 379" svg:d="M108 15c1-3 2-6 2-8 0-3-2-7-9-7-11 0-55 4-68 4-4 3-13 3-13 14 0 8 9 8 15 8 24 0 24 3 24 7s-4 26-8 37c-4 17-8 34-11 51-5 17-36 136-36 142-4 13-4 20-4 27 0 54 35 89 79 89 68 0 141-74 141-153 0-64-44-90-81-90-29 0-53 15-69 31 13-51 25-101 38-152zM81 364c-26 0-41-24-41-55 0-19 4-37 19-98 3-11 3-11 14-25 19-24 44-35 63-35 22 0 40 16 40 53 0 22-11 77-29 107-11 27-39 53-66 53z">
              <text:p/>
            </draw:path>
            <draw:path draw:style-name="gr3" draw:text-style-name="P7" draw:layer="layout" svg:width="0.276cm" svg:height="0.348cm" svg:x="23.718cm" svg:y="7.975cm" svg:viewBox="0 0 277 349" svg:d="M275 35c2-9 2-9 2-13 0-9-9-15-17-15-5 0-16 2-22 11-3 4-7 21-9 32-4 15-8 30-11 44-2 13-20 81-22 88-22 15-24 46-66 46-38 0-38-35-38-44 0-30 14-63 29-105 7-18 9-24 9-33 0-26-22-46-51-46-55 0-79 75-79 83 0 7 6 5 9 7 9 0 9-2 11-9 13-44 37-66 57-66 11 0 15 7 15 20 0 11-6 24-8 31-27 66-31 85-31 109 0 9 0 33 20 51 17 15 39 17 55 17 22 0 41-8 59-24-7 29-13 53-35 79-16 18-38 35-66 35-5 0-29 0-40-17 29-5 19-21 29-31 0-17-16-20-22-20-13 0-31 11-31 36 0 26 26 48 64 48 55 0 121-44 138-110 17-68 34-136 51-204z">
              <text:p/>
            </draw:path>
            <draw:path draw:style-name="gr3" draw:text-style-name="P7" draw:layer="layout" svg:width="0.08cm" svg:height="0.08cm" svg:x="24.132cm" svg:y="8.449cm" svg:viewBox="0 0 81 81" svg:d="M81 42c0-22-18-42-41-42-24 0-40 20-40 42s16 39 40 39c23 0 41-17 41-39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10cm" svg:x="0.6cm" svg:y="3.8cm" presentation:class="outline" presentation:user-transformed="true">
          <draw:text-box>
            <text:list text:style-name="L3">
              <text:list-item>
                <text:p><text:span text:style-name="T18">For </text:span><text:span text:style-name="T16">a</text:span><text:span text:style-name="T14">, </text:span><text:span text:style-name="T16">b</text:span><text:span text:style-name="T14"> &gt; 0, consider the joint distribution function of two random variables </text:span><text:span text:style-name="T16">X</text:span><text:span text:style-name="T14"> and </text:span><text:span text:style-name="T16">Y</text:span><text:span text:style-name="T14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6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13400000011D55988D60676C3C5.png" xlink:type="simple" xlink:show="embed" xlink:actuate="onLoad" draw:mime-type="image/png"/>
          </draw:frame>
        </draw:g>
        <draw:g>
          <svg:title>TexMaths</svg:title>
          <svg:desc>22§display§f(x,y) = abe^{-(ax+by)}.§svg§600§FALSE§</svg:desc>
          <draw:frame draw:style-name="gr2" draw:text-style-name="P6" draw:layer="layout" svg:width="7.363cm" svg:height="0.975cm" svg:x="4.036cm" svg:y="9.395cm">
            <draw:image xlink:href="Pictures/10004E6F00000D14000001BC4BBA8897CC092C67.svg" xlink:type="simple" xlink:show="embed" xlink:actuate="onLoad" draw:mime-type="image/svg+xml">
              <text:p/>
            </draw:image>
            <draw:image xlink:href="Pictures/100000010000007F00000011F9438A0C4FC8DA97.png" xlink:type="simple" xlink:show="embed" xlink:actuate="onLoad" draw:mime-type="image/png"/>
          </draw:frame>
        </draw:g>
        <draw:g>
          <svg:title>TexMaths</svg:title>
          <svg:desc>22§display§F_X(x) = F(x, \infty) = 1 - e^{-ax}, \, F_Y(y) = F(\infty, y) = 1 - e^{-by}.§svg§600§TRUE§</svg:desc>
          <draw:g>
            <draw:path draw:style-name="gr3" draw:text-style-name="P7" draw:layer="layout" svg:width="0.549cm" svg:height="0.521cm" svg:x="4.121cm" svg:y="8.008cm" svg:viewBox="0 0 550 522" svg:d="M205 272c25 0 51 0 77 0 57 0 63 13 63 35 0 7 0 15-6 37 0 5-2 7-2 9 0 7 4 9 8 9 9 0 9-2 14-15 14-56 27-112 41-167 3-9 3-11 3-13-3-3-2-9-9-9-8 0-9 4-11 17-18 60-35 73-101 73-24 0-47 0-71 0 17-65 34-130 51-195 6-27 6-29 42-29 33 0 67 0 101 0 94 0 112 24 112 83 0 18 0 22-2 42 0 11 0 11 0 13 0 5 2 11 9 11 8 0 8-4 11-19 5-45 10-90 15-134 2-20-2-20-22-20-126 0-252 0-378 0-16 0-22 0-22 15 0 9 6 9 19 9 29 0 51 0 51 13 0 2 0 5-2 18-35 136-69 272-104 408-6 31-8 35-70 35-13 0-22 0-22 15 0 9 11 9 13 9 22 0 79-2 101-2 27 0 91 2 115 2 9 0 17 0 17-13 0-7-3-6-4-9-2-2-4-2-22-2s-22 0-40 0c-24-2-26-7-26-15 0-3 0-7 4-18 16-64 31-129 47-193z">
              <text:p/>
            </draw:path>
            <draw:path draw:style-name="gr3" draw:text-style-name="P7" draw:layer="layout" svg:width="0.476cm" svg:height="0.368cm" svg:x="4.616cm" svg:y="8.278cm" svg:viewBox="0 0 477 369" svg:d="M275 162c17-16 34-33 51-50 70-68 90-90 138-92 9 0 13 0 13-11 0-7-4-9-6-9-16 0-35 2-51 2-13 0-48-2-64-2-4 0-11 2-11 13 3 2 0 7 9 7 5 0 20 2 20 13 0 9-9 17-15 22-5 4-73 70-93 92-18-35-36-70-55-105 0-3-2-7-2-9 0-4 11-11 29-13 4 0 11 0 11-11 0-2 0-9-9-9-11 0-23 2-35 2-13 0-25 0-36 0s-24 0-33 0c-8 0-19-2-28-2-2 0-11 0-11 13 0 7 6 7 15 7 31 0 33 4 40 15 25 50 50 100 75 149-11 10-21 21-31 31-9 9-35 33-44 44-66 66-88 88-139 90-6 0-13 0-13 11 0 2 2 9 9 9 15 0 33-3 50-3 9 0 22 0 31 0 11 0 22 3 31 3 2 0 11 0 11-11 0-9-7-9-9-9-6 0-17-2-17-13 0-9 6-16 19-29 37-35 74-70 110-105 22 42 44 85 66 127 3 4 2 4 3 7 0 2-9 11-29 13-4 0-11 0-11 11 0 2 0 9 9 9 11 0 24-3 35-3s24 0 35 0c9 0 22 0 33 0 9 0 20 3 29 3 2 0 11 0 11-11 0-9-7-9-16-9-30 0-33-7-39-16-29-57-57-114-86-171z">
              <text:p/>
            </draw:path>
            <draw:path draw:style-name="gr3" draw:text-style-name="P7" draw:layer="layout" svg:width="0.177cm" svg:height="0.769cm" svg:x="5.254cm" svg:y="7.953cm" svg:viewBox="0 0 178 770" svg:d="M178 761c0-2 0-2-13-15-95-97-121-244-121-360 0-134 31-270 125-364 9-11 9-11 9-13 0-7-2-9-6-9-9 0-77 53-124 151-39 84-48 169-48 235 0 59 9 151 51 239 46 94 112 145 121 145 4 0 6-2 6-9z">
              <text:p/>
            </draw:path>
            <draw:path draw:style-name="gr3" draw:text-style-name="P7" draw:layer="layout" svg:width="0.384cm" svg:height="0.348cm" svg:x="5.5cm" svg:y="8.19cm" svg:viewBox="0 0 385 349" svg:d="M235 107c5-19 22-89 77-89 5 0 22 0 40 11-22 2-37 21-37 39 0 13 8 29 28 29 18 0 42-16 42-47 0-39-46-50-73-50-44 0-70 42-81 59-18-50-59-59-84-59-79 0-123 99-123 118 0 9 7 9 9 9 7 0 9-2 11-9 26-81 77-100 103-100 14 0 42 6 42 50 0 24-13 77-42 184-13 49-39 79-74 79-5 0-22 0-38-9 20-4 35-19 35-41s-15-27-28-27c-22 0-42 20-42 44 0 35 40 51 73 51 50 0 79-53 81-59 9 28 37 59 84 59 79 0 123-99 123-119 0-6-7-6-9-6-7 0-9 2-11 6-24 84-77 101-101 101-31 0-44-24-44-50 0-16 4-33 13-68s18-70 26-106z">
              <text:p/>
            </draw:path>
            <draw:path draw:style-name="gr3" draw:text-style-name="P7" draw:layer="layout" svg:width="0.177cm" svg:height="0.769cm" svg:x="5.964cm" svg:y="7.953cm" svg:viewBox="0 0 178 770" svg:d="M178 386c0-61-9-153-50-241-47-95-113-145-121-145-5 0-7 4-7 9 0 2 0 2 13 17 77 75 121 198 121 360 0 132-28 265-125 364-9 9-9 9-9 11 0 7 2 9 7 9 8 0 77-53 123-149 39-86 48-171 48-235z">
              <text:p/>
            </draw:path>
            <draw:path draw:style-name="gr3" draw:text-style-name="P7" draw:layer="layout" svg:width="0.512cm" svg:height="0.179cm" svg:x="6.479cm" svg:y="8.249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3" draw:text-style-name="P7" draw:layer="layout" svg:width="0.549cm" svg:height="0.521cm" svg:x="7.28cm" svg:y="8.008cm" svg:viewBox="0 0 550 522" svg:d="M205 272c25 0 49 0 74 0 60 0 66 13 66 35 0 7 0 15-6 37-2 5-2 7-2 9 0 7 4 9 8 9 9 0 9-2 14-15 14-56 27-112 41-167 3-9 3-11 3-13-3-3-2-9-9-9-8 0-9 4-13 17-16 60-33 73-99 73-24 0-47 0-71 0 17-65 34-130 51-195 6-27 6-29 42-29 33 0 67 0 101 0 94 0 112 24 112 83 0 18 0 22-2 42 0 11 0 11 0 13 0 5 2 11 9 11 8 0 8-4 11-19 5-45 10-90 15-134 2-20-2-20-22-20-126 0-252 0-378 0-16 0-25 0-25 15 0 9 9 9 22 9 29 0 51 0 51 13 0 2 0 5-4 18-34 136-68 272-102 408-8 31-8 35-70 35-13 0-22 0-22 15 0 9 9 9 11 9 24 0 81-2 103-2 25 0 91 2 115 2 6 0 17 0 17-13 0-7-4-6-6-9-2-2-2-2-20-2s-22 0-42 0c-22-2-24-7-24-15 0-3 0-7 4-18 16-64 31-129 47-193z">
              <text:p/>
            </draw:path>
            <draw:path draw:style-name="gr3" draw:text-style-name="P7" draw:layer="layout" svg:width="0.179cm" svg:height="0.769cm" svg:x="7.931cm" svg:y="7.953cm" svg:viewBox="0 0 180 770" svg:d="M180 761c0-2 0-2-13-15-97-97-121-244-121-360 0-134 29-270 123-364 11-11 11-11 11-13 0-7-2-9-8-9-7 0-77 53-121 151-40 84-51 169-51 235 0 59 9 151 53 239 46 94 112 145 119 145 6 0 8-2 8-9z">
              <text:p/>
            </draw:path>
            <draw:path draw:style-name="gr3" draw:text-style-name="P7" draw:layer="layout" svg:width="0.384cm" svg:height="0.348cm" svg:x="8.177cm" svg:y="8.19cm" svg:viewBox="0 0 385 349" svg:d="M238 107c4-19 22-89 74-89 5 0 25 0 40 11-22 2-37 21-37 39 0 13 8 29 28 29 18 0 42-16 42-47 0-39-44-50-70-50-47 0-73 42-82 59-20-50-61-59-83-59-82 0-126 99-126 118 0 9 9 9 11 9 5 0 7-2 9-9 26-81 77-100 103-100 16 0 42 6 42 50 0 24-13 77-42 184-11 49-39 79-72 79-5 0-22 0-40-9 20-4 38-19 38-41s-18-27-29-27c-24 0-44 20-44 44 0 35 40 51 73 51 52 0 79-53 81-59 11 28 37 59 84 59 81 0 125-99 125-119 0-6-9-6-11-6-7 0-9 2-9 6-26 84-79 101-103 101-31 0-42-24-42-50 0-16 4-33 13-68s18-70 27-106z">
              <text:p/>
            </draw:path>
            <draw:path draw:style-name="gr3" draw:text-style-name="P7" draw:layer="layout" svg:width="0.089cm" svg:height="0.229cm" svg:x="8.664cm" svg:y="8.449cm" svg:viewBox="0 0 90 230" svg:d="M90 81c0-50-17-81-48-81-27 0-42 20-42 42 0 19 15 39 42 39 9 0 20-2 26-9 2-2 3-1 5-2 0 4 2 0 2 11 0 57-28 104-53 130-8 7-9 8-9 11 0 6 5 8 7 8 9 0 70-59 70-149z">
              <text:p/>
            </draw:path>
            <draw:path draw:style-name="gr3" draw:text-style-name="P7" draw:layer="layout" svg:width="0.685cm" svg:height="0.348cm" svg:x="8.985cm" svg:y="8.19cm" svg:viewBox="0 0 686 349" svg:d="M350 132c-42-53-51-64-75-84-44-33-88-48-128-48-90 0-147 86-147 175 0 88 57 174 145 174s154-70 192-132c41 53 50 64 74 84 44 35 86 48 126 48 90 0 149-84 149-174 0-89-56-175-145-175s-154 70-191 132zM370 158c30-55 88-134 176-134 81 0 123 81 123 151 0 75-51 136-119 136-46 0-79-30-97-48-20-20-37-44-83-105zM317 191c-33 55-90 134-176 134-84 0-126-82-126-150 0-76 53-138 121-138 44 0 80 33 95 49 20 21 37 46 86 105z">
              <text:p/>
            </draw:path>
            <draw:path draw:style-name="gr3" draw:text-style-name="P7" draw:layer="layout" svg:width="0.177cm" svg:height="0.769cm" svg:x="9.759cm" svg:y="7.953cm" svg:viewBox="0 0 178 770" svg:d="M178 386c0-61-9-153-50-241-47-95-113-145-121-145-5 0-7 4-7 9 0 2 0 2 13 17 77 75 121 198 121 360 0 132-28 265-125 364-9 9-9 9-9 11 0 7 2 9 7 9 8 0 77-53 123-149 39-86 48-171 48-235z">
              <text:p/>
            </draw:path>
            <draw:path draw:style-name="gr3" draw:text-style-name="P7" draw:layer="layout" svg:width="0.512cm" svg:height="0.179cm" svg:x="10.274cm" svg:y="8.249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3" draw:text-style-name="P7" draw:layer="layout" svg:width="0.254cm" svg:height="0.51cm" svg:x="11.114cm" svg:y="8.019cm" svg:viewBox="0 0 255 511" svg:d="M158 20c0-20 0-20-17-20-49 48-117 48-141 48 0 8 0 16 0 24 15 0 62 0 101-19 0 133 0 266 0 399 0 26-2 35-70 35-9 0-18 0-27 0 0 8 0 16 0 24 29-2 95-2 126-2s99 0 125 2c0-8 0-16 0-24-8 0-16 0-24 0-70 0-73-7-73-35 0-144 0-288 0-432z">
              <text:p/>
            </draw:path>
            <draw:path draw:style-name="gr3" draw:text-style-name="P7" draw:layer="layout" svg:width="0.472cm" svg:height="0.03cm" svg:x="11.669cm" svg:y="8.324cm" svg:viewBox="0 0 473 31" svg:d="M444 31c14 0 29 0 29-16 0-15-15-15-29-15-139 0-278 0-418 0-13 0-26 0-26 15 0 16 13 16 26 16 140 0 279 0 418 0z">
              <text:p/>
            </draw:path>
            <draw:path draw:style-name="gr3" draw:text-style-name="P7" draw:layer="layout" svg:width="0.296cm" svg:height="0.348cm" svg:x="12.412cm" svg:y="8.19cm" svg:viewBox="0 0 297 349" svg:d="M110 162c22 0 79 0 119-17 53-22 57-68 57-79 0-33-29-66-84-66-85 0-202 75-202 211 0 76 46 138 121 138 112 0 176-81 176-90 0-5-4-11-9-11-4 0-4 2-11 9-59 74-145 74-154 74-59 0-66-63-66-88 0-8 0-32 11-81 14 0 28 0 42 0zM73 147c30-118 110-129 129-129 38 0 58 21 58 48 0 81-124 81-154 81-11 0-22 0-33 0z">
              <text:p/>
            </draw:path>
            <draw:path draw:style-name="gr3" draw:text-style-name="P7" draw:layer="layout" svg:width="0.366cm" svg:height="0.025cm" svg:x="12.795cm" svg:y="8.065cm" svg:viewBox="0 0 367 26" svg:d="M345 26c9 0 22 0 22-13s-13-13-22-13c-107 0-215 0-323 0-9 0-22 0-22 13s13 13 22 13c108 0 216 0 323 0z">
              <text:p/>
            </draw:path>
            <draw:path draw:style-name="gr3" draw:text-style-name="P7" draw:layer="layout" svg:width="0.276cm" svg:height="0.242cm" svg:x="13.252cm" svg:y="7.975cm" svg:viewBox="0 0 277 243" svg:d="M196 33c-11-18-29-33-55-33-71 0-141 77-141 154 0 52 35 89 81 89 31 0 58-17 77-37 11 31 42 37 58 37 19 0 33-13 41-28 14-22 20-53 20-55 0-6-6-6-9-6-8 0-8 2-13 17-4 26-15 57-39 57-14 0-18-11-18-26 0-9 4-29 9-42 4-15 9-37 11-50 3-13 7-27 11-40 4-15 11-39 11-41 0-14-11-18-20-18s-20 7-24 22zM161 171c-3 15-16 26-27 35-4 5-26 22-50 22-20 0-40-13-40-53 0-28 15-87 29-109 24-42 52-51 68-51 37 0 48 42 48 46 0 3-2 7-2 9-9 34-18 67-26 101z">
              <text:p/>
            </draw:path>
            <draw:path draw:style-name="gr3" draw:text-style-name="P7" draw:layer="layout" svg:width="0.287cm" svg:height="0.242cm" svg:x="13.582cm" svg:y="7.975cm" svg:viewBox="0 0 288 243" svg:d="M108 180c-5 20-24 48-51 48-2 0-17 0-28-6 22-9 22-27 22-31 0-11-9-20-20-20-16 0-31 13-31 33 0 26 29 39 55 39s48-15 62-39c13 29 41 39 63 39 64 0 97-68 97-83 0-6-6-4-9-6-8 0-8 2-11 8-11 38-44 66-74 66-22 0-33-15-33-35 0-13 13-64 28-123 11-41 35-55 53-55 2 0 18 0 29 7-16 7-22 22-22 31 0 11 7 19 19 19s31-11 31-33c0-30-35-39-55-39-28 0-50 18-61 39-9-21-36-39-64-39-62 0-97 66-97 83 0 7 6 5 9 7 9 0 9-2 11-9 13-42 48-66 75-66 17 0 33 9 33 35 0 11-7 38-14 57-5 25-11 49-17 73z">
              <text:p/>
            </draw:path>
            <draw:path draw:style-name="gr3" draw:text-style-name="P7" draw:layer="layout" svg:width="0.089cm" svg:height="0.229cm" svg:x="14.011cm" svg:y="8.449cm" svg:viewBox="0 0 90 230" svg:d="M90 81c0-50-20-81-48-81-27 0-42 20-42 42 0 19 15 39 42 39 9 0 17-2 26-9 2-2 2-2 5-2 0 4 0 0 0 11 0 57-27 103-53 130-7 6-7 8-7 11 0 6 2 8 7 8 9 0 70-59 70-149z">
              <text:p/>
            </draw:path>
            <draw:path draw:style-name="gr3" draw:text-style-name="P7" draw:layer="layout" svg:width="0.547cm" svg:height="0.521cm" svg:x="14.447cm" svg:y="8.008cm" svg:viewBox="0 0 548 522" svg:d="M205 272c25 0 49 0 74 0 58 0 64 13 64 35 0 7 0 15-4 37-2 5-2 7-2 9 0 7 4 9 8 9 7 0 7-2 11-15 14-56 28-112 42-167 5-9 5-11 5-13-4-3-4-9-11-9-8 0-9 4-11 17-16 60-33 73-99 73-24 0-47 0-71 0 16-65 32-130 49-195 6-27 8-29 41-29 35 0 69 0 104 0 94 0 112 24 112 83 0 18 0 22-2 42-2 11-2 11-2 13 0 5 2 11 8 11 9 0 11-4 11-19 5-45 11-90 16-134 2-20 0-20-20-20-126 0-252 0-378 0-16 0-25 0-25 15 0 9 7 9 22 9 29 0 51 0 51 13 0 2 0 5-4 18-34 136-68 272-102 408-8 31-11 35-70 35-13 0-22 0-22 15 0 9 9 9 11 9 22 0 79-2 101-2 27 0 90 2 117 2 6 0 15 0 15-13 0-7-3-6-4-9-2-2-5-2-22-2-16 0-20 0-40 0-22-2-24-7-24-15 0-3 0-7 2-18 16-64 32-129 49-193z">
              <text:p/>
            </draw:path>
            <draw:path draw:style-name="gr3" draw:text-style-name="P7" draw:layer="layout" svg:width="0.428cm" svg:height="0.368cm" svg:x="14.946cm" svg:y="8.278cm" svg:viewBox="0 0 429 369" svg:d="M334 66c11-11 22-22 33-29 22-15 42-17 51-17 4 0 11 0 11-11 0-5-2-9-7-9-13 0-30 2-44 2-17 0-39-2-57-2-2 0-11 0-11 13 0 7 9 7 11 7 16 2 16 6 16 11 0 4-5 8-7 13-4 4-7 9-9 11-45 47-91 95-136 142-24-52-47-105-71-158-4-8-4-8-4-10 0-9 26-9 29-9 6 0 15 0 15-11 0-2 0-9-9-9-17 0-57 2-72 2-16 0-49-2-62-2-4 0-11 2-11 13 0 7 7 7 13 7 33 0 35 4 40 17 28 62 56 123 83 185-8 32-16 65-24 98-6 27-6 29-50 29-9 0-16 0-16 11 0 6 5 9 9 9 11 0 22-3 33-3s26 0 37 0c9 0 22 0 33 0s27 3 38 3c2 0 11 0 11-11 0-9-7-9-18-9-9 0-11 0-22 0-9-2-11-2-11-9 0-2 7-29 11-44 5-17 16-63 16-66 2-8 2-8 8-15 48-50 96-99 143-149z">
              <text:p/>
            </draw:path>
            <draw:path draw:style-name="gr3" draw:text-style-name="P7" draw:layer="layout" svg:width="0.179cm" svg:height="0.769cm" svg:x="15.525cm" svg:y="7.953cm" svg:viewBox="0 0 180 770" svg:d="M180 761c0-2 0-2-13-15-97-97-121-244-121-360 0-134 29-270 123-364 11-11 11-11 11-13 0-7-2-9-6-9-9 0-79 53-123 151-40 84-51 169-51 235 0 59 9 151 53 239 46 94 112 145 121 145 4 0 6-2 6-9z">
              <text:p/>
            </draw:path>
            <draw:path draw:style-name="gr3" draw:text-style-name="P7" draw:layer="layout" svg:width="0.355cm" svg:height="0.497cm" svg:x="15.773cm" svg:y="8.19cm" svg:viewBox="0 0 356 498" svg:d="M352 48c4-11 4-13 4-17 0-16-11-22-24-22-6 0-20 4-26 15-2 5-7 29-11 42-5 22-11 41-16 61-11 47-23 94-35 141-2 11-35 63-86 63-39 0-48-33-48-61 0-35 13-84 40-152 11-30 15-39 15-54 0-35-24-64-64-64-72 0-101 112-101 118 0 9 7 9 9 9 6 0 9-2 11-15 22-73 53-94 79-94 7 0 20 0 20 24 0 19-9 39-13 55-31 81-47 125-47 160 0 70 49 92 95 92 31 0 57-13 79-35-11 41-20 79-50 118-20 26-51 48-86 48-11 0-46-2-60-30 14 0 25 0 36-9 6-9 15-18 15-33 0-24-22-26-29-26-17 0-44 11-44 50 0 37 33 66 82 66 79 0 160-70 180-156 25-98 50-196 75-294z">
              <text:p/>
            </draw:path>
            <draw:path draw:style-name="gr3" draw:text-style-name="P7" draw:layer="layout" svg:width="0.179cm" svg:height="0.769cm" svg:x="16.2cm" svg:y="7.953cm" svg:viewBox="0 0 180 770" svg:d="M180 386c0-61-8-153-50-241-46-95-115-145-121-145-5 0-9 4-9 9 0 2 0 2 15 17 75 75 119 198 119 360 0 132-28 265-123 364-11 9-11 9-11 11 0 7 4 9 9 9 6 0 77-53 123-149 40-86 48-171 48-235z">
              <text:p/>
            </draw:path>
            <draw:path draw:style-name="gr3" draw:text-style-name="P7" draw:layer="layout" svg:width="0.514cm" svg:height="0.179cm" svg:x="16.715cm" svg:y="8.249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3" draw:text-style-name="P7" draw:layer="layout" svg:width="0.547cm" svg:height="0.521cm" svg:x="17.518cm" svg:y="8.008cm" svg:viewBox="0 0 548 522" svg:d="M205 272c25 0 49 0 74 0 58 0 64 13 64 35 0 7 0 15-4 37-2 5-2 7-2 9 0 7 4 9 8 9 7 0 7-2 11-15 14-56 28-112 42-167 5-9 5-11 5-13-4-3-4-9-11-9-8 0-9 4-11 17-16 60-33 73-99 73-24 0-47 0-71 0 16-65 32-130 49-195 6-27 8-29 41-29 35 0 69 0 104 0 94 0 112 24 112 83 0 18 0 22-2 42-2 11-2 11-2 13 0 5 2 11 8 11 9 0 11-4 11-19 5-45 11-90 16-134 2-20 0-20-20-20-126 0-252 0-378 0-16 0-25 0-25 15 0 9 7 9 22 9 29 0 51 0 51 13 0 2 0 5-4 18-34 136-68 272-102 408-8 31-11 35-70 35-13 0-22 0-22 15 0 9 9 9 11 9 22 0 79-2 101-2 27 0 90 2 117 2 6 0 15 0 15-13 0-7-3-6-4-9-2-2-5-2-22-2-16 0-20 0-40 0-22-2-24-7-24-15 0-3 0-7 2-18 16-64 32-129 49-193z">
              <text:p/>
            </draw:path>
            <draw:path draw:style-name="gr3" draw:text-style-name="P7" draw:layer="layout" svg:width="0.179cm" svg:height="0.769cm" svg:x="18.169cm" svg:y="7.953cm" svg:viewBox="0 0 180 770" svg:d="M180 761c0-2 0-2-13-15-97-97-123-244-123-360 0-134 31-270 125-364 11-11 11-11 11-13 0-7-4-9-8-9-7 0-77 53-124 151-39 84-48 169-48 235 0 59 9 151 51 239 46 94 114 145 121 145 4 0 8-2 8-9z">
              <text:p/>
            </draw:path>
            <draw:path draw:style-name="gr3" draw:text-style-name="P7" draw:layer="layout" svg:width="0.688cm" svg:height="0.348cm" svg:x="18.435cm" svg:y="8.19cm" svg:viewBox="0 0 689 349" svg:d="M350 132c-42-53-51-64-75-84-42-33-86-48-125-48-91 0-150 86-150 175 0 88 58 174 147 174s152-70 190-132c41 53 52 64 77 84 41 35 85 48 125 48 90 0 150-84 150-174 0-89-59-175-148-175s-152 70-191 132zM372 158c31-55 88-134 176-134 81 0 123 81 123 151 0 75-53 136-121 136-44 0-79-30-95-48-19-20-37-44-83-105zM317 191c-31 55-88 134-176 134-82 0-123-82-123-150 0-76 50-138 118-138 47 0 82 33 97 49 20 21 38 46 84 105z">
              <text:p/>
            </draw:path>
            <draw:path draw:style-name="gr3" draw:text-style-name="P7" draw:layer="layout" svg:width="0.089cm" svg:height="0.229cm" svg:x="19.234cm" svg:y="8.449cm" svg:viewBox="0 0 90 230" svg:d="M90 81c0-50-20-81-50-81-25 0-40 20-40 42 0 19 15 39 40 39 8 0 19-2 26-9 4-2 3-1 4-2 3 0 3 0 3 11 0 57-27 103-53 130-9 6-9 8-9 11 0 6 4 8 9 8 9 0 70-59 70-149z">
              <text:p/>
            </draw:path>
            <draw:path draw:style-name="gr3" draw:text-style-name="P7" draw:layer="layout" svg:width="0.355cm" svg:height="0.497cm" svg:x="19.533cm" svg:y="8.19cm" svg:viewBox="0 0 356 498" svg:d="M352 48c4-11 4-13 4-17 0-16-11-22-24-22-6 0-20 4-26 15-2 5-7 29-11 42-5 22-11 41-16 61-11 47-23 94-35 141-2 11-35 63-86 63-39 0-48-33-48-61 0-35 13-84 40-152 11-30 15-39 15-54 0-35-24-64-64-64-72 0-101 112-101 118 0 9 7 9 9 9 6 0 9-2 13-15 20-73 51-94 77-94 7 0 20 0 20 24 0 19-9 39-13 55-31 81-47 125-47 160 0 70 51 92 95 92 31 0 57-13 79-35-11 41-20 79-50 118-20 26-51 48-86 48-11 0-44-2-57-30 11 0 22 0 33-9 6-9 15-18 15-33 0-24-22-26-29-26-17 0-44 11-44 50 0 37 36 66 82 66 81 0 160-70 182-156 25-98 49-196 73-294z">
              <text:p/>
            </draw:path>
            <draw:path draw:style-name="gr3" draw:text-style-name="P7" draw:layer="layout" svg:width="0.179cm" svg:height="0.769cm" svg:x="19.96cm" svg:y="7.953cm" svg:viewBox="0 0 180 770" svg:d="M180 386c0-61-8-153-50-241-46-95-115-145-121-145-5 0-9 4-9 9 0 2 0 2 15 17 77 75 121 198 121 360 0 132-28 265-125 364-11 9-11 9-11 11 0 7 4 9 9 9 6 0 77-53 123-149 40-86 48-171 48-235z">
              <text:p/>
            </draw:path>
            <draw:path draw:style-name="gr3" draw:text-style-name="P7" draw:layer="layout" svg:width="0.514cm" svg:height="0.179cm" svg:x="20.474cm" svg:y="8.249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3" draw:text-style-name="P7" draw:layer="layout" svg:width="0.254cm" svg:height="0.51cm" svg:x="21.317cm" svg:y="8.019cm" svg:viewBox="0 0 255 511" svg:d="M158 20c0-20 0-20-17-20-49 48-117 48-141 48 0 8 0 16 0 24 15 0 62 0 101-19 0 133 0 266 0 399 0 26-2 35-72 35-8 0-17 0-25 0 0 8 0 16 0 24 27-2 95-2 126-2s99 0 125 2c0-8 0-16 0-24-8 0-16 0-24 0-70 0-73-7-73-35 0-144 0-288 0-432z">
              <text:p/>
            </draw:path>
            <draw:path draw:style-name="gr3" draw:text-style-name="P7" draw:layer="layout" svg:width="0.47cm" svg:height="0.03cm" svg:x="21.871cm" svg:y="8.324cm" svg:viewBox="0 0 471 31" svg:d="M444 31c14 0 27 0 27-16 0-15-13-15-27-15-139 0-278 0-418 0-13 0-26 0-26 15 0 16 13 16 26 16 140 0 279 0 418 0z">
              <text:p/>
            </draw:path>
            <draw:path draw:style-name="gr3" draw:text-style-name="P7" draw:layer="layout" svg:width="0.296cm" svg:height="0.348cm" svg:x="22.615cm" svg:y="8.19cm" svg:viewBox="0 0 297 349" svg:d="M108 162c24 0 81 0 119-17 55-22 59-68 59-79 0-33-31-66-84-66-85 0-202 75-202 211 0 76 46 138 121 138 110 0 176-81 176-90 0-5-4-11-9-11-4 0-6 2-11 9-61 74-145 74-154 74-61 0-68-63-68-88 0-8 2-32 13-81 13 0 27 0 40 0zM73 147c30-118 110-129 129-129 38 0 58 21 58 48 0 81-124 81-157 81-10 0-20 0-30 0z">
              <text:p/>
            </draw:path>
            <draw:path draw:style-name="gr3" draw:text-style-name="P7" draw:layer="layout" svg:width="0.364cm" svg:height="0.025cm" svg:x="22.998cm" svg:y="8.065cm" svg:viewBox="0 0 365 26" svg:d="M343 26c9 0 22 0 22-13s-11-13-22-13c-107 0-214 0-321 0-9 0-22 0-22 13s13 13 22 13c107 0 214 0 321 0z">
              <text:p/>
            </draw:path>
            <draw:path draw:style-name="gr3" draw:text-style-name="P7" draw:layer="layout" svg:width="0.219cm" svg:height="0.378cm" svg:x="23.457cm" svg:y="7.839cm" svg:viewBox="0 0 220 379" svg:d="M108 15c1-3 2-6 2-8 0-3-2-7-9-7-11 0-55 4-68 4-4 3-13 3-13 14 0 8 9 8 15 8 24 0 24 3 24 7s-4 26-8 37c-4 17-8 34-11 51-5 17-36 136-36 142-4 13-4 20-4 27 0 54 35 89 79 89 68 0 141-74 141-153 0-64-44-90-81-90-29 0-53 15-69 31 13-51 25-101 38-152zM81 364c-26 0-41-24-41-55 0-19 4-37 19-98 3-11 3-11 14-25 19-24 44-35 63-35 22 0 40 16 40 53 0 22-11 77-29 107-11 27-39 53-66 53z">
              <text:p/>
            </draw:path>
            <draw:path draw:style-name="gr3" draw:text-style-name="P7" draw:layer="layout" svg:width="0.276cm" svg:height="0.348cm" svg:x="23.719cm" svg:y="7.975cm" svg:viewBox="0 0 277 349" svg:d="M275 35c2-9 2-9 2-13 0-9-9-15-17-15-5 0-16 2-22 11-3 4-7 21-9 32-4 15-8 30-11 44-2 13-20 81-22 88-22 15-24 46-66 46-38 0-38-35-38-44 0-30 14-63 29-105 7-18 9-24 9-33 0-26-22-46-51-46-55 0-79 75-79 83 0 7 6 5 9 7 9 0 9-2 11-9 13-44 37-66 57-66 11 0 15 7 15 20 0 11-6 24-8 31-27 66-31 85-31 109 0 9 0 33 20 51 17 15 39 17 55 17 22 0 41-8 59-24-7 29-13 53-35 79-16 18-38 35-66 35-5 0-29 0-40-17 29-5 19-21 29-31 0-17-16-20-22-20-13 0-31 11-31 36 0 26 26 48 64 48 55 0 121-44 138-110 17-68 34-136 51-204z">
              <text:p/>
            </draw:path>
            <draw:path draw:style-name="gr3" draw:text-style-name="P7" draw:layer="layout" svg:width="0.08cm" svg:height="0.08cm" svg:x="24.133cm" svg:y="8.449cm" svg:viewBox="0 0 81 81" svg:d="M81 42c0-22-18-42-41-42-24 0-40 20-40 42s16 39 40 39c23 0 41-17 41-39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10cm" svg:x="0.6cm" svg:y="3.8cm" presentation:class="outline" presentation:user-transformed="true">
          <draw:text-box>
            <text:list text:style-name="L3">
              <text:list-item>
                <text:p><text:span text:style-name="T18">For </text:span><text:span text:style-name="T16">a</text:span><text:span text:style-name="T14">, </text:span><text:span text:style-name="T16">b</text:span><text:span text:style-name="T14"> &gt; 0, consider the joint distribution function of two random variables </text:span><text:span text:style-name="T16">X</text:span><text:span text:style-name="T14"> and </text:span><text:span text:style-name="T16">Y</text:span><text:span text:style-name="T14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6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13400000011D55988D60676C3C5.png" xlink:type="simple" xlink:show="embed" xlink:actuate="onLoad" draw:mime-type="image/png"/>
          </draw:frame>
        </draw:g>
        <draw:g>
          <svg:title>TexMaths</svg:title>
          <svg:desc>22§display§f(x,y) = abe^{-(ax+by)}.§svg§600§FALSE§</svg:desc>
          <draw:frame draw:style-name="gr2" draw:text-style-name="P6" draw:layer="layout" svg:width="7.363cm" svg:height="0.975cm" svg:x="4.036cm" svg:y="9.395cm">
            <draw:image xlink:href="Pictures/10004E6F00000D14000001BC4BBA8897CC092C67.svg" xlink:type="simple" xlink:show="embed" xlink:actuate="onLoad" draw:mime-type="image/svg+xml">
              <text:p/>
            </draw:image>
            <draw:image xlink:href="Pictures/100000010000007F00000011F9438A0C4FC8DA97.png" xlink:type="simple" xlink:show="embed" xlink:actuate="onLoad" draw:mime-type="image/png"/>
          </draw:frame>
        </draw:g>
        <draw:g>
          <svg:title>TexMaths</svg:title>
          <svg:desc>22§display§F(x,y) = (1-e^{-ax}) (1-e^{-by}) = F_X(x) F_Y(y).§svg§600§FALSE§</svg:desc>
          <draw:frame draw:style-name="gr2" draw:text-style-name="P6" draw:layer="layout" svg:width="15.697cm" svg:height="0.887cm" svg:x="5.47cm" svg:y="11.339cm">
            <draw:image xlink:href="Pictures/1000937B00001BE000000194C8EA1FF61307F18C.svg" xlink:type="simple" xlink:show="embed" xlink:actuate="onLoad" draw:mime-type="image/svg+xml">
              <text:p/>
            </draw:image>
            <draw:image xlink:href="Pictures/100000010000010E0000000FD2D4C1A6E59AE5F1.png" xlink:type="simple" xlink:show="embed" xlink:actuate="onLoad" draw:mime-type="image/png"/>
          </draw:frame>
        </draw:g>
        <draw:g>
          <svg:title>TexMaths</svg:title>
          <svg:desc>22§display§f_X(x) = ae^{-ax},\, f_Y(y) = be^{-by}\, \;\therefore f(x, y) = f_X(x)f_Y(y).§svg§600§TRUE§</svg:desc>
          <draw:g>
            <draw:path draw:style-name="gr3" draw:text-style-name="P7" draw:layer="layout" svg:width="0.384cm" svg:height="0.699cm" svg:x="4.588cm" svg:y="12.991cm" svg:viewBox="0 0 385 700" svg:d="M242 235c22 0 44 0 66 0 15 0 24 0 24-16 0-8-9-8-22-8-21 0-42 0-64 0 6-30 11-59 16-88 4-16 15-70 20-79 6-15 19-26 35-26 4 0 24 0 39 13-35 2-41 30-41 41 0 18 13 27 28 27 20 0 42-18 42-46 0-35-35-53-68-53-27 0-75 13-97 90-4 15-7 24-26 121-18 0-36 0-53 0-16 0-24 0-24 15 0 9 8 9 22 9 16 0 33 0 50 0-19 101-38 203-57 305-13 74-26 142-68 142-2 0-22 0-35-13 35-2 41-31 41-42 0-17-13-26-28-26-20 0-42 18-42 46 0 35 33 53 64 53 44 0 75-44 88-75 24-48 44-140 44-147 15-81 31-162 46-243z">
              <text:p/>
            </draw:path>
            <draw:path draw:style-name="gr3" draw:text-style-name="P7" draw:layer="layout" svg:width="0.479cm" svg:height="0.368cm" svg:x="4.951cm" svg:y="13.281cm" svg:viewBox="0 0 480 369" svg:d="M275 162c17-16 34-33 51-50 70-68 90-90 138-92 9 0 16 0 16-11 0-7-7-9-9-9-16 0-35 2-51 2-13 0-48-2-64-2-2 0-8 2-8 13 2 2 0 7 6 7 5 0 20 2 20 13 0 9-9 17-15 22-5 4-73 70-93 92-18-35-36-70-55-105 0-3-2-7-2-9 0-4 11-11 29-13 4 0 11 0 11-11 0-2 0-9-9-9-11 0-23 2-35 2-13 0-25 0-36 0s-22 0-33 0c-8 0-19-2-28-2-2 0-11 0-11 13 0 7 6 7 15 7 31 0 33 4 40 15 25 50 50 100 75 149-11 10-21 21-31 31-9 9-35 33-44 44-66 66-88 88-137 90-8 0-15 0-15 11 0 2 2 9 9 9 15 0 33-3 50-3 9 0 22 0 31 0 11 0 22 3 31 3 2 0 11 0 11-11 0-9-7-9-9-9-6 0-17-2-17-13 0-9 8-16 19-29 37-35 74-70 110-105 22 42 44 85 66 127 3 4 2 4 3 7 0 2-9 11-29 13-4 0-11 0-11 11 0 2 0 9 9 9 11 0 23-3 35-3s24 0 35 0 22 0 33 0c9 0 20 3 29 3 2 0 11 0 11-11 0-9-7-9-16-9-30 0-33-7-39-16-29-57-57-114-86-171z">
              <text:p/>
            </draw:path>
            <draw:path draw:style-name="gr3" draw:text-style-name="P7" draw:layer="layout" svg:width="0.179cm" svg:height="0.769cm" svg:x="5.589cm" svg:y="12.956cm" svg:viewBox="0 0 180 770" svg:d="M180 761c0-2 0-2-13-15-97-97-123-244-123-360 0-134 31-270 125-364 11-11 11-11 11-13 0-7-4-9-8-9-7 0-77 53-124 151-39 84-48 169-48 235 0 59 9 151 51 239 46 94 114 145 121 145 4 0 8-2 8-9z">
              <text:p/>
            </draw:path>
            <draw:path draw:style-name="gr3" draw:text-style-name="P7" draw:layer="layout" svg:width="0.384cm" svg:height="0.348cm" svg:x="5.835cm" svg:y="13.193cm" svg:viewBox="0 0 385 349" svg:d="M235 107c5-19 22-89 77-89 5 0 22 0 40 11-22 2-37 21-37 39 0 13 8 29 28 29 18 0 42-16 42-47 0-39-46-50-73-50-44 0-70 42-79 59-20-50-61-59-83-59-82 0-126 99-126 118 0 9 7 9 9 9 7 0 9-2 11-9 26-81 77-100 103-100 16 0 42 6 42 50 0 24-13 77-42 184-13 49-39 79-74 79-5 0-22 0-38-9 20-4 35-19 35-41s-15-27-28-27c-22 0-42 20-42 44 0 35 40 51 73 51 50 0 79-53 81-59 9 28 37 59 84 59 79 0 123-99 123-119 0-6-7-6-9-6-7 0-9 2-11 6-24 84-77 101-101 101-31 0-44-24-44-50 0-16 4-33 13-68s18-70 26-106z">
              <text:p/>
            </draw:path>
            <draw:path draw:style-name="gr3" draw:text-style-name="P7" draw:layer="layout" svg:width="0.177cm" svg:height="0.769cm" svg:x="6.299cm" svg:y="12.956cm" svg:viewBox="0 0 178 770" svg:d="M178 386c0-61-9-153-50-241-47-95-113-145-121-145-5 0-7 4-7 9 0 2 0 2 13 17 77 75 121 198 121 360 0 132-28 265-125 364-9 9-9 9-9 11 0 7 2 9 7 9 8 0 77-53 123-149 39-86 48-171 48-235z">
              <text:p/>
            </draw:path>
            <draw:path draw:style-name="gr3" draw:text-style-name="P7" draw:layer="layout" svg:width="0.512cm" svg:height="0.179cm" svg:x="6.814cm" svg:y="13.252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3" draw:text-style-name="P7" draw:layer="layout" svg:width="0.353cm" svg:height="0.348cm" svg:x="7.617cm" svg:y="13.193cm" svg:viewBox="0 0 354 349" svg:d="M257 50c-13-28-35-50-70-50-90 0-187 114-187 226 0 72 42 123 103 123 16 0 53-2 99-57 7 33 36 57 71 57 28 0 46-18 57-42 13-28 24-74 24-77 0-6-6-6-9-6-8 0-8 2-11 13-13 50-26 94-59 94-20 0-22-20-22-35s0-22 9-57c9-31 11-39 17-68 10-36 19-72 29-107 4-22 4-25 4-27 0-13-8-22-22-22-19 0-30 18-33 35zM207 250c-5 13-5 15-16 29-33 41-66 52-85 52-40 0-51-41-51-72 0-37 24-132 42-167 24-46 59-74 90-74 51 0 62 63 62 68 0 4-3 8-3 13-13 50-26 101-39 151z">
              <text:p/>
            </draw:path>
            <draw:path draw:style-name="gr3" draw:text-style-name="P7" draw:layer="layout" svg:width="0.296cm" svg:height="0.348cm" svg:x="8.031cm" svg:y="13.193cm" svg:viewBox="0 0 297 349" svg:d="M108 162c24 0 81 0 119-17 55-22 59-68 59-79 0-33-31-66-84-66-85 0-202 75-202 211 0 76 46 138 121 138 110 0 176-81 176-90 0-5-4-11-9-11-4 0-6 2-11 9-61 74-145 74-154 74-61 0-68-63-68-88 0-8 2-32 13-81 13 0 27 0 40 0zM73 147c30-118 110-129 129-129 38 0 58 21 58 48 0 81-124 81-157 81-10 0-20 0-30 0z">
              <text:p/>
            </draw:path>
            <draw:path draw:style-name="gr3" draw:text-style-name="P7" draw:layer="layout" svg:width="0.364cm" svg:height="0.025cm" svg:x="8.413cm" svg:y="13.068cm" svg:viewBox="0 0 365 26" svg:d="M343 26c9 0 22 0 22-13s-11-13-22-13c-107 0-214 0-321 0-9 0-22 0-22 13s13 13 22 13c107 0 214 0 321 0z">
              <text:p/>
            </draw:path>
            <draw:path draw:style-name="gr3" draw:text-style-name="P7" draw:layer="layout" svg:width="0.276cm" svg:height="0.242cm" svg:x="8.871cm" svg:y="12.978cm" svg:viewBox="0 0 277 243" svg:d="M196 33c-11-18-31-33-55-33-71 0-141 77-141 154 0 52 35 89 81 89 29 0 55-17 77-37 11 31 42 37 55 37 20 0 33-13 44-28 11-22 20-53 20-55 0-6-6-4-9-6-8 0-8 2-13 17-6 26-15 57-39 57-14 0-18-11-18-26 0-9 4-29 9-42 4-15 9-37 11-50 3-13 7-27 11-40 4-15 11-39 11-41 0-14-11-18-20-18s-22 7-24 22zM161 171c-5 15-16 26-27 35-6 5-26 22-50 22-20 0-40-13-40-53 0-28 15-87 29-109 24-42 52-51 68-51 37 0 46 42 46 46 0 3 0 7 0 9-9 34-18 67-26 101z">
              <text:p/>
            </draw:path>
            <draw:path draw:style-name="gr3" draw:text-style-name="P7" draw:layer="layout" svg:width="0.289cm" svg:height="0.242cm" svg:x="9.199cm" svg:y="12.978cm" svg:viewBox="0 0 290 243" svg:d="M110 180c-7 20-24 48-51 48-2 0-17 0-30-6 22-9 24-27 24-31 0-11-9-20-22-20-16 0-31 13-31 33 0 26 31 39 57 39 24 0 49-15 62-39 13 29 42 39 64 39 61 0 94-68 94-83 0-6-6-6-9-6-6 0-6 2-8 8-14 38-44 66-75 66-22 0-33-15-33-35 0-13 13-64 28-123 11-41 36-55 53-55 10 3 18 0 29 7-18 7-24 22-24 31 0 11 8 19 22 19 13 0 30-11 30-33 0-30-35-39-57-39-26 0-48 18-59 39-11-21-35-39-66-39-60 0-95 66-95 83 0 7 7 7 9 7 7 0 9-2 11-9 13-42 46-66 75-66 17 0 31 9 31 35 0 11-7 38-11 57-6 25-12 49-18 73z">
              <text:p/>
            </draw:path>
            <draw:path draw:style-name="gr3" draw:text-style-name="P7" draw:layer="layout" svg:width="0.089cm" svg:height="0.229cm" svg:x="9.63cm" svg:y="13.452cm" svg:viewBox="0 0 90 230" svg:d="M90 81c0-50-20-81-50-81-25 0-40 20-40 42 0 19 15 39 40 39 8 0 19-2 28-9 2-2 2-1 2-2 3 0 3 0 3 11 0 57-27 103-53 130-9 6-9 8-9 11 0 6 4 8 9 8 9 0 70-59 70-149z">
              <text:p/>
            </draw:path>
            <draw:path draw:style-name="gr3" draw:text-style-name="P7" draw:layer="layout" svg:width="0.384cm" svg:height="0.699cm" svg:x="10.076cm" svg:y="12.991cm" svg:viewBox="0 0 385 700" svg:d="M242 235c22 0 44 0 66 0 15 0 24 0 24-16 0-8-9-8-22-8-21 0-42 0-64 0 6-30 12-59 18-88 2-16 13-70 18-79 6-15 19-26 37-26 2 0 22 0 37 13-35 2-41 30-41 41 0 18 13 27 28 27 20 0 42-18 42-46 0-35-35-53-66-53-26 0-75 13-99 90-4 15-7 24-26 121-18 0-36 0-53 0-16 0-22 0-22 15 0 9 6 9 20 9 17 0 35 0 52 0-19 101-39 203-59 305-13 74-26 142-66 142-4 0-22 0-37-13 35-2 41-31 41-42 0-17-13-26-28-26-20 0-42 18-42 46 0 35 33 53 66 53 42 0 73-44 86-75 26-48 44-140 44-147 15-81 31-162 46-243z">
              <text:p/>
            </draw:path>
            <draw:path draw:style-name="gr3" draw:text-style-name="P7" draw:layer="layout" svg:width="0.428cm" svg:height="0.368cm" svg:x="10.446cm" svg:y="13.281cm" svg:viewBox="0 0 429 369" svg:d="M334 66c11-11 22-22 33-29 22-15 42-17 49-17 6 0 13 0 13-11 0-5-2-9-7-9-13 0-30 2-44 2-17 0-39-2-57-2-2 0-11 0-11 13 0 7 7 7 11 7 16 2 16 6 16 11 0 4-5 8-7 13-4 4-7 9-11 11-45 47-89 95-134 142-24-52-49-105-73-158-2-8-2-8-2-10 0-9 26-9 29-9 6 0 13 0 13-11 0-2 0-9-9-9-15 0-55 2-73 2-13 0-46-2-61-2-5 0-9 2-9 13 0 7 7 7 13 7 31 0 33 4 40 17 28 62 56 123 83 185-8 32-16 65-24 98-6 27-9 29-50 29-9 0-16 0-16 11 0 6 5 9 9 9 11 0 22-3 33-3s26 0 35 0c11 0 24 0 35 0s25 3 38 3c2 0 11 0 11-11 0-9-7-9-18-9-9 0-11 0-22 0-9-2-11-2-11-9 0-2 7-29 11-44 5-17 16-63 16-66 2-8 2-8 8-15 48-50 96-99 143-149z">
              <text:p/>
            </draw:path>
            <draw:path draw:style-name="gr3" draw:text-style-name="P7" draw:layer="layout" svg:width="0.179cm" svg:height="0.769cm" svg:x="11.025cm" svg:y="12.956cm" svg:viewBox="0 0 180 770" svg:d="M180 761c0-2 0-2-13-15-97-97-121-244-121-360 0-134 29-270 123-364 11-11 11-11 11-13 0-7-4-9-8-9-7 0-77 53-124 151-37 84-48 169-48 235 0 59 9 151 53 239 46 94 112 145 119 145 4 0 8-2 8-9z">
              <text:p/>
            </draw:path>
            <draw:path draw:style-name="gr3" draw:text-style-name="P7" draw:layer="layout" svg:width="0.355cm" svg:height="0.497cm" svg:x="11.271cm" svg:y="13.193cm" svg:viewBox="0 0 356 498" svg:d="M354 48c2-11 2-13 2-17 0-16-8-22-22-22-6 0-19 4-26 15-2 5-9 29-11 42-4 22-11 41-15 61-12 47-24 94-36 141-2 11-35 63-88 63-37 0-46-33-46-61 0-35 13-84 40-152 11-30 15-39 15-54 0-35-26-64-64-64-74 0-103 112-103 118 0 9 9 9 11 9 7 0 7-2 11-15 22-73 53-94 79-94 7 0 20 0 20 24 0 19-9 39-13 55-31 81-46 125-46 160 0 70 48 92 94 92 31 0 57-13 79-35-11 41-19 79-50 118-20 26-51 48-86 48-11 0-46-2-59-30 13 0 24 0 33-9 8-9 15-18 15-33 0-24-20-26-29-26-17 0-41 11-41 50 0 37 33 66 81 66 79 0 158-70 180-156 25-98 50-196 75-294z">
              <text:p/>
            </draw:path>
            <draw:path draw:style-name="gr3" draw:text-style-name="P7" draw:layer="layout" svg:width="0.179cm" svg:height="0.769cm" svg:x="11.7cm" svg:y="12.956cm" svg:viewBox="0 0 180 770" svg:d="M180 386c0-61-8-153-50-241-49-95-115-145-121-145-5 0-9 4-9 9 0 2 0 2 15 17 75 75 119 198 119 360 0 132-28 265-123 364-11 9-11 9-11 11 0 7 4 9 9 9 6 0 77-53 123-149 37-86 48-171 48-235z">
              <text:p/>
            </draw:path>
            <draw:path draw:style-name="gr3" draw:text-style-name="P7" draw:layer="layout" svg:width="0.514cm" svg:height="0.179cm" svg:x="12.215cm" svg:y="13.252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3" draw:text-style-name="P7" draw:layer="layout" svg:width="0.283cm" svg:height="0.541cm" svg:x="13.024cm" svg:y="13cm" svg:viewBox="0 0 284 542" svg:d="M147 9c0-2 0-9-8-9-18 0-75 7-95 7-7 2-15 2-15 15 0 11 6 11 19 11 38 0 38 4 38 13 0 4-7 31-11 46-21 84-41 168-62 252-11 38-13 51-13 77 0 73 42 121 99 121 90 0 185-114 185-226 0-70-40-123-104-123-35 0-66 22-90 46 19-77 38-153 57-230zM75 298c4-15 4-17 13-26 37-50 73-61 92-61 27 0 49 22 49 72 0 46-27 134-40 162-26 53-61 79-90 79-26 0-53-19-53-77 0-15 0-28 13-76 6-24 11-49 16-73z">
              <text:p/>
            </draw:path>
            <draw:path draw:style-name="gr3" draw:text-style-name="P7" draw:layer="layout" svg:width="0.296cm" svg:height="0.348cm" svg:x="13.354cm" svg:y="13.193cm" svg:viewBox="0 0 297 349" svg:d="M110 162c22 0 79 0 119-17 53-22 57-68 57-79 0-33-29-66-84-66-85 0-202 75-202 211 0 76 46 138 123 138 110 0 174-81 174-90 0-5-4-11-9-11-4 0-4 2-9 9-61 74-147 74-156 74-59 0-66-63-66-88 0-8 0-32 11-81 14 0 28 0 42 0zM73 147c30-118 110-129 129-129 38 0 58 21 58 48 0 81-124 81-154 81-11 0-22 0-33 0z">
              <text:p/>
            </draw:path>
            <draw:path draw:style-name="gr3" draw:text-style-name="P7" draw:layer="layout" svg:width="0.366cm" svg:height="0.025cm" svg:x="13.737cm" svg:y="13.068cm" svg:viewBox="0 0 367 26" svg:d="M345 26c9 0 22 0 22-13s-13-13-22-13c-107 0-215 0-323 0-9 0-22 0-22 13s13 13 22 13c108 0 216 0 323 0z">
              <text:p/>
            </draw:path>
            <draw:path draw:style-name="gr3" draw:text-style-name="P7" draw:layer="layout" svg:width="0.217cm" svg:height="0.378cm" svg:x="14.199cm" svg:y="12.842cm" svg:viewBox="0 0 218 379" svg:d="M106 15c2 0 2-6 2-8 0-3-2-7-9-7-9 0-55 4-68 4-5 3-11 3-11 14 0 8 6 8 13 8 26 0 26 3 26 7s-6 26-8 37c-5 17-9 34-14 51-4 17-35 136-35 142-2 13-2 20-2 27 0 54 33 89 79 89 68 0 139-74 139-153 0-64-44-90-82-90-26 0-50 15-68 31 13-51 25-101 38-152zM79 364c-26 0-42-24-42-55 0-19 5-37 20-98 5-11 5-11 13-25 22-24 47-35 66-35 20 0 40 16 40 53 0 22-13 77-29 107-13 27-39 53-68 53z">
              <text:p/>
            </draw:path>
            <draw:path draw:style-name="gr3" draw:text-style-name="P7" draw:layer="layout" svg:width="0.276cm" svg:height="0.348cm" svg:x="14.461cm" svg:y="12.978cm" svg:viewBox="0 0 277 349" svg:d="M275 35c2-9 2-9 2-13 0-9-9-15-17-15-7 0-18 2-22 11-3 4-7 21-9 32-4 15-8 30-11 44-5 13-22 81-22 88-2 0-24 46-68 46-36 0-36-35-36-44 0-30 11-63 29-105 7-18 9-24 9-33 0-26-22-46-51-46-55 0-79 75-79 83 0 7 7 7 9 7 6 0 9-2 9-9 13-44 37-66 59-66 9 0 13 7 13 20 0 11-4 24-6 31-27 66-33 85-33 109 0 9 0 33 22 51 15 15 39 17 52 17 22 0 42-8 60-24-7 29-13 53-35 79-16 18-36 35-64 35-5 0-31 0-42-17 29-5 19-21 29-31 0-17-16-20-20-20-13 0-33 11-33 36 0 26 26 48 66 48 55 0 121-44 136-110 18-68 35-136 53-204z">
              <text:p/>
            </draw:path>
            <draw:path draw:style-name="gr3" draw:text-style-name="P7" draw:layer="layout" svg:width="0.468cm" svg:height="0.414cm" svg:x="15.387cm" svg:y="13.178cm" svg:viewBox="0 0 469 415" svg:d="M275 39c0-21-18-39-40-39s-41 18-41 39c0 22 19 42 41 42s40-17 40-42zM469 373c0-22-18-42-40-42s-42 20-42 42 20 42 42 42 40-20 40-42zM84 373c0-22-20-42-42-42s-42 20-42 42 20 42 42 42 42-20 42-42z">
              <text:p/>
            </draw:path>
            <draw:path draw:style-name="gr3" draw:text-style-name="P7" draw:layer="layout" svg:width="0.386cm" svg:height="0.699cm" svg:x="16.135cm" svg:y="12.991cm" svg:viewBox="0 0 387 700" svg:d="M244 235c22 0 44 0 66 0 16 0 22 0 22-16 0-8-6-8-20-8-21 0-42 0-63 0 5-30 10-59 15-88 4-16 15-70 20-79 6-15 20-26 35-26 4 0 24 0 37 13-33 2-41 30-41 41 0 18 15 27 28 27 22 0 44-18 44-46 0-35-35-53-68-53-26 0-75 13-97 90-6 15-9 24-26 121-18 0-35 0-53 0-15 0-24 0-24 15 0 9 6 9 22 9 17 0 34 0 50 0-19 101-38 203-57 305-15 74-26 142-68 142-2 0-22 0-37-13 37-2 44-31 44-42 0-17-16-26-29-26-20 0-44 18-44 46 0 35 35 53 66 53 44 0 75-44 88-75 24-48 42-140 44-147 15-81 31-162 46-243z">
              <text:p/>
            </draw:path>
            <draw:path draw:style-name="gr3" draw:text-style-name="P7" draw:layer="layout" svg:width="0.179cm" svg:height="0.769cm" svg:x="16.632cm" svg:y="12.956cm" svg:viewBox="0 0 180 770" svg:d="M180 761c0-2 0-2-13-15-97-97-121-244-121-360 0-134 29-270 123-364 11-11 11-11 11-13 0-7-2-9-8-9-7 0-77 53-121 151-40 84-51 169-51 235 0 59 9 151 53 239 46 94 112 145 119 145 6 0 8-2 8-9z">
              <text:p/>
            </draw:path>
            <draw:path draw:style-name="gr3" draw:text-style-name="P7" draw:layer="layout" svg:width="0.384cm" svg:height="0.348cm" svg:x="16.878cm" svg:y="13.193cm" svg:viewBox="0 0 385 349" svg:d="M238 107c4-19 22-89 74-89 5 0 25 0 40 11-22 2-37 21-37 39 0 13 8 29 30 29 16 0 40-16 40-47 0-39-44-50-70-50-47 0-73 42-82 59-20-50-61-59-83-59-82 0-126 99-126 118 0 9 9 9 11 9 5 0 7-2 9-9 26-81 77-100 103-100 16 0 42 6 42 50 0 24-13 77-42 184-11 49-39 79-72 79-5 0-22 0-40-9 20-4 38-19 38-41s-18-27-29-27c-24 0-44 20-44 44 0 35 40 51 75 51 50 0 77-53 79-59 11 28 37 59 84 59 81 0 125-99 125-119 0-6-9-6-11-6-7 0-7 2-9 6-26 84-79 101-103 101-31 0-42-24-42-50 0-16 4-33 13-68s18-70 27-106z">
              <text:p/>
            </draw:path>
            <draw:path draw:style-name="gr3" draw:text-style-name="P7" draw:layer="layout" svg:width="0.089cm" svg:height="0.229cm" svg:x="17.364cm" svg:y="13.452cm" svg:viewBox="0 0 90 230" svg:d="M90 81c0-50-17-81-48-81-27 0-42 20-42 42 0 19 15 39 42 39 9 0 20-2 26-9 2-2 3-1 5-2 0 4 2 0 2 11 0 57-28 104-53 130-8 7-9 8-9 11 0 6 5 8 9 8 7 0 68-59 68-149z">
              <text:p/>
            </draw:path>
            <draw:path draw:style-name="gr3" draw:text-style-name="P7" draw:layer="layout" svg:width="0.355cm" svg:height="0.497cm" svg:x="17.666cm" svg:y="13.193cm" svg:viewBox="0 0 356 498" svg:d="M352 48c4-11 4-13 4-17 0-16-11-22-24-22-6 0-20 4-26 15-2 5-7 29-11 42-5 22-11 41-16 61-11 47-23 94-35 141-2 11-35 63-86 63-39 0-48-33-48-61 0-35 13-84 40-152 11-30 15-39 15-54 0-35-26-64-64-64-72 0-101 112-101 118 0 9 7 9 9 9 6 0 9-2 11-15 22-73 53-94 79-94 7 0 20 0 20 24 0 19-9 39-13 55-31 81-47 125-47 160 0 70 49 92 95 92 31 0 57-13 79-35-11 41-20 79-50 118-20 26-51 48-86 48-11 0-46-2-60-30 14 0 25 0 36-9 6-9 15-18 15-33 0-24-22-26-29-26-17 0-44 11-44 50 0 37 33 66 82 66 79 0 160-70 180-156 25-98 50-196 75-294z">
              <text:p/>
            </draw:path>
            <draw:path draw:style-name="gr3" draw:text-style-name="P7" draw:layer="layout" svg:width="0.179cm" svg:height="0.769cm" svg:x="18.093cm" svg:y="12.956cm" svg:viewBox="0 0 180 770" svg:d="M180 386c0-61-8-153-50-241-46-95-115-145-121-145-5 0-9 4-9 9 0 2 0 2 15 17 75 75 119 198 119 360 0 132-28 265-123 364-11 9-11 9-11 11 0 7 4 9 9 9 6 0 77-53 123-149 40-86 48-171 48-235z">
              <text:p/>
            </draw:path>
            <draw:path draw:style-name="gr3" draw:text-style-name="P7" draw:layer="layout" svg:width="0.514cm" svg:height="0.179cm" svg:x="18.607cm" svg:y="13.252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3" draw:text-style-name="P7" draw:layer="layout" svg:width="0.384cm" svg:height="0.699cm" svg:x="19.421cm" svg:y="12.991cm" svg:viewBox="0 0 385 700" svg:d="M242 235c23 0 45 0 68 0 16 0 22 0 22-16 0-8-6-8-20-8-21 0-42 0-63 0 5-30 10-59 15-88 2-16 13-70 18-79 8-15 22-26 37-26 2 0 22 0 37 13-33 2-41 30-41 41 0 18 13 27 28 27 20 0 42-18 42-46 0-35-35-53-66-53-26 0-75 13-99 90-4 15-7 24-24 121-19 0-37 0-55 0-13 0-22 0-22 15 0 9 6 9 22 9 17 0 34 0 50 0-19 101-38 203-57 305-15 74-28 142-68 142-2 0-22 0-37-13 35-2 41-31 41-42 0-17-13-26-28-26-20 0-42 18-42 46 0 35 35 53 66 53 42 0 73-44 88-75 24-48 42-140 42-147 15-81 31-162 46-243z">
              <text:p/>
            </draw:path>
            <draw:path draw:style-name="gr3" draw:text-style-name="P7" draw:layer="layout" svg:width="0.476cm" svg:height="0.368cm" svg:x="19.786cm" svg:y="13.281cm" svg:viewBox="0 0 477 369" svg:d="M273 162c17-16 35-33 53-50 68-68 90-90 138-92 7 0 13 0 13-11 0-7-4-6-6-9-18 0-35 2-51 2-15 0-50-2-64-2-4 0-11 2-11 13 3 2 0 7 9 7 5 0 18 2 18 13 0 9-9 17-13 22-5 4-73 70-93 92-18-35-36-70-55-105-2-3-2-7-2-9 0-4 9-11 29-13 2 0 11 0 11-11 0-2 0-9-9-9-13 0-27 2-38 2s-24 0-35 0c-9 0-22 0-31 0-11 0-22-2-30-2-3 0-11 0-11 13 0 7 6 7 15 7 33 0 35 4 40 15 25 50 51 100 77 149-11 10-21 21-31 31-11 9-35 33-46 44-66 66-88 88-137 90-6 0-13 0-13 11 0 2 2 9 7 9 15 0 35-3 50-3 9 0 24 0 33 0s22 3 31 3c2 0 11 0 11-11 0-9-7-9-11-9s-15-2-15-13c0-9 6-16 17-29 37-35 74-70 110-105 22 42 44 85 66 127 2 4 3 4 5 7 0 2-11 11-29 13-7 0-13 0-13 11 0 2 0 9 9 9 13 0 26-3 37-3s24 0 35 0c9 0 22 0 31 0 11 0 22 3 31 3 2 0 11 0 11-11 0-9-7-9-16-9-33 0-35-7-39-16-30-57-59-114-88-171z">
              <text:p/>
            </draw:path>
            <draw:path draw:style-name="gr3" draw:text-style-name="P7" draw:layer="layout" svg:width="0.177cm" svg:height="0.769cm" svg:x="20.424cm" svg:y="12.956cm" svg:viewBox="0 0 178 770" svg:d="M178 761c0-2 0-2-13-15-97-97-121-244-121-360 0-134 29-270 123-364 11-11 11-11 11-13 0-7-2-9-6-9-9 0-80 53-124 151-39 84-48 169-48 235 0 59 7 151 51 239 46 94 112 145 121 145 4 0 6-2 6-9z">
              <text:p/>
            </draw:path>
            <draw:path draw:style-name="gr3" draw:text-style-name="P7" draw:layer="layout" svg:width="0.384cm" svg:height="0.348cm" svg:x="20.671cm" svg:y="13.193cm" svg:viewBox="0 0 385 349" svg:d="M235 107c5-19 22-89 77-89 3 0 22 0 38 11-22 2-38 21-38 39 0 13 9 29 31 29 16 0 42-16 42-47 0-39-46-50-73-50-44 0-72 42-81 59-20-50-62-59-84-59-79 0-125 99-125 118 0 9 9 9 11 9 7 0 9-2 9-9 26-81 77-100 103-100 16 0 42 6 42 50 0 24-13 77-42 184-11 49-39 79-72 79-5 0-22 0-40-9 20-4 37-19 37-41s-17-27-28-27c-24 0-42 20-42 44 0 35 37 51 73 51 50 0 77-53 81-59 9 28 35 59 81 59 82 0 126-99 126-119 0-6-7-6-11-6-7 0-7 2-9 6-26 84-79 101-103 101-31 0-42-24-42-50 0-16 4-33 13-68s18-70 26-106z">
              <text:p/>
            </draw:path>
            <draw:path draw:style-name="gr3" draw:text-style-name="P7" draw:layer="layout" svg:width="0.179cm" svg:height="0.769cm" svg:x="21.133cm" svg:y="12.956cm" svg:viewBox="0 0 180 770" svg:d="M180 386c0-61-8-153-50-241-46-95-115-145-121-145-5 0-9 4-9 9 0 2 0 2 15 17 75 75 119 198 119 360 0 132-28 265-123 364-11 9-11 9-11 11 0 7 4 9 9 9 6 0 77-53 123-149 40-86 48-171 48-235z">
              <text:p/>
            </draw:path>
            <draw:path draw:style-name="gr3" draw:text-style-name="P7" draw:layer="layout" svg:width="0.384cm" svg:height="0.699cm" svg:x="21.432cm" svg:y="12.991cm" svg:viewBox="0 0 385 700" svg:d="M242 235c22 0 44 0 66 0 15 0 24 0 24-16 0-8-9-8-22-8-21 0-42 0-64 0 6-30 11-59 16-88 4-16 15-70 20-79 6-15 19-26 35-26 4 0 24 0 39 13-35 2-41 30-41 41 0 18 13 27 28 27 20 0 42-18 42-46 0-35-35-53-68-53-27 0-75 13-97 90-4 15-7 24-26 121-18 0-36 0-53 0-16 0-24 0-24 15 0 9 6 9 22 9s33 0 50 0c-19 101-38 203-57 305-13 74-26 142-68 142-2 0-22 0-35-13 35-2 41-31 41-42 0-17-13-26-28-26-20 0-42 18-42 46 0 35 33 53 64 53 44 0 75-44 88-75 24-48 42-140 44-147 15-81 31-162 46-243z">
              <text:p/>
            </draw:path>
            <draw:path draw:style-name="gr3" draw:text-style-name="P7" draw:layer="layout" svg:width="0.43cm" svg:height="0.368cm" svg:x="21.799cm" svg:y="13.281cm" svg:viewBox="0 0 431 369" svg:d="M337 66c8-11 19-22 33-29 22-15 41-17 48-17s13 0 13-11c0-5-4-9-9-9-13 0-28 2-44 2-15 0-39-2-55-2-2 0-11 0-11 13 0 7 7 7 9 7 18 2 18 6 18 11 0 4-5 8-9 13-2 4-4 9-9 11-45 47-89 95-134 142-24-52-48-105-73-158-4-8-4-8-4-10 0-9 26-9 31-9 6 0 13 0 13-11 0-2 0-9-9-9-15 0-55 2-72 2-14 0-49-2-62-2-4 0-11 2-11 13 0 7 7 7 15 7 31 0 33 4 40 17 28 62 56 123 84 185-8 32-17 65-25 98-8 27-8 29-50 29-9 0-16 0-16 11 0 6 3 9 9 9 9 0 22-3 33-3s27 0 35 0c11 0 25 0 36 0s24 3 35 3c4 0 13 0 13-11 0-9-7-9-20-9-9 0-11 0-20 0-11-2-11-2-11-9 0-2 7-29 9-44 5-17 16-63 18-66 2-8 2-8 6-15 49-50 97-99 146-149z">
              <text:p/>
            </draw:path>
            <draw:path draw:style-name="gr3" draw:text-style-name="P7" draw:layer="layout" svg:width="0.179cm" svg:height="0.769cm" svg:x="22.38cm" svg:y="12.956cm" svg:viewBox="0 0 180 770" svg:d="M180 761c0-2 0-2-13-15-97-97-123-244-123-360 0-134 31-270 125-364 11-11 11-11 11-13 0-7-4-9-8-9-7 0-77 53-124 151-39 84-48 169-48 235 0 59 9 151 51 239 46 94 114 145 121 145 4 0 8-2 8-9z">
              <text:p/>
            </draw:path>
            <draw:path draw:style-name="gr3" draw:text-style-name="P7" draw:layer="layout" svg:width="0.355cm" svg:height="0.497cm" svg:x="22.626cm" svg:y="13.193cm" svg:viewBox="0 0 356 498" svg:d="M354 48c2-11 2-13 2-17 0-16-11-22-22-22-8 0-19 4-26 15-2 5-9 29-11 42-7 22-11 41-15 61-12 47-24 94-36 141-4 11-37 63-88 63-39 0-48-33-48-61 0-35 13-84 40-152 13-30 15-39 15-54 0-35-24-64-62-64-74 0-103 112-103 118 0 9 6 6 9 9 9 0 9-2 13-15 20-73 53-94 77-94 7 0 20 0 20 24 0 19-7 39-13 55-31 81-44 125-44 160 0 70 48 92 94 92 29 0 55-13 77-35-9 41-20 79-50 118-20 26-49 48-84 48-11 0-46-2-59-30 13 0 22 0 33-9 8-9 15-18 15-33 0-24-20-26-29-26-17 0-41 11-41 50 0 37 33 66 81 66 79 0 158-70 180-156 25-98 50-196 75-294z">
              <text:p/>
            </draw:path>
            <draw:path draw:style-name="gr3" draw:text-style-name="P7" draw:layer="layout" svg:width="0.177cm" svg:height="0.769cm" svg:x="23.055cm" svg:y="12.956cm" svg:viewBox="0 0 178 770" svg:d="M178 386c0-61-6-153-50-241-47-95-113-145-121-145-5 0-7 4-7 9 0 2 0 2 15 17 75 75 119 198 119 360 0 132-28 265-125 364-9 9-9 9-9 11 0 7 2 9 7 9 8 0 79-53 123-149 39-86 48-171 48-235z">
              <text:p/>
            </draw:path>
            <draw:path draw:style-name="gr3" draw:text-style-name="P7" draw:layer="layout" svg:width="0.08cm" svg:height="0.08cm" svg:x="23.379cm" svg:y="13.452cm" svg:viewBox="0 0 81 81" svg:d="M81 42c0-22-18-42-41-42-24 0-40 20-40 42s16 39 40 39c23 0 41-17 41-39z">
              <text:p/>
            </draw:path>
          </draw:g>
        </draw:g>
        <draw:g>
          <svg:title>TexMaths</svg:title>
          <svg:desc>22§display§F_X(x) = F(x, \infty) = 1 - e^{-ax}, \, F_Y(y) = F(\infty, y) = 1 - e^{-by}.§svg§600§TRUE§</svg:desc>
          <draw:g>
            <draw:path draw:style-name="gr3" draw:text-style-name="P7" draw:layer="layout" svg:width="0.549cm" svg:height="0.521cm" svg:x="4.121cm" svg:y="8.008cm" svg:viewBox="0 0 550 522" svg:d="M205 272c25 0 51 0 77 0 57 0 63 13 63 35 0 7 0 15-6 37 0 5-2 7-2 9 0 7 4 9 8 9 9 0 9-2 14-15 14-56 27-112 41-167 3-9 3-11 3-13-3-3-2-9-9-9-8 0-9 4-11 17-18 60-35 73-101 73-24 0-47 0-71 0 17-65 34-130 51-195 6-27 6-29 42-29 33 0 67 0 101 0 94 0 112 24 112 83 0 18 0 22-2 42 0 11 0 11 0 13 0 5 2 11 9 11 8 0 8-4 11-19 5-45 10-90 15-134 2-20-2-20-22-20-126 0-252 0-378 0-16 0-22 0-22 15 0 9 6 9 19 9 29 0 51 0 51 13 0 2 0 5-2 18-35 136-69 272-104 408-6 31-8 35-70 35-13 0-22 0-22 15 0 9 11 9 13 9 22 0 79-2 101-2 27 0 91 2 115 2 9 0 17 0 17-13 0-7-3-6-4-9-2-2-4-2-22-2s-22 0-40 0c-24-2-26-7-26-15 0-3 0-7 4-18 16-64 31-129 47-193z">
              <text:p/>
            </draw:path>
            <draw:path draw:style-name="gr3" draw:text-style-name="P7" draw:layer="layout" svg:width="0.476cm" svg:height="0.368cm" svg:x="4.616cm" svg:y="8.278cm" svg:viewBox="0 0 477 369" svg:d="M275 162c17-16 34-33 51-50 70-68 90-90 138-92 9 0 13 0 13-11 0-7-4-9-6-9-16 0-35 2-51 2-13 0-48-2-64-2-4 0-11 2-11 13 3 2 0 7 9 7 5 0 20 2 20 13 0 9-9 17-15 22-5 4-73 70-93 92-18-35-36-70-55-105 0-3-2-7-2-9 0-4 11-11 29-13 4 0 11 0 11-11 0-2 0-9-9-9-11 0-23 2-35 2-13 0-25 0-36 0s-24 0-33 0c-8 0-19-2-28-2-2 0-11 0-11 13 0 7 6 7 15 7 31 0 33 4 40 15 25 50 50 100 75 149-11 10-21 21-31 31-9 9-35 33-44 44-66 66-88 88-139 90-6 0-13 0-13 11 0 2 2 9 9 9 15 0 33-3 50-3 9 0 22 0 31 0 11 0 22 3 31 3 2 0 11 0 11-11 0-9-7-9-9-9-6 0-17-2-17-13 0-9 6-16 19-29 37-35 74-70 110-105 22 42 44 85 66 127 3 4 2 4 3 7 0 2-9 11-29 13-4 0-11 0-11 11 0 2 0 9 9 9 11 0 24-3 35-3s24 0 35 0c9 0 22 0 33 0 9 0 20 3 29 3 2 0 11 0 11-11 0-9-7-9-16-9-30 0-33-7-39-16-29-57-57-114-86-171z">
              <text:p/>
            </draw:path>
            <draw:path draw:style-name="gr3" draw:text-style-name="P7" draw:layer="layout" svg:width="0.177cm" svg:height="0.769cm" svg:x="5.254cm" svg:y="7.953cm" svg:viewBox="0 0 178 770" svg:d="M178 761c0-2 0-2-13-15-95-97-121-244-121-360 0-134 31-270 125-364 9-11 9-11 9-13 0-7-2-9-6-9-9 0-77 53-124 151-39 84-48 169-48 235 0 59 9 151 51 239 46 94 112 145 121 145 4 0 6-2 6-9z">
              <text:p/>
            </draw:path>
            <draw:path draw:style-name="gr3" draw:text-style-name="P7" draw:layer="layout" svg:width="0.384cm" svg:height="0.348cm" svg:x="5.5cm" svg:y="8.19cm" svg:viewBox="0 0 385 349" svg:d="M235 107c5-19 22-89 77-89 5 0 22 0 40 11-22 2-37 21-37 39 0 13 8 29 28 29 18 0 42-16 42-47 0-39-46-50-73-50-44 0-70 42-81 59-18-50-59-59-84-59-79 0-123 99-123 118 0 9 7 9 9 9 7 0 9-2 11-9 26-81 77-100 103-100 14 0 42 6 42 50 0 24-13 77-42 184-13 49-39 79-74 79-5 0-22 0-38-9 20-4 35-19 35-41s-15-27-28-27c-22 0-42 20-42 44 0 35 40 51 73 51 50 0 79-53 81-59 9 28 37 59 84 59 79 0 123-99 123-119 0-6-7-6-9-6-7 0-9 2-11 6-24 84-77 101-101 101-31 0-44-24-44-50 0-16 4-33 13-68s18-70 26-106z">
              <text:p/>
            </draw:path>
            <draw:path draw:style-name="gr3" draw:text-style-name="P7" draw:layer="layout" svg:width="0.177cm" svg:height="0.769cm" svg:x="5.964cm" svg:y="7.953cm" svg:viewBox="0 0 178 770" svg:d="M178 386c0-61-9-153-50-241-47-95-113-145-121-145-5 0-7 4-7 9 0 2 0 2 13 17 77 75 121 198 121 360 0 132-28 265-125 364-9 9-9 9-9 11 0 7 2 9 7 9 8 0 77-53 123-149 39-86 48-171 48-235z">
              <text:p/>
            </draw:path>
            <draw:path draw:style-name="gr3" draw:text-style-name="P7" draw:layer="layout" svg:width="0.512cm" svg:height="0.179cm" svg:x="6.479cm" svg:y="8.249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3" draw:text-style-name="P7" draw:layer="layout" svg:width="0.549cm" svg:height="0.521cm" svg:x="7.28cm" svg:y="8.008cm" svg:viewBox="0 0 550 522" svg:d="M205 272c25 0 49 0 74 0 60 0 66 13 66 35 0 7 0 15-6 37-2 5-2 7-2 9 0 7 4 9 8 9 9 0 9-2 14-15 14-56 27-112 41-167 3-9 3-11 3-13-3-3-2-9-9-9-8 0-9 4-13 17-16 60-33 73-99 73-24 0-47 0-71 0 17-65 34-130 51-195 6-27 6-29 42-29 33 0 67 0 101 0 94 0 112 24 112 83 0 18 0 22-2 42 0 11 0 11 0 13 0 5 2 11 9 11 8 0 8-4 11-19 5-45 10-90 15-134 2-20-2-20-22-20-126 0-252 0-378 0-16 0-25 0-25 15 0 9 9 9 22 9 29 0 51 0 51 13 0 2 0 5-4 18-34 136-68 272-102 408-8 31-8 35-70 35-13 0-22 0-22 15 0 9 9 9 11 9 24 0 81-2 103-2 25 0 91 2 115 2 6 0 17 0 17-13 0-7-4-6-6-9-2-2-2-2-20-2s-22 0-42 0c-22-2-24-7-24-15 0-3 0-7 4-18 16-64 31-129 47-193z">
              <text:p/>
            </draw:path>
            <draw:path draw:style-name="gr3" draw:text-style-name="P7" draw:layer="layout" svg:width="0.179cm" svg:height="0.769cm" svg:x="7.931cm" svg:y="7.953cm" svg:viewBox="0 0 180 770" svg:d="M180 761c0-2 0-2-13-15-97-97-121-244-121-360 0-134 29-270 123-364 11-11 11-11 11-13 0-7-2-9-8-9-7 0-77 53-121 151-40 84-51 169-51 235 0 59 9 151 53 239 46 94 112 145 119 145 6 0 8-2 8-9z">
              <text:p/>
            </draw:path>
            <draw:path draw:style-name="gr3" draw:text-style-name="P7" draw:layer="layout" svg:width="0.384cm" svg:height="0.348cm" svg:x="8.177cm" svg:y="8.19cm" svg:viewBox="0 0 385 349" svg:d="M238 107c4-19 22-89 74-89 5 0 25 0 40 11-22 2-37 21-37 39 0 13 8 29 28 29 18 0 42-16 42-47 0-39-44-50-70-50-47 0-73 42-82 59-20-50-61-59-83-59-82 0-126 99-126 118 0 9 9 9 11 9 5 0 7-2 9-9 26-81 77-100 103-100 16 0 42 6 42 50 0 24-13 77-42 184-11 49-39 79-72 79-5 0-22 0-40-9 20-4 38-19 38-41s-18-27-29-27c-24 0-44 20-44 44 0 35 40 51 73 51 52 0 79-53 81-59 11 28 37 59 84 59 81 0 125-99 125-119 0-6-9-6-11-6-7 0-9 2-9 6-26 84-79 101-103 101-31 0-42-24-42-50 0-16 4-33 13-68s18-70 27-106z">
              <text:p/>
            </draw:path>
            <draw:path draw:style-name="gr3" draw:text-style-name="P7" draw:layer="layout" svg:width="0.089cm" svg:height="0.229cm" svg:x="8.664cm" svg:y="8.449cm" svg:viewBox="0 0 90 230" svg:d="M90 81c0-50-17-81-48-81-27 0-42 20-42 42 0 19 15 39 42 39 9 0 20-2 26-9 2-2 3-1 5-2 0 4 2 0 2 11 0 57-28 104-53 130-8 7-9 8-9 11 0 6 5 8 7 8 9 0 70-59 70-149z">
              <text:p/>
            </draw:path>
            <draw:path draw:style-name="gr3" draw:text-style-name="P7" draw:layer="layout" svg:width="0.685cm" svg:height="0.348cm" svg:x="8.985cm" svg:y="8.19cm" svg:viewBox="0 0 686 349" svg:d="M350 132c-42-53-51-64-75-84-44-33-88-48-128-48-90 0-147 86-147 175 0 88 57 174 145 174s154-70 192-132c41 53 50 64 74 84 44 35 86 48 126 48 90 0 149-84 149-174 0-89-56-175-145-175s-154 70-191 132zM370 158c30-55 88-134 176-134 81 0 123 81 123 151 0 75-51 136-119 136-46 0-79-30-97-48-20-20-37-44-83-105zM317 191c-33 55-90 134-176 134-84 0-126-82-126-150 0-76 53-138 121-138 44 0 80 33 95 49 20 21 37 46 86 105z">
              <text:p/>
            </draw:path>
            <draw:path draw:style-name="gr3" draw:text-style-name="P7" draw:layer="layout" svg:width="0.177cm" svg:height="0.769cm" svg:x="9.759cm" svg:y="7.953cm" svg:viewBox="0 0 178 770" svg:d="M178 386c0-61-9-153-50-241-47-95-113-145-121-145-5 0-7 4-7 9 0 2 0 2 13 17 77 75 121 198 121 360 0 132-28 265-125 364-9 9-9 9-9 11 0 7 2 9 7 9 8 0 77-53 123-149 39-86 48-171 48-235z">
              <text:p/>
            </draw:path>
            <draw:path draw:style-name="gr3" draw:text-style-name="P7" draw:layer="layout" svg:width="0.512cm" svg:height="0.179cm" svg:x="10.274cm" svg:y="8.249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3" draw:text-style-name="P7" draw:layer="layout" svg:width="0.254cm" svg:height="0.51cm" svg:x="11.114cm" svg:y="8.019cm" svg:viewBox="0 0 255 511" svg:d="M158 20c0-20 0-20-17-20-49 48-117 48-141 48 0 8 0 16 0 24 15 0 62 0 101-19 0 133 0 266 0 399 0 26-2 35-70 35-9 0-18 0-27 0 0 8 0 16 0 24 29-2 95-2 126-2s99 0 125 2c0-8 0-16 0-24-8 0-16 0-24 0-70 0-73-7-73-35 0-144 0-288 0-432z">
              <text:p/>
            </draw:path>
            <draw:path draw:style-name="gr3" draw:text-style-name="P7" draw:layer="layout" svg:width="0.472cm" svg:height="0.03cm" svg:x="11.669cm" svg:y="8.324cm" svg:viewBox="0 0 473 31" svg:d="M444 31c14 0 29 0 29-16 0-15-15-15-29-15-139 0-278 0-418 0-13 0-26 0-26 15 0 16 13 16 26 16 140 0 279 0 418 0z">
              <text:p/>
            </draw:path>
            <draw:path draw:style-name="gr3" draw:text-style-name="P7" draw:layer="layout" svg:width="0.296cm" svg:height="0.348cm" svg:x="12.412cm" svg:y="8.19cm" svg:viewBox="0 0 297 349" svg:d="M110 162c22 0 79 0 119-17 53-22 57-68 57-79 0-33-29-66-84-66-85 0-202 75-202 211 0 76 46 138 121 138 112 0 176-81 176-90 0-5-4-11-9-11-4 0-4 2-11 9-59 74-145 74-154 74-59 0-66-63-66-88 0-8 0-32 11-81 14 0 28 0 42 0zM73 147c30-118 110-129 129-129 38 0 58 21 58 48 0 81-124 81-154 81-11 0-22 0-33 0z">
              <text:p/>
            </draw:path>
            <draw:path draw:style-name="gr3" draw:text-style-name="P7" draw:layer="layout" svg:width="0.366cm" svg:height="0.025cm" svg:x="12.795cm" svg:y="8.065cm" svg:viewBox="0 0 367 26" svg:d="M345 26c9 0 22 0 22-13s-13-13-22-13c-107 0-215 0-323 0-9 0-22 0-22 13s13 13 22 13c108 0 216 0 323 0z">
              <text:p/>
            </draw:path>
            <draw:path draw:style-name="gr3" draw:text-style-name="P7" draw:layer="layout" svg:width="0.276cm" svg:height="0.242cm" svg:x="13.252cm" svg:y="7.975cm" svg:viewBox="0 0 277 243" svg:d="M196 33c-11-18-29-33-55-33-71 0-141 77-141 154 0 52 35 89 81 89 31 0 58-17 77-37 11 31 42 37 58 37 19 0 33-13 41-28 14-22 20-53 20-55 0-6-6-6-9-6-8 0-8 2-13 17-4 26-15 57-39 57-14 0-18-11-18-26 0-9 4-29 9-42 4-15 9-37 11-50 3-13 7-27 11-40 4-15 11-39 11-41 0-14-11-18-20-18s-20 7-24 22zM161 171c-3 15-16 26-27 35-4 5-26 22-50 22-20 0-40-13-40-53 0-28 15-87 29-109 24-42 52-51 68-51 37 0 48 42 48 46 0 3-2 7-2 9-9 34-18 67-26 101z">
              <text:p/>
            </draw:path>
            <draw:path draw:style-name="gr3" draw:text-style-name="P7" draw:layer="layout" svg:width="0.287cm" svg:height="0.242cm" svg:x="13.582cm" svg:y="7.975cm" svg:viewBox="0 0 288 243" svg:d="M108 180c-5 20-24 48-51 48-2 0-17 0-28-6 22-9 22-27 22-31 0-11-9-20-20-20-16 0-31 13-31 33 0 26 29 39 55 39s48-15 62-39c13 29 41 39 63 39 64 0 97-68 97-83 0-6-6-4-9-6-8 0-8 2-11 8-11 38-44 66-74 66-22 0-33-15-33-35 0-13 13-64 28-123 11-41 35-55 53-55 2 0 18 0 29 7-16 7-22 22-22 31 0 11 7 19 19 19s31-11 31-33c0-30-35-39-55-39-28 0-50 18-61 39-9-21-36-39-64-39-62 0-97 66-97 83 0 7 6 5 9 7 9 0 9-2 11-9 13-42 48-66 75-66 17 0 33 9 33 35 0 11-7 38-14 57-5 25-11 49-17 73z">
              <text:p/>
            </draw:path>
            <draw:path draw:style-name="gr3" draw:text-style-name="P7" draw:layer="layout" svg:width="0.089cm" svg:height="0.229cm" svg:x="14.011cm" svg:y="8.449cm" svg:viewBox="0 0 90 230" svg:d="M90 81c0-50-20-81-48-81-27 0-42 20-42 42 0 19 15 39 42 39 9 0 17-2 26-9 2-2 2-2 5-2 0 4 0 0 0 11 0 57-27 103-53 130-7 6-7 8-7 11 0 6 2 8 7 8 9 0 70-59 70-149z">
              <text:p/>
            </draw:path>
            <draw:path draw:style-name="gr3" draw:text-style-name="P7" draw:layer="layout" svg:width="0.547cm" svg:height="0.521cm" svg:x="14.447cm" svg:y="8.008cm" svg:viewBox="0 0 548 522" svg:d="M205 272c25 0 49 0 74 0 58 0 64 13 64 35 0 7 0 15-4 37-2 5-2 7-2 9 0 7 4 9 8 9 7 0 7-2 11-15 14-56 28-112 42-167 5-9 5-11 5-13-4-3-4-9-11-9-8 0-9 4-11 17-16 60-33 73-99 73-24 0-47 0-71 0 16-65 32-130 49-195 6-27 8-29 41-29 35 0 69 0 104 0 94 0 112 24 112 83 0 18 0 22-2 42-2 11-2 11-2 13 0 5 2 11 8 11 9 0 11-4 11-19 5-45 11-90 16-134 2-20 0-20-20-20-126 0-252 0-378 0-16 0-25 0-25 15 0 9 7 9 22 9 29 0 51 0 51 13 0 2 0 5-4 18-34 136-68 272-102 408-8 31-11 35-70 35-13 0-22 0-22 15 0 9 9 9 11 9 22 0 79-2 101-2 27 0 90 2 117 2 6 0 15 0 15-13 0-7-3-6-4-9-2-2-5-2-22-2-16 0-20 0-40 0-22-2-24-7-24-15 0-3 0-7 2-18 16-64 32-129 49-193z">
              <text:p/>
            </draw:path>
            <draw:path draw:style-name="gr3" draw:text-style-name="P7" draw:layer="layout" svg:width="0.428cm" svg:height="0.368cm" svg:x="14.946cm" svg:y="8.278cm" svg:viewBox="0 0 429 369" svg:d="M334 66c11-11 22-22 33-29 22-15 42-17 51-17 4 0 11 0 11-11 0-5-2-9-7-9-13 0-30 2-44 2-17 0-39-2-57-2-2 0-11 0-11 13 0 7 9 7 11 7 16 2 16 6 16 11 0 4-5 8-7 13-4 4-7 9-9 11-45 47-91 95-136 142-24-52-47-105-71-158-4-8-4-8-4-10 0-9 26-9 29-9 6 0 15 0 15-11 0-2 0-9-9-9-17 0-57 2-72 2-16 0-49-2-62-2-4 0-11 2-11 13 0 7 7 7 13 7 33 0 35 4 40 17 28 62 56 123 83 185-8 32-16 65-24 98-6 27-6 29-50 29-9 0-16 0-16 11 0 6 5 9 9 9 11 0 22-3 33-3s26 0 37 0c9 0 22 0 33 0s27 3 38 3c2 0 11 0 11-11 0-9-7-9-18-9-9 0-11 0-22 0-9-2-11-2-11-9 0-2 7-29 11-44 5-17 16-63 16-66 2-8 2-8 8-15 48-50 96-99 143-149z">
              <text:p/>
            </draw:path>
            <draw:path draw:style-name="gr3" draw:text-style-name="P7" draw:layer="layout" svg:width="0.179cm" svg:height="0.769cm" svg:x="15.525cm" svg:y="7.953cm" svg:viewBox="0 0 180 770" svg:d="M180 761c0-2 0-2-13-15-97-97-121-244-121-360 0-134 29-270 123-364 11-11 11-11 11-13 0-7-2-9-6-9-9 0-79 53-123 151-40 84-51 169-51 235 0 59 9 151 53 239 46 94 112 145 121 145 4 0 6-2 6-9z">
              <text:p/>
            </draw:path>
            <draw:path draw:style-name="gr3" draw:text-style-name="P7" draw:layer="layout" svg:width="0.355cm" svg:height="0.497cm" svg:x="15.773cm" svg:y="8.19cm" svg:viewBox="0 0 356 498" svg:d="M352 48c4-11 4-13 4-17 0-16-11-22-24-22-6 0-20 4-26 15-2 5-7 29-11 42-5 22-11 41-16 61-11 47-23 94-35 141-2 11-35 63-86 63-39 0-48-33-48-61 0-35 13-84 40-152 11-30 15-39 15-54 0-35-24-64-64-64-72 0-101 112-101 118 0 9 7 9 9 9 6 0 9-2 11-15 22-73 53-94 79-94 7 0 20 0 20 24 0 19-9 39-13 55-31 81-47 125-47 160 0 70 49 92 95 92 31 0 57-13 79-35-11 41-20 79-50 118-20 26-51 48-86 48-11 0-46-2-60-30 14 0 25 0 36-9 6-9 15-18 15-33 0-24-22-26-29-26-17 0-44 11-44 50 0 37 33 66 82 66 79 0 160-70 180-156 25-98 50-196 75-294z">
              <text:p/>
            </draw:path>
            <draw:path draw:style-name="gr3" draw:text-style-name="P7" draw:layer="layout" svg:width="0.179cm" svg:height="0.769cm" svg:x="16.2cm" svg:y="7.953cm" svg:viewBox="0 0 180 770" svg:d="M180 386c0-61-8-153-50-241-46-95-115-145-121-145-5 0-9 4-9 9 0 2 0 2 15 17 75 75 119 198 119 360 0 132-28 265-123 364-11 9-11 9-11 11 0 7 4 9 9 9 6 0 77-53 123-149 40-86 48-171 48-235z">
              <text:p/>
            </draw:path>
            <draw:path draw:style-name="gr3" draw:text-style-name="P7" draw:layer="layout" svg:width="0.514cm" svg:height="0.179cm" svg:x="16.715cm" svg:y="8.249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3" draw:text-style-name="P7" draw:layer="layout" svg:width="0.547cm" svg:height="0.521cm" svg:x="17.518cm" svg:y="8.008cm" svg:viewBox="0 0 548 522" svg:d="M205 272c25 0 49 0 74 0 58 0 64 13 64 35 0 7 0 15-4 37-2 5-2 7-2 9 0 7 4 9 8 9 7 0 7-2 11-15 14-56 28-112 42-167 5-9 5-11 5-13-4-3-4-9-11-9-8 0-9 4-11 17-16 60-33 73-99 73-24 0-47 0-71 0 16-65 32-130 49-195 6-27 8-29 41-29 35 0 69 0 104 0 94 0 112 24 112 83 0 18 0 22-2 42-2 11-2 11-2 13 0 5 2 11 8 11 9 0 11-4 11-19 5-45 11-90 16-134 2-20 0-20-20-20-126 0-252 0-378 0-16 0-25 0-25 15 0 9 7 9 22 9 29 0 51 0 51 13 0 2 0 5-4 18-34 136-68 272-102 408-8 31-11 35-70 35-13 0-22 0-22 15 0 9 9 9 11 9 22 0 79-2 101-2 27 0 90 2 117 2 6 0 15 0 15-13 0-7-3-6-4-9-2-2-5-2-22-2-16 0-20 0-40 0-22-2-24-7-24-15 0-3 0-7 2-18 16-64 32-129 49-193z">
              <text:p/>
            </draw:path>
            <draw:path draw:style-name="gr3" draw:text-style-name="P7" draw:layer="layout" svg:width="0.179cm" svg:height="0.769cm" svg:x="18.169cm" svg:y="7.953cm" svg:viewBox="0 0 180 770" svg:d="M180 761c0-2 0-2-13-15-97-97-123-244-123-360 0-134 31-270 125-364 11-11 11-11 11-13 0-7-4-9-8-9-7 0-77 53-124 151-39 84-48 169-48 235 0 59 9 151 51 239 46 94 114 145 121 145 4 0 8-2 8-9z">
              <text:p/>
            </draw:path>
            <draw:path draw:style-name="gr3" draw:text-style-name="P7" draw:layer="layout" svg:width="0.688cm" svg:height="0.348cm" svg:x="18.435cm" svg:y="8.19cm" svg:viewBox="0 0 689 349" svg:d="M350 132c-42-53-51-64-75-84-42-33-86-48-125-48-91 0-150 86-150 175 0 88 58 174 147 174s152-70 190-132c41 53 52 64 77 84 41 35 85 48 125 48 90 0 150-84 150-174 0-89-59-175-148-175s-152 70-191 132zM372 158c31-55 88-134 176-134 81 0 123 81 123 151 0 75-53 136-121 136-44 0-79-30-95-48-19-20-37-44-83-105zM317 191c-31 55-88 134-176 134-82 0-123-82-123-150 0-76 50-138 118-138 47 0 82 33 97 49 20 21 38 46 84 105z">
              <text:p/>
            </draw:path>
            <draw:path draw:style-name="gr3" draw:text-style-name="P7" draw:layer="layout" svg:width="0.089cm" svg:height="0.229cm" svg:x="19.234cm" svg:y="8.449cm" svg:viewBox="0 0 90 230" svg:d="M90 81c0-50-20-81-50-81-25 0-40 20-40 42 0 19 15 39 40 39 8 0 19-2 26-9 4-2 3-1 4-2 3 0 3 0 3 11 0 57-27 103-53 130-9 6-9 8-9 11 0 6 4 8 9 8 9 0 70-59 70-149z">
              <text:p/>
            </draw:path>
            <draw:path draw:style-name="gr3" draw:text-style-name="P7" draw:layer="layout" svg:width="0.355cm" svg:height="0.497cm" svg:x="19.533cm" svg:y="8.19cm" svg:viewBox="0 0 356 498" svg:d="M352 48c4-11 4-13 4-17 0-16-11-22-24-22-6 0-20 4-26 15-2 5-7 29-11 42-5 22-11 41-16 61-11 47-23 94-35 141-2 11-35 63-86 63-39 0-48-33-48-61 0-35 13-84 40-152 11-30 15-39 15-54 0-35-24-64-64-64-72 0-101 112-101 118 0 9 7 9 9 9 6 0 9-2 13-15 20-73 51-94 77-94 7 0 20 0 20 24 0 19-9 39-13 55-31 81-47 125-47 160 0 70 51 92 95 92 31 0 57-13 79-35-11 41-20 79-50 118-20 26-51 48-86 48-11 0-44-2-57-30 11 0 22 0 33-9 6-9 15-18 15-33 0-24-22-26-29-26-17 0-44 11-44 50 0 37 36 66 82 66 81 0 160-70 182-156 25-98 49-196 73-294z">
              <text:p/>
            </draw:path>
            <draw:path draw:style-name="gr3" draw:text-style-name="P7" draw:layer="layout" svg:width="0.179cm" svg:height="0.769cm" svg:x="19.96cm" svg:y="7.953cm" svg:viewBox="0 0 180 770" svg:d="M180 386c0-61-8-153-50-241-46-95-115-145-121-145-5 0-9 4-9 9 0 2 0 2 15 17 77 75 121 198 121 360 0 132-28 265-125 364-11 9-11 9-11 11 0 7 4 9 9 9 6 0 77-53 123-149 40-86 48-171 48-235z">
              <text:p/>
            </draw:path>
            <draw:path draw:style-name="gr3" draw:text-style-name="P7" draw:layer="layout" svg:width="0.514cm" svg:height="0.179cm" svg:x="20.474cm" svg:y="8.249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3" draw:text-style-name="P7" draw:layer="layout" svg:width="0.254cm" svg:height="0.51cm" svg:x="21.317cm" svg:y="8.019cm" svg:viewBox="0 0 255 511" svg:d="M158 20c0-20 0-20-17-20-49 48-117 48-141 48 0 8 0 16 0 24 15 0 62 0 101-19 0 133 0 266 0 399 0 26-2 35-72 35-8 0-17 0-25 0 0 8 0 16 0 24 27-2 95-2 126-2s99 0 125 2c0-8 0-16 0-24-8 0-16 0-24 0-70 0-73-7-73-35 0-144 0-288 0-432z">
              <text:p/>
            </draw:path>
            <draw:path draw:style-name="gr3" draw:text-style-name="P7" draw:layer="layout" svg:width="0.47cm" svg:height="0.03cm" svg:x="21.871cm" svg:y="8.324cm" svg:viewBox="0 0 471 31" svg:d="M444 31c14 0 27 0 27-16 0-15-13-15-27-15-139 0-278 0-418 0-13 0-26 0-26 15 0 16 13 16 26 16 140 0 279 0 418 0z">
              <text:p/>
            </draw:path>
            <draw:path draw:style-name="gr3" draw:text-style-name="P7" draw:layer="layout" svg:width="0.296cm" svg:height="0.348cm" svg:x="22.615cm" svg:y="8.19cm" svg:viewBox="0 0 297 349" svg:d="M108 162c24 0 81 0 119-17 55-22 59-68 59-79 0-33-31-66-84-66-85 0-202 75-202 211 0 76 46 138 121 138 110 0 176-81 176-90 0-5-4-11-9-11-4 0-6 2-11 9-61 74-145 74-154 74-61 0-68-63-68-88 0-8 2-32 13-81 13 0 27 0 40 0zM73 147c30-118 110-129 129-129 38 0 58 21 58 48 0 81-124 81-157 81-10 0-20 0-30 0z">
              <text:p/>
            </draw:path>
            <draw:path draw:style-name="gr3" draw:text-style-name="P7" draw:layer="layout" svg:width="0.364cm" svg:height="0.025cm" svg:x="22.998cm" svg:y="8.065cm" svg:viewBox="0 0 365 26" svg:d="M343 26c9 0 22 0 22-13s-11-13-22-13c-107 0-214 0-321 0-9 0-22 0-22 13s13 13 22 13c107 0 214 0 321 0z">
              <text:p/>
            </draw:path>
            <draw:path draw:style-name="gr3" draw:text-style-name="P7" draw:layer="layout" svg:width="0.219cm" svg:height="0.378cm" svg:x="23.457cm" svg:y="7.839cm" svg:viewBox="0 0 220 379" svg:d="M108 15c1-3 2-6 2-8 0-3-2-7-9-7-11 0-55 4-68 4-4 3-13 3-13 14 0 8 9 8 15 8 24 0 24 3 24 7s-4 26-8 37c-4 17-8 34-11 51-5 17-36 136-36 142-4 13-4 20-4 27 0 54 35 89 79 89 68 0 141-74 141-153 0-64-44-90-81-90-29 0-53 15-69 31 13-51 25-101 38-152zM81 364c-26 0-41-24-41-55 0-19 4-37 19-98 3-11 3-11 14-25 19-24 44-35 63-35 22 0 40 16 40 53 0 22-11 77-29 107-11 27-39 53-66 53z">
              <text:p/>
            </draw:path>
            <draw:path draw:style-name="gr3" draw:text-style-name="P7" draw:layer="layout" svg:width="0.276cm" svg:height="0.348cm" svg:x="23.719cm" svg:y="7.975cm" svg:viewBox="0 0 277 349" svg:d="M275 35c2-9 2-9 2-13 0-9-9-15-17-15-5 0-16 2-22 11-3 4-7 21-9 32-4 15-8 30-11 44-2 13-20 81-22 88-22 15-24 46-66 46-38 0-38-35-38-44 0-30 14-63 29-105 7-18 9-24 9-33 0-26-22-46-51-46-55 0-79 75-79 83 0 7 6 5 9 7 9 0 9-2 11-9 13-44 37-66 57-66 11 0 15 7 15 20 0 11-6 24-8 31-27 66-31 85-31 109 0 9 0 33 20 51 17 15 39 17 55 17 22 0 41-8 59-24-7 29-13 53-35 79-16 18-38 35-66 35-5 0-29 0-40-17 29-5 19-21 29-31 0-17-16-20-22-20-13 0-31 11-31 36 0 26 26 48 64 48 55 0 121-44 138-110 17-68 34-136 51-204z">
              <text:p/>
            </draw:path>
            <draw:path draw:style-name="gr3" draw:text-style-name="P7" draw:layer="layout" svg:width="0.08cm" svg:height="0.08cm" svg:x="24.133cm" svg:y="8.449cm" svg:viewBox="0 0 81 81" svg:d="M81 42c0-22-18-42-41-42-24 0-40 20-40 42s16 39 40 39c23 0 41-17 41-39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g>
          <svg:title>TexMaths</svg:title>
          <svg:desc>20§display§\Pr[X\leq x\mid \textcolor{red}{Y = y}]  = \lim_{\delta\rightarrow 0} \Pr[X\leq x\mid y\leq Y\leq y+\delta].§svg§600§FALSE§</svg:desc>
          <draw:frame draw:style-name="gr2" draw:text-style-name="P6" draw:layer="layout" svg:width="15.962cm" svg:height="0.994cm" svg:x="4.238cm" svg:y="4.235cm">
            <draw:image xlink:href="Pictures/1000876F00001F2E000001F24987436C1C3B476C.svg" xlink:type="simple" xlink:show="embed" xlink:actuate="onLoad" draw:mime-type="image/svg+xml">
              <text:p/>
            </draw:image>
            <draw:image xlink:href="Pictures/100000010000012E000000138CF982438B553411.png" xlink:type="simple" xlink:show="embed" xlink:actuate="onLoad" draw:mime-type="image/png"/>
          </draw:frame>
        </draw:g>
        <draw:frame draw:style-name="gr10" draw:text-style-name="P16" draw:layer="layout" svg:width="3.2cm" svg:height="1.11cm" svg:x="4cm" svg:y="5.6cm">
          <draw:text-box>
            <text:p><text:span text:style-name="T19">Why?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g>
          <svg:title>TexMaths</svg:title>
          <svg:desc>18§latex§\begin{eqnarray*}
\textcolor{red}{\Pr[X\leq x\mid Y=y]} &amp; = &amp;\lim_{\delta\rightarrow 0} \Pr[X\leq x\mid y\leq Y\leq y+\delta]\\
&amp;=&amp; \lim_{\delta\rightarrow 0}  \frac{\Pr[(X\leq x)\cap (y\leq Y\leq y+\delta)]}{\Pr[y\leq Y\leq y+\delta]}\\
&amp;=&amp; \lim_{\delta\rightarrow 0} \frac{F(x, y+\delta) - F(x, y)}{F_Y(y+\delta) - F_Y(y)}\\
&amp;=&amp; \lim_{\delta\rightarrow 0} \int_{u=-\infty}^x \frac{\partial F(u, y+\delta)/\partial x - \partial F(u, y)/\partial x}{F_Y(y+\delta)-F_Y(y)}du\\
&amp;=&amp;  \int_{u=-\infty}^x \lim_{\delta\rightarrow 0} \frac{(\partial F(u, y+\delta)/\partial x - \partial F(u, y)/\partial x)/\delta}{(F_Y(y+\delta)-F_Y(y))/\delta}du\\
&amp;=&amp; \textcolor{red}{\int_{u=-\infty}^x \frac{f(u, y)}{f_Y(y)} du}.
\end{eqnarray*}§svg§600§FALSE§</svg:desc>
          <draw:frame draw:style-name="gr2" draw:text-style-name="P6" draw:layer="layout" svg:width="20.561cm" svg:height="9.808cm" svg:x="2.039cm" svg:y="4.035cm">
            <draw:image xlink:href="Pictures/1004249D00002CA00000154AB75EE655135E93A2.svg" xlink:type="simple" xlink:show="embed" xlink:actuate="onLoad" draw:mime-type="image/svg+xml">
              <text:p/>
            </draw:image>
            <draw:image xlink:href="Pictures/10000001000001B0000000CEDA9D1980B2E4E03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frame presentation:style-name="pr5" draw:text-style-name="P1" draw:layer="layout" svg:width="25.2cm" svg:height="9.134cm" svg:x="0.3cm" svg:y="3.987cm" presentation:class="outline" presentation:user-transformed="true">
          <draw:text-box>
            <text:list text:style-name="L3">
              <text:list-item>
                <text:p><text:span text:style-name="T14">For example, </text:span></text:p>
              </text:list-item>
            </text:list>
          </draw:text-box>
        </draw:frame>
        <draw:g>
          <svg:title>TexMaths</svg:title>
          <svg:desc>20§latex§\begin{eqnarray*}
&amp; &amp;\Pr[X\leq 3\mid Y = 4] \\
&amp;=&amp; \int^{3}_{u=0} \frac{abe^{-au+4b}}{be^{-4b}} du = 1 - e^{-3a}.
\end{eqnarray*}§svg§600§FALSE§</svg:desc>
          <draw:g>
            <draw:path draw:style-name="gr6" draw:text-style-name="P12" draw:layer="layout" svg:width="10.439cm" svg:height="2.659cm" svg:x="1.396cm" svg:y="8.273cm" svg:viewBox="0 0 10440 2660" svg:d="M5221 2660c-1740 0-3481 0-5221 0 0-887 0-1773 0-2660 3480 0 6960 0 10440 0 0 887 0 1773 0 2660-1740 0-3479 0-5219 0z">
              <text:p/>
            </draw:path>
            <draw:path draw:style-name="gr3" draw:text-style-name="P7" draw:layer="layout" svg:width="0.413cm" svg:height="0.479cm" svg:x="2.634cm" svg:y="8.285cm" svg:viewBox="0 0 414 480" svg:d="M136 258c39 0 79 0 118 0 84 0 160-58 160-128 0-68-70-130-166-130-83 0-165 0-248 0 0 7 0 15 0 22 6 0 12 0 18 0 54 0 54 8 54 32 0 123 0 246 0 370 0 26 0 34-54 34-6 0-12 0-18 0 0 7 0 14 0 22 26-2 78-2 104-2s80 0 104 2c0-8 0-15 0-22-5 0-11 0-16 0-56 0-56-8-56-34 0-56 0-111 0-166zM134 240c0-63 0-127 0-190 0-24 0-28 34-28 21 0 41 0 62 0 112 0 112 74 112 108s0 110-112 110c-32 0-64 0-96 0z">
              <text:p/>
            </draw:path>
            <draw:path draw:style-name="gr3" draw:text-style-name="P7" draw:layer="layout" svg:width="0.235cm" svg:height="0.311cm" svg:x="3.108cm" svg:y="8.453cm" svg:viewBox="0 0 236 312" svg:d="M98 78c0-26 0-52 0-78-33 3-65 5-98 8 0 7 0 15 0 22 50 0 54 6 54 40 0 63 0 125 0 188 0 32-6 32-54 32 0 7 0 14 0 22 28-2 60-2 80-2 28 0 62 0 90 2 0-8 0-15 0-22-5 0-11 0-16 0-52 0-52-8-52-34 0-36 0-72 0-108 0-70 28-132 82-132 6 0 6 0 8 0-2 2-16 10-16 28 0 20 14 30 30 30 12 0 30-8 30-30s-22-44-52-44c-52 0-76 48-86 78z">
              <text:p/>
            </draw:path>
            <draw:path draw:style-name="gr3" draw:text-style-name="P7" draw:layer="layout" svg:width="0.095cm" svg:height="0.702cm" svg:x="3.446cm" svg:y="8.237cm" svg:viewBox="0 0 96 703" svg:d="M96 703c0-9 0-19 0-29-23 0-45 0-68 0 0-216 0-431 0-646 23 0 45 0 68 0 0-9 0-19 0-28-32 0-64 0-96 0 0 234 0 469 0 703 32 0 64 0 96 0z">
              <text:p/>
            </draw:path>
            <draw:path draw:style-name="gr3" draw:text-style-name="P7" draw:layer="layout" svg:width="0.577cm" svg:height="0.479cm" svg:x="3.578cm" svg:y="8.285cm" svg:viewBox="0 0 578 480" svg:d="M322 190c-20-47-40-93-60-140-2-4-1-5-2-8 0-4 12-18 40-20 8-2 14-2 14-14 0-8-8-8-10-8-28 0-58 2-88 2-18 0-62-2-80-2-4 0-12 0-12 14 0 8 8 8 16 8 42 0 46 6 54 22 27 65 55 131 82 196-49 53-99 106-148 160-3 2-7 5-10 8-34 36-66 48-102 50-10 0-16 0-16 14 3 2 0 8 8 8 22 0 46-2 66-2 26 0 54 2 80 2 4 0 12 0 12-14 0-8-6-8-8-8-6-2-28-2-28-22 0-12 10-22 18-32 24-26 48-51 72-76 21-23 43-46 64-68 23 56 47 112 70 168 4 8 4 8 4 10 0 4-14 16-40 20-8 0-14 2-14 12s8 10 10 10c20 0 68-2 88-2 18 0 60 2 78 2 6 0 14 0 14-14 0-8-8-8-12-8-48-2-50-4-62-32-26-64-74-174-90-216 48-50 122-134 144-152 20-18 48-34 90-36 8-2 14-2 14-14 0-2 0-8-8-8-22 0-44 2-66 2-26 0-52-2-78-2-4 0-14 0-14 14 0 4 4 6 8 8 8 0 28 2 28 22 0 8-6 18-12 24-38 41-76 81-114 122z">
              <text:p/>
            </draw:path>
            <draw:path draw:style-name="gr3" draw:text-style-name="P7" draw:layer="layout" svg:width="0.429cm" svg:height="0.543cm" svg:x="4.449cm" svg:y="8.317cm" svg:viewBox="0 0 430 544" svg:d="M416 30c8-4 14-6 14-16 0-8-6-14-14-14-4 0-10 4-14 4-129 61-259 123-388 184-12 6-14 10-14 16s4 12 14 16c129 60 259 121 388 182 10 6 12 6 14 6 6 0 14-6 14-14s-4-12-16-16c-123-58-245-116-368-174 123-58 247-116 370-174zM404 544c12 0 26 0 26-14s-16-14-26-14c-126 0-252 0-378 0-12 0-26 0-26 14s12 14 24 14c127 0 253 0 380 0z">
              <text:p/>
            </draw:path>
            <draw:path draw:style-name="gr3" draw:text-style-name="P7" draw:layer="layout" svg:width="0.291cm" svg:height="0.481cm" svg:x="5.161cm" svg:y="8.297cm" svg:viewBox="0 0 292 482" svg:d="M176 220c56-18 98-68 98-124 0-58-62-96-130-96-70 0-124 42-124 96 0 22 16 36 36 36 22 0 36-16 36-36 0-36-34-36-44-36 22-34 68-42 94-42 28 0 66 14 66 78 0 8 0 48-18 80-22 34-46 36-64 36-4 2-22 2-26 2-6 2-12 2-12 8 0 8 6 8 18 8 10 0 20 0 30 0 58 0 84 48 84 118 0 94-48 116-80 116-30 0-82-12-106-54 24 4 46-12 46-38s-20-40-40-40c-16 0-40 10-40 40 0 64 66 110 142 110 86 0 150-64 150-134 0-58-44-114-116-128z">
              <text:p/>
            </draw:path>
            <draw:path draw:style-name="gr3" draw:text-style-name="P7" draw:layer="layout" svg:width="0.027cm" svg:height="0.702cm" svg:x="5.763cm" svg:y="8.237cm" svg:viewBox="0 0 28 703" svg:d="M28 26c0-12 0-26-14-26s-14 14-14 26c0 217 0 434 0 652 0 12 0 25 14 25s14-13 14-25c0-218 0-435 0-652z">
              <text:p/>
            </draw:path>
            <draw:path draw:style-name="gr3" draw:text-style-name="P7" draw:layer="layout" svg:width="0.509cm" svg:height="0.479cm" svg:x="6.095cm" svg:y="8.285cm" svg:viewBox="0 0 510 480" svg:d="M394 80c3-3 7-7 10-10 20-22 44-46 92-48 8-2 14-2 14-14 0-6-4-8-10-8-18 0-38 2-56 2-24 0-48-2-72-2-4 0-12 0-12 12 0 8 6 10 10 10 6 0 26 0 26 16 0 12-16 30-20 34-54 62-108 124-162 186-26-69-52-139-78-208-4-10-3-8-4-12 0-16 34-16 42-16 10 0 16 0 16-14 0-8-8-8-10-8-20 0-70 2-88 2s-62-2-80-2c-4 0-12 0-12 14 0 8 6 8 16 8 42 0 44 6 50 24 29 77 57 153 86 230 2 2 4 10 4 12s-28 116-32 128c-8 38-10 40-66 42-14 0-18 0-18 14 0 8 5 5 8 8 20 0 70-2 90-2s70 2 90 2c4 0 12 0 12-14 0-8-6-8-18-8-2 0-16 0-28-2-14-2-18-2-18-12 0-4 6-28 10-44 8-33 16-66 24-98 4-14 4-16 10-22 58-67 116-133 174-200z">
              <text:p/>
            </draw:path>
            <draw:path draw:style-name="gr3" draw:text-style-name="P7" draw:layer="layout" svg:width="0.465cm" svg:height="0.163cm" svg:x="6.869cm" svg:y="8.50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7" draw:layer="layout" svg:width="0.309cm" svg:height="0.475cm" svg:x="7.591cm" svg:y="8.289cm" svg:viewBox="0 0 310 476" svg:d="M186 360c0 20 0 40 0 60 0 26 0 34-52 34-5 0-11 0-16 0 0 7 0 14 0 22 30-2 67-2 96-2s66 0 94 2c0-8 0-15 0-22-5 0-9 0-14 0-52 0-54-8-54-34 0-20 0-40 0-60 23 0 47 0 70 0 0-8 0-15 0-22-23 0-47 0-70 0 0-107 0-213 0-320 0-14 0-18-10-18-6 0-10 0-14 8-72 110-144 220-216 330 0 7 0 14 0 22 62 0 124 0 186 0zM190 338c-57 0-113 0-170 0 57-88 113-175 170-262 0 87 0 174 0 262z">
              <text:p/>
            </draw:path>
            <draw:path draw:style-name="gr3" draw:text-style-name="P7" draw:layer="layout" svg:width="0.095cm" svg:height="0.702cm" svg:x="7.937cm" svg:y="8.237cm" svg:viewBox="0 0 96 703" svg:d="M96 0c-32 0-64 0-96 0 0 9 0 19 0 28 23 0 45 0 68 0 0 215 0 430 0 646-23 0-45 0-68 0 0 10 0 20 0 29 32 0 64 0 96 0 0-234 0-469 0-703z">
              <text:p/>
            </draw:path>
            <draw:path draw:style-name="gr3" draw:text-style-name="P7" draw:layer="layout" svg:width="0.467cm" svg:height="0.163cm" svg:x="1.4cm" svg:y="10.062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621cm" svg:height="1.558cm" svg:x="2.65cm" svg:y="9.364cm" svg:viewBox="0 0 622 1559" svg:d="M34 1527c22 0 34-16 34-34 0-22-18-34-34-34-18 0-34 10-34 36 0 34 34 64 78 64 106 0 146-164 196-368 54-222 100-446 138-671 26-150 52-290 76-380 8-34 32-126 60-126 22 0 38 14 42 16-24 2-36 18-36 36 0 22 18 34 34 34 18 0 34-10 34-36 0-38-38-64-76-64-54 0-92 76-132 220-2 6-96 360-174 819-18 106-38 224-62 322-12 50-46 182-102 182-26 0-28-11-42-16z">
              <text:p/>
            </draw:path>
            <draw:path draw:style-name="gr3" draw:text-style-name="P7" draw:layer="layout" svg:width="0.225cm" svg:height="0.335cm" svg:x="3.34cm" svg:y="9.21cm" svg:viewBox="0 0 226 336" svg:d="M108 162c38 0 66 28 66 80 0 60-36 80-64 80-20 0-64-6-84-36 22 0 28-16 28-26 0-16-12-28-28-28-12 0-26 8-26 28 0 46 50 76 110 76 68 0 116-44 116-94 0-38-32-76-86-88 52-18 70-56 70-86 0-38-43-68-98-68s-98 26-98 66c0 18 12 26 26 26 16 0 26-10 26-24s-10-26-26-26c18-22 52-28 70-28 22 0 52 12 52 54 0 20-6 44-18 58-18 20-30 20-56 22-12 0-12 0-16 2-1 2-4 0-4 6s4 6 12 6c9 0 19 0 28 0z">
              <text:p/>
            </draw:path>
            <draw:path draw:style-name="gr3" draw:text-style-name="P7" draw:layer="layout" svg:width="0.285cm" svg:height="0.221cm" svg:x="3.024cm" svg:y="10.741cm" svg:viewBox="0 0 286 222" svg:d="M184 138c-2 10-6 28-8 30-8 14-28 40-58 40-34 0-34-32-34-40 0-28 12-64 26-100 4-10 8-18 8-24 0-26-22-44-48-44-48 0-70 68-70 76 0 6 6 6 8 6 6 0 8-2 8-8 12-40 34-60 54-60 8 0 12 6 12 18s-4 22-10 32c-26 68-26 82-26 96 0 8 0 32 18 46 14 12 34 16 52 16 30 0 46-16 64-32 10 32 42 32 48 32 18 0 30-10 40-26 10-18 12-32 18-48 0-8-5-5-8-8-8 0-8 2-12 16-6 24-16 52-36 52-12 0-16-10-16-24 0-8 4-26 8-38 2-14 8-34 10-44 4-15 8-29 12-44 2-12 8-34 8-36 0-10-8-16-16-16-18 0-22 14-26 30-9 34-17 68-26 102z">
              <text:p/>
            </draw:path>
            <draw:path draw:style-name="gr3" draw:text-style-name="P7" draw:layer="layout" svg:width="0.361cm" svg:height="0.131cm" svg:x="3.368cm" svg:y="10.769cm" svg:viewBox="0 0 362 132" svg:d="M342 24c8 0 20 0 20-12s-12-12-18-12c-109 0-217 0-326 0-8 0-18 0-18 12s10 12 18 12c108 0 216 0 324 0zM344 132c6 0 18 0 18-12s-12-12-20-12c-108 0-216 0-324 0-8 0-18 0-18 12s10 12 18 12c109 0 217 0 326 0z">
              <text:p/>
            </draw:path>
            <draw:path draw:style-name="gr3" draw:text-style-name="P7" draw:layer="layout" svg:width="0.227cm" svg:height="0.335cm" svg:x="3.79cm" svg:y="10.633cm" svg:viewBox="0 0 228 336" svg:d="M228 168c0-54-6-92-28-126-16-24-46-42-86-42-114 0-114 133-114 168s0 168 114 168 114-132 114-168zM114 322c-22 0-52-14-62-54-8-28-8-70-8-106s0-72 8-100c10-38 42-50 62-50 26 0 52 18 60 46 8 26 10 62 10 104 0 36 0 74-8 104-8 44-42 56-62 56z">
              <text:p/>
            </draw:path>
            <draw:path draw:style-name="gr3" draw:text-style-name="P7" draw:layer="layout" svg:width="0.321cm" svg:height="0.317cm" svg:x="4.309cm" svg:y="9.534cm" svg:viewBox="0 0 322 318" svg:d="M234 44c-14-26-34-44-66-44-82 0-168 104-168 206 0 66 38 112 92 112 14 0 50-2 92-52 6 28 30 52 64 52 24 0 40-16 52-38 12-26 22-68 22-70 0-8-8-8-10-8-6 0-8 4-10 14-12 46-24 86-52 86-20 0-22-18-22-32 0-16 2-20 10-52 8-30 8-36 14-62 9-33 17-67 26-100 6-20 6-20 6-24 0-12-10-18-22-18-16 0-26 16-28 30zM188 226c-4 14-4 14-14 26-32 40-60 50-80 50-36 0-44-38-44-66 0-34 22-122 38-154 22-40 54-66 82-66 44 0 54 57 54 62s0 8-2 10c-11 46-23 92-34 138z">
              <text:p/>
            </draw:path>
            <draw:path draw:style-name="gr3" draw:text-style-name="P7" draw:layer="layout" svg:width="0.257cm" svg:height="0.495cm" svg:x="4.685cm" svg:y="9.356cm" svg:viewBox="0 0 258 496" svg:d="M134 8c-3-3 0-8-8-8-16 0-68 6-86 8-6 0-14 2-14 14 0 8 6 8 18 8 32 0 34 6 34 12s-6 28-10 44c-19 76-39 152-58 228-8 36-10 48-10 72 0 66 36 110 88 110 84 0 170-104 170-206 0-64-38-112-94-112-32 0-60 20-82 42 17-71 35-141 52-212zM68 274c4-16 4-16 10-24 36-46 68-56 86-56 24 0 44 20 44 66 0 40-24 122-36 148-24 48-56 72-84 72-24 0-46-18-46-70 0-14 0-28 10-72 5-22 11-43 16-64z">
              <text:p/>
            </draw:path>
            <draw:path draw:style-name="gr3" draw:text-style-name="P7" draw:layer="layout" svg:width="0.269cm" svg:height="0.317cm" svg:x="4.985cm" svg:y="9.534cm" svg:viewBox="0 0 270 318" svg:d="M100 148c20 0 72-2 108-16 48-22 52-62 52-72 0-32-26-60-76-60-78 0-184 68-184 190 0 72 42 128 110 128 102 0 160-74 160-82 0-6-4-10-8-10s-4 2-10 8c-54 68-132 68-140 68-54 0-60-58-60-80 0-10 0-32 10-74 13 0 25 0 38 0zM66 132c28-106 100-116 118-116 34 0 52 20 52 44 0 72-112 72-140 72-10 0-20 0-30 0z">
              <text:p/>
            </draw:path>
            <draw:path draw:style-name="gr3" draw:text-style-name="P7" draw:layer="layout" svg:width="0.333cm" svg:height="0.023cm" svg:x="5.333cm" svg:y="9.454cm" svg:viewBox="0 0 334 24" svg:d="M314 24c8 0 20 0 20-12s-12-12-20-12c-98 0-196 0-294 0-8 0-20 0-20 12s12 12 20 12c98 0 196 0 294 0z">
              <text:p/>
            </draw:path>
            <draw:path draw:style-name="gr3" draw:text-style-name="P7" draw:layer="layout" svg:width="0.251cm" svg:height="0.221cm" svg:x="5.749cm" svg:y="9.372cm" svg:viewBox="0 0 252 222" svg:d="M178 30c-10-16-26-30-50-30-64 0-128 70-128 140 0 48 32 82 74 82 28 0 52-14 70-34 10 30 38 34 52 34 18 0 30-10 38-26 12-18 12-32 18-48 0-8-6-8-8-8-8 0-8 2-12 16-4 24-14 52-34 52-14 0-18-10-18-24 0-8 4-26 8-38 4-14 8-34 10-44 3-13 7-25 10-38 4-12 10-36 10-38 0-12-10-16-18-16s-18 6-22 20zM146 156c-2 14-14 24-24 32-4 4-24 20-46 20-18 0-36-12-36-48 0-26 14-80 26-100 22-38 48-46 62-46 34 0 44 38 44 44-1 2-2 4-2 6-8 31-16 61-24 92z">
              <text:p/>
            </draw:path>
            <draw:path draw:style-name="gr3" draw:text-style-name="P7" draw:layer="layout" svg:width="0.285cm" svg:height="0.221cm" svg:x="6.047cm" svg:y="9.372cm" svg:viewBox="0 0 286 222" svg:d="M186 138c-2 10-5 19-8 28-10 16-30 42-60 42-34 0-34-32-34-40 0-30 14-64 28-100 4-10 6-18 6-26 0-24-20-42-46-42-50 0-72 68-72 76 0 6 8 6 10 6 6 0 6-2 8-8 12-40 34-60 52-60 8 0 12 6 12 18 0 10-4 22-8 32-26 68-26 82-26 96 0 8 0 30 18 46 14 12 34 16 50 16 32 0 48-16 64-32 12 32 44 32 50 32 16 0 30-10 38-26 12-18 12-32 18-48 0-8-6-8-8-8-6 0-8 2-10 16-6 22-16 52-36 52-14 0-16-10-16-24 0-8 4-26 6-38 4-14 8-34 12-44 3-15 7-29 10-44 4-12 10-34 10-36 0-10-8-16-18-16-18 0-20 14-24 30-9 34-17 68-26 102z">
              <text:p/>
            </draw:path>
            <draw:path draw:style-name="gr3" draw:text-style-name="P7" draw:layer="layout" svg:width="0.361cm" svg:height="0.363cm" svg:x="6.391cm" svg:y="9.284cm" svg:viewBox="0 0 362 364" svg:d="M194 194c50 0 100 0 150 0 6 0 18 0 18-12s-10-12-18-12c-50 0-100 0-150 0 0-50 0-100 0-150 0-8 0-20-12-20s-12 12-12 20c0 50 0 100 0 150-51 0-101 0-152 0-6 0-18 0-18 12s12 12 18 12c51 0 101 0 152 0 0 50 0 101 0 152 0 6 0 18 12 18s12-12 12-18c0-51 0-102 0-152z">
              <text:p/>
            </draw:path>
            <draw:path draw:style-name="gr3" draw:text-style-name="P7" draw:layer="layout" svg:width="0.241cm" svg:height="0.331cm" svg:x="6.807cm" svg:y="9.258cm" svg:viewBox="0 0 242 332" svg:d="M242 250c0-6 0-12 0-18-19 0-37 0-56 0 0-73 0-145 0-218 0-10 0-14-10-14-6 0-8 0-12 6-55 75-109 151-164 226 0 6 0 12 0 18 49 0 97 0 146 0 0 14 0 28 0 42 0 16 0 22-40 22-5 0-9 0-14 0 0 6 0 12 0 18 24-2 56-2 74-2s50 0 74 2c0-6 0-12 0-18-5 0-9 0-14 0-40 0-40-6-40-22 0-14 0-28 0-42 19 0 37 0 56 0zM148 52c0 60 0 120 0 180-43 0-87 0-130 0 43-60 87-120 130-180z">
              <text:p/>
            </draw:path>
            <draw:path draw:style-name="gr3" draw:text-style-name="P7" draw:layer="layout" svg:width="0.199cm" svg:height="0.345cm" svg:x="7.101cm" svg:y="9.248cm" svg:viewBox="0 0 200 346" svg:d="M98 14c1-3 2-6 2-8s-2-6-8-6c-10 0-52 4-64 4-4 2-10 2-10 12 0 8 6 8 12 8 24 0 24 2 24 6s-4 24-8 34c-4 15-8 31-12 46-4 16-30 124-32 132-2 10-2 18-2 24 0 48 32 80 72 80 62 0 128-66 128-140 0-56-40-82-74-82-26 0-48 14-62 28 11-46 23-92 34-138zM72 332c-24 0-38-20-38-50 0-18 6-34 20-90 2-10 2-10 12-22 18-20 40-32 58-32 20 0 36 14 36 48 0 20-10 70-26 98-12 24-36 48-62 48z">
              <text:p/>
            </draw:path>
            <draw:path draw:style-name="gr3" draw:text-style-name="P7" draw:layer="layout" svg:width="3.07cm" svg:height="0.027cm" svg:x="4.279cm" svg:y="10.13cm" svg:viewBox="0 0 3071 28" svg:d="M1536 28c-512 0-1024 0-1536 0 0-9 0-19 0-28 1024 0 2048 0 3071 0 0 9 0 19 0 28-511 0-1023 0-1535 0z">
              <text:p/>
            </draw:path>
            <draw:path draw:style-name="gr3" draw:text-style-name="P7" draw:layer="layout" svg:width="0.257cm" svg:height="0.495cm" svg:x="5.033cm" svg:y="10.313cm" svg:viewBox="0 0 258 496" svg:d="M136 8c0-2 0-8-10-8-16 0-68 6-86 6-6 2-14 2-14 16 0 8 8 8 18 8 34 0 34 4 34 12 0 4-6 28-10 42-19 77-37 153-56 230-10 36-12 46-12 70 0 68 38 112 90 112 82 0 168-106 168-206 0-64-36-114-92-114-34 0-62 22-82 44 17-71 35-141 52-212zM68 274c6-16 6-18 12-26 34-46 66-56 84-56 26 0 44 22 44 66 0 42-24 122-36 150-22 46-56 72-82 72-24 0-48-20-48-72 0-12 0-26 12-70 5-22 9-43 14-64z">
              <text:p/>
            </draw:path>
            <draw:path draw:style-name="gr3" draw:text-style-name="P7" draw:layer="layout" svg:width="0.267cm" svg:height="0.319cm" svg:x="5.335cm" svg:y="10.489cm" svg:viewBox="0 0 268 320" svg:d="M98 150c20 0 72-2 108-16 48-22 52-64 52-74 0-30-26-60-74-60-78 0-184 70-184 192 0 72 40 128 110 128 100 0 158-76 158-84 0-4-4-8-8-8s-4 0-8 6c-56 70-132 70-142 70-54 0-60-60-60-82 0-8 0-30 10-72 13 0 25 0 38 0zM66 134c26-108 98-118 118-118 32 0 52 20 52 44 0 74-114 74-142 74-9 0-19 0-28 0z">
              <text:p/>
            </draw:path>
            <draw:path draw:style-name="gr3" draw:text-style-name="P7" draw:layer="layout" svg:width="0.331cm" svg:height="0.023cm" svg:x="5.683cm" svg:y="10.463cm" svg:viewBox="0 0 332 24" svg:d="M312 24c8 0 20 0 20-12s-12-12-20-12c-98 0-196 0-294 0-8 0-18 0-18 12s10 12 18 12c98 0 196 0 294 0z">
              <text:p/>
            </draw:path>
            <draw:path draw:style-name="gr3" draw:text-style-name="P7" draw:layer="layout" svg:width="0.241cm" svg:height="0.329cm" svg:x="6.087cm" svg:y="10.268cm" svg:viewBox="0 0 242 330" svg:d="M242 250c0-6 0-12 0-18-19 0-37 0-56 0 0-73 0-147 0-220 0-10 0-12-10-12-6 0-8 0-12 6-55 75-109 151-164 226 0 6 0 12 0 18 49 0 97 0 146 0 0 13 0 26 0 40 0 16 0 22-40 22-5 0-9 0-14 0 0 6 0 12 0 18 24 0 56-2 74-2s50 2 74 2c0-6 0-12 0-18-5 0-9 0-14 0-40 0-40-6-40-22 0-14 0-27 0-40 19 0 37 0 56 0zM148 52c0 60 0 120 0 180-43 0-87 0-130 0 43-60 87-120 130-180z">
              <text:p/>
            </draw:path>
            <draw:path draw:style-name="gr3" draw:text-style-name="P7" draw:layer="layout" svg:width="0.199cm" svg:height="0.345cm" svg:x="6.381cm" svg:y="10.258cm" svg:viewBox="0 0 200 346" svg:d="M98 14c1-3 1-5 2-8 0-2-2-6-8-6-10 0-52 4-64 4-4 0-10 2-10 12 0 6 6 6 12 6 24 0 24 4 24 8s-4 22-8 34c-4 15-8 31-12 46-4 16-30 124-32 130-2 12-2 18-2 24 0 50 32 82 72 82 62 0 128-68 128-140 0-58-40-82-74-82-26 0-48 14-62 26 11-45 23-91 34-136zM72 332c-24 0-38-22-38-50 0-18 6-36 20-90 2-10 2-12 12-22 18-22 40-32 58-32 20 0 36 14 36 48 0 20-12 70-26 98-12 24-36 48-62 48z">
              <text:p/>
            </draw:path>
            <draw:path draw:style-name="gr3" draw:text-style-name="P7" draw:layer="layout" svg:width="0.333cm" svg:height="0.495cm" svg:x="7.463cm" svg:y="9.832cm" svg:viewBox="0 0 334 496" svg:d="M334 8c-3-3 0-8-8-8-10 0-78 6-90 8-6 0-10 4-10 14 0 8 6 8 18 8 34 0 34 4 34 12-1 5-1 9-2 14-14 55-28 111-42 166-12-26-32-44-64-44-82 0-170 102-170 204 0 66 38 114 94 114 14 0 48-4 92-54 4 30 30 54 64 54 24 0 40-16 52-40s13-46 20-68c0-8-6-8-8-8-8 0-8 2-10 12-12 46-24 88-54 88-18 0-20-18-20-32 0-18 0-22 4-34 33-136 67-271 100-406zM188 404c-2 12-2 14-14 26-30 38-60 50-78 50-36 0-46-38-46-66 0-36 22-122 38-154 22-42 54-68 82-68 46 0 56 58 56 62s-2 8-2 12c-12 46-24 92-36 138z">
              <text:p/>
            </draw:path>
            <draw:path draw:style-name="gr3" draw:text-style-name="P7" draw:layer="layout" svg:width="0.361cm" svg:height="0.317cm" svg:x="7.821cm" svg:y="10.01cm" svg:viewBox="0 0 362 318" svg:d="M226 270c8 30 32 48 62 48 26 0 42-16 52-40 12-24 15-46 22-68 0-8-6-8-8-8-8 0-8 2-10 12-10 40-24 88-54 88-14 0-22-10-22-32 0-16 10-48 14-74 7-25 13-51 20-76 2-10 10-36 12-48 4-16 12-42 12-46 0-12-10-20-22-20-2 0-22 2-26 26-14 50-46 174-54 210 0 4-28 60-80 60-36 0-44-32-44-58 0-40 20-94 38-144 10-20 12-30 12-44 0-30-22-56-56-56-68 0-94 100-94 108 0 6 5 4 8 6 8 0 8-2 12-12 18-62 44-88 72-88 6 0 16 2 16 24 0 16-8 36-12 48-26 70-40 112-40 148 0 66 48 84 86 84 46 0 72-32 84-48z">
              <text:p/>
            </draw:path>
            <draw:path draw:style-name="gr3" draw:text-style-name="P7" draw:layer="layout" svg:width="0.467cm" svg:height="0.163cm" svg:x="8.437cm" svg:y="10.062cm" svg:viewBox="0 0 468 164" svg:d="M444 28c10 0 24 0 24-14s-14-14-22-14c-141 0-281 0-422 0-10 0-24 0-24 14s14 14 24 14c140 0 280 0 420 0zM446 164c8 0 22 0 22-14s-14-14-24-14c-140 0-280 0-420 0-10 0-24 0-24 14s14 14 24 14c141 0 281 0 422 0z">
              <text:p/>
            </draw:path>
            <draw:path draw:style-name="gr3" draw:text-style-name="P7" draw:layer="layout" svg:width="0.231cm" svg:height="0.467cm" svg:x="9.203cm" svg:y="9.852cm" svg:viewBox="0 0 232 468" svg:d="M144 18c0-16 0-18-16-18-44 44-106 44-128 44 0 7 0 15 0 22 14 0 56 0 92-18 0 121 0 242 0 364 0 26-2 34-66 34-7 0-15 0-22 0 0 7 0 14 0 22 24-2 86-2 114-2s90 0 114 2c0-8 0-15 0-22-7 0-15 0-22 0-64 0-66-8-66-34 0-132 0-263 0-394z">
              <text:p/>
            </draw:path>
            <draw:path draw:style-name="gr3" draw:text-style-name="P7" draw:layer="layout" svg:width="0.427cm" svg:height="0.027cm" svg:x="9.706cm" svg:y="10.13cm" svg:viewBox="0 0 428 28" svg:d="M404 28c12 0 24 0 24-14s-12-14-24-14c-127 0-253 0-380 0-12 0-24 0-24 14s12 14 24 14c127 0 253 0 380 0z">
              <text:p/>
            </draw:path>
            <draw:path draw:style-name="gr3" draw:text-style-name="P7" draw:layer="layout" svg:width="0.269cm" svg:height="0.317cm" svg:x="10.382cm" svg:y="10.01cm" svg:viewBox="0 0 270 318" svg:d="M100 148c20 0 72-2 106-16 50-22 54-64 54-74 0-30-28-58-76-58-78 0-184 68-184 190 0 72 42 128 110 128 102 0 160-76 160-84 0-4-4-8-8-8s-6 0-10 6c-54 70-132 70-140 70-54 0-62-60-62-82 0-8 2-30 12-72 13 0 25 0 38 0zM66 132c28-106 100-118 118-118 34 0 52 20 52 44 0 74-112 74-140 74-10 0-20 0-30 0z">
              <text:p/>
            </draw:path>
            <draw:path draw:style-name="gr3" draw:text-style-name="P7" draw:layer="layout" svg:width="0.331cm" svg:height="0.023cm" svg:x="10.73cm" svg:y="9.894cm" svg:viewBox="0 0 332 24" svg:d="M314 24c8 0 18 0 18-12s-10-12-18-12c-98 0-196 0-294 0-8 0-20 0-20 12s12 12 20 12c98 0 196 0 294 0z">
              <text:p/>
            </draw:path>
            <draw:path draw:style-name="gr3" draw:text-style-name="P7" draw:layer="layout" svg:width="0.227cm" svg:height="0.337cm" svg:x="11.142cm" svg:y="9.702cm" svg:viewBox="0 0 228 338" svg:d="M108 164c40 0 66 26 66 78 0 62-34 80-64 80-18 0-62-6-82-34 22-2 28-18 28-28 0-16-12-28-28-28-14 0-28 8-28 30 0 46 52 76 112 76 68 0 116-46 116-96 0-38-32-76-86-88 52-18 70-56 70-86 0-38-45-68-100-68s-96 28-96 66c0 18 12 26 26 26 16 0 24-10 24-24s-8-24-24-26c18-22 50-26 70-26 22 0 52 10 52 52 0 22-6 44-20 60-16 18-30 20-54 20-12 2-14 2-16 2-1 2-4 0-4 6 0 8 4 8 12 8 9 0 17 0 26 0z">
              <text:p/>
            </draw:path>
            <draw:path draw:style-name="gr3" draw:text-style-name="P7" draw:layer="layout" svg:width="0.251cm" svg:height="0.221cm" svg:x="11.426cm" svg:y="9.812cm" svg:viewBox="0 0 252 222" svg:d="M178 30c-10-16-26-30-50-30-64 0-128 70-128 140 0 48 32 82 74 82 28 0 52-14 70-34 10 30 38 34 52 34 18 0 30-10 38-26 12-18 18-46 18-48 0-8-6-8-8-8-8 0-8 2-12 16-6 24-14 52-36 52-12 0-16-10-16-24 0-8 4-26 8-38 4-14 8-34 10-44 3-13 7-25 10-38 4-12 10-36 10-38 0-12-10-16-18-16s-18 6-22 20zM146 156c-2 14-14 24-24 32-4 4-24 20-46 20-18 0-36-12-36-48 0-26 14-80 26-98 22-40 48-48 62-48 34 0 44 38 44 44 0 2-2 4-2 6-8 31-16 61-24 92z">
              <text:p/>
            </draw:path>
            <draw:path draw:style-name="gr3" draw:text-style-name="P7" draw:layer="layout" svg:width="0.073cm" svg:height="0.073cm" svg:x="11.798cm" svg:y="10.246cm" svg:viewBox="0 0 74 74" svg:d="M74 36c0-20-18-36-38-36s-36 16-36 36 16 38 36 38 38-18 38-38z">
              <text:p/>
            </draw:path>
          </draw:g>
        </draw:g>
        <draw:g>
          <svg:title>TexMaths</svg:title>
          <svg:desc>22§display§F(x,y) = 1 - e^{-ax} - e^{-by} + e^{-(ax+by)}, §svg§600§FALSE§</svg:desc>
          <draw:frame draw:style-name="gr2" draw:text-style-name="P6" draw:layer="layout" svg:width="13.05cm" svg:height="0.975cm" svg:x="1.663cm" svg:y="5.897cm">
            <draw:image xlink:href="Pictures/100071150000172D000001BC0A825619F9D49EBB.svg" xlink:type="simple" xlink:show="embed" xlink:actuate="onLoad" draw:mime-type="image/svg+xml">
              <text:p/>
            </draw:image>
            <draw:image xlink:href="Pictures/10000001000000E000000011C00AF171C1C0681A.png" xlink:type="simple" xlink:show="embed" xlink:actuate="onLoad" draw:mime-type="image/png"/>
          </draw:frame>
        </draw:g>
        <draw:frame draw:style-name="gr11" draw:text-style-name="P6" draw:layer="layout" svg:width="11.8cm" svg:height="5.303cm" svg:x="15.4cm" svg:y="4cm">
          <draw:image xlink:href="Pictures/10000001000008E900000401549FADA00E2098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Density Func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0">Assume that </text:span><text:span text:style-name="T21">f</text:span><text:span text:style-name="T22">Y</text:span><text:span text:style-name="T20">(</text:span><text:span text:style-name="T21">y</text:span><text:span text:style-name="T23">) </text:span><text:span text:style-name="T24">≠</text:span><text:span text:style-name="T25"> 0 (resp., </text:span><text:span text:style-name="T26">f</text:span><text:span text:style-name="T27">X</text:span><text:span text:style-name="T28">(</text:span><text:span text:style-name="T26">x</text:span><text:span text:style-name="T28">) </text:span><text:span text:style-name="T29">≠</text:span><text:span text:style-name="T28"> 0), </text:span><text:span text:style-name="T14"><text:s/></text:span></text:p>
              </text:list-item>
            </text:list>
          </draw:text-box>
        </draw:frame>
        <draw:g>
          <svg:title>TexMaths</svg:title>
          <svg:desc>22§latex§\begin{eqnarray*}
f_{X\mid Y}(x, y) &amp;=&amp; \frac{f(x, y)}{f_Y(y)}\\
f_{Y\mid X}(x, y) &amp;=&amp; \frac{f(x, y)}{f_X(x)}.
\end{eqnarray*}§svg§600§FALSE§</svg:desc>
          <draw:frame draw:style-name="gr2" draw:text-style-name="P6" draw:layer="layout" svg:width="8.175cm" svg:height="3.96cm" svg:x="7.83cm" svg:y="5.601cm">
            <draw:image xlink:href="Pictures/1000DB1000000E85000007095369933F64B7B0A7.svg" xlink:type="simple" xlink:show="embed" xlink:actuate="onLoad" draw:mime-type="image/svg+xml">
              <text:p/>
            </draw:image>
            <draw:image xlink:href="Pictures/100000010000008C00000044178DD5B5B0D3E6AC.png" xlink:type="simple" xlink:show="embed" xlink:actuate="onLoad" draw:mime-type="image/png"/>
          </draw:frame>
        </draw:g>
        <draw:g>
          <svg:title>TexMaths</svg:title>
          <svg:desc>22§display§\mathbb{E}[X\mid Y = y] = \int_{x=-\infty}^{\infty} x\cdot f_{X\mid Y} (x, y) dx.§svg§600§FALSE§</svg:desc>
          <draw:g>
            <draw:path draw:style-name="gr6" draw:text-style-name="P12" draw:layer="layout" svg:width="13.252cm" svg:height="1.726cm" svg:x="6.346cm" svg:y="10.817cm" svg:viewBox="0 0 13253 1727" svg:d="M0 0c4418 0 8835 0 13253 0 0 576 0 1151 0 1727-4418 0-8835 0-13253 0 0-576 0-1151 0-1727z">
              <text:p/>
            </draw:path>
            <draw:path draw:style-name="gr3" draw:text-style-name="P7" draw:layer="layout" svg:width="0.483cm" svg:height="0.528cm" svg:x="6.317cm" svg:y="11.346cm" svg:viewBox="0 0 484 529" svg:d="M189 270c20 0 57 0 84 16 37 24 39 66 39 70 3 11 3 20 16 20s13-11 13-24c0-70 0-140 0-209 0-13 0-24-13-24s-16 11-16 17c-4 99-83 106-123 106 0-55 0-109 0-163 0-53 16-53 33-53 13 0 25 0 38 0 103 0 156 55 160 108 0 7 2 18 13 18 14 0 14-14 14-27 0-33 0-66 0-99 0-24 0-26-25-26-132 0-264 0-396 0-13 0-26 0-26 13s15 13 20 13c44 0 48 7 48 44 0 129 0 258 0 387 0 37-2 44-44 44-11 0-24 0-24 13 0 15 13 15 26 15 137 0 273 0 410 0 15 0 22 0 24-10 2-3 24-130 24-135 0-8-9-13-13-13-11 0-16 9-16 11-4 20-11 51-68 84-39 24-79 35-123 35-14 0-28 0-42 0-17 0-33 0-33-51 0-60 0-120 0-180zM420 26c0 13 0 25 0 38-13-13-28-27-44-38 15 0 29 0 44 0zM271 253c11-5 28-18 41-33 0 22 0 44 0 66-17-22-28-21-41-31 0-1 0-2 0-2zM95 70c0-11 0-28-7-44 28 0 56 0 84 0-9 18-9 44-9 51 0 124 0 249 0 373 0 29 4 44 9 51-28 0-56 0-84 0 7-13 7-33 7-42 0-129 0-259 0-389zM383 501c24-13 46-29 61-42-2 2-6 35-8 42-18 0-36 0-53 0z">
              <text:p/>
            </draw:path>
            <draw:path draw:style-name="gr3" draw:text-style-name="P7" draw:layer="layout" svg:width="0.105cm" svg:height="0.77cm" svg:x="6.913cm" svg:y="11.296cm" svg:viewBox="0 0 106 771" svg:d="M106 771c0-10 0-20 0-31-25 0-50 0-75 0 0-236 0-473 0-709 25 0 50 0 75 0 0-10 0-21 0-31-36 0-71 0-106 0 0 257 0 514 0 771 35 0 70 0 106 0z">
              <text:p/>
            </draw:path>
            <draw:path draw:style-name="gr3" draw:text-style-name="P7" draw:layer="layout" svg:width="0.637cm" svg:height="0.526cm" svg:x="7.056cm" svg:y="11.348cm" svg:viewBox="0 0 638 527" svg:d="M354 209c-21-52-42-103-64-154-2-4-3-6-4-9 0-4 13-20 46-22 7-2 16-2 16-15 0-9-9-9-11-9-33 0-66 2-99 2-20 0-66-2-86-2-5 0-13 0-13 15 0 9 6 9 17 9 46 0 51 7 57 24 30 72 60 144 91 216-55 58-109 117-163 175-3 3-6 5-9 7-37 42-75 55-114 57-9 0-18 0-18 16 4 2 0 8 11 8 22 0 48-2 73-2 28 0 59 2 85 2 5 0 16 0 16-15 0-9-9-9-11-9-7-2-31-2-31-24 0-13 13-24 22-35 26-28 53-56 79-84 23-25 46-49 68-74 27 61 53 123 80 184 2 7 4 9 4 11 0 5-15 18-46 22-9 0-16 0-16 13 0 11 9 11 11 11 22 0 77-2 99-2 20 0 66 2 86 2 5 0 13 0 13-15 0-9-6-9-13-9-50-2-53-4-66-35-31-70-81-191-99-237 51-55 132-148 159-167 22-20 50-38 96-40 11-2 18-2 18-15 0-2 0-9-11-9-22 0-48 2-73 2-28 0-57-2-85-2-5 0-14 0-14 15 0 5 3 7 9 9 7 0 31 2 31 24 0 9-9 20-15 27-42 44-84 89-126 134z">
              <text:p/>
            </draw:path>
            <draw:path draw:style-name="gr3" draw:text-style-name="P7" draw:layer="layout" svg:width="0.03cm" svg:height="0.77cm" svg:x="8.044cm" svg:y="11.296cm" svg:viewBox="0 0 31 771" svg:d="M31 29c0-14 0-29-16-29-15 0-15 15-15 29 0 238 0 477 0 716 0 13 0 26 15 26 16 0 16-13 16-26 0-239 0-478 0-716z">
              <text:p/>
            </draw:path>
            <draw:path draw:style-name="gr3" draw:text-style-name="P7" draw:layer="layout" svg:width="0.56cm" svg:height="0.526cm" svg:x="8.409cm" svg:y="11.348cm" svg:viewBox="0 0 561 527" svg:d="M433 88c4-4 8-7 11-11 25-24 49-51 102-53 8-2 15-2 15-15 0-7-4-9-9-9-20 0-44 2-64 2-26 0-52-2-77-2-4 0-15 0-15 13 0 9 9 11 11 11 7 0 29 0 29 18 0 13-18 33-22 37-60 68-119 136-179 204-28-76-57-152-85-228-5-11-3-9-5-13 0-18 38-18 46-18 11 0 18 0 18-15 0-9-9-9-11-9-22 0-75 2-97 2-20 0-68-2-88-2-4 0-13 0-13 15 0 9 7 9 18 9 46 0 48 7 55 27 32 84 64 168 96 252 0 2 3 11 3 13 0 3-31 128-36 141-8 42-11 44-72 46-13 0-20 0-20 16 0 8 9 8 11 8 22 0 75-2 97-2s77 2 99 2c4 0 15 0 15-15 0-9-9-9-22-9-2 0-17 0-31-2-15-2-19-2-19-13 0-5 6-31 11-49 8-35 17-71 26-107 4-16 4-18 11-24 64-74 128-147 191-220z">
              <text:p/>
            </draw:path>
            <draw:path draw:style-name="gr3" draw:text-style-name="P7" draw:layer="layout" svg:width="0.514cm" svg:height="0.179cm" svg:x="9.26cm" svg:y="11.592cm" svg:viewBox="0 0 515 180" svg:d="M488 31c11 0 27 0 27-16 0-15-16-15-27-15-154 0-309 0-464 0-9 0-24 0-24 15 0 16 15 16 26 16 154 0 308 0 462 0zM488 180c11 0 27 0 27-15 0-16-16-16-27-16-154 0-308 0-462 0-11 0-26 0-26 16 0 15 15 15 24 15 155 0 310 0 464 0z">
              <text:p/>
            </draw:path>
            <draw:path draw:style-name="gr3" draw:text-style-name="P7" draw:layer="layout" svg:width="0.355cm" svg:height="0.5cm" svg:x="10.054cm" svg:y="11.533cm" svg:viewBox="0 0 356 501" svg:d="M354 48c2-11 2-13 2-17 0-16-11-22-22-22-6 0-19 4-26 17-2 3-9 27-11 42-7 20-11 40-15 62-12 46-24 92-36 138-2 11-35 66-88 66-39 0-46-35-46-64 0-35 13-83 38-151 13-31 17-40 17-55 0-35-26-64-64-64-74 0-103 112-103 119 0 8 9 8 11 8 7 0 7-2 11-13 22-72 53-96 79-96 5 0 18 0 18 24 0 20-7 39-13 55-31 81-44 125-44 162 0 68 48 90 94 90 31 0 57-13 77-33-9 40-17 77-48 119-22 26-51 48-86 48-11 0-46-2-59-33 13 0 22 0 33-8 8-7 15-18 15-33 0-22-20-27-29-27-17 0-41 13-41 51 0 39 33 68 81 68 79 0 158-70 180-158 25-98 50-197 75-295z">
              <text:p/>
            </draw:path>
            <draw:path draw:style-name="gr3" draw:text-style-name="P7" draw:layer="layout" svg:width="0.105cm" svg:height="0.77cm" svg:x="10.457cm" svg:y="11.296cm" svg:viewBox="0 0 106 771" svg:d="M106 0c-36 0-71 0-106 0 0 10 0 21 0 31 25 0 50 0 75 0 0 236 0 473 0 709-25 0-50 0-75 0 0 11 0 21 0 31 35 0 70 0 106 0 0-257 0-514 0-771z">
              <text:p/>
            </draw:path>
            <draw:path draw:style-name="gr3" draw:text-style-name="P7" draw:layer="layout" svg:width="0.514cm" svg:height="0.179cm" svg:x="10.912cm" svg:y="11.592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3" draw:text-style-name="P7" draw:layer="layout" svg:width="0.685cm" svg:height="1.713cm" svg:x="11.728cm" svg:y="10.825cm" svg:viewBox="0 0 686 1714" svg:d="M37 1679c25-3 38-18 38-38 0-26-20-37-38-37-17 0-37 11-37 37 0 40 37 73 86 73 116 0 160-180 215-405 60-243 110-489 152-738 29-165 57-318 84-417 9-38 35-139 66-139 24 0 44 16 46 18-27 2-38 20-38 40 0 24 18 37 36 37 19 0 39-11 39-40 0-41-42-70-85-70-58 0-102 83-143 242-3 6-108 395-194 898-20 119-42 249-68 356-13 55-49 200-112 200-27 0-31-12-47-17z">
              <text:p/>
            </draw:path>
            <draw:path draw:style-name="gr3" draw:text-style-name="P7" draw:layer="layout" svg:width="0.531cm" svg:height="0.243cm" svg:x="12.5cm" svg:y="10.777cm" svg:viewBox="0 0 532 244" svg:d="M271 90c-29-33-38-42-60-57-33-24-66-33-97-33-66 0-114 57-114 123 0 62 46 121 112 121 77 0 130-62 148-90 28 33 37 42 59 57 33 24 66 33 97 33 66 0 116-57 116-123 0-62-48-121-114-121-75 0-128 62-147 90zM288 110c22-35 68-90 134-90 55 0 95 49 95 101 0 51-42 92-92 92-51 0-86-39-137-103zM244 134c-22 35-70 90-136 90-55 0-95-49-95-101s44-92 93-92c50 0 85 39 138 103z">
              <text:p/>
            </draw:path>
            <draw:path draw:style-name="gr3" draw:text-style-name="P7" draw:layer="layout" svg:width="0.289cm" svg:height="0.243cm" svg:x="12.139cm" svg:y="12.339cm" svg:viewBox="0 0 290 244" svg:d="M110 180c-7 20-24 48-51 48-2 0-19 0-30-6 22-9 24-26 24-31 0-11-9-20-22-20-16 0-31 14-31 33 0 27 31 40 57 40 24 0 46-16 62-37 13 28 42 37 64 37 61 0 94-68 94-84 0-6-6-6-9-6-6 0-6 2-8 9-14 37-44 65-75 65-22 0-33-15-33-35 0-13 13-63 28-123 11-41 36-55 53-55 10 3 18 0 29 7-18 7-24 22-24 31 0 11 8 20 22 20 13 0 30-11 30-33 0-31-35-40-57-40-26 0-48 18-59 40-11-22-35-40-66-40-60 0-95 66-95 83 0 7 7 7 9 7 7 0 9-2 11-9 13-41 46-66 73-66 19 0 33 9 33 36 0 11-7 37-11 57-6 24-12 48-18 72z">
              <text:p/>
            </draw:path>
            <draw:path draw:style-name="gr3" draw:text-style-name="P7" draw:layer="layout" svg:width="0.397cm" svg:height="0.144cm" svg:x="12.502cm" svg:y="12.37cm" svg:viewBox="0 0 398 145" svg:d="M378 26c7 0 20 0 20-13s-13-13-20-13c-119 0-239 0-358 0-7 0-20 0-20 13s13 13 20 13c119 0 239 0 358 0zM378 145c7 0 20 0 20-13s-13-13-20-13c-119 0-239 0-358 0-7 0-20 0-20 13s13 13 20 13c119 0 239 0 358 0z">
              <text:p/>
            </draw:path>
            <draw:path draw:style-name="gr3" draw:text-style-name="P7" draw:layer="layout" svg:width="0.364cm" svg:height="0.025cm" svg:x="12.997cm" svg:y="12.429cm" svg:viewBox="0 0 365 26" svg:d="M345 26c7 0 20 0 20-13s-11-13-20-13c-107 0-215 0-323 0-9 0-22 0-22 13s13 13 22 13c108 0 216 0 323 0z">
              <text:p/>
            </draw:path>
            <draw:path draw:style-name="gr3" draw:text-style-name="P7" draw:layer="layout" svg:width="0.531cm" svg:height="0.243cm" svg:x="13.464cm" svg:y="12.339cm" svg:viewBox="0 0 532 244" svg:d="M271 90c-29-33-38-42-58-57-33-24-68-33-96-33-69 0-117 57-117 123 0 62 46 121 114 121 75 0 128-62 148-90 28 33 37 42 57 57 33 24 68 33 99 33 66 0 114-57 114-123 0-62-46-121-114-121-75 0-128 62-147 90zM288 110c22-35 68-90 134-90 58 0 95 49 95 101 0 51-42 92-92 92-49 0-84-39-137-103zM244 134c-22 35-68 90-134 90-57 0-95-49-95-101s42-92 93-92c50 0 83 39 136 103z">
              <text:p/>
            </draw:path>
            <draw:path draw:style-name="gr3" draw:text-style-name="P7" draw:layer="layout" svg:width="0.384cm" svg:height="0.348cm" svg:x="14.229cm" svg:y="11.533cm" svg:viewBox="0 0 385 349" svg:d="M235 110c5-22 22-92 77-92 3 0 22 0 38 11-22 2-38 22-38 41 0 11 9 27 31 27 16 0 42-14 42-44 0-42-46-53-73-53-44 0-72 42-81 59-20-50-62-59-84-59-79 0-123 101-123 119 0 8 7 8 9 8 7 0 9-2 9-8 26-82 77-101 103-101 16 0 42 6 42 52 0 24-13 75-42 183-11 48-37 81-72 81-5 0-22 0-40-11 20-4 37-20 37-42 0-20-17-26-28-26-24 0-42 20-42 44 0 35 37 50 73 50 50 0 79-52 81-57 9 29 35 57 84 57 79 0 123-99 123-118 0-7-7-7-9-7-9 0-9 2-11 9-26 81-77 101-103 101-29 0-42-26-42-51 0-17 4-35 13-68 9-35 18-70 26-105z">
              <text:p/>
            </draw:path>
            <draw:path draw:style-name="gr3" draw:text-style-name="P7" draw:layer="layout" svg:width="0.08cm" svg:height="0.08cm" svg:x="14.887cm" svg:y="11.64cm" svg:viewBox="0 0 81 81" svg:d="M81 42c0-22-19-42-41-42s-40 20-40 42 18 39 40 39 41-17 41-39z">
              <text:p/>
            </draw:path>
            <draw:path draw:style-name="gr3" draw:text-style-name="P7" draw:layer="layout" svg:width="0.384cm" svg:height="0.702cm" svg:x="15.248cm" svg:y="11.331cm" svg:viewBox="0 0 385 703" svg:d="M242 235c22 0 44 0 66 0 15 0 24 0 24-15 0-9-9-9-22-9-21 0-42 0-64 0 6-29 12-59 18-88 2-15 13-70 18-79 6-15 19-26 37-26 2 0 22 0 37 13-35 2-41 31-41 42 0 17 13 26 28 26 20 0 42-16 42-46 0-35-35-53-66-53-26 0-77 13-99 90-4 15-7 24-26 121-18 0-36 0-53 0-16 0-22 0-22 15 0 9 6 9 20 9 17 0 35 0 52 0-19 102-39 204-59 305-13 75-26 145-66 145-4 0-24 0-37-13 35-4 41-30 41-41 0-20-13-29-28-29-20 0-42 18-42 46 0 35 33 55 66 55 42 0 73-46 86-75 26-50 44-142 44-149 15-81 31-163 46-244z">
              <text:p/>
            </draw:path>
            <draw:path draw:style-name="gr3" draw:text-style-name="P7" draw:layer="layout" svg:width="0.479cm" svg:height="0.368cm" svg:x="15.61cm" svg:y="11.645cm" svg:viewBox="0 0 480 369" svg:d="M275 163c17-17 34-34 51-51 70-68 90-90 140-92 7 0 14 0 14-11 0-7-7-9-9-9-16 0-35 2-51 2-13 0-48-2-61-2-5 0-11 2-11 11 0 2 0 9 6 9 7 0 20 2 20 13 0 9-9 18-13 22-5 4-75 70-95 92-18-35-37-70-55-105 0-2-2-7-2-9 0-4 11-13 29-13 4 0 11 0 11-11 0-2 0-9-9-9-11 0-24 2-35 2s-25 0-36 0c-8 0-22 0-33 0-8 0-19-2-28-2-2 0-11 0-11 11 0 9 6 9 15 9 31 0 33 4 40 15 25 50 50 100 75 150-10 10-20 20-29 30-11 9-37 33-46 44-66 66-88 88-137 90-8 0-15 0-15 14 0 2 2 6 9 6 15 0 33-2 50-2 9 0 22 0 31 0 11 0 22 2 31 2 4 0 11 0 11-11 0-9-4-9-9-9-4 0-17-2-17-13 0-9 8-15 19-28 37-36 74-71 110-106 22 43 44 85 66 128 3 4 2 4 3 6 0 2-9 11-29 13-4 0-11 0-11 14 3 2 0 6 9 6 11 0 23-2 35-2s24 0 35 0 24 0 33 0 20 2 29 2c2 0 11 0 11-11 0-9-7-9-16-9-30 0-33-6-37-15-29-57-59-114-88-171z">
              <text:p/>
            </draw:path>
            <draw:path draw:style-name="gr3" draw:text-style-name="P7" draw:layer="layout" svg:width="0.025cm" svg:height="0.537cm" svg:x="16.211cm" svg:y="11.61cm" svg:viewBox="0 0 26 538" svg:d="M26 20c0-7 0-20-11-20-15 0-15 11-15 20 0 166 0 332 0 499 0 8 0 19 13 19s13-11 13-19c0-167 0-333 0-499z">
              <text:p/>
            </draw:path>
            <draw:path draw:style-name="gr3" draw:text-style-name="P7" draw:layer="layout" svg:width="0.43cm" svg:height="0.368cm" svg:x="16.347cm" svg:y="11.645cm" svg:viewBox="0 0 431 369" svg:d="M337 66c11-11 22-22 33-29 22-15 41-17 48-17s13 0 13-11c0-5-2-9-6-9-16 0-31 2-44 2-18 0-42-2-58-2-2 0-11 0-11 11 0 9 7 9 11 9 16 0 16 6 16 11 0 4-5 9-7 13-4 4-6 9-11 11-45 48-89 95-134 143-24-53-48-106-73-158-2-9-2-9-2-11 0-9 24-9 29-9 6 0 13 0 13-11 0-2 0-9-9-9-15 0-55 2-72 2-14 0-47-2-62-2-4 0-11 2-11 11s9 9 15 9c31 0 33 4 40 17 28 62 56 123 84 185-8 33-17 66-25 99-6 26-8 28-50 28-9 0-16 0-16 11 0 7 5 9 9 9 9 0 22-2 33-2s27 0 35 0c11 0 25 0 36 0s24 2 37 2c2 0 11 0 11-11 0-9-7-9-18-9-8 0-11 0-22 0-8-2-11-2-11-8 0-3 7-29 11-44 3-18 16-64 16-66 2-9 2-9 9-16 47-49 95-99 143-149z">
              <text:p/>
            </draw:path>
            <draw:path draw:style-name="gr3" draw:text-style-name="P7" draw:layer="layout" svg:width="0.179cm" svg:height="0.77cm" svg:x="16.928cm" svg:y="11.296cm" svg:viewBox="0 0 180 771" svg:d="M180 765c0-3 0-5-13-18-97-97-121-242-121-360 0-134 29-268 123-365 11-11 11-11 11-13 0-7-4-9-8-9-7 0-77 53-124 152-37 83-48 169-48 235 0 59 9 153 51 239 48 97 114 145 121 145 4 0 8-2 8-6z">
              <text:p/>
            </draw:path>
            <draw:path draw:style-name="gr3" draw:text-style-name="P7" draw:layer="layout" svg:width="0.384cm" svg:height="0.348cm" svg:x="17.174cm" svg:y="11.533cm" svg:viewBox="0 0 385 349" svg:d="M238 110c4-22 22-92 74-92 5 0 25 0 40 11-22 2-37 22-37 41 0 11 8 27 28 27 18 0 42-14 42-44 0-42-44-53-70-53-47 0-73 42-82 59-20-50-61-59-83-59-82 0-126 101-126 119 0 8 6 6 9 8 7 0 9-2 11-8 26-82 77-101 103-101 16 0 42 6 42 52 0 24-13 75-42 183-11 48-39 81-72 81-5 0-22 0-40-11 20-4 38-20 38-42 0-20-18-26-29-26-24 0-44 20-44 44 0 35 40 50 73 50 52 0 79-52 81-57 11 29 37 57 84 57 79 0 123-99 123-118 0-7-7-7-9-7-7 0-9 2-9 9-26 81-79 101-103 101-31 0-42-26-42-51 0-17 4-35 13-68 9-35 18-70 27-105z">
              <text:p/>
            </draw:path>
            <draw:path draw:style-name="gr3" draw:text-style-name="P7" draw:layer="layout" svg:width="0.089cm" svg:height="0.23cm" svg:x="17.661cm" svg:y="11.792cm" svg:viewBox="0 0 90 231" svg:d="M90 81c0-50-17-81-48-81-27 0-42 20-42 42 0 20 15 41 42 41 9 0 20-4 26-10 2-3 3-2 5-3 0 4 2 0 2 11 0 57-29 104-53 130-9 9-9 9-9 11 0 6 5 9 7 9 9 0 70-60 70-150z">
              <text:p/>
            </draw:path>
            <draw:path draw:style-name="gr3" draw:text-style-name="P7" draw:layer="layout" svg:width="0.355cm" svg:height="0.5cm" svg:x="17.96cm" svg:y="11.533cm" svg:viewBox="0 0 356 501" svg:d="M354 48c2-11 2-13 2-17 0-16-11-22-22-22-6 0-19 4-26 17-2 3-9 27-11 42-4 20-11 40-15 62-12 46-24 92-36 138-2 11-35 66-88 66-37 0-46-35-46-64 0-35 13-83 40-151 11-31 15-40 15-55 0-35-26-64-64-64-74 0-103 112-103 119 0 8 9 8 11 8 7 0 7-2 11-13 22-72 53-96 79-96 7 0 20 0 20 24 0 20-9 39-13 55-33 81-46 125-46 162 0 68 48 90 94 90 31 0 57-13 79-33-11 40-19 77-50 119-20 26-51 48-86 48-11 0-46-2-59-33 13 0 24 0 33-8 8-7 15-18 15-33 0-22-20-27-29-27-17 0-41 13-41 51 0 39 33 68 81 68 79 0 158-70 180-158 25-98 50-197 75-295z">
              <text:p/>
            </draw:path>
            <draw:path draw:style-name="gr3" draw:text-style-name="P7" draw:layer="layout" svg:width="0.179cm" svg:height="0.77cm" svg:x="18.389cm" svg:y="11.296cm" svg:viewBox="0 0 180 771" svg:d="M180 387c0-62-8-154-52-242-47-94-113-145-119-145-5 0-9 4-9 9 0 2 0 2 15 17 75 77 119 198 119 361 0 132-28 268-123 364-11 9-11 11-11 14 0 4 4 6 9 6 6 0 77-53 123-149 37-86 48-172 48-235z">
              <text:p/>
            </draw:path>
            <draw:path draw:style-name="gr3" draw:text-style-name="P7" draw:layer="layout" svg:width="0.366cm" svg:height="0.542cm" svg:x="18.677cm" svg:y="11.339cm" svg:viewBox="0 0 367 543" svg:d="M367 9c0-2 0-9-8-9-14 0-86 7-99 9-7 0-11 4-11 13 0 11 6 11 17 11 38 0 40 4 40 13-1 5-2 10-2 16-16 60-31 121-47 182-13-29-37-51-70-51-92 0-187 115-187 227 0 72 42 123 103 123 16 0 53-3 99-57 7 33 33 57 71 57 28 0 46-18 57-42 13-29 24-75 24-77 0-7-6-7-9-7-8 0-8 3-11 14-13 50-28 96-59 96-22 0-24-19-24-35 0-20 2-24 4-37 38-149 75-298 112-446zM207 444c-5 13-5 15-16 28-33 42-66 55-88 55-37 0-48-44-48-72 0-40 24-134 42-169 24-47 59-75 90-75 51 0 62 64 62 68s-3 9-3 13c-13 51-26 101-39 152z">
              <text:p/>
            </draw:path>
            <draw:path draw:style-name="gr3" draw:text-style-name="P7" draw:layer="layout" svg:width="0.384cm" svg:height="0.348cm" svg:x="19.07cm" svg:y="11.533cm" svg:viewBox="0 0 385 349" svg:d="M235 110c5-22 22-92 77-92 5 0 22 0 38 11-20 2-35 22-35 41 0 11 6 27 28 27 18 0 42-14 42-44 0-42-46-53-73-53-44 0-70 42-81 59-18-50-59-59-84-59-79 0-123 101-123 119 0 8 7 8 9 8 7 0 9-2 11-8 24-82 77-101 103-101 14 0 42 6 42 52 0 24-13 75-42 183-13 48-39 81-74 81-5 0-22 0-38-11 18-4 35-20 35-42 0-20-17-26-28-26-22 0-42 20-42 44 0 35 37 50 73 50 50 0 79-52 81-57 9 29 37 57 84 57 79 0 123-99 123-118 0-7-7-7-9-7-7 0-9 2-11 9-24 81-77 101-103 101-29 0-42-26-42-51 0-17 4-35 13-68 9-35 18-70 26-105z">
              <text:p/>
            </draw:path>
            <draw:path draw:style-name="gr3" draw:text-style-name="P7" draw:layer="layout" svg:width="0.08cm" svg:height="0.082cm" svg:x="19.557cm" svg:y="11.792cm" svg:viewBox="0 0 81 83" svg:d="M81 42c0-22-18-42-41-42-24 0-40 20-40 42s16 41 40 41c23 0 41-19 41-41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Uniform Distribution</text:p>
          </draw:text-box>
        </draw:frame>
        <draw:g>
          <draw:line draw:style-name="gr12" draw:text-style-name="P6" draw:layer="layout" svg:x1="3.6cm" svg:y1="3.5cm" svg:x2="3.6cm" svg:y2="8.5cm">
            <text:p/>
          </draw:line>
          <draw:line draw:style-name="gr13" draw:text-style-name="P6" draw:layer="layout" svg:x1="3cm" svg:y1="8.1cm" svg:x2="11.6cm" svg:y2="8.1cm">
            <text:p/>
          </draw:line>
          <draw:line draw:style-name="gr14" draw:text-style-name="P6" draw:layer="layout" svg:x1="3.6cm" svg:y1="8.1cm" svg:x2="6cm" svg:y2="8.1cm">
            <text:p/>
          </draw:line>
          <draw:line draw:style-name="gr14" draw:text-style-name="P6" draw:layer="layout" svg:x1="8.5cm" svg:y1="8.1cm" svg:x2="11.45cm" svg:y2="8.1cm">
            <text:p/>
          </draw:line>
          <draw:line draw:style-name="gr14" draw:text-style-name="P6" draw:layer="layout" svg:x1="6.1cm" svg:y1="6cm" svg:x2="8.5cm" svg:y2="6cm">
            <text:p/>
          </draw:line>
          <draw:line draw:style-name="gr15" draw:text-style-name="P6" draw:layer="layout" svg:x1="6.087cm" svg:y1="8.152cm" svg:x2="6.087cm" svg:y2="5.952cm">
            <text:p/>
          </draw:line>
          <draw:line draw:style-name="gr15" draw:text-style-name="P6" draw:layer="layout" svg:x1="8.487cm" svg:y1="8.152cm" svg:x2="8.487cm" svg:y2="5.952cm">
            <text:p/>
          </draw:line>
          <draw:line draw:style-name="gr15" draw:text-style-name="P6" draw:layer="layout" svg:x1="3.588cm" svg:y1="6.047cm" svg:x2="5.988cm" svg:y2="6.047cm">
            <text:p/>
          </draw:line>
          <draw:g>
            <svg:title>TexMaths</svg:title>
            <svg:desc>16§display§\frac{1}{b-a}§svg§600§FALSE§</svg:desc>
            <draw:frame draw:style-name="gr2" draw:text-style-name="P6" draw:layer="layout" svg:width="1.267cm" svg:height="1.187cm" svg:x="2.069cm" svg:y="5.393cm">
              <draw:image xlink:href="Pictures/10000EC900000319000002E7A211E40C596092AE.svg" xlink:type="simple" xlink:show="embed" xlink:actuate="onLoad" draw:mime-type="image/svg+xml">
                <text:p/>
              </draw:image>
              <draw:image xlink:href="Pictures/100000010000001E0000001C6D5C72EF156B5CA4.png" xlink:type="simple" xlink:show="embed" xlink:actuate="onLoad" draw:mime-type="image/png"/>
            </draw:frame>
          </draw:g>
          <draw:g>
            <svg:title>TexMaths</svg:title>
            <svg:desc>16§display§a§svg§600§FALSE§</svg:desc>
            <draw:frame draw:style-name="gr2" draw:text-style-name="P6" draw:layer="layout" svg:width="0.278cm" svg:height="0.253cm" svg:x="5.97cm" svg:y="8.395cm">
              <draw:image xlink:href="Pictures/100006E1000000AF0000009F125258D9ED598202.svg" xlink:type="simple" xlink:show="embed" xlink:actuate="onLoad" draw:mime-type="image/svg+xml">
                <text:p/>
              </draw:image>
              <draw:image xlink:href="Pictures/10000001000000070000000635B517A1F169F8B1.png" xlink:type="simple" xlink:show="embed" xlink:actuate="onLoad" draw:mime-type="image/png"/>
            </draw:frame>
          </draw:g>
          <draw:g>
            <svg:title>TexMaths</svg:title>
            <svg:desc>16§display§b§svg§600§FALSE§</svg:desc>
            <draw:frame draw:style-name="gr2" draw:text-style-name="P6" draw:layer="layout" svg:width="0.232cm" svg:height="0.395cm" svg:x="8.37cm" svg:y="8.397cm">
              <draw:image xlink:href="Pictures/100005D700000092000000F83795F20A1F607BC6.svg" xlink:type="simple" xlink:show="embed" xlink:actuate="onLoad" draw:mime-type="image/svg+xml">
                <text:p/>
              </draw:image>
              <draw:image xlink:href="Pictures/100000010000000600000009B7C359D758989C93.png" xlink:type="simple" xlink:show="embed" xlink:actuate="onLoad" draw:mime-type="image/png"/>
            </draw:frame>
          </draw:g>
          <draw:line draw:style-name="gr12" draw:text-style-name="P6" draw:layer="layout" svg:x1="15.101cm" svg:y1="3.5cm" svg:x2="15.101cm" svg:y2="8.5cm">
            <text:p/>
          </draw:line>
          <draw:line draw:style-name="gr13" draw:text-style-name="P6" draw:layer="layout" svg:x1="14.501cm" svg:y1="8.1cm" svg:x2="23.101cm" svg:y2="8.1cm">
            <text:p/>
          </draw:line>
          <draw:line draw:style-name="gr14" draw:text-style-name="P6" draw:layer="layout" svg:x1="15.101cm" svg:y1="8.1cm" svg:x2="17.551cm" svg:y2="8.1cm">
            <text:p/>
          </draw:line>
          <draw:line draw:style-name="gr14" draw:text-style-name="P6" draw:layer="layout" svg:x1="20.014cm" svg:y1="5.974cm" svg:x2="22.964cm" svg:y2="5.974cm">
            <text:p/>
          </draw:line>
          <draw:line draw:style-name="gr14" draw:text-style-name="P6" draw:layer="layout" svg:x1="17.588cm" svg:y1="8.1cm" svg:x2="20.049cm" svg:y2="5.951cm">
            <text:p/>
          </draw:line>
          <draw:line draw:style-name="gr15" draw:text-style-name="P6" draw:layer="layout" svg:x1="19.988cm" svg:y1="8.152cm" svg:x2="19.988cm" svg:y2="5.952cm">
            <text:p/>
          </draw:line>
          <draw:line draw:style-name="gr15" draw:text-style-name="P6" draw:layer="layout" svg:x1="15.089cm" svg:y1="6.021cm" svg:x2="19.889cm" svg:y2="6.021cm">
            <text:p/>
          </draw:line>
          <draw:g>
            <svg:title>TexMaths</svg:title>
            <svg:desc>16§display§1§svg§600§FALSE§</svg:desc>
            <draw:frame draw:style-name="gr2" draw:text-style-name="P6" draw:layer="layout" svg:width="0.234cm" svg:height="0.373cm" svg:x="14.47cm" svg:y="5.894cm">
              <draw:image xlink:href="Pictures/1000033100000093000000EA5795EF8A37F00334.svg" xlink:type="simple" xlink:show="embed" xlink:actuate="onLoad" draw:mime-type="image/svg+xml">
                <text:p/>
              </draw:image>
              <draw:image xlink:href="Pictures/100000010000000600000009B2FBB145C32BF506.png" xlink:type="simple" xlink:show="embed" xlink:actuate="onLoad" draw:mime-type="image/png"/>
            </draw:frame>
          </draw:g>
          <draw:g>
            <svg:title>TexMaths</svg:title>
            <svg:desc>16§display§a§svg§600§FALSE§</svg:desc>
            <draw:frame draw:style-name="gr2" draw:text-style-name="P6" draw:layer="layout" svg:width="0.278cm" svg:height="0.253cm" svg:x="17.471cm" svg:y="8.395cm">
              <draw:image xlink:href="Pictures/100006E1000000AF0000009F125258D9ED598202.svg" xlink:type="simple" xlink:show="embed" xlink:actuate="onLoad" draw:mime-type="image/svg+xml">
                <text:p/>
              </draw:image>
              <draw:image xlink:href="Pictures/10000001000000070000000635B517A1F169F8B1.png" xlink:type="simple" xlink:show="embed" xlink:actuate="onLoad" draw:mime-type="image/png"/>
            </draw:frame>
          </draw:g>
          <draw:g>
            <svg:title>TexMaths</svg:title>
            <svg:desc>16§display§b§svg§600§FALSE§</svg:desc>
            <draw:frame draw:style-name="gr2" draw:text-style-name="P6" draw:layer="layout" svg:width="0.232cm" svg:height="0.395cm" svg:x="19.871cm" svg:y="8.397cm">
              <draw:image xlink:href="Pictures/100005D700000092000000F83795F20A1F607BC6.svg" xlink:type="simple" xlink:show="embed" xlink:actuate="onLoad" draw:mime-type="image/svg+xml">
                <text:p/>
              </draw:image>
              <draw:image xlink:href="Pictures/100000010000000600000009B7C359D758989C93.png" xlink:type="simple" xlink:show="embed" xlink:actuate="onLoad" draw:mime-type="image/png"/>
            </draw:frame>
          </draw:g>
        </draw:g>
        <draw:g>
          <svg:title>TexMaths</svg:title>
          <svg:desc>18§display§F(x) = \left\{\begin{array}{ll}
0 &amp; \mbox{ if } x\leq a,\\
\frac{x-a}{b-a} &amp; \mbox{ if } a\leq x\leq b,\\
1 &amp; \mbox{ if } x\geq b.
\end{array}
\right.§svg§600§FALSE§</svg:desc>
          <draw:frame draw:style-name="gr2" draw:text-style-name="P6" draw:layer="layout" svg:width="8.431cm" svg:height="2.322cm" svg:x="14.334cm" svg:y="9.191cm">
            <draw:image xlink:href="Pictures/10008EB90000124D0000050B284E2E128A3DCDAB.svg" xlink:type="simple" xlink:show="embed" xlink:actuate="onLoad" draw:mime-type="image/svg+xml">
              <text:p/>
            </draw:image>
            <draw:image xlink:href="Pictures/10000001000000B100000031D48BA6F4ED4946E6.png" xlink:type="simple" xlink:show="embed" xlink:actuate="onLoad" draw:mime-type="image/png"/>
          </draw:frame>
        </draw:g>
        <draw:g>
          <svg:title>TexMaths</svg:title>
          <svg:desc>18§display§f(x) = \left\{\begin{array}{ll}
0 &amp; \mbox{ if } x\leq a,\\
\frac{1}{b-a} &amp; \mbox{ if } a\leq x\leq b,\\
0 &amp; \mbox{ if } x\geq b.
\end{array}
\right.§svg§600§FALSE§</svg:desc>
          <draw:frame draw:style-name="gr2" draw:text-style-name="P6" draw:layer="layout" svg:width="8.203cm" svg:height="2.275cm" svg:x="2.736cm" svg:y="9.192cm">
            <draw:image xlink:href="Pictures/10008264000011CE000004F10D503B321AE467A2.svg" xlink:type="simple" xlink:show="embed" xlink:actuate="onLoad" draw:mime-type="image/svg+xml">
              <text:p/>
            </draw:image>
            <draw:image xlink:href="Pictures/10000001000000AC0000003002FCE65B2F20875A.png" xlink:type="simple" xlink:show="embed" xlink:actuate="onLoad" draw:mime-type="image/png"/>
          </draw:frame>
        </draw:g>
        <draw:g>
          <svg:title>TexMaths</svg:title>
          <svg:desc>16§display§\mathbb{E}[X] = \int_a^b \frac{x}{b-a} dx = \frac{b^2-a^2}{2(b-a)} = \frac{b+a}{2}.§svg§600§TRUE§</svg:desc>
          <draw:g>
            <draw:path draw:style-name="gr3" draw:text-style-name="P7" draw:layer="layout" svg:width="0.351cm" svg:height="0.385cm" svg:x="2.547cm" svg:y="12.362cm" svg:viewBox="0 0 352 386" svg:d="M138 197c14 0 41 0 60 11 28 18 29 48 29 51 2 8 2 16 11 16 10 0 10-8 10-17 0-52 0-103 0-154 0-8 0-18-10-18-9 0-11 8-11 13-3 74-59 77-89 77 0-39 0-79 0-118 0-37 11-37 24-37 9 0 18 0 27 0 77 0 113 38 117 77 1 4 1 12 11 12 9 0 9-8 9-17 0-25 0-49 0-74 0-17-1-19-19-19-96 0-192 0-288 0-9 0-19 0-19 11 0 10 11 10 16 10 32 0 34 5 34 32 0 94 0 188 0 281 0 26-2 33-32 33-8 0-18 0-18 9 0 10 10 10 19 10 99 0 199 0 298 0 11 0 17 0 19-8 5-33 16-95 16-98 0-5-5-10-10-10-8 0-7 6-11 8-3 15-8 39-49 63-29 18-58 26-88 26-11 0-22 0-32 0-13 0-24 0-24-39 0-44 0-87 0-131zM306 21c0 9 0 18 0 27-10-11-20-21-32-27 10 0 21 0 32 0zM197 186c8-5 21-13 30-24 0 15 0 31 0 46-13-14-20-15-30-22zM69 51c0-6 0-21-3-30 19 0 39 0 59 0-7 13-7 30-7 37 0 90 0 181 0 272 0 20 4 32 7 37-20 0-40 0-59 0 3-12 3-25 3-33 0-94 0-188 0-283zM278 367c0-1 0-2 0-2 18-8 34-21 45-31 0 4-5 28-5 33-13 0-26 0-40 0z">
              <text:p/>
            </draw:path>
            <draw:path draw:style-name="gr3" draw:text-style-name="P7" draw:layer="layout" svg:width="0.076cm" svg:height="0.561cm" svg:x="2.981cm" svg:y="12.327cm" svg:viewBox="0 0 77 562" svg:d="M77 562c0-8 0-15 0-23-18 0-36 0-55 0 0-172 0-344 0-517 19 0 37 0 55 0 0-7 0-15 0-22-26 0-51 0-77 0 0 187 0 375 0 562 26 0 51 0 77 0z">
              <text:p/>
            </draw:path>
            <draw:path draw:style-name="gr3" draw:text-style-name="P7" draw:layer="layout" svg:width="0.461cm" svg:height="0.383cm" svg:x="3.086cm" svg:y="12.363cm" svg:viewBox="0 0 462 384" svg:d="M258 154c-16-38-32-75-48-112-2-5-4-7-4-8 0-4 10-15 34-16 6 0 11-2 11-12 0-6-6-6-8-6-24 0-48 2-72 2-13 0-48-2-62-2-3 0-10 0-10 11 0 7 5 7 13 7 34 0 37 6 42 17 22 52 44 105 67 157-40 43-79 85-119 128-2 2-5 4-8 6-27 29-54 39-83 41-6 1-11 1-11 11 0 1 0 6 6 6 18 0 36-1 53-1 21 0 43 1 64 1 3 0 10 0 10-11 0-5-4-4-7-6-4 0-22-2-22-18 0-8 8-18 14-26 20-19 39-39 58-59 17-19 34-37 51-56 19 45 38 90 56 134 2 7 3 7 3 8 0 5-11 15-33 17-5 1-11 1-11 11 0 6 6 6 9 6 16 0 55-1 71-1 14 0 48 1 62 1 3 0 11 0 11-11 0-6-6-6-11-6-37 0-38-2-48-25-22-52-59-140-72-174 38-38 98-106 115-122 16-12 37-27 71-28 8 0 12 0 12-12-2-2 0-6-6-6-18 0-37 2-53 2-21 0-43-2-62-2-5 0-11 0-11 11 0 5 3 7 6 7 5 0 22 1 22 17 0 8-6 15-11 21-30 33-60 65-89 98z">
              <text:p/>
            </draw:path>
            <draw:path draw:style-name="gr3" draw:text-style-name="P7" draw:layer="layout" svg:width="0.076cm" svg:height="0.561cm" svg:x="3.593cm" svg:y="12.327cm" svg:viewBox="0 0 77 562" svg:d="M77 0c-26 0-51 0-77 0 0 7 0 15 0 22 18 0 36 0 54 0 0 173 0 345 0 517-18 0-36 0-54 0 0 8 0 15 0 23 26 0 51 0 77 0 0-187 0-375 0-562z">
              <text:p/>
            </draw:path>
            <draw:path draw:style-name="gr3" draw:text-style-name="P7" draw:layer="layout" svg:width="0.372cm" svg:height="0.13cm" svg:x="3.925cm" svg:y="12.541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3" draw:text-style-name="P7" draw:layer="layout" svg:width="0.497cm" svg:height="1.247cm" svg:x="4.518cm" svg:y="11.982cm" svg:viewBox="0 0 498 1248" svg:d="M27 1224c18-1 27-14 27-28 0-18-14-28-27-28-14 0-27 8-27 29 0 29 27 51 62 51 85 0 117-131 157-294 43-178 80-357 111-536 20-120 41-232 60-306 7-27 26-99 48-99 18 0 31 9 34 13-19 1-29 12-29 27 0 19 15 27 27 27 15 0 28-8 28-27 0-31-31-53-61-53-43 0-74 61-106 176-1 6-77 288-139 656-14 87-30 179-50 258-9 42-36 147-81 147-21 0-23-8-34-13z">
              <text:p/>
            </draw:path>
            <draw:path draw:style-name="gr3" draw:text-style-name="P7" draw:layer="layout" svg:width="0.157cm" svg:height="0.276cm" svg:x="5.075cm" svg:y="11.848cm" svg:viewBox="0 0 158 277" svg:d="M77 13c1-2 1-4 1-7s-1-6-6-6c-8 0-40 3-50 5-3 0-8 0-8 8 0 6 5 6 10 6 19 0 19 2 19 5s-5 19-6 29c-3 12-7 23-10 35-3 14-25 99-25 106-2 9-2 14-2 19 0 40 24 64 58 64 49 0 100-53 100-112 0-45-32-66-59-66-19 0-37 13-49 23 9-37 18-73 27-109zM58 266c-20 0-31-16-31-40 0-15 3-28 15-72 3-8 3-8 9-16 16-18 34-28 48-28 15 0 29 12 29 39 0 16-10 56-21 80-9 19-29 37-49 37z">
              <text:p/>
            </draw:path>
            <draw:path draw:style-name="gr3" draw:text-style-name="P7" draw:layer="layout" svg:width="0.201cm" svg:height="0.177cm" svg:x="4.822cm" svg:y="13.087cm" svg:viewBox="0 0 202 178" svg:d="M142 22c-8-12-20-22-40-22-51 0-102 54-102 112 0 38 26 66 59 66 23 0 40-13 56-29 8 24 31 29 42 29 14 0 24-10 30-23 10-14 15-37 15-38 0-5-5-5-7-5-6 0-6 2-9 11-5 19-12 43-29 43-10 0-13-9-13-19 0-8 3-21 6-32 4-9 7-27 8-35 3-10 6-20 8-30 4-10 8-29 8-31 0-8-8-13-14-13s-14 5-18 16zM117 123c-2 11-11 19-19 27-4 4-20 16-37 16-15 0-29-11-29-38 0-21 11-64 21-80 17-32 38-37 49-37 28 0 36 29 36 34 0 1-1 3-2 5-6 24-13 49-19 73z">
              <text:p/>
            </draw:path>
            <draw:path draw:style-name="gr3" draw:text-style-name="P7" draw:layer="layout" svg:width="0.279cm" svg:height="0.253cm" svg:x="5.904cm" svg:y="12.118cm" svg:viewBox="0 0 280 254" svg:d="M171 78c3-14 16-65 56-65 3 0 16 0 29 8-16 1-27 16-27 29 0 9 6 20 21 20 12 0 30-11 30-33 0-29-34-37-53-37-32 0-51 30-57 43-15-37-45-43-61-43-59 0-91 74-91 86 0 7 4 5 6 7 5 0 6-2 8-7 19-59 56-73 75-73 11 0 31 5 31 37 0 17-10 56-31 134-9 35-29 59-53 59-4 0-17 0-28-8 14-3 25-14 25-30 0-15-11-19-21-19-16 0-30 14-30 32 0 25 29 36 53 36 37 0 57-38 59-41 6 21 27 41 61 41 57 0 89-72 89-86 0-5-4-5-6-5-5 0-6 2-8 7-18 59-56 73-74 73-22 0-32-19-32-38 0-11 4-24 10-48 6-26 13-52 19-79z">
              <text:p/>
            </draw:path>
            <draw:path draw:style-name="gr3" draw:text-style-name="P7" draw:layer="layout" svg:width="1.225cm" svg:height="0.021cm" svg:x="5.435cm" svg:y="12.595cm" svg:viewBox="0 0 1226 22" svg:d="M613 22c-204 0-409 0-613 0 0-7 0-15 0-22 409 0 817 0 1226 0 0 7 0 15 0 22-205 0-409 0-613 0z">
              <text:p/>
            </draw:path>
            <draw:path draw:style-name="gr3" draw:text-style-name="P7" draw:layer="layout" svg:width="0.205cm" svg:height="0.396cm" svg:x="5.462cm" svg:y="12.743cm" svg:viewBox="0 0 206 397" svg:d="M107 6c-2-2 0-6-6-6-13 0-55 5-69 6-5 0-11 0-11 12 0 6 5 6 14 6 26 0 27 3 27 10 0 3-4 22-8 35-15 61-31 121-46 182-6 29-8 37-8 58 0 53 29 88 70 88 68 0 136-83 136-165 0-51-28-90-75-90-25 0-48 16-65 34 13-56 27-113 41-170zM54 219c4-13 4-14 10-19 27-37 53-46 67-46 19 0 35 17 35 52 0 34-19 100-28 120-20 37-45 58-68 58-17 0-36-14-36-56 0-11 0-22 9-58 4-17 8-34 11-51z">
              <text:p/>
            </draw:path>
            <draw:path draw:style-name="gr3" draw:text-style-name="P7" draw:layer="layout" svg:width="0.343cm" svg:height="0.021cm" svg:x="5.848cm" svg:y="12.981cm" svg:viewBox="0 0 344 22" svg:d="M325 22c9 0 19 0 19-11s-10-11-19-11c-102 0-203 0-304 0-10 0-21 0-21 11s11 11 21 11c101 0 202 0 304 0z">
              <text:p/>
            </draw:path>
            <draw:path draw:style-name="gr3" draw:text-style-name="P7" draw:layer="layout" svg:width="0.257cm" svg:height="0.253cm" svg:x="6.387cm" svg:y="12.885cm" svg:viewBox="0 0 258 254" svg:d="M187 35c-11-21-27-35-53-35-65 0-134 82-134 165 0 53 30 89 74 89 11 0 40-3 73-43 5 24 24 43 51 43 20 0 32-12 42-30 10-21 12-37 18-56 0-6-7-6-8-6-5 0-5 3-7 11-9 35-21 69-43 69-16 0-18-15-18-26 0-13 2-18 8-42 7-24 7-28 13-51 7-26 13-52 19-78 5-16 5-16 5-19 0-10-8-15-17-15-13 0-21 11-23 24zM150 181c-3 11-3 11-11 21-25 30-48 40-64 40-27 0-35-31-35-53 0-27 18-98 30-123 18-34 44-55 66-55 37 0 45 47 45 50s-2 8-3 9c-9 37-19 74-28 111z">
              <text:p/>
            </draw:path>
            <draw:path draw:style-name="gr3" draw:text-style-name="P7" draw:layer="layout" svg:width="0.266cm" svg:height="0.396cm" svg:x="6.752cm" svg:y="12.357cm" svg:viewBox="0 0 267 397" svg:d="M267 6c-2-2 0-6-8-6s-61 5-70 6c-5 2-8 4-8 12 0 6 5 6 13 6 27 0 28 5 28 10 0 3-1 7-1 11-11 44-23 88-34 133-11-21-27-36-53-36-65 0-134 82-134 165 0 53 30 90 74 90 11 0 40-2 73-42 5 23 24 42 51 42 20 0 32-13 42-30 10-21 18-55 18-57 0-6-7-6-8-6-5 0-7 3-8 11-10 35-20 69-42 69-16 0-18-14-18-25 0-13 2-18 4-28 27-108 54-216 81-325zM150 323c-3 11-3 11-11 21-25 32-48 40-64 40-29 0-35-30-35-53 0-27 18-97 30-123 18-32 44-53 66-53 37 0 43 44 43 48s0 8-1 10c-9 37-19 73-28 110z">
              <text:p/>
            </draw:path>
            <draw:path draw:style-name="gr3" draw:text-style-name="P7" draw:layer="layout" svg:width="0.279cm" svg:height="0.253cm" svg:x="7.038cm" svg:y="12.499cm" svg:viewBox="0 0 280 254" svg:d="M171 78c3-14 16-65 56-65 2 0 16 0 27 6-16 3-27 18-27 31 0 9 7 19 23 19 11 0 30-10 30-32 0-29-34-37-53-37-32 0-53 29-59 43-14-38-45-43-61-43-57 0-89 72-89 86 0 5 4 5 6 5 5 0 6 0 6-5 20-60 56-73 76-73 11 0 30 5 30 37 0 17-10 56-30 134-8 34-28 58-53 58-3 0-16 0-29-7 14-3 27-16 27-30 0-16-13-21-21-21-17 0-30 16-30 34 0 25 27 36 53 36 37 0 57-40 59-43 6 21 26 43 61 43 57 0 89-72 89-86 0-6-4-6-6-6-6 0-6 3-8 6-19 61-58 74-75 74-21 0-31-18-31-37 0-13 4-24 10-50 6-25 13-51 19-77z">
              <text:p/>
            </draw:path>
            <draw:path draw:style-name="gr3" draw:text-style-name="P7" draw:layer="layout" svg:width="0.372cm" svg:height="0.13cm" svg:x="7.531cm" svg:y="12.541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3" draw:text-style-name="P7" draw:layer="layout" svg:width="0.207cm" svg:height="0.394cm" svg:x="8.292cm" svg:y="11.978cm" svg:viewBox="0 0 208 395" svg:d="M109 6c0-1 0-6-8-6-13 0-53 5-69 5-3 1-10 1-10 11 0 6 5 6 13 6 27 0 29 5 29 10s-5 24-8 35c-15 62-31 123-46 184-7 27-10 37-10 56 0 55 30 88 72 88 67 0 136-83 136-165 0-51-30-89-75-89-26 0-50 16-66 33 14-56 28-112 42-168zM56 218c3-12 3-13 8-20 27-36 53-44 67-44 21 0 35 16 35 52 0 34-17 98-27 119-19 38-45 59-67 59-19 0-37-16-37-58 0-11 0-20 8-56 4-17 9-35 13-52z">
              <text:p/>
            </draw:path>
            <draw:path draw:style-name="gr3" draw:text-style-name="P7" draw:layer="layout" svg:width="0.173cm" svg:height="0.26cm" svg:x="8.532cm" svg:y="11.902cm" svg:viewBox="0 0 174 261" svg:d="M174 189c-4 0-8 0-12 0-2 9-7 32-12 37-3 1-33 1-38 1-24 0-48 0-72 0 40-37 54-48 78-65 29-24 56-48 56-85 0-48-41-77-92-77-48 0-82 34-82 70 0 20 18 23 21 23 9 0 21-8 21-21 0-8-2-22-23-22 11-28 39-36 58-36 38 0 59 31 59 63 0 33-24 61-37 75-31 31-63 62-94 93-5 5-5 5-5 16 54 0 109 0 163 0 4-24 8-48 11-72z">
              <text:p/>
            </draw:path>
            <draw:path draw:style-name="gr3" draw:text-style-name="P7" draw:layer="layout" svg:width="0.341cm" svg:height="0.021cm" svg:x="8.932cm" svg:y="12.216cm" svg:viewBox="0 0 342 22" svg:d="M323 22c10 0 19 0 19-11s-9-11-19-11c-101 0-202 0-304 0-9 0-19 0-19 11s10 11 19 11c102 0 203 0 304 0z">
              <text:p/>
            </draw:path>
            <draw:path draw:style-name="gr3" draw:text-style-name="P7" draw:layer="layout" svg:width="0.257cm" svg:height="0.253cm" svg:x="9.47cm" svg:y="12.118cm" svg:viewBox="0 0 258 254" svg:d="M187 37c-9-21-27-37-51-37-66 0-136 83-136 165 0 53 30 89 75 89 11 0 39-1 72-41 5 24 24 41 51 41 21 0 34-12 42-30 10-21 18-54 18-56 0-5-5-5-7-5-6 0-6 2-8 10-9 37-21 70-43 70-14 0-16-16-16-27s0-16 6-42c7-22 8-28 13-49 7-26 13-52 19-79 5-16 5-17 5-19 0-9-6-16-16-16-14 0-22 13-24 26zM150 182c-3 10-3 12-11 21-24 31-48 40-64 40-27 0-35-32-35-53 0-28 18-97 30-123 18-33 44-54 66-54 37 0 45 46 45 49 0 4-2 7-2 10-9 37-19 74-29 110z">
              <text:p/>
            </draw:path>
            <draw:path draw:style-name="gr3" draw:text-style-name="P7" draw:layer="layout" svg:width="0.173cm" svg:height="0.26cm" svg:x="9.769cm" svg:y="11.902cm" svg:viewBox="0 0 174 261" svg:d="M174 189c-4 0-8 0-12 0-2 9-7 32-12 37-3 1-33 1-38 1-25 0-49 0-74 0 42-37 56-48 80-65 29-24 56-48 56-85 0-48-41-77-92-77-48 0-82 34-82 70 0 20 18 23 21 23 9 0 21-8 21-21 0-8-4-22-23-22 11-28 39-36 58-36 38 0 59 31 59 63 0 33-24 61-37 75-31 31-63 62-94 93-5 5-5 5-5 16 54 0 108 0 162 0 4-24 8-48 12-72z">
              <text:p/>
            </draw:path>
            <draw:path draw:style-name="gr3" draw:text-style-name="P7" draw:layer="layout" svg:width="1.943cm" svg:height="0.021cm" svg:x="8.16cm" svg:y="12.595cm" svg:viewBox="0 0 1944 22" svg:d="M973 22c-324 0-649 0-973 0 0-7 0-15 0-22 648 0 1296 0 1944 0 0 7 0 15 0 22-324 0-647 0-971 0z">
              <text:p/>
            </draw:path>
            <draw:path draw:style-name="gr3" draw:text-style-name="P7" draw:layer="layout" svg:width="0.223cm" svg:height="0.374cm" svg:x="8.188cm" svg:y="12.759cm" svg:viewBox="0 0 224 375" svg:d="M43 331c20-19 40-38 59-57 88-79 122-109 122-165 0-64-51-109-120-109-62 0-104 51-104 102 0 31 27 31 29 31 9 0 30-7 30-29 0-14-11-30-30-30-5 0-7 0-8 1 13-37 43-57 77-57 51 0 75 44 75 91 0 45-29 89-59 125-37 40-73 80-109 120-5 6-5 8-5 21 69 0 139 0 208 0 5-33 11-66 16-98-5 0-10 0-14 0-4 16-7 41-13 49-3 5-40 5-53 5-34 0-67 0-101 0z">
              <text:p/>
            </draw:path>
            <draw:path draw:style-name="gr3" draw:text-style-name="P7" draw:layer="layout" svg:width="0.129cm" svg:height="0.561cm" svg:x="8.497cm" svg:y="12.712cm" svg:viewBox="0 0 130 562" svg:d="M130 555c0-1 0-1-10-11-70-72-88-177-88-264 0-98 21-195 91-266 7-6 7-8 7-9 0-3-2-5-5-5-7 0-58 37-90 109-29 62-35 125-35 171 0 45 5 112 37 176 33 69 81 106 88 106 3 0 5-2 5-7z">
              <text:p/>
            </draw:path>
            <draw:path draw:style-name="gr3" draw:text-style-name="P7" draw:layer="layout" svg:width="0.205cm" svg:height="0.396cm" svg:x="8.686cm" svg:y="12.743cm" svg:viewBox="0 0 206 397" svg:d="M107 6c-2-2 0-6-6-6-13 0-55 5-69 6-5 0-11 0-11 12 0 6 5 6 14 6 27 0 27 3 27 10 0 3-4 22-8 35-15 61-29 121-44 182-8 29-10 37-10 58 0 53 30 88 72 88 66 0 134-83 134-165 0-51-28-90-73-90-27 0-50 16-67 34 13-56 27-113 41-170zM54 219c4-13 4-14 10-19 27-37 53-46 67-46 19 0 35 17 35 52 0 34-19 100-28 120-20 37-45 58-66 58-19 0-38-14-38-56 0-11 0-22 9-58 4-17 8-34 11-51z">
              <text:p/>
            </draw:path>
            <draw:path draw:style-name="gr3" draw:text-style-name="P7" draw:layer="layout" svg:width="0.343cm" svg:height="0.021cm" svg:x="9.072cm" svg:y="12.981cm" svg:viewBox="0 0 344 22" svg:d="M325 22c9 0 19 0 19-11s-10-11-19-11c-102 0-203 0-304 0-10 0-21 0-21 11s11 11 21 11c101 0 202 0 304 0z">
              <text:p/>
            </draw:path>
            <draw:path draw:style-name="gr3" draw:text-style-name="P7" draw:layer="layout" svg:width="0.257cm" svg:height="0.253cm" svg:x="9.611cm" svg:y="12.885cm" svg:viewBox="0 0 258 254" svg:d="M187 35c-11-21-27-35-53-35-65 0-134 82-134 165 0 53 30 89 75 89 11 0 39-3 72-43 5 24 24 43 51 43 20 0 34-12 42-30 10-21 12-37 18-56 0-6-5-6-7-6-6 0-6 3-8 11-9 35-21 69-43 69-16 0-18-15-18-26 0-13 2-18 8-42 7-24 7-28 13-51 7-26 13-52 19-78 5-16 5-16 5-19 0-10-6-15-16-15-14 0-22 11-24 24zM150 181c-3 11-3 11-11 21-25 30-48 40-64 40-27 0-35-31-35-53 0-27 18-98 30-123 18-34 44-55 66-55 37 0 45 47 45 50s-2 8-2 9c-9 37-19 74-29 111z">
              <text:p/>
            </draw:path>
            <draw:path draw:style-name="gr3" draw:text-style-name="P7" draw:layer="layout" svg:width="0.129cm" svg:height="0.561cm" svg:x="9.918cm" svg:y="12.712cm" svg:viewBox="0 0 130 562" svg:d="M130 280c0-43-7-112-37-174-34-71-82-106-88-106-3 0-5 2-5 5 0 1 0 3 10 13 56 56 88 145 88 262 0 96-21 195-92 266-6 8-6 8-6 9 0 4 2 7 5 7 6 0 56-39 89-111 29-60 36-123 36-171z">
              <text:p/>
            </draw:path>
            <draw:path draw:style-name="gr3" draw:text-style-name="P7" draw:layer="layout" svg:width="0.372cm" svg:height="0.13cm" svg:x="10.36cm" svg:y="12.541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3" draw:text-style-name="P7" draw:layer="layout" svg:width="0.205cm" svg:height="0.394cm" svg:x="11.016cm" svg:y="11.978cm" svg:viewBox="0 0 206 395" svg:d="M107 6c0-1 0-6-8-6-13 0-53 5-67 5-5 1-11 1-11 11 0 6 5 6 13 6 27 0 28 5 28 10s-4 24-8 35c-15 62-31 123-46 184-6 27-8 37-8 56 0 55 29 88 70 88 68 0 136-83 136-165 0-51-30-89-75-89-25 0-48 16-65 33 13-56 27-112 41-168zM54 218c4-12 4-13 8-20 28-36 53-44 68-44 20 0 36 16 36 52 0 34-19 98-28 119-20 38-45 59-68 59-19 0-36-16-36-58 0-11 0-20 8-56 4-17 8-35 12-52z">
              <text:p/>
            </draw:path>
            <draw:path draw:style-name="gr3" draw:text-style-name="P7" draw:layer="layout" svg:width="0.372cm" svg:height="0.374cm" svg:x="11.387cm" svg:y="12.04cm" svg:viewBox="0 0 373 375" svg:d="M198 198c53 0 105 0 157 0 8 0 18 0 18-11s-10-11-18-11c-52 0-104 0-157 0 0-53 0-106 0-158 0-8 0-18-11-18s-11 10-11 18c0 52 0 105 0 158-53 0-106 0-158 0-8 0-18 0-18 11s10 11 18 11c52 0 105 0 158 0 0 53 0 105 0 157 0 8 0 20 11 20s11-12 11-20c0-52 0-104 0-157z">
              <text:p/>
            </draw:path>
            <draw:path draw:style-name="gr3" draw:text-style-name="P7" draw:layer="layout" svg:width="0.257cm" svg:height="0.253cm" svg:x="11.939cm" svg:y="12.118cm" svg:viewBox="0 0 258 254" svg:d="M187 37c-9-21-25-37-51-37-66 0-136 83-136 165 0 53 32 89 75 89 11 0 40-1 74-41 5 24 24 41 51 41 19 0 32-12 42-30 9-21 16-54 16-56 0-5-5-5-7-5-5 0-6 2-8 10-9 37-19 70-41 70-16 0-18-16-18-27s2-16 8-42c5-22 6-28 11-49 7-26 14-52 21-79 3-16 3-17 3-19 0-9-6-16-16-16-13 0-21 13-24 26zM152 182c-3 10-3 12-11 21-26 31-48 40-64 40-29 0-37-32-37-53 0-28 19-97 32-123 18-33 42-54 64-54 37 0 45 46 45 49 0 4 0 7-2 10-9 37-18 74-27 110z">
              <text:p/>
            </draw:path>
            <draw:path draw:style-name="gr3" draw:text-style-name="P7" draw:layer="layout" svg:width="1.225cm" svg:height="0.021cm" svg:x="10.988cm" svg:y="12.595cm" svg:viewBox="0 0 1226 22" svg:d="M613 22c-204 0-409 0-613 0 0-7 0-15 0-22 409 0 817 0 1226 0 0 7 0 15 0 22-205 0-409 0-613 0z">
              <text:p/>
            </draw:path>
            <draw:path draw:style-name="gr3" draw:text-style-name="P7" draw:layer="layout" svg:width="0.223cm" svg:height="0.374cm" svg:x="11.489cm" svg:y="12.759cm" svg:viewBox="0 0 224 375" svg:d="M43 331c20-19 40-38 59-57 88-79 122-109 122-165 0-64-51-109-118-109-64 0-106 51-106 102 0 31 27 31 29 31 9 0 30-7 30-29 0-14-11-30-30-30-5 0-5 0-7 1 13-37 44-57 76-57 51 0 75 44 75 91 0 45-29 89-59 125-36 40-72 80-108 120-6 6-6 8-6 21 69 0 139 0 208 0 5-33 11-66 16-98-5 0-10 0-14 0-4 16-7 41-12 49-4 5-41 5-54 5-34 0-67 0-101 0z">
              <text:p/>
            </draw:path>
            <draw:path draw:style-name="gr3" draw:text-style-name="P7" draw:layer="layout" svg:width="0.058cm" svg:height="0.058cm" svg:x="12.331cm" svg:y="12.688cm" svg:viewBox="0 0 59 59" svg:d="M59 29c0-16-14-29-30-29s-29 12-29 29 13 30 29 30 30-13 30-30z">
              <text:p/>
            </draw:path>
          </draw:g>
        </draw:g>
        <draw:g>
          <svg:title>TexMaths</svg:title>
          <svg:desc>16§display§\mathbb{E}[X^2] = \int_a^b \frac{x^2}{b-a} dx = \frac{b^3-a^3}{3(b-a)} = \frac{b^2+ab+a^2}{3}.§svg§600§TRUE§</svg:desc>
          <draw:g>
            <draw:path draw:style-name="gr3" draw:text-style-name="P7" draw:layer="layout" svg:width="0.351cm" svg:height="0.384cm" svg:x="14.147cm" svg:y="12.364cm" svg:viewBox="0 0 352 385" svg:d="M138 197c14 0 41 0 60 11 28 17 29 48 29 51 2 8 2 16 11 16 10 0 10-8 10-18 0-51 0-102 0-153 0-8 0-18-10-18-9 0-11 8-11 13-3 74-59 77-89 77 0-40 0-79 0-118 0-37 11-37 24-37 9 0 18 0 27 0 77 0 113 38 117 76 1 5 1 13 11 13 9 0 9-8 9-17 0-25 0-49 0-74 0-17-1-19-19-19-96 0-192 0-288 0-9 0-19 0-19 11 0 10 11 10 16 10 32 0 34 5 34 32 0 94 0 187 0 281 0 26-2 32-32 32-8 0-18 0-18 10 0 9 10 9 19 9 99 0 199 0 298 0 11 0 17 0 19-8 5-32 16-94 16-97 0-5-5-10-10-10-8 0-7 5-11 8-3 14-8 38-49 62-29 18-58 26-88 26-11 0-22 0-32 0-13 0-24 0-24-38 0-44 0-88 0-131zM306 21c0 9 0 18 0 27-10-11-20-21-32-27 10 0 21 0 32 0zM197 185c8-4 21-12 30-24 0 16 0 31 0 47-13-15-20-15-30-23zM69 51c0-6 0-21-3-30 19 0 39 0 59 0-7 13-7 30-7 37 0 90 0 181 0 271 0 21 4 32 7 37-20 0-40 0-59 0 3-11 3-24 3-32 0-94 0-189 0-283zM278 366c0-1 0-1 0-2 18-8 34-20 45-30 0 3-5 27-5 32-13 0-26 0-40 0z">
              <text:p/>
            </draw:path>
            <draw:path draw:style-name="gr3" draw:text-style-name="P7" draw:layer="layout" svg:width="0.076cm" svg:height="0.56cm" svg:x="14.581cm" svg:y="12.329cm" svg:viewBox="0 0 77 561" svg:d="M77 561c0-7 0-15 0-22-18 0-36 0-55 0 0-172 0-345 0-517 19 0 37 0 55 0 0-7 0-15 0-22-26 0-51 0-77 0 0 187 0 374 0 561 26 0 51 0 77 0z">
              <text:p/>
            </draw:path>
            <draw:path draw:style-name="gr3" draw:text-style-name="P7" draw:layer="layout" svg:width="0.461cm" svg:height="0.383cm" svg:x="14.686cm" svg:y="12.366cm" svg:viewBox="0 0 462 384" svg:d="M258 153c-16-37-32-74-48-111-2-5-4-7-4-8 0-4 10-15 34-16 6 0 11-2 11-12 0-6-6-6-8-6-24 0-48 2-72 2-13 0-48-2-62-2-3 0-10 0-10 11 0 7 5 7 13 7 34 0 37 6 42 17 22 52 44 105 67 157-40 42-79 85-119 128-2 2-5 4-8 6-27 29-54 38-83 40-6 2-11 2-11 11 0 2 0 7 6 7 18 0 36-2 53-2 21 0 43 2 64 2 3 0 10 0 10-12 0-4-4-4-7-6-4 0-22-2-22-18 0-8 8-17 14-25 20-20 39-40 58-59 17-19 34-38 51-56 19 45 37 89 56 134 2 6 3 6 3 8 0 5-11 14-33 16-5 2-11 2-11 11 0 7 6 7 9 7 16 0 55-2 71-2 14 0 48 2 62 2 3 0 11 0 11-12 0-6-6-6-11-6-37 0-38-2-48-24-22-53-59-141-72-174 38-39 98-106 115-122 16-12 37-27 71-28 8 0 12 0 12-12-2-2 0-6-6-6-18 0-37 2-53 2-21 0-43-2-62-2-5 0-11 0-11 11 0 5 3 7 6 7 5 0 22 1 22 17 0 8-6 15-11 21-30 32-60 65-89 97z">
              <text:p/>
            </draw:path>
            <draw:path draw:style-name="gr3" draw:text-style-name="P7" draw:layer="layout" svg:width="0.173cm" svg:height="0.26cm" svg:x="15.204cm" svg:y="12.257cm" svg:viewBox="0 0 174 261" svg:d="M174 189c-4 0-8 0-12 0-2 9-5 32-12 36-3 2-33 2-38 2-24 0-48 0-72 0 42-37 54-48 78-66 29-24 56-48 56-84 0-48-41-77-91-77-49 0-83 34-83 70 0 20 18 23 21 23 9 0 21-8 21-21 0-8-2-21-23-21 13-29 39-37 58-37 38 0 59 31 59 63 0 33-24 60-37 75-31 31-63 62-94 93-5 4-5 4-5 16 54 0 109 0 163 0 4-24 8-48 11-72z">
              <text:p/>
            </draw:path>
            <draw:path draw:style-name="gr3" draw:text-style-name="P7" draw:layer="layout" svg:width="0.076cm" svg:height="0.56cm" svg:x="15.444cm" svg:y="12.329cm" svg:viewBox="0 0 77 561" svg:d="M77 0c-26 0-51 0-77 0 0 7 0 15 0 22 18 0 36 0 54 0 0 172 0 345 0 517-18 0-36 0-54 0 0 7 0 15 0 22 26 0 51 0 77 0 0-187 0-374 0-561z">
              <text:p/>
            </draw:path>
            <draw:path draw:style-name="gr3" draw:text-style-name="P7" draw:layer="layout" svg:width="0.373cm" svg:height="0.13cm" svg:x="15.776cm" svg:y="12.543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3" draw:text-style-name="P7" draw:layer="layout" svg:width="0.498cm" svg:height="1.246cm" svg:x="16.369cm" svg:y="11.985cm" svg:viewBox="0 0 499 1247" svg:d="M27 1223c18-2 27-15 27-29 0-18-12-27-25-27-15 0-29 8-29 28 0 29 29 52 62 52 87 0 119-131 159-294 43-178 80-357 110-536 21-120 42-232 61-305 6-27 26-99 46-99 18 0 32 9 36 13-20 1-29 12-29 27 0 19 14 27 27 27s27-8 27-27c0-31-30-53-61-53-43 0-75 61-105 176-2 6-79 287-139 655-16 86-32 179-50 257-11 42-37 147-82 147-20 0-33-12-35-12z">
              <text:p/>
            </draw:path>
            <draw:path draw:style-name="gr3" draw:text-style-name="P7" draw:layer="layout" svg:width="0.159cm" svg:height="0.275cm" svg:x="16.926cm" svg:y="11.851cm" svg:viewBox="0 0 160 276" svg:d="M78 13c0-2 1-4 2-7 0-3-2-6-6-6-8 0-40 3-50 5-3 0-10 0-10 8 0 6 7 6 12 6 17 0 17 2 17 5s-3 19-6 29c-3 11-6 23-8 35-3 14-26 99-26 105-3 10-3 15-3 20 0 40 26 63 58 63 49 0 102-52 102-111 0-45-32-66-59-66-21 0-39 13-50 22 9-36 18-72 27-108zM59 265c-19 0-30-16-30-40 0-14 3-27 14-72 2-8 2-8 10-16 14-17 32-27 46-27 16 0 29 11 29 39 0 16-8 56-21 80-8 19-29 36-48 36z">
              <text:p/>
            </draw:path>
            <draw:path draw:style-name="gr3" draw:text-style-name="P7" draw:layer="layout" svg:width="0.199cm" svg:height="0.176cm" svg:x="16.675cm" svg:y="13.088cm" svg:viewBox="0 0 200 177" svg:d="M142 22c-8-12-22-22-41-22-50 0-101 54-101 112 0 38 26 65 59 65 21 0 40-12 56-28 8 24 31 28 40 28 15 0 24-9 32-22 8-14 13-37 13-38 0-5-5-5-6-5-5 0-5 1-8 11-5 19-13 43-29 43-10 0-13-9-13-19 0-8 3-21 6-32 2-10 7-27 8-35 3-10 6-20 8-30s7-29 7-31c0-8-7-13-13-13s-16 5-18 16zM117 123c-3 11-11 19-21 27-3 3-19 16-35 16-15 0-29-11-29-38 0-21 11-64 21-80 17-32 37-37 48-37 29 0 35 29 35 34 0 1 0 3 0 5-6 24-13 49-19 73z">
              <text:p/>
            </draw:path>
            <draw:path draw:style-name="gr3" draw:text-style-name="P7" draw:layer="layout" svg:width="0.279cm" svg:height="0.253cm" svg:x="17.63cm" svg:y="12.121cm" svg:viewBox="0 0 280 254" svg:d="M171 78c3-14 16-65 56-65 3 0 16 0 27 8-14 1-25 16-25 29 0 9 5 20 21 20 12 0 30-11 30-33 0-29-34-37-53-37-32 0-51 30-59 43-13-37-43-43-61-43-57 0-89 74-89 86 0 7 4 7 6 7 5 0 6-2 8-7 19-59 56-73 75-73 10 0 31 5 31 37 0 17-10 55-31 134-9 35-29 59-54 59-3 0-16 0-27-8 14-3 25-14 25-30 0-15-11-20-21-20-16 0-30 15-30 32 0 26 29 37 53 37 37 0 57-38 59-41 6 20 27 41 61 41 57 0 89-72 89-86 0-5-4-5-6-5-5 0-6 2-8 6-18 60-56 74-74 74-22 0-32-19-32-38 0-12 4-24 10-48 6-26 13-53 19-79z">
              <text:p/>
            </draw:path>
            <draw:path draw:style-name="gr3" draw:text-style-name="P7" draw:layer="layout" svg:width="0.173cm" svg:height="0.26cm" svg:x="17.959cm" svg:y="11.905cm" svg:viewBox="0 0 174 261" svg:d="M174 189c-4 0-9 0-14 0 0 9-5 32-10 36-3 2-33 2-38 2-25 0-49 0-74 0 42-37 56-48 80-66 29-24 56-48 56-84 0-48-41-77-92-77-48 0-82 34-82 70 0 20 18 23 21 23 9 0 21-8 21-21 0-8-4-22-23-22 11-28 39-36 58-36 38 0 59 31 59 63 0 33-24 60-37 75-31 31-63 62-94 93-5 4-5 4-5 16 54 0 108 0 162 0 4-24 8-48 12-72z">
              <text:p/>
            </draw:path>
            <draw:path draw:style-name="gr3" draw:text-style-name="P7" draw:layer="layout" svg:width="1.224cm" svg:height="0.021cm" svg:x="17.287cm" svg:y="12.597cm" svg:viewBox="0 0 1225 22" svg:d="M613 22c-205 0-409 0-613 0 0-7 0-15 0-22 408 0 817 0 1225 0 0 7 0 15 0 22-204 0-408 0-612 0z">
              <text:p/>
            </draw:path>
            <draw:path draw:style-name="gr3" draw:text-style-name="P7" draw:layer="layout" svg:width="0.207cm" svg:height="0.395cm" svg:x="17.313cm" svg:y="12.744cm" svg:viewBox="0 0 208 396" svg:d="M109 6c-3-2 0-6-8-6-13 0-53 5-67 6-5 0-12 0-12 12 0 6 5 6 13 6 27 0 29 3 29 10 0 3-5 22-8 35-15 60-31 121-46 182-7 29-10 37-10 57 0 53 30 88 72 88 67 0 136-83 136-164 0-51-30-90-75-90-26 0-50 16-66 34 14-57 28-113 42-170zM56 219c3-13 3-14 8-19 27-37 53-47 67-47 21 0 35 18 35 53 0 34-17 99-27 120-19 37-45 58-67 58-19 0-37-15-37-56 0-12 0-23 8-58 4-17 9-34 13-51z">
              <text:p/>
            </draw:path>
            <draw:path draw:style-name="gr3" draw:text-style-name="P7" draw:layer="layout" svg:width="0.343cm" svg:height="0.021cm" svg:x="17.7cm" svg:y="12.983cm" svg:viewBox="0 0 344 22" svg:d="M323 22c10 0 21 0 21-11s-11-11-21-11c-101 0-202 0-304 0-9 0-19 0-19 11s10 11 19 11c102 0 203 0 304 0z">
              <text:p/>
            </draw:path>
            <draw:path draw:style-name="gr3" draw:text-style-name="P7" draw:layer="layout" svg:width="0.257cm" svg:height="0.253cm" svg:x="18.238cm" svg:y="12.887cm" svg:viewBox="0 0 258 254" svg:d="M187 35c-9-21-25-35-51-35-66 0-136 82-136 165 0 52 32 89 75 89 11 0 40-3 74-43 5 24 24 43 51 43 19 0 32-13 42-30 9-21 10-38 16-56 0-7-5-7-7-7-5 0-6 4-8 12-9 35-19 68-43 68-14 0-16-14-16-25 0-13 2-18 6-42 7-24 8-29 13-51 7-26 14-52 21-78 3-16 3-16 3-19 0-10-6-15-16-15-13 0-22 11-24 24zM152 181c-3 11-3 11-13 20-24 31-46 40-62 40-29 0-37-30-37-52 0-28 19-98 32-123 18-34 42-55 64-55 37 0 45 47 45 50s-2 8-2 9c-9 37-18 74-27 111z">
              <text:p/>
            </draw:path>
            <draw:path draw:style-name="gr3" draw:text-style-name="P7" draw:layer="layout" svg:width="0.268cm" svg:height="0.395cm" svg:x="18.602cm" svg:y="12.359cm" svg:viewBox="0 0 269 396" svg:d="M269 6c-3-2 0-6-8-6s-63 5-72 6c-3 2-8 4-8 12 0 6 6 6 14 6 27 0 27 5 27 10 0 3-1 7-1 11-11 44-23 88-34 132-9-20-25-35-51-35-66 0-136 82-136 165 0 53 32 89 75 89 11 0 40-1 74-41 3 22 24 41 51 41 19 0 32-12 42-30 9-21 16-54 16-56 0-6-5-6-7-6-6 0-6 3-8 11-9 35-19 69-43 69-14 0-16-15-16-26 0-13 2-18 3-27 27-108 55-216 82-325zM150 323c-1 11-1 11-11 21-24 32-46 40-62 40-29 0-37-31-37-53 0-27 18-98 32-123 16-32 42-53 64-53 37 0 45 44 45 48s-2 8-2 10c-9 36-19 73-29 110z">
              <text:p/>
            </draw:path>
            <draw:path draw:style-name="gr3" draw:text-style-name="P7" draw:layer="layout" svg:width="0.279cm" svg:height="0.253cm" svg:x="18.889cm" svg:y="12.501cm" svg:viewBox="0 0 280 254" svg:d="M171 78c5-14 18-65 56-65 3 0 16 0 29 6-16 3-27 18-27 31 0 9 6 19 21 19 12 0 30-10 30-32 0-29-32-37-51-37-34 0-53 29-59 43-15-38-45-43-61-43-59 0-91 72-91 86 0 5 4 4 6 5 5 0 6 0 8-5 19-60 56-73 75-73 11 0 31 5 31 37 0 17-10 55-31 134-9 33-29 57-53 57-3 0-17 0-28-6 14-3 27-16 27-30 0-16-13-21-21-21-18 0-32 16-32 33 0 26 29 37 53 37 38 0 57-40 59-43 6 21 27 43 61 43 57 0 89-72 89-86 0-7-4-7-6-7-5 0-6 4-6 7-20 61-58 73-76 73-22 0-30-17-30-36 0-13 3-24 10-50 5-26 11-51 17-77z">
              <text:p/>
            </draw:path>
            <draw:path draw:style-name="gr3" draw:text-style-name="P7" draw:layer="layout" svg:width="0.373cm" svg:height="0.13cm" svg:x="19.381cm" svg:y="12.543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3" draw:text-style-name="P7" draw:layer="layout" svg:width="0.205cm" svg:height="0.394cm" svg:x="20.145cm" svg:y="11.98cm" svg:viewBox="0 0 206 395" svg:d="M109 6c0-1 0-6-8-6-13 0-55 5-69 5-5 1-11 1-11 11 0 6 6 6 14 6 27 0 27 5 27 10s-4 24-6 35c-15 61-31 123-46 184-8 27-10 37-10 56 0 54 30 88 72 88 66 0 134-83 134-165 0-51-28-89-73-89-27 0-50 16-66 33 14-56 28-112 42-168zM56 217c3-11 3-12 8-19 27-37 53-45 67-45 21 0 35 16 35 53 0 34-19 98-28 118-18 39-45 60-66 60-19 0-38-16-38-58 0-11 0-21 9-56 4-17 9-35 13-53z">
              <text:p/>
            </draw:path>
            <draw:path draw:style-name="gr3" draw:text-style-name="P7" draw:layer="layout" svg:width="0.18cm" svg:height="0.268cm" svg:x="20.381cm" svg:y="11.905cm" svg:viewBox="0 0 181 269" svg:d="M86 129c31 0 52 21 52 63 0 49-28 64-50 64-16 0-51-5-67-27 17-2 22-15 22-23 0-13-9-21-22-21-10 0-21 7-21 23 0 37 40 61 88 61 54 0 93-37 93-77 0-31-26-61-69-71 42-14 56-43 56-67 0-32-36-54-80-54s-77 21-77 53c0 13 10 21 21 21 13 0 21-10 21-21s-8-19-21-21c14-16 42-21 56-21 18 0 42 8 42 43 0 16-5 34-16 47-13 14-24 16-44 17-9 0-9 0-12 0-1 2-4 2-4 5 0 6 4 6 10 6 7 0 15 0 22 0z">
              <text:p/>
            </draw:path>
            <draw:path draw:style-name="gr3" draw:text-style-name="P7" draw:layer="layout" svg:width="0.343cm" svg:height="0.021cm" svg:x="20.783cm" svg:y="12.219cm" svg:viewBox="0 0 344 22" svg:d="M325 22c9 0 19 0 19-11s-10-11-19-11c-102 0-203 0-304 0-10 0-21 0-21 11s11 11 21 11c101 0 202 0 304 0z">
              <text:p/>
            </draw:path>
            <draw:path draw:style-name="gr3" draw:text-style-name="P7" draw:layer="layout" svg:width="0.257cm" svg:height="0.253cm" svg:x="21.322cm" svg:y="12.121cm" svg:viewBox="0 0 258 254" svg:d="M187 37c-11-21-27-37-53-37-65 0-134 83-134 165 0 52 30 89 74 89 11 0 40-1 73-41 5 24 24 41 51 41 20 0 32-13 42-30 10-21 18-55 18-56 0-5-7-5-8-5-5 0-7 2-8 10-10 36-20 70-42 70-16 0-18-16-18-27s2-16 8-42c7-22 7-29 12-49 7-26 13-53 20-79 5-16 5-17 5-19 0-9-8-16-17-16-13 0-21 13-23 26zM150 182c-3 10-3 11-11 21-25 30-48 40-64 40-29 0-35-32-35-53 0-29 18-97 30-123 18-33 44-54 66-54 35 0 43 46 43 49 0 4 0 7-1 10-9 37-19 73-28 110z">
              <text:p/>
            </draw:path>
            <draw:path draw:style-name="gr3" draw:text-style-name="P7" draw:layer="layout" svg:width="0.18cm" svg:height="0.268cm" svg:x="21.618cm" svg:y="11.905cm" svg:viewBox="0 0 181 269" svg:d="M85 129c32 0 53 21 53 63 0 49-28 64-52 64-14 0-49-5-65-27 17-2 22-15 22-23 0-13-9-21-22-21-11 0-21 7-21 23 0 37 40 61 88 61 54 0 93-37 93-77 0-31-26-61-69-71 42-14 56-43 56-67 0-32-36-54-80-54s-77 21-77 53c0 13 10 21 21 21 13 0 21-10 21-21s-8-19-21-21c14-16 42-21 56-21 18 0 42 8 42 43 0 16-5 34-16 47-13 14-24 16-44 17-9 0-11 0-12 0-1 2-4 2-4 5 0 6 4 6 10 6 7 0 14 0 21 0z">
              <text:p/>
            </draw:path>
            <draw:path draw:style-name="gr3" draw:text-style-name="P7" draw:layer="layout" svg:width="1.943cm" svg:height="0.021cm" svg:x="20.012cm" svg:y="12.597cm" svg:viewBox="0 0 1944 22" svg:d="M971 22c-324 0-647 0-971 0 0-7 0-15 0-22 648 0 1296 0 1944 0 0 7 0 15 0 22-324 0-649 0-973 0z">
              <text:p/>
            </draw:path>
            <draw:path draw:style-name="gr3" draw:text-style-name="P7" draw:layer="layout" svg:width="0.233cm" svg:height="0.386cm" svg:x="20.034cm" svg:y="12.76cm" svg:viewBox="0 0 234 387" svg:d="M141 176c45-15 78-55 78-98 0-46-49-78-104-78-56 0-99 34-99 77 0 17 13 28 29 28 17 0 29-12 29-28 0-27-28-27-36-27 18-29 55-36 76-36 22 0 52 13 52 63 0 6 0 40-14 64-18 27-37 28-51 28-3 2-18 4-21 4-5 0-10 0-10 6s5 6 15 6c8 0 16 0 24 0 46 0 67 37 67 93 0 77-38 93-64 93-24 0-66-10-85-43 19 3 37-10 37-31s-16-32-32-32c-13 0-32 8-32 34 0 51 53 88 114 88 68 0 120-51 120-109 0-46-36-89-93-102z">
              <text:p/>
            </draw:path>
            <draw:path draw:style-name="gr3" draw:text-style-name="P7" draw:layer="layout" svg:width="0.13cm" svg:height="0.56cm" svg:x="20.348cm" svg:y="12.714cm" svg:viewBox="0 0 131 561" svg:d="M131 555c0-2 0-2-9-12-71-72-88-177-88-263 0-98 20-195 89-266 8-6 8-8 8-9 0-3-3-5-6-5-5 0-56 37-90 109-29 62-35 124-35 171 0 44 6 112 37 176 33 68 83 105 88 105 3 0 6-2 6-6z">
              <text:p/>
            </draw:path>
            <draw:path draw:style-name="gr3" draw:text-style-name="P7" draw:layer="layout" svg:width="0.205cm" svg:height="0.395cm" svg:x="20.538cm" svg:y="12.744cm" svg:viewBox="0 0 206 396" svg:d="M107 6c-2-2 0-6-8-6-13 0-53 5-67 6-5 0-11 0-11 12 0 6 5 6 13 6 27 0 28 3 28 10 0 3-4 22-8 35-15 60-31 121-46 182-6 29-8 37-8 57 0 53 29 88 70 88 68 0 136-83 136-164 0-51-30-90-75-90-25 0-48 16-65 34 13-57 27-113 41-170zM54 219c4-13 4-14 8-19 28-37 53-47 68-47 20 0 36 18 36 53 0 34-19 99-28 120-20 37-45 58-68 58-19 0-36-15-36-56 0-12 0-23 8-58 4-17 8-34 12-51z">
              <text:p/>
            </draw:path>
            <draw:path draw:style-name="gr3" draw:text-style-name="P7" draw:layer="layout" svg:width="0.343cm" svg:height="0.021cm" svg:x="20.924cm" svg:y="12.983cm" svg:viewBox="0 0 344 22" svg:d="M325 22c9 0 19 0 19-11s-10-11-19-11c-102 0-204 0-306 0-9 0-19 0-19 11s10 11 19 11c102 0 204 0 306 0z">
              <text:p/>
            </draw:path>
            <draw:path draw:style-name="gr3" draw:text-style-name="P7" draw:layer="layout" svg:width="0.257cm" svg:height="0.253cm" svg:x="21.461cm" svg:y="12.887cm" svg:viewBox="0 0 258 254" svg:d="M187 35c-9-21-25-35-51-35-66 0-136 82-136 165 0 52 32 89 75 89 11 0 40-3 74-43 5 24 24 43 51 43 19 0 32-13 42-30 9-21 10-38 16-56 0-7-5-7-7-7-5 0-6 4-8 12-9 35-19 68-41 68-16 0-18-14-18-25 0-13 2-18 8-42 5-24 6-29 11-51 7-26 14-52 21-78 3-16 3-16 3-19 0-10-6-15-16-15-13 0-21 11-24 24zM152 181c-3 11-3 11-11 20-26 31-48 40-64 40-29 0-37-30-37-52 0-28 19-98 32-123 18-34 42-55 64-55 37 0 45 47 45 50s0 8-2 9c-9 37-18 74-27 111z">
              <text:p/>
            </draw:path>
            <draw:path draw:style-name="gr3" draw:text-style-name="P7" draw:layer="layout" svg:width="0.13cm" svg:height="0.56cm" svg:x="21.768cm" svg:y="12.714cm" svg:viewBox="0 0 131 561" svg:d="M131 280c0-43-6-112-38-175-34-70-82-105-87-105-3 0-6 2-6 5 0 1 0 3 11 13 55 56 87 145 87 262 0 96-21 195-90 265-8 8-8 8-8 10 0 3 3 6 6 6 5 0 56-38 90-110 27-61 35-123 35-171z">
              <text:p/>
            </draw:path>
            <draw:path draw:style-name="gr3" draw:text-style-name="P7" draw:layer="layout" svg:width="0.373cm" svg:height="0.13cm" svg:x="22.21cm" svg:y="12.543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3" draw:text-style-name="P7" draw:layer="layout" svg:width="0.207cm" svg:height="0.394cm" svg:x="22.866cm" svg:y="11.98cm" svg:viewBox="0 0 208 395" svg:d="M109 6c0-1 0-6-8-6-13 0-55 5-69 5-5 1-10 1-10 11 0 6 5 6 13 6 27 0 29 5 29 10s-6 24-8 35c-15 61-31 123-46 184-7 27-10 37-10 56 0 54 30 88 72 88 66 0 136-83 136-165 0-51-30-89-75-89-26 0-50 16-66 33 14-56 28-112 42-168zM56 217c3-11 3-12 8-19 27-37 53-45 67-45 21 0 35 16 35 53 0 34-17 98-28 118-18 39-44 60-66 60-19 0-38-16-38-58 0-11 0-21 9-56 4-17 9-35 13-53z">
              <text:p/>
            </draw:path>
            <draw:path draw:style-name="gr3" draw:text-style-name="P7" draw:layer="layout" svg:width="0.173cm" svg:height="0.26cm" svg:x="23.106cm" svg:y="11.905cm" svg:viewBox="0 0 174 261" svg:d="M174 189c-4 0-9 0-14 0 0 9-5 32-10 36-3 2-33 2-38 2-25 0-49 0-74 0 42-37 56-48 80-66 29-24 56-48 56-84 0-48-41-77-92-77-48 0-82 34-82 70 0 20 18 23 21 23 9 0 21-8 21-21 0-8-4-22-23-22 11-28 39-36 56-36 40 0 61 31 61 63 0 33-24 60-37 75-32 31-64 62-96 93-3 4-3 4-3 16 54 0 108 0 162 0 4-24 8-48 12-72z">
              <text:p/>
            </draw:path>
            <draw:path draw:style-name="gr3" draw:text-style-name="P7" draw:layer="layout" svg:width="0.373cm" svg:height="0.373cm" svg:x="23.49cm" svg:y="12.043cm" svg:viewBox="0 0 374 374" svg:d="M198 198c53 0 105 0 157 0 8 0 19 0 19-11s-11-11-19-11c-52 0-104 0-157 0 0-53 0-106 0-158 0-8 0-18-11-18s-11 10-11 18c0 52 0 105 0 158-52 0-105 0-157 0-8 0-19 0-19 11s11 11 19 11c52 0 105 0 157 0 0 52 0 105 0 157 0 8 0 19 11 19s11-11 11-19c0-52 0-105 0-157z">
              <text:p/>
            </draw:path>
            <draw:path draw:style-name="gr3" draw:text-style-name="P7" draw:layer="layout" svg:width="0.257cm" svg:height="0.253cm" svg:x="24.043cm" svg:y="12.121cm" svg:viewBox="0 0 258 254" svg:d="M187 37c-11-21-27-37-53-37-65 0-134 83-134 165 0 52 30 89 74 89 11 0 40-1 73-41 5 24 24 41 51 41 20 0 32-13 42-30 10-21 18-55 18-56 0-5-7-5-8-5-5 0-5 2-7 10-9 36-21 70-43 70-16 0-18-16-18-27s2-16 8-42c7-22 7-29 13-49 7-26 13-53 19-79 5-16 5-17 5-19 0-9-8-16-17-16-13 0-21 13-23 26zM150 182c-3 10-3 11-11 21-25 30-48 40-64 40-27 0-35-32-35-53 0-29 18-97 30-123 18-33 44-54 66-54 37 0 45 46 45 49 0 4-2 7-3 10-9 37-19 73-28 110z">
              <text:p/>
            </draw:path>
            <draw:path draw:style-name="gr3" draw:text-style-name="P7" draw:layer="layout" svg:width="0.205cm" svg:height="0.394cm" svg:x="24.344cm" svg:y="11.98cm" svg:viewBox="0 0 206 395" svg:d="M107 6c0-1 0-6-6-6-13 0-55 5-69 5-5 1-11 1-11 11 0 6 5 6 14 6 27 0 27 5 27 10s-4 24-8 35c-15 61-29 123-44 184-8 27-10 37-10 56 0 54 30 88 72 88 66 0 134-83 134-165 0-51-28-89-73-89-27 0-50 16-67 33 13-56 27-112 41-168zM54 217c4-11 4-12 10-19 27-37 53-45 67-45 19 0 35 16 35 53 0 34-19 98-28 118-20 39-45 60-66 60-19 0-38-16-38-58 0-11 0-21 9-56 4-17 8-35 11-53z">
              <text:p/>
            </draw:path>
            <draw:path draw:style-name="gr3" draw:text-style-name="P7" draw:layer="layout" svg:width="0.373cm" svg:height="0.373cm" svg:x="24.715cm" svg:y="12.043cm" svg:viewBox="0 0 374 374" svg:d="M198 198c53 0 105 0 157 0 8 0 19 0 19-11s-11-11-19-11c-52 0-104 0-157 0 0-53 0-106 0-158 0-8 0-18-11-18s-11 10-11 18c0 52 0 105 0 158-52 0-105 0-157 0-8 0-19 0-19 11s11 11 19 11c52 0 105 0 157 0 0 52 0 105 0 157 0 8 0 19 11 19s11-11 11-19c0-52 0-105 0-157z">
              <text:p/>
            </draw:path>
            <draw:path draw:style-name="gr3" draw:text-style-name="P7" draw:layer="layout" svg:width="0.257cm" svg:height="0.253cm" svg:x="25.269cm" svg:y="12.121cm" svg:viewBox="0 0 258 254" svg:d="M187 37c-11-21-27-37-53-37-65 0-134 83-134 165 0 52 30 89 75 89 11 0 39-1 72-41 5 24 24 41 51 41 20 0 34-13 42-30 10-21 18-55 18-56 0-5-5-5-7-5-6 0-6 2-8 10-9 36-21 70-43 70-16 0-18-16-18-27s2-16 8-42c7-22 7-29 13-49 7-26 13-53 19-79 5-16 5-17 5-19 0-9-6-16-16-16-14 0-22 13-24 26zM150 182c-3 10-3 11-11 21-25 30-48 40-64 40-27 0-35-32-35-53 0-29 18-97 30-123 18-33 44-54 66-54 37 0 45 46 45 49 0 4-2 7-2 10-9 37-19 73-29 110z">
              <text:p/>
            </draw:path>
            <draw:path draw:style-name="gr3" draw:text-style-name="P7" draw:layer="layout" svg:width="0.173cm" svg:height="0.26cm" svg:x="25.568cm" svg:y="11.905cm" svg:viewBox="0 0 174 261" svg:d="M174 189c-4 0-9 0-14 0 0 9-5 32-10 36-3 2-33 2-38 2-25 0-49 0-74 0 42-37 56-48 80-66 29-24 56-48 56-84 0-48-41-77-92-77-48 0-82 34-82 70 0 20 18 23 21 23 9 0 21-8 21-21 0-8-4-22-23-22 11-28 39-36 56-36 40 0 61 31 61 63 0 33-24 60-37 75-32 31-64 62-96 93-3 4-3 4-3 16 54 0 108 0 162 0 4-24 8-48 12-72z">
              <text:p/>
            </draw:path>
            <draw:path draw:style-name="gr3" draw:text-style-name="P7" draw:layer="layout" svg:width="2.954cm" svg:height="0.021cm" svg:x="22.84cm" svg:y="12.597cm" svg:viewBox="0 0 2955 22" svg:d="M1477 22c-493 0-985 0-1477 0 0-7 0-15 0-22 985 0 1970 0 2955 0 0 7 0 15 0 22-493 0-986 0-1478 0z">
              <text:p/>
            </draw:path>
            <draw:path draw:style-name="gr3" draw:text-style-name="P7" draw:layer="layout" svg:width="0.233cm" svg:height="0.386cm" svg:x="24.2cm" svg:y="12.76cm" svg:viewBox="0 0 234 387" svg:d="M139 176c47-15 80-55 80-98 0-46-49-78-104-78-56 0-99 34-99 77 0 17 13 28 29 28 17 0 29-12 29-28 0-27-28-27-36-27 18-29 55-36 76-36 22 0 52 13 52 63 0 6 0 40-16 64-16 27-35 28-49 28-5 2-18 4-21 4-5 0-10 0-10 6s5 6 15 6c8 0 16 0 24 0 46 0 67 37 67 93 0 77-38 93-64 93-24 0-66-10-86-43 20 3 38-10 38-31s-16-32-32-32c-13 0-32 8-32 34 0 51 53 88 114 88 68 0 120-51 120-109 0-46-36-89-95-102z">
              <text:p/>
            </draw:path>
            <draw:path draw:style-name="gr3" draw:text-style-name="P7" draw:layer="layout" svg:width="0.058cm" svg:height="0.058cm" svg:x="25.912cm" svg:y="12.69cm" svg:viewBox="0 0 59 59" svg:d="M59 29c0-16-14-29-30-29s-29 12-29 29 13 30 29 30 30-13 30-30z">
              <text:p/>
            </draw:path>
          </draw:g>
        </draw:g>
        <draw:g>
          <svg:title>TexMaths</svg:title>
          <svg:desc>16§display§\mathbf{Var}[X] = \mathbb{E}[X^2] - (\mathbb{E}[X])^2 = \frac{(b-a)^2}{12}.§svg§600§TRUE§</svg:desc>
          <draw:g>
            <draw:path draw:style-name="gr3" draw:text-style-name="P7" draw:layer="layout" svg:width="0.458cm" svg:height="0.389cm" svg:x="9.108cm" svg:y="13.926cm" svg:viewBox="0 0 459 390" svg:d="M402 40c3-8 6-13 46-13 4 0 7 0 11 0 0-9 0-18 0-27-21 2-48 2-64 2-22 0-51 0-73-2 0 9 0 18 0 27 4 0 49 0 49 7 0 1-1 4-1 6-38 85-76 170-114 256-40-90-80-179-120-269 18 0 35 0 53 0 0-9 0-18 0-27-21 2-75 2-99 2-23 0-71 0-90-2 0 9 0 18 0 27 17 0 34 0 51 0 52 116 104 232 155 349 5 9 8 14 24 14 8 0 16 0 23-13 49-112 99-225 149-337z">
              <text:p/>
            </draw:path>
            <draw:path draw:style-name="gr3" draw:text-style-name="P7" draw:layer="layout" svg:width="0.295cm" svg:height="0.256cm" svg:x="9.546cm" svg:y="14.057cm" svg:viewBox="0 0 296 257" svg:d="M192 211c0 18 0 43 59 43 9 0 18 0 27 0 12 0 18 0 18-13 0-12-8-12-14-12-36-2-36-8-36-21 0-41 0-81 0-122 0-49-40-86-123-86-32 0-101 2-101 51 0 26 20 37 36 37 17 0 35-13 35-37 0-16-11-25-13-27 16-3 34-3 42-3 41 0 60 22 60 65 0 7 0 13 0 19-40 2-182 7-182 88 0 55 70 64 109 64 45 0 72-22 83-46zM182 123c0 18 0 35 0 53 0 54-51 62-65 62-29 0-51-21-51-45 0-60 89-68 116-70z">
              <text:p/>
            </draw:path>
            <draw:path draw:style-name="gr3" draw:text-style-name="P7" draw:layer="layout" svg:width="0.228cm" svg:height="0.252cm" svg:x="9.863cm" svg:y="14.058cm" svg:viewBox="0 0 229 253" svg:d="M94 64c0-21 0-43 0-64-31 2-63 3-94 5 0 8 0 17 0 25 35 0 40 0 40 23 0 58 0 116 0 174-13 0-27 0-40 0 0 8 0 17 0 26 21 0 45-2 72-2 21 0 56 0 77 2 0-9 0-18 0-26-17 0-33 0-50 0 0-33 0-66 0-99 0-39 15-107 71-107-4 8-10 9-10 25 0 23 18 34 34 34s35-11 35-34c0-30-31-46-61-46-38 0-61 29-74 64z">
              <text:p/>
            </draw:path>
            <draw:path draw:style-name="gr3" draw:text-style-name="P7" draw:layer="layout" svg:width="0.076cm" svg:height="0.56cm" svg:x="10.175cm" svg:y="13.891cm" svg:viewBox="0 0 77 561" svg:d="M77 561c0-7 0-15 0-22-18 0-36 0-55 0 0-172 0-345 0-517 19 0 37 0 55 0 0-7 0-15 0-22-26 0-51 0-77 0 0 187 0 374 0 561 26 0 51 0 77 0z">
              <text:p/>
            </draw:path>
            <draw:path draw:style-name="gr3" draw:text-style-name="P7" draw:layer="layout" svg:width="0.461cm" svg:height="0.383cm" svg:x="10.281cm" svg:y="13.927cm" svg:viewBox="0 0 462 384" svg:d="M258 153c-16-37-32-74-48-111-2-5-4-7-4-8 0-4 10-13 34-16 6 0 11 0 11-10 0-8-6-8-8-8-22 0-48 2-70 2-15 0-50-2-64-2-3 0-10 0-10 11 0 7 7 7 13 7 34 0 37 6 42 17 22 52 44 105 67 157-40 42-79 85-119 128-2 2-5 4-8 6-27 30-54 38-81 40-8 2-13 2-13 11 0 2 0 7 6 7 18 0 37-2 53-2 21 0 43 2 64 2 3 0 10 0 10-12 0-4-5-6-7-6-4 0-22-2-22-18 0-8 8-17 14-24 20-20 39-40 58-60 17-19 34-38 51-56 19 45 37 89 56 134 3 6 3 6 3 8 0 5-11 14-32 16-6 2-11 2-11 11 0 7 5 7 8 7 16 0 55-2 71-2 14 0 48 2 62 2 5 0 11 0 11-12 0-6-6-6-9-6-39 0-40-2-50-24-21-53-59-141-72-174 38-39 98-106 115-122 16-12 39-27 72-28 7 0 11 0 11-12-2-2 0-6-6-6-18 0-35 2-53 2-21 0-43-2-62-2-3 0-11 0-11 11 0 5 3 7 6 7 5 1 22 1 22 17 0 8-6 16-9 21-31 32-61 65-91 97z">
              <text:p/>
            </draw:path>
            <draw:path draw:style-name="gr3" draw:text-style-name="P7" draw:layer="layout" svg:width="0.076cm" svg:height="0.56cm" svg:x="10.788cm" svg:y="13.891cm" svg:viewBox="0 0 77 561" svg:d="M77 0c-26 0-51 0-77 0 0 7 0 15 0 22 18 0 36 0 54 0 0 172 0 345 0 517-18 0-36 0-54 0 0 7 0 15 0 22 26 0 51 0 77 0 0-187 0-374 0-561z">
              <text:p/>
            </draw:path>
            <draw:path draw:style-name="gr3" draw:text-style-name="P7" draw:layer="layout" svg:width="0.373cm" svg:height="0.13cm" svg:x="11.119cm" svg:y="14.105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3" draw:text-style-name="P7" draw:layer="layout" svg:width="0.351cm" svg:height="0.383cm" svg:x="11.688cm" svg:y="13.927cm" svg:viewBox="0 0 352 384" svg:d="M138 195c14 0 41 0 60 13 28 16 29 46 29 51 2 6 2 14 11 14 10 0 10-8 10-17 0-51 0-102 0-152 0-10 0-19-10-19-9 0-11 9-11 12-3 74-61 77-89 79 0-40 0-80 0-120 0-37 11-37 24-37 9 0 18 0 27 0 77 0 113 39 117 77 1 5 1 13 11 13 9 0 9-8 9-18 0-24 0-49 0-73 0-18-1-18-19-18-96 0-192 0-288 0-9 0-19 0-19 10 0 9 11 9 16 9 32 0 34 5 34 32 0 94 0 188 0 281 0 26-2 32-32 32-8 0-18 0-18 10s10 10 19 10c99 0 199 0 298 0 11 0 16 0 19-8 5-33 16-95 16-98 0-5-5-10-10-10-8 0-7 6-11 8-3 15-8 39-49 63-29 17-58 25-88 25-11 0-22 0-32 0-13 0-24 0-24-38 0-44 0-87 0-131zM306 19c0 9 0 18 0 27-10-11-20-20-32-27 10 0 21 0 32 0zM197 184c8-5 21-13 30-24 0 15 0 31 0 46-13-14-20-15-30-22zM69 50c0-7 0-21-3-31 19 0 39 0 59 0-7 13-7 32-7 37 0 91 0 181 0 272 0 20 4 32 7 36-20 0-40 0-59 0 3-9 3-24 3-30 0-95 0-190 0-284zM278 364c18-9 34-20 45-32-1 4-5 28-5 32-13 0-26 0-40 0z">
              <text:p/>
            </draw:path>
            <draw:path draw:style-name="gr3" draw:text-style-name="P7" draw:layer="layout" svg:width="0.076cm" svg:height="0.56cm" svg:x="12.122cm" svg:y="13.891cm" svg:viewBox="0 0 77 561" svg:d="M77 561c0-7 0-15 0-22-18 0-36 0-55 0 0-172 0-345 0-517 19 0 37 0 55 0 0-7 0-15 0-22-26 0-51 0-77 0 0 187 0 374 0 561 26 0 51 0 77 0z">
              <text:p/>
            </draw:path>
            <draw:path draw:style-name="gr3" draw:text-style-name="P7" draw:layer="layout" svg:width="0.461cm" svg:height="0.383cm" svg:x="12.227cm" svg:y="13.927cm" svg:viewBox="0 0 462 384" svg:d="M256 153c-16-37-31-74-46-111-2-5-4-7-4-8 0-4 10-13 34-16 5 0 11 0 11-10 0-8-6-8-8-8-24 0-48 2-72 2-13 0-48-2-62-2-3 0-10 0-10 11 0 7 5 7 13 7 34 0 37 6 42 17 22 52 44 105 67 157-40 42-79 85-119 128-2 2-5 4-8 6-27 30-54 38-83 40-6 2-11 2-11 11 0 2 0 7 6 7 18 0 36-2 53-2 21 0 43 2 64 2 3 0 10 0 10-12 0-4-4-4-7-6-6 0-22-2-22-18 0-8 8-17 14-24 20-20 39-40 58-60 17-19 34-38 51-56 19 45 37 89 56 134 2 6 3 6 3 8 0 5-11 14-33 16-5 2-11 2-11 11 0 7 6 7 9 7 15 0 55-2 71-2 14 0 48 2 62 2 3 0 11 0 11-12 0-6-6-6-11-6-37 0-38-2-48-24-22-53-59-141-72-174 38-39 96-106 115-122 16-12 37-27 71-28 8 0 12 0 12-12-2-2 0-6-6-6-18 0-37 2-53 2-22 0-43-2-64-2-3 0-9 0-9 11 0 5 3 7 6 7 5 1 22 1 22 17 0 8-6 16-11 21-30 32-61 65-91 97z">
              <text:p/>
            </draw:path>
            <draw:path draw:style-name="gr3" draw:text-style-name="P7" draw:layer="layout" svg:width="0.173cm" svg:height="0.26cm" svg:x="12.746cm" svg:y="13.819cm" svg:viewBox="0 0 174 261" svg:d="M174 189c-4 0-8 0-12 0-2 9-7 32-12 36-3 2-33 2-38 2-24 0-48 0-72 0 40-37 54-46 78-66 29-24 56-48 56-84 0-48-41-77-92-77-48 0-82 34-82 70 0 21 18 23 21 23 9 0 21-7 21-21 0-8-2-21-23-21 11-29 39-37 58-37 38 0 59 31 59 63 0 33-24 60-37 75-31 31-63 63-94 94-5 3-5 3-5 15 54 0 109 0 163 0 4-24 8-48 11-72z">
              <text:p/>
            </draw:path>
            <draw:path draw:style-name="gr3" draw:text-style-name="P7" draw:layer="layout" svg:width="0.076cm" svg:height="0.56cm" svg:x="12.986cm" svg:y="13.891cm" svg:viewBox="0 0 77 561" svg:d="M77 0c-26 0-51 0-77 0 0 7 0 15 0 22 18 0 36 0 54 0 0 172 0 345 0 517-18 0-36 0-54 0 0 7 0 15 0 22 26 0 51 0 77 0 0-187 0-374 0-561z">
              <text:p/>
            </draw:path>
            <draw:path draw:style-name="gr3" draw:text-style-name="P7" draw:layer="layout" svg:width="0.343cm" svg:height="0.021cm" svg:x="13.301cm" svg:y="14.159cm" svg:viewBox="0 0 344 22" svg:d="M325 22c9 0 19 0 19-11s-10-11-19-11c-102 0-203 0-304 0-10 0-21 0-21 11s11 11 21 11c101 0 202 0 304 0z">
              <text:p/>
            </draw:path>
            <draw:path draw:style-name="gr3" draw:text-style-name="P7" draw:layer="layout" svg:width="0.13cm" svg:height="0.56cm" svg:x="13.872cm" svg:y="13.891cm" svg:viewBox="0 0 131 561" svg:d="M131 555c0-2 0-2-9-12-71-72-88-177-88-263 0-98 20-195 89-266 8-6 8-8 8-9 0-3-3-5-6-5-5 0-56 38-90 109-27 62-35 124-35 171 0 44 6 112 37 175 35 69 83 106 88 106 3 0 6-2 6-6z">
              <text:p/>
            </draw:path>
            <draw:path draw:style-name="gr3" draw:text-style-name="P7" draw:layer="layout" svg:width="0.351cm" svg:height="0.383cm" svg:x="14.043cm" svg:y="13.927cm" svg:viewBox="0 0 352 384" svg:d="M138 195c14 0 41 0 60 13 28 16 29 46 29 51 2 6 2 14 11 14 10 0 10-8 10-17 0-51 0-102 0-152 0-10 0-19-10-19-9 0-11 9-11 12-3 74-61 77-89 79 0-40 0-80 0-120 0-37 11-37 24-37 9 0 18 0 27 0 77 0 113 39 117 77 1 5 1 13 11 13 9 0 9-8 9-18 0-24 0-49 0-73 0-18-1-18-19-18-96 0-192 0-288 0-9 0-19 0-19 10 0 9 11 9 16 9 32 0 34 5 34 32 0 94 0 188 0 281 0 26-2 32-32 32-8 0-18 0-18 10s10 10 19 10c99 0 199 0 298 0 11 0 16 0 19-8 5-33 16-95 16-98 0-5-5-10-10-10-8 0-7 6-11 8-3 15-8 39-49 63-29 17-58 25-88 25-11 0-22 0-32 0-13 0-24 0-24-38 0-44 0-87 0-131zM306 19c0 9 0 18 0 27-10-11-20-20-32-27 10 0 21 0 32 0zM197 184c8-5 21-13 30-24 0 15 0 31 0 46-13-14-20-15-30-22zM69 50c0-7 0-21-5-31 20 0 41 0 61 0-7 13-7 32-7 37 0 91 0 181 0 272 0 20 4 32 7 36-20 0-41 0-61 0 5-9 5-24 5-30 0-95 0-190 0-284zM278 364c18-9 34-20 45-32-1 4-5 28-5 32-13 0-26 0-40 0z">
              <text:p/>
            </draw:path>
            <draw:path draw:style-name="gr3" draw:text-style-name="P7" draw:layer="layout" svg:width="0.076cm" svg:height="0.56cm" svg:x="14.476cm" svg:y="13.891cm" svg:viewBox="0 0 77 561" svg:d="M77 561c0-7 0-15 0-22-18 0-36 0-55 0 0-172 0-345 0-517 19 0 37 0 55 0 0-7 0-15 0-22-26 0-51 0-77 0 0 187 0 374 0 561 26 0 51 0 77 0z">
              <text:p/>
            </draw:path>
            <draw:path draw:style-name="gr3" draw:text-style-name="P7" draw:layer="layout" svg:width="0.461cm" svg:height="0.383cm" svg:x="14.582cm" svg:y="13.927cm" svg:viewBox="0 0 462 384" svg:d="M256 153c-16-37-31-74-46-111-2-5-4-7-4-8 0-4 10-13 34-16 5 0 11 0 11-10 0-8-6-8-8-8-24 0-48 2-72 2-13 0-48-2-62-2-3 0-10 0-10 11 0 7 5 7 13 7 34 0 37 6 42 17 22 52 44 105 67 157-40 42-80 85-120 128-2 2-4 4-7 6-27 30-54 38-83 40-6 2-11 2-11 11 0 2 0 7 6 7 18 0 36-2 53-2 21 0 43 2 63 2 4 0 11 0 11-12 0-4-4-4-7-6-6 0-22-2-22-18 0-8 8-17 14-24 20-20 39-40 58-60 16-19 33-38 50-56 19 45 38 89 57 134 2 6 3 6 3 8 0 5-11 14-33 16-7 2-11 2-11 11 0 7 6 7 9 7 15 0 55-2 71-2 14 0 48 2 62 2 3 0 11 0 11-12 0-6-6-6-11-6-37 0-38-2-48-24-22-53-59-141-72-174 38-39 96-106 115-122 16-12 37-27 71-28 8 0 12 0 12-12-2-2 0-6-6-6-18 0-37 2-54 2-21 0-42-2-63-2-3 0-9 0-9 11 0 5 3 7 6 7 5 1 22 1 22 17 0 8-6 16-11 21-30 32-61 65-91 97z">
              <text:p/>
            </draw:path>
            <draw:path draw:style-name="gr3" draw:text-style-name="P7" draw:layer="layout" svg:width="0.077cm" svg:height="0.56cm" svg:x="15.088cm" svg:y="13.891cm" svg:viewBox="0 0 78 561" svg:d="M78 0c-26 0-52 0-78 0 0 7 0 15 0 22 19 0 37 0 56 0 0 172 0 345 0 517-19 0-37 0-56 0 0 7 0 15 0 22 26 0 52 0 78 0 0-187 0-374 0-561z">
              <text:p/>
            </draw:path>
            <draw:path draw:style-name="gr3" draw:text-style-name="P7" draw:layer="layout" svg:width="0.13cm" svg:height="0.56cm" svg:x="15.264cm" svg:y="13.891cm" svg:viewBox="0 0 131 561" svg:d="M131 280c0-43-6-112-37-175-33-68-83-105-88-105-3 0-6 2-6 5 0 1 0 3 11 13 56 56 88 145 88 262 0 96-21 195-91 265-8 8-8 8-8 10 0 4 3 6 6 6 5 0 56-38 90-110 29-61 35-123 35-171z">
              <text:p/>
            </draw:path>
            <draw:path draw:style-name="gr3" draw:text-style-name="P7" draw:layer="layout" svg:width="0.172cm" svg:height="0.26cm" svg:x="15.476cm" svg:y="13.819cm" svg:viewBox="0 0 173 261" svg:d="M173 189c-5 0-9 0-13 0-2 9-5 32-11 36-2 2-32 2-39 2-24 0-48 0-72 0 42-37 55-46 79-66 29-24 56-48 56-84 0-48-42-77-91-77-50 0-82 34-82 70 0 21 16 23 21 23 8 0 21-7 21-21 0-8-4-21-24-21 12-29 38-37 57-37 40 0 59 31 59 63 0 33-24 60-36 75-32 31-63 63-95 94-3 3-3 3-3 15 54 0 108 0 162 0 3-24 7-48 11-72z">
              <text:p/>
            </draw:path>
            <draw:path draw:style-name="gr3" draw:text-style-name="P7" draw:layer="layout" svg:width="0.373cm" svg:height="0.13cm" svg:x="15.891cm" svg:y="14.105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3" draw:text-style-name="P7" draw:layer="layout" svg:width="0.13cm" svg:height="0.56cm" svg:x="16.575cm" svg:y="13.51cm" svg:viewBox="0 0 131 561" svg:d="M131 556c0-1 0-3-9-13-71-70-88-175-88-262 0-97 20-195 89-265 8-6 8-8 8-10 0-4-3-6-6-6-5 0-56 38-90 110-29 61-35 123-35 171 0 43 6 112 37 174 33 71 83 106 88 106 3 0 6-2 6-5z">
              <text:p/>
            </draw:path>
            <draw:path draw:style-name="gr3" draw:text-style-name="P7" draw:layer="layout" svg:width="0.205cm" svg:height="0.394cm" svg:x="16.766cm" svg:y="13.542cm" svg:viewBox="0 0 206 395" svg:d="M107 6c0-1 0-6-8-6-13 0-53 5-67 5-5 1-11 1-11 11 0 8 5 8 13 8 27 0 28 3 28 10 0 3-4 22-8 33-15 61-31 123-46 184-6 27-8 37-8 56 0 54 29 88 70 88 68 0 136-83 136-163 0-51-30-91-75-91-25 0-48 17-65 33 13-56 27-112 41-168zM54 219c4-13 4-14 8-21 28-37 53-45 68-45 20 0 36 18 36 53 0 34-19 98-28 120-20 37-45 58-68 58-19 0-36-16-36-58 0-10 0-21 8-56 4-17 8-34 12-51z">
              <text:p/>
            </draw:path>
            <draw:path draw:style-name="gr3" draw:text-style-name="P7" draw:layer="layout" svg:width="0.343cm" svg:height="0.021cm" svg:x="17.151cm" svg:y="13.78cm" svg:viewBox="0 0 344 22" svg:d="M323 22c10 0 21 0 21-11s-11-11-21-11c-101 0-202 0-304 0-9 0-19 0-19 11s10 11 19 11c102 0 203 0 304 0z">
              <text:p/>
            </draw:path>
            <draw:path draw:style-name="gr3" draw:text-style-name="P7" draw:layer="layout" svg:width="0.257cm" svg:height="0.253cm" svg:x="17.689cm" svg:y="13.683cm" svg:viewBox="0 0 258 254" svg:d="M187 37c-9-21-25-37-51-37-66 0-136 83-136 165 0 52 32 89 75 89 11 0 40-1 74-41 5 24 24 41 51 41 19 0 32-13 42-30 9-19 16-55 16-56 0-5-5-5-7-5-5 0-6 2-8 10-9 36-19 70-43 70-14 0-16-14-16-26s2-17 6-41c7-24 8-31 13-51 7-26 14-53 21-79 3-16 3-17 3-19 0-9-6-16-16-16-13 0-22 13-24 26zM152 182c-3 10-3 11-11 21-26 30-48 40-64 40-29 0-37-32-37-53 0-29 19-97 32-123 18-33 42-54 64-54 37 0 45 46 45 49 0 4-2 7-2 10-9 37-18 73-27 110z">
              <text:p/>
            </draw:path>
            <draw:path draw:style-name="gr3" draw:text-style-name="P7" draw:layer="layout" svg:width="0.13cm" svg:height="0.56cm" svg:x="17.996cm" svg:y="13.51cm" svg:viewBox="0 0 131 561" svg:d="M131 281c0-44-6-112-38-176-34-68-82-105-87-105-4 0-6 3-6 6 0 2 0 4 11 13 55 56 87 144 87 262 0 96-21 195-90 266-8 6-8 8-8 9 0 3 2 5 6 5 5 0 56-37 88-109 29-62 37-124 37-171z">
              <text:p/>
            </draw:path>
            <draw:path draw:style-name="gr3" draw:text-style-name="P7" draw:layer="layout" svg:width="0.173cm" svg:height="0.26cm" svg:x="18.207cm" svg:y="13.467cm" svg:viewBox="0 0 174 261" svg:d="M174 189c-4 0-8 0-12 0-2 9-7 32-12 36-3 2-33 2-38 2-24 0-48 0-72 0 40-37 54-46 78-66 29-22 56-48 56-84 0-48-41-77-92-77-48 0-82 34-82 70 0 21 18 23 21 23 9 0 21-7 21-21 0-8-2-21-23-21 11-29 39-37 58-37 38 0 59 31 59 63 0 33-24 60-37 75-31 31-63 63-94 94-5 3-5 3-5 15 54 0 109 0 163 0 4-24 8-48 11-72z">
              <text:p/>
            </draw:path>
            <draw:path draw:style-name="gr3" draw:text-style-name="P7" draw:layer="layout" svg:width="1.914cm" svg:height="0.021cm" svg:x="16.519cm" svg:y="14.159cm" svg:viewBox="0 0 1915 22" svg:d="M0 0c638 0 1277 0 1915 0 0 7 0 15 0 22-638 0-1277 0-1915 0 0-7 0-15 0-22z">
              <text:p/>
            </draw:path>
            <draw:path draw:style-name="gr3" draw:text-style-name="P7" draw:layer="layout" svg:width="0.185cm" svg:height="0.373cm" svg:x="17.245cm" svg:y="14.322cm" svg:viewBox="0 0 186 374" svg:d="M115 14c0-12 0-14-13-14-33 37-83 37-102 37 0 6 0 11 0 17 11 0 45 0 74-16 0 97 0 194 0 291 0 21-2 27-52 27-5 0-11 0-17 0 0 6 0 12 0 18 19-2 66-2 89-2 24 0 72 0 92 2 0-6 0-12 0-18-6 0-12 0-18 0-50 0-53-6-53-27 0-105 0-210 0-315z">
              <text:p/>
            </draw:path>
            <draw:path draw:style-name="gr3" draw:text-style-name="P7" draw:layer="layout" svg:width="0.225cm" svg:height="0.373cm" svg:x="17.505cm" svg:y="14.322cm" svg:viewBox="0 0 226 374" svg:d="M43 331c20-19 41-39 61-58 88-78 122-108 122-164 0-64-52-109-120-109-64 0-106 51-106 102 0 31 29 31 30 31 10 0 29-7 29-29 0-15-9-29-29-29-4 0-6 0-8 0 13-37 44-57 77-57 51 0 75 44 75 91 0 44-28 89-59 124-36 40-72 80-109 120-6 7-6 8-6 21 70 0 140 0 210 0 5-33 10-65 16-98-5 0-10 0-15 0-3 16-6 42-13 50-3 5-41 5-52 5-35 0-69 0-103 0z">
              <text:p/>
            </draw:path>
            <draw:path draw:style-name="gr3" draw:text-style-name="P7" draw:layer="layout" svg:width="0.058cm" svg:height="0.058cm" svg:x="18.551cm" svg:y="14.252cm" svg:viewBox="0 0 59 59" svg:d="M59 30c0-17-13-30-30-30s-29 14-29 30c0 17 12 29 29 29s30-13 30-29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ponential Distribution</text:p>
          </draw:text-box>
        </draw:frame>
        <draw:frame presentation:style-name="pr5" draw:text-style-name="P1" draw:layer="layout" svg:width="25.2cm" svg:height="9.134cm" svg:x="0.6cm" svg:y="3.6cm" presentation:class="outline" presentation:user-transformed="true">
          <draw:text-box>
            <text:list text:style-name="L3">
              <text:list-item>
                <text:p><text:span text:style-name="T30">Definition</text:span><text:span text:style-name="T14">. An exponential distribution with parameter </text:span><text:span text:style-name="T31">λ</text:span><text:span text:style-name="T28"> is given by the following probability distribution function: </text:span></text:p>
              </text:list-item>
            </text:list>
          </draw:text-box>
        </draw:frame>
        <draw:frame draw:style-name="gr2" draw:text-style-name="P6" draw:layer="layout" svg:width="8cm" svg:height="6.56cm" svg:x="3.462cm" svg:y="8.126cm">
          <draw:image xlink:href="Pictures/10000001000003CA0000031B82844C55EC89F850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6.37cm" svg:x="14.1cm" svg:y="8.227cm">
          <draw:image xlink:href="Pictures/10000001000003D00000030983B755FCA23E14B4.png" xlink:type="simple" xlink:show="embed" xlink:actuate="onLoad" draw:mime-type="image/png">
            <text:p/>
          </draw:image>
        </draw:frame>
        <draw:frame draw:style-name="gr16" draw:text-style-name="P18" draw:layer="layout" svg:width="3.2cm" svg:height="0.835cm" svg:x="21.9cm" svg:y="12.734cm">
          <draw:text-box>
            <text:p><text:span text:style-name="T32">wikipedia</text:span></text:p>
          </draw:text-box>
        </draw:frame>
        <draw:g>
          <svg:title>TexMaths</svg:title>
          <svg:desc>22§display§F(x) = \left\{\begin{array}{ll}
1 - e^{-\lambda x} &amp; \mbox{ for } x\geq 0,\\
0 &amp; \mbox{ otherwise.}
\end{array}§svg§600§FALSE§</svg:desc>
          <draw:g>
            <draw:path draw:style-name="gr6" draw:text-style-name="P12" draw:layer="layout" svg:width="10.856cm" svg:height="1.775cm" svg:x="6.695cm" svg:y="6.007cm" svg:viewBox="0 0 10857 1776" svg:d="M0 0c3619 0 7238 0 10857 0 0 592 0 1184 0 1776-3619 0-7238 0-10857 0 0-592 0-1184 0-1776z">
              <text:p/>
            </draw:path>
            <draw:path draw:style-name="gr3" draw:text-style-name="P7" draw:layer="layout" svg:width="0.549cm" svg:height="0.524cm" svg:x="6.684cm" svg:y="6.565cm" svg:viewBox="0 0 550 525" svg:d="M205 275c25 0 51 0 77 0 57 0 63 11 63 33 0 6 0 15-6 39 0 2-2 5-2 7 0 6 4 11 8 11 9 0 9-2 14-18 13-55 27-111 41-167 3-9 3-9 3-13-3-2-2-7-9-7-8 0-9 3-11 16-18 59-35 75-101 75-24 0-47 0-71 0 17-66 34-132 51-198 6-27 6-29 42-29 33 0 67 0 101 0 94 0 112 24 112 84 0 17 0 22-2 41 0 11 0 14 0 16s2 9 9 9c8 0 8-5 11-20 5-45 10-90 15-134 2-20-2-20-22-20-126 0-252 0-378 0-16 0-22 0-22 15 0 9 6 9 19 9 29 0 51 0 51 13 0 5 0 5-2 20-35 136-69 271-104 407-6 31-8 37-70 37-13 0-22 0-22 15 0 9 11 9 13 9 22 0 79-2 101-2 27 0 91 2 115 2 9 0 17 0 17-15 0-7-4-7-4-9-2 0-4 0-22 0s-22 0-40-2c-24-2-26-4-26-15 0-3 0-7 4-18 16-64 31-128 47-191z">
              <text:p/>
            </draw:path>
            <draw:path draw:style-name="gr3" draw:text-style-name="P7" draw:layer="layout" svg:width="0.177cm" svg:height="0.773cm" svg:x="7.337cm" svg:y="6.51cm" svg:viewBox="0 0 178 774" svg:d="M178 765c0-2 0-5-13-18-97-96-121-241-121-360 0-134 29-268 123-365 11-9 11-11 11-13 0-7-2-9-6-9-9 0-80 53-124 152-39 83-48 169-48 235 0 59 7 154 51 239 46 97 112 148 121 148 4 0 6-5 6-9z">
              <text:p/>
            </draw:path>
            <draw:path draw:style-name="gr3" draw:text-style-name="P7" draw:layer="layout" svg:width="0.384cm" svg:height="0.351cm" svg:x="7.584cm" svg:y="6.747cm" svg:viewBox="0 0 385 352" svg:d="M235 110c5-20 22-92 77-92 3 0 22 0 38 11-22 4-38 22-38 41 0 11 9 27 31 27 16 0 42-13 42-44 0-42-46-53-73-53-44 0-72 42-81 59-20-50-62-59-84-59-79 0-125 101-125 121 0 6 9 6 11 6 7 0 9-2 9-8 26-82 77-101 103-101 16 0 42 6 42 52 0 25-13 75-42 183-11 48-39 81-72 81-5 0-22 0-40-11 20-2 37-20 37-42 0-19-17-26-28-26-24 0-42 20-42 44 0 37 37 53 73 53 50 0 77-55 81-60 9 29 35 60 81 60 82 0 126-101 126-121 0-7-7-7-11-7-7 0-7 2-9 9-26 81-79 101-103 101-31 0-42-24-42-50 0-18 4-36 13-69 9-35 18-70 26-105z">
              <text:p/>
            </draw:path>
            <draw:path draw:style-name="gr3" draw:text-style-name="P7" draw:layer="layout" svg:width="0.179cm" svg:height="0.773cm" svg:x="8.046cm" svg:y="6.51cm" svg:viewBox="0 0 180 774" svg:d="M180 387c0-60-8-154-50-242-46-94-115-145-121-145-5 0-9 4-9 9 0 2 0 4 15 17 75 77 119 200 119 361 0 132-28 268-123 365-11 8-11 11-11 13 0 4 4 9 9 9 6 0 77-53 123-152 40-86 48-171 48-235z">
              <text:p/>
            </draw:path>
            <draw:path draw:style-name="gr3" draw:text-style-name="P7" draw:layer="layout" svg:width="0.514cm" svg:height="0.179cm" svg:x="8.56cm" svg:y="6.807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3" draw:text-style-name="P7" draw:layer="layout" svg:width="0.377cm" svg:height="1.852cm" svg:x="9.434cm" svg:y="5.969cm" svg:viewBox="0 0 378 1853" svg:d="M222 1180c0-35 0-92-50-154-29-39-73-74-128-98 152-73 178-185 178-229 0-148 0-296 0-444 0-48 0-147 150-220 6-4 6-6 6-17 0-16 0-18-17-18-11 0-13 0-33 11-77 37-152 99-170 191-2 18-2 24-2 75 0 119 0 237 0 356 0 24 0 66 0 73-6 81-55 151-143 200-11 8-13 8-13 22 0 13 2 13 13 19 51 29 126 84 141 181 2 17 2 19 2 28 0 152 0 305 0 457 0 112 79 185 174 231 18 9 20 9 31 9 15 0 17 0 17-18 0-11-2-13-8-15-31-16-130-66-148-178 0-11 0-20 0-66 0-132 0-264 0-396z">
              <text:p/>
            </draw:path>
            <draw:path draw:style-name="gr3" draw:text-style-name="P7" draw:layer="layout" svg:width="0.254cm" svg:height="0.513cm" svg:x="10.368cm" svg:y="6.108cm" svg:viewBox="0 0 255 514" svg:d="M158 20c0-18 0-20-17-20-49 51-117 51-141 51 0 8 0 16 0 24 15 0 62 0 101-22 0 133 0 266 0 400 0 28-2 37-72 37-8 0-17 0-25 0 0 8 0 16 0 24 27-2 95-2 126-2s99 0 125 2c0-8 0-16 0-24-8 0-16 0-24 0-70 0-73-9-73-37 0-145 0-289 0-433z">
              <text:p/>
            </draw:path>
            <draw:path draw:style-name="gr3" draw:text-style-name="P7" draw:layer="layout" svg:width="0.47cm" svg:height="0.03cm" svg:x="10.923cm" svg:y="6.413cm" svg:viewBox="0 0 471 31" svg:d="M444 31c14 0 27 0 27-16 0-15-13-15-27-15-139 0-278 0-418 0-13 0-26 0-26 15 0 16 13 16 26 16 140 0 279 0 418 0z">
              <text:p/>
            </draw:path>
            <draw:path draw:style-name="gr3" draw:text-style-name="P7" draw:layer="layout" svg:width="0.296cm" svg:height="0.348cm" svg:x="11.666cm" svg:y="6.281cm" svg:viewBox="0 0 297 349" svg:d="M108 163c24 0 81-3 119-18 55-24 59-68 59-79 0-35-31-66-84-66-85 0-202 75-202 209 0 79 46 140 121 140 110 0 176-81 176-92 0-4-4-9-9-9-4 0-6 3-11 7-61 77-145 77-154 77-61 0-68-64-68-90 0-9 2-33 13-79 13 0 27 0 40 0zM73 145c30-116 110-127 129-127 36 0 58 22 58 48 0 79-124 79-157 79-10 0-20 0-30 0z">
              <text:p/>
            </draw:path>
            <draw:path draw:style-name="gr3" draw:text-style-name="P7" draw:layer="layout" svg:width="0.364cm" svg:height="0.025cm" svg:x="12.049cm" svg:y="6.193cm" svg:viewBox="0 0 365 26" svg:d="M343 26c9 0 22 0 22-13s-11-13-22-13c-107 0-214 0-321 0-9 0-22 0-22 13s13 13 22 13c107 0 214 0 321 0z">
              <text:p/>
            </draw:path>
            <draw:path draw:style-name="gr3" draw:text-style-name="P7" draw:layer="layout" svg:width="0.296cm" svg:height="0.381cm" svg:x="12.513cm" svg:y="5.967cm" svg:viewBox="0 0 297 382" svg:d="M178 220c29 61 60 140 64 147 11 13 20 13 29 13 3 0 7 0 11 0 11 0 15 0 15-6 0-3 0-5-2-5-7-6-11-20-13-24-44-104-88-208-132-312-5-9-16-33-73-33-7 0-13 0-13 7 0 6 4 8 6 8 14 3 22 3 36 33 22 51 44 101 66 152-54 48-107 97-161 145-7 4-11 9-11 18 0 13 11 19 20 19s15-8 17-8c47-52 94-103 141-154z">
              <text:p/>
            </draw:path>
            <draw:path draw:style-name="gr3" draw:text-style-name="P7" draw:layer="layout" svg:width="0.289cm" svg:height="0.243cm" svg:x="12.865cm" svg:y="6.103cm" svg:viewBox="0 0 290 244" svg:d="M110 182c-7 18-24 47-51 47-2 0-17 0-30-7 24-7 24-26 24-31 0-11-9-20-22-20s-31 14-31 33c0 27 31 40 57 40 27 0 49-15 62-37 13 28 42 37 64 37 61 0 94-68 94-84 0-6-6-6-9-6-6 0-6 2-8 9-11 37-44 66-75 66-22 0-33-14-33-36 0-13 13-63 28-123 11-41 36-55 53-55 10 3 18 0 29 9-18 5-24 20-24 29 0 11 9 20 22 20 12 0 30-11 30-33 0-31-35-40-57-40-26 0-48 18-59 40-11-22-35-40-66-40-60 0-95 66-95 84 0 6 6 4 9 6 7 0 9-2 11-9 13-41 48-66 75-66 17 0 31 11 31 36 0 11-7 39-11 57-6 25-12 50-18 74z">
              <text:p/>
            </draw:path>
            <draw:path draw:style-name="gr3" draw:text-style-name="P7" draw:layer="layout" svg:width="0.248cm" svg:height="0.544cm" svg:x="14.286cm" svg:y="6.077cm" svg:viewBox="0 0 249 545" svg:d="M110 213c0-30 0-60 0-90 0-68 35-105 70-105 3 0 14 0 25 6-9 2-22 13-22 31s13 35 33 35c22 0 33-17 33-35 0-29-29-55-69-55-55 0-121 42-121 123 0 30 0 60 0 90-19 0-39 0-59 0 0 8 0 16 0 24 20 0 40 0 59 0 0 83 0 166 0 249 0 35-6 35-59 35 0 8 0 16 0 24 31 0 66-2 88-2 31 0 68 0 99 2 0-8 0-16 0-24-6 0-12 0-18 0-57 0-57-9-57-35 0-83 0-166 0-249 30 0 59 0 88 0 0-8 0-16 0-24-30 0-60 0-90 0z">
              <text:p/>
            </draw:path>
            <draw:path draw:style-name="gr3" draw:text-style-name="P7" draw:layer="layout" svg:width="0.342cm" svg:height="0.353cm" svg:x="14.517cm" svg:y="6.277cm" svg:viewBox="0 0 343 354" svg:d="M343 180c0-99-77-180-171-180-97 0-172 84-172 180 0 99 81 174 172 174 92 0 171-75 171-174zM172 334c-33 0-66-15-88-50-20-36-20-82-20-110 0-31 0-73 20-106 19-35 57-53 88-53 33 0 67 18 88 51 20 33 19 79 19 108 0 28 0 70-17 103-18 35-51 57-90 57z">
              <text:p/>
            </draw:path>
            <draw:path draw:style-name="gr3" draw:text-style-name="P7" draw:layer="layout" svg:width="0.259cm" svg:height="0.34cm" svg:x="14.904cm" svg:y="6.281cm" svg:viewBox="0 0 260 341" svg:d="M108 84c0-28 0-56 0-84-36 3-72 6-108 9 0 8 0 16 0 24 55 0 59 4 59 42 0 69 0 137 0 206 0 35-8 35-59 35 0 9 0 17 0 25 31 0 66-3 88-3 31 0 68 0 99 3 0-8 0-16 0-25-6 0-12 0-18 0-57 0-57-8-57-35 0-39 0-79 0-118 0-77 31-145 90-145 5 0 7 0 9 0-2 0-17 8-17 30 0 20 15 33 33 33 13 0 33-11 33-35s-25-46-58-46c-57 0-83 51-94 84z">
              <text:p/>
            </draw:path>
            <draw:path draw:style-name="gr3" draw:text-style-name="P7" draw:layer="layout" svg:width="0.384cm" svg:height="0.348cm" svg:x="15.465cm" svg:y="6.281cm" svg:viewBox="0 0 385 349" svg:d="M235 108c5-20 22-90 77-90 5 0 22 0 40 8-22 5-37 25-37 42 0 13 8 27 28 27 18 0 42-14 42-44 0-40-46-51-73-51-44 0-70 40-81 59-18-52-59-59-81-59-82 0-126 99-126 119 0 6 7 6 9 6 7 0 9 0 11-6 26-84 77-101 103-101 14 0 42 6 42 50 0 24-13 77-42 185-13 46-39 79-74 79-5 0-22 0-38-9 20-4 35-20 35-42s-15-28-28-28c-22 0-42 22-42 46 0 35 40 50 73 50 50 0 79-54 81-59 9 29 37 59 84 59 79 0 123-98 123-118 0-9-7-9-9-9-7 0-9 4-11 9-24 83-77 101-101 101-31 0-44-24-44-51 0-17 4-33 13-68s18-70 26-105z">
              <text:p/>
            </draw:path>
            <draw:path draw:style-name="gr3" draw:text-style-name="P7" draw:layer="layout" svg:width="0.472cm" svg:height="0.595cm" svg:x="16.162cm" svg:y="6.132cm" svg:viewBox="0 0 473 596" svg:d="M458 240c11-5 15-9 15-16 0-9-2-13-15-20-143-66-285-133-427-200-9-4-13-4-16-4-8 0-15 7-15 15 0 9 7 14 15 16 136 64 272 127 407 191-135 64-269 127-404 191-16 7-18 13-18 18 0 9 9 15 15 15 5 0 5 0 16-4 142-68 284-135 427-202zM447 596c13 0 26 0 26-16 0-15-15-15-29-15-138 0-277 0-415 0-11 0-29 0-29 15 0 16 15 16 29 16 139 0 278 0 418 0z">
              <text:p/>
            </draw:path>
            <draw:path draw:style-name="gr3" draw:text-style-name="P7" draw:layer="layout" svg:width="0.325cm" svg:height="0.531cm" svg:x="16.945cm" svg:y="6.108cm" svg:viewBox="0 0 326 532" svg:d="M326 268c0-61-5-125-31-182-35-73-99-86-132-86-46 0-104 20-134 92-25 53-29 115-29 176 0 57 2 128 35 185 33 63 88 79 128 79 42 0 99-18 134-90 24-53 29-115 29-174zM163 514c-31 0-77-19-90-92-9-48-9-119-9-165 0-48 0-99 6-141 16-92 73-98 93-98 24 0 75 13 90 90 9 44 9 101 9 149 0 59 0 112-9 161-11 74-57 96-90 96z">
              <text:p/>
            </draw:path>
            <draw:path draw:style-name="gr3" draw:text-style-name="P7" draw:layer="layout" svg:width="0.089cm" svg:height="0.23cm" svg:x="17.368cm" svg:y="6.541cm" svg:viewBox="0 0 90 231" svg:d="M90 81c0-50-20-81-48-81-27 0-42 20-42 40 0 22 15 41 42 41 9 0 17-2 26-11 2 0 2-2 5-2 0 5 0 2 0 13 0 57-27 104-51 128-9 9-9 11-9 13 0 4 2 9 7 9 9 0 70-60 70-150z">
              <text:p/>
            </draw:path>
            <draw:path draw:style-name="gr3" draw:text-style-name="P7" draw:layer="layout" svg:width="0.325cm" svg:height="0.529cm" svg:x="10.329cm" svg:y="7.035cm" svg:viewBox="0 0 326 530" svg:d="M326 266c0-62-5-123-31-180-35-75-99-86-132-86-46 0-101 20-134 90-25 55-29 114-29 176 0 57 4 127 35 187 33 61 90 77 128 77 42 0 101-16 134-90 24-53 29-113 29-174zM163 514c-31 0-75-19-90-94-9-46-9-117-9-163 0-50 0-101 6-143 16-92 73-99 93-99 26 0 77 16 92 90 7 44 7 104 7 152 0 57 0 110-9 161-11 72-55 96-90 96z">
              <text:p/>
            </draw:path>
            <draw:path draw:style-name="gr3" draw:text-style-name="P7" draw:layer="layout" svg:width="0.342cm" svg:height="0.353cm" svg:x="14.282cm" svg:y="7.202cm" svg:viewBox="0 0 343 354" svg:d="M343 180c0-99-79-180-171-180-97 0-172 84-172 180 0 101 79 174 172 174 92 0 171-75 171-174zM172 336c-33 0-69-17-88-52-20-33-20-82-20-108 0-31 0-73 17-108 22-35 58-50 91-50s66 17 85 50c20 33 20 77 20 108 0 26 0 68-15 103-18 33-53 57-90 57z">
              <text:p/>
            </draw:path>
            <draw:path draw:style-name="gr3" draw:text-style-name="P7" draw:layer="layout" svg:width="0.241cm" svg:height="0.48cm" svg:x="14.66cm" svg:y="7.075cm" svg:viewBox="0 0 242 481" svg:d="M121 165c37 0 73 0 110 0 0-8 0-16 0-24-37 0-73 0-110 0 0-47 0-94 0-141-7 0-13 0-20 0-2 62-24 145-101 147 0 6 0 12 0 18 22 0 44 0 66 0 0 71 0 142 0 213 0 95 73 103 101 103 55 0 75-55 75-103 0-15 0-29 0-44-6 0-12 0-18 0 0 14 0 28 0 42 0 57-24 88-52 88-51 0-51-71-51-84 0-72 0-143 0-215z">
              <text:p/>
            </draw:path>
            <draw:path draw:style-name="gr3" draw:text-style-name="P7" draw:layer="layout" svg:width="0.386cm" svg:height="0.535cm" svg:x="14.972cm" svg:y="7.013cm" svg:viewBox="0 0 387 536" svg:d="M59 477c0 35-8 35-59 35 0 8 0 16 0 24 26-2 66-4 86-4s61 2 88 4c0-8 0-16 0-24-53 0-62 0-62-35 0-48 0-95 0-143 0-79 55-123 106-123 48 0 57 42 57 86 0 60 0 120 0 180 0 35-9 35-62 35 0 8 0 16 0 24 29-2 69-4 88-4 20 0 60 2 86 4 0-8 0-16 0-24-39 0-59 0-59-24 0-49 0-98 0-147 0-66 0-90-24-119-11-13-36-29-82-29-64 0-99 47-112 77 0-90 0-180 0-270-37 3-73 6-110 9 0 8 0 16 0 24 53 0 59 4 59 42 0 134 0 268 0 402z">
              <text:p/>
            </draw:path>
            <draw:path draw:style-name="gr3" draw:text-style-name="P7" draw:layer="layout" svg:width="0.298cm" svg:height="0.353cm" svg:x="15.397cm" svg:y="7.202cm" svg:viewBox="0 0 299 354" svg:d="M66 152c4-115 70-134 97-134 79 0 86 103 86 134-61 0-122 0-183 0zM66 167c72 0 144 0 216 0 15 0 17 0 17-15 0-77-42-152-136-152-90 0-163 79-163 176 0 103 81 178 172 178 94 0 127-86 127-99 0-9-4-11-9-11-6 0-8 7-11 11-26 81-96 81-103 81-40 0-70-24-88-52-22-38-22-88-22-117z">
              <text:p/>
            </draw:path>
            <draw:path draw:style-name="gr3" draw:text-style-name="P7" draw:layer="layout" svg:width="0.259cm" svg:height="0.342cm" svg:x="15.742cm" svg:y="7.207cm" svg:viewBox="0 0 260 343" svg:d="M106 86c0-29 0-57 0-86-36 3-71 6-106 9 0 8 0 16 0 24 53 0 59 4 59 44 0 69 0 138 0 207 0 35-8 35-59 35 0 8 0 16 0 24 29-2 66-5 88-5 31 0 66 0 97 5 0-8 0-16 0-24-5 0-10 0-16 0-57 0-59-9-59-38 0-39 0-79 0-118 0-77 33-145 92-145 5 0 7 0 9 0-4 2-20 11-20 30 0 22 18 33 36 33 13 0 33-7 33-33 0-25-25-48-58-48-57 0-85 53-96 86z">
              <text:p/>
            </draw:path>
            <draw:path draw:style-name="gr3" draw:text-style-name="P7" draw:layer="layout" svg:width="0.527cm" svg:height="0.34cm" svg:x="16.037cm" svg:y="7.215cm" svg:viewBox="0 0 528 341" svg:d="M464 73c13-38 38-49 64-49 0-8 0-16 0-24-15 2-40 2-55 2-22 0-57-2-73-2 0 8 0 16 0 24 29 0 44 16 44 38 0 4 0 6-2 15-23 66-47 132-70 198-26-72-52-144-77-216-2-8-5-11-5-13 0-22 31-22 47-22 0-8 0-16 0-24-22 0-62 2-82 2-22 0-44 0-68-2 0 8 0 16 0 24 29 0 42 2 48 11 5 5 14 29 18 44-22 62-44 125-66 187-24-69-48-138-73-207-4-8-4-11-4-13 0-22 31-22 46-22 0-8 0-16 0-24-24 0-68 2-86 2-2 0-44 0-70-2 0 8 0 16 0 24 37 0 46 2 57 27 32 91 65 183 97 274 4 11 5 16 15 16s14-5 16-16c26-72 53-145 79-217 26 73 53 146 79 219 2 9 6 14 16 14 9 0 11-7 15-14 30-85 60-169 90-254z">
              <text:p/>
            </draw:path>
            <draw:path draw:style-name="gr3" draw:text-style-name="P7" draw:layer="layout" svg:width="0.164cm" svg:height="0.515cm" svg:x="16.607cm" svg:y="7.033cm" svg:viewBox="0 0 165 516" svg:d="M110 174c-36 3-72 5-108 8 0 8 0 17 0 25 51 0 57 4 57 41 0 70 0 140 0 209 0 35-8 35-59 35 0 8 0 16 0 24 24-2 66-4 84-4 28 0 55 2 81 4 0-8 0-16 0-24-51 0-55-4-55-35 0-94 0-189 0-283zM114 40c0-25-19-40-41-40-25 0-40 20-40 40 0 22 15 41 40 41 22 0 41-17 41-41z">
              <text:p/>
            </draw:path>
            <draw:path draw:style-name="gr3" draw:text-style-name="P7" draw:layer="layout" svg:width="0.252cm" svg:height="0.353cm" svg:x="16.82cm" svg:y="7.202cm" svg:viewBox="0 0 253 354" svg:d="M136 196c18 4 80 15 80 72 0 40-27 70-86 70-66 0-93-43-108-109-2-11-4-14-11-14-11 0-11 5-11 20 0 34 0 68 0 101 0 13 0 18 9 18 4 0 4 0 20-16 2 0 2-2 15-17 35 33 68 33 86 33 88 0 123-51 123-106 0-41-22-66-31-74-26-25-57-31-90-38-42-9-95-17-95-61 0-29 20-60 88-60 84 0 88 69 91 93 0 6 6 6 8 6 9 0 9-2 9-17 0-26 0-52 0-77 0-13 0-20-6-20-5 0-7 0-16 9-2 4-11 11-13 13-31-22-62-22-73-22-94 0-125 53-125 95 0 28 13 48 33 65 26 20 48 25 103 36z">
              <text:p/>
            </draw:path>
            <draw:path draw:style-name="gr3" draw:text-style-name="P7" draw:layer="layout" svg:width="0.298cm" svg:height="0.353cm" svg:x="17.121cm" svg:y="7.202cm" svg:viewBox="0 0 299 354" svg:d="M66 152c4-115 68-134 95-134 79 0 88 103 88 134-61 0-122 0-183 0zM64 167c72 0 143 0 215 0 18 0 20 0 20-15 0-77-42-152-138-152-88 0-161 79-161 176 0 103 81 178 172 178 92 0 127-86 127-99 0-9-6-11-9-11-8 0-8 7-11 11-26 81-96 81-103 81-40 0-70-24-88-52-24-38-24-88-24-117z">
              <text:p/>
            </draw:path>
            <draw:path draw:style-name="gr3" draw:text-style-name="P7" draw:layer="layout" svg:width="0.08cm" svg:height="0.083cm" svg:x="17.511cm" svg:y="7.466cm" svg:viewBox="0 0 81 84" svg:d="M81 42c0-22-18-42-41-42-24 0-40 20-40 42s16 42 40 42c23 0 41-20 41-42z">
              <text:p/>
            </draw:path>
          </draw:g>
        </draw:g>
        <draw:frame draw:style-name="gr2" draw:text-style-name="P6" draw:layer="layout" svg:width="2.828cm" svg:height="0.564cm" draw:transform="rotate (1.5707963267949) translate (3.32cm 12.597cm)">
          <draw:image xlink:href="Pictures/10000000000001E1000000602DD713FE193946CE.png" xlink:type="simple" xlink:show="embed" xlink:actuate="onLoad" draw:mime-type="image/png">
            <text:p/>
          </draw:image>
          <svg:title>TexMaths</svg:title>
          <svg:desc>14§display§f(x) = \lambda e^{-\lambda x}§png§600§FALSE§</svg:desc>
        </draw:frame>
        <draw:frame draw:style-name="gr2" draw:text-style-name="P6" draw:layer="layout" svg:width="3.48cm" svg:height="0.564cm" draw:transform="rotate (1.5707963267949) translate (14.112cm 12.92cm)">
          <draw:image xlink:href="Pictures/100000000000025000000060E7B2099DD49A1270.png" xlink:type="simple" xlink:show="embed" xlink:actuate="onLoad" draw:mime-type="image/png">
            <text:p/>
          </draw:image>
          <svg:title>TexMaths</svg:title>
          <svg:desc>14§display§F(x) = 1-e^{-\lambda x}§png§600§FALSE§</svg:desc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0" draw:layer="layout" svg:width="19.5cm" svg:height="2.6cm" svg:x="0.8cm" svg:y="0.6cm" presentation:class="title">
          <draw:text-box>
            <text:p text:style-name="P9">Exponential Distribution</text:p>
          </draw:text-box>
        </draw:frame>
        <draw:g>
          <svg:title>TexMaths</svg:title>
          <svg:desc>20§display§\mathbb{E}[X] = \int_0^{\infty} t\lambda e^{-\lambda t} dt = \frac{1}{\lambda}.§svg§600§TRUE§</svg:desc>
          <draw:g>
            <draw:path draw:style-name="gr3" draw:text-style-name="P7" draw:layer="layout" svg:width="0.439cm" svg:height="0.478cm" svg:x="5.173cm" svg:y="7.675cm" svg:viewBox="0 0 440 479" svg:d="M172 244c18 0 52 0 76 16 34 22 36 60 36 64 2 10 2 18 14 18s12-10 12-22c0-64 0-127 0-190 0-12 0-22-12-22s-14 10-14 16c-4 90-76 94-112 96 0-50 0-99 0-148 0-48 14-48 30-48 11 0 23 0 34 0 94 0 142 48 146 98 0 4 2 16 12 16 12 0 12-12 12-24 0-31 0-61 0-92 0-20 0-22-22-22-120 0-240 0-360 0-12 0-24 0-24 12s14 12 18 12c40 0 44 6 44 40 0 117 0 234 0 351 0 34-2 40-40 40-10 0-22 0-22 12s12 12 24 12c124 0 248 0 372 0 14 0 20 0 22-10 2 0 22-117 22-119 0-8-8-14-12-14-10 0-9 6-14 10-4 18-10 48-62 77-36 22-72 32-112 32-13 0-25 0-38 0-16 0-30 0-30-45 0-56 0-111 0-166zM382 24c0 11 0 23 0 34-12-14-26-24-40-34 13 0 27 0 40 0zM246 230c10-4 26-16 38-30 0 19 0 38 0 58-16-18-25-19-38-28zM86 62c0-8 0-26-6-38 25 0 51 0 76 0-8 16-8 40-8 46 0 113 0 226 0 340 0 25 4 39 8 45-25 0-51 0-76 0 6-12 6-30 6-38 0-118 0-237 0-355zM348 455c22-12 42-26 56-40-2 4-6 34-8 40-16 0-32 0-48 0z">
              <text:p/>
            </draw:path>
            <draw:path draw:style-name="gr3" draw:text-style-name="P7" draw:layer="layout" svg:width="0.095cm" svg:height="0.7cm" svg:x="5.715cm" svg:y="7.629cm" svg:viewBox="0 0 96 701" svg:d="M96 701c0-9 0-18 0-28-23 0-45 0-68 0 0-215 0-430 0-645 23 0 45 0 68 0 0-9 0-19 0-28-32 0-64 0-96 0 0 234 0 467 0 701 32 0 64 0 96 0z">
              <text:p/>
            </draw:path>
            <draw:path draw:style-name="gr3" draw:text-style-name="P7" draw:layer="layout" svg:width="0.579cm" svg:height="0.476cm" svg:x="5.845cm" svg:y="7.677cm" svg:viewBox="0 0 580 477" svg:d="M322 190c-19-47-39-93-58-140-2-6-3-5-4-8 0-4 12-18 42-22 6 0 14 0 14-12 0-8-8-8-10-8-30 0-60 2-90 2-18 0-60-2-78-2-4 0-12 0-12 14 0 6 6 6 16 6 42 0 46 8 52 24 27 65 55 130 82 196-49 52-99 105-148 158-3 2-5 5-8 8-34 37-68 47-104 49-8 2-16 2-16 14 0 2 0 8 10 8 20 0 44-2 66-2 26 0 54 2 78 2 4 0 14 0 14-14 0-6-8-8-10-8-6 0-28-2-28-20 0-12 12-23 20-31 24-26 48-51 72-76 21-24 41-47 62-70 24 56 48 112 72 167 2 8 3 7 4 10 0 6-14 18-42 20-8 2-14 2-14 14 0 8 8 8 10 8 20 0 70-2 90-2 16 0 60 2 78 2 4 0 12 0 12-12 0-10-6-10-12-10-46 0-48-2-60-30-28-65-74-173-90-215 46-50 120-134 144-154 20-16 46-32 88-36 10 0 16 0 16-14-3-2 0-6-10-6-20 0-44 2-66 2-26 0-52-2-78-2-4 0-12 0-12 14 0 4 2 6 8 6 6 2 28 4 28 22 0 10-8 20-14 26-38 41-76 81-114 122z">
              <text:p/>
            </draw:path>
            <draw:path draw:style-name="gr3" draw:text-style-name="P7" draw:layer="layout" svg:width="0.095cm" svg:height="0.7cm" svg:x="6.479cm" svg:y="7.629cm" svg:viewBox="0 0 96 701" svg:d="M96 0c-32 0-64 0-96 0 0 9 0 19 0 28 23 0 45 0 68 0 0 215 0 430 0 645-23 0-45 0-68 0 0 10 0 19 0 28 32 0 64 0 96 0 0-234 0-467 0-701z">
              <text:p/>
            </draw:path>
            <draw:path draw:style-name="gr3" draw:text-style-name="P7" draw:layer="layout" svg:width="0.467cm" svg:height="0.165cm" svg:x="6.893cm" svg:y="7.897cm" svg:viewBox="0 0 468 166" svg:d="M444 30c10 0 24 1 24-14s-14-16-22-16c-141 0-281 0-422 0-10 0-24 1-24 16s14 14 24 14c140 0 280 0 420 0zM446 166c8 0 22 0 22-14s-14-14-24-14c-140 0-280 0-420 0-10 0-24 0-24 14s14 14 24 14c141 0 281 0 422 0z">
              <text:p/>
            </draw:path>
            <draw:path draw:style-name="gr3" draw:text-style-name="P7" draw:layer="layout" svg:width="0.623cm" svg:height="1.555cm" svg:x="7.634cm" svg:y="7.202cm" svg:viewBox="0 0 624 1556" svg:d="M34 1526c24-2 34-18 34-36 0-22-16-34-32-34-18 0-36 12-36 36 0 36 36 64 78 64 108 0 148-164 198-365 54-222 100-446 138-672 26-149 52-289 76-379 8-34 32-126 58-126 22 0 40 14 44 16-24 2-36 18-36 36 0 22 18 34 34 34s34-10 34-36c0-38-38-64-76-64-54 0-94 76-132 218-2 8-98 359-174 819-20 108-40 223-62 321-14 52-46 184-102 184-26 0-42-16-44-16z">
              <text:p/>
            </draw:path>
            <draw:path draw:style-name="gr3" draw:text-style-name="P7" draw:layer="layout" svg:width="0.483cm" svg:height="0.221cm" svg:x="8.336cm" svg:y="7.158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c-44 0-76-36-124-94zM222 122c-20 32-62 80-122 80-52 0-86-43-86-90s38-84 84-84 76 36 124 94z">
              <text:p/>
            </draw:path>
            <draw:path draw:style-name="gr3" draw:text-style-name="P7" draw:layer="layout" svg:width="0.227cm" svg:height="0.335cm" svg:x="8.012cm" svg:y="8.468cm" svg:viewBox="0 0 228 336" svg:d="M228 170c0-54-6-94-30-128-14-22-46-42-84-42-114 0-114 135-114 170s0 166 114 166 114-132 114-166zM114 322c-24 0-54-14-62-54-8-28-8-68-8-104s0-74 8-102c10-38 42-48 62-48 26 0 52 16 60 44 8 26 8 62 8 106 0 36 0 72-6 102-10 46-42 56-62 56z">
              <text:p/>
            </draw:path>
            <draw:path draw:style-name="gr3" draw:text-style-name="P7" draw:layer="layout" svg:width="0.215cm" svg:height="0.444cm" svg:x="9.026cm" svg:y="7.717cm" svg:viewBox="0 0 216 445" svg:d="M130 158c22 0 44 0 66 0 14 0 20 0 20-14 0-8-6-8-18-8-21 0-41 0-62 0 24-100 28-114 28-118 0-12-8-18-20-18-2 0-22 0-28 24-9 37-19 75-28 112-22 0-44 0-66 0-14 0-22 0-22 14 0 8 6 8 20 8 21 0 41 0 62 0-50 200-52 212-52 224 0 37 26 63 64 63 72 0 112-101 112-107s-6-6-8-6c-8 0-8 2-12 10-30 71-66 87-90 87-16 0-22-8-22-31 0-16 0-22 4-34 17-69 35-138 52-206z">
              <text:p/>
            </draw:path>
            <draw:path draw:style-name="gr3" draw:text-style-name="P7" draw:layer="layout" svg:width="0.347cm" svg:height="0.494cm" svg:x="9.302cm" svg:y="7.669cm" svg:viewBox="0 0 348 495" svg:d="M214 282c28 74 62 179 74 195 10 16 18 16 36 16 5 0 11 0 16 0 6 0 8-4 8-6s-2-4-4-8c-6-6-12-18-16-32-48-132-96-265-144-397-14-42-52-50-86-50-2 0-12 0-12 8 0 4 4 4 6 6 24 4 28 8 46 56 23 64 45 128 68 192-65 64-129 128-194 191-8 8-12 12-12 22 0 12 9 20 20 20s18-8 24-16c57-66 113-131 170-197z">
              <text:p/>
            </draw:path>
            <draw:path draw:style-name="gr3" draw:text-style-name="P7" draw:layer="layout" svg:width="0.269cm" svg:height="0.317cm" svg:x="9.706cm" svg:y="7.845cm" svg:viewBox="0 0 270 318" svg:d="M100 148c20 0 72 0 108-16 48-20 52-62 52-72 0-30-26-60-76-60-78 0-184 68-184 192 0 70 42 126 112 126 100 0 158-74 158-82 0-4-4-10-8-10s-4 2-8 8c-56 68-132 68-142 68-54 0-60-58-60-80 0-8 0-30 10-74 13 0 25 0 38 0zM66 134c28-108 100-118 118-118 34 0 52 20 52 44 0 74-112 74-140 74-10 0-20 0-30 0z">
              <text:p/>
            </draw:path>
            <draw:path draw:style-name="gr3" draw:text-style-name="P7" draw:layer="layout" svg:width="0.333cm" svg:height="0.023cm" svg:x="10.054cm" svg:y="7.731cm" svg:viewBox="0 0 334 24" svg:d="M314 24c8 0 20 0 20-12s-12-12-20-12c-98 0-196 0-294 0-8 0-20 0-20 12s12 12 20 12c98 0 196 0 294 0z">
              <text:p/>
            </draw:path>
            <draw:path draw:style-name="gr3" draw:text-style-name="P7" draw:layer="layout" svg:width="0.269cm" svg:height="0.345cm" svg:x="10.478cm" svg:y="7.526cm" svg:viewBox="0 0 270 346" svg:d="M162 200c24 56 52 128 58 134 10 12 18 12 26 12 3 0 7 0 10 0 10 0 14 0 14-6 0-2-2-4-2-6-6-4-12-16-14-20-40-95-80-189-120-284-2-8-12-30-64-30-6 0-14 0-14 6s6 8 8 8c10 0 20 2 32 30 19 46 39 92 58 138-48 43-96 86-144 130-6 6-10 10-10 18 0 12 10 16 16 16 10 0 16-6 16-8 43-46 87-92 130-138z">
              <text:p/>
            </draw:path>
            <draw:path draw:style-name="gr3" draw:text-style-name="P7" draw:layer="layout" svg:width="0.165cm" svg:height="0.311cm" svg:x="10.796cm" svg:y="7.56cm" svg:viewBox="0 0 166 312" svg:d="M100 112c17 0 33 0 50 0 8 0 16 0 16-10 0-8-8-8-16-8-15 0-31 0-46 0 6-24 12-48 18-72 0-2 2-4 2-6 0-10-8-16-18-16-12 0-18 8-22 20-4 14 2-10-20 74-17 0-33 0-50 0-8 0-14 0-14 12 0 6 4 6 14 6 15 0 31 0 46 0-9 38-19 77-28 116-4 12-8 30-8 38 0 28 24 46 52 46 56 0 86-70 86-76s-6-6-8-6c-6 0-6 2-10 10-14 30-38 58-66 58-10 0-16-6-16-24 0-6 0-16 2-20 12-48 24-95 36-142z">
              <text:p/>
            </draw:path>
            <draw:path draw:style-name="gr3" draw:text-style-name="P7" draw:layer="layout" svg:width="0.333cm" svg:height="0.492cm" svg:x="11.05cm" svg:y="7.669cm" svg:viewBox="0 0 334 493" svg:d="M334 8c0-2 0-8-8-8-12 0-78 6-90 8-6 0-10 4-10 12s6 8 18 8c32 0 34 6 34 12-1 5-1 9-2 14-14 56-28 112-42 168-12-26-34-46-64-46-82 0-170 104-170 206 0 65 38 111 94 111 14 0 48-2 90-52 6 30 30 52 64 52 26 0 42-16 52-38 12-26 22-67 22-69 0-6-6-6-8-6-8 0-8 2-10 12-12 45-26 85-54 85-18 0-20-18-20-32 0-16 0-22 4-33 33-135 67-270 100-404zM188 404c-4 11-4 13-14 25-30 38-60 48-80 48-34 0-44-38-44-65 0-34 22-120 38-152 22-42 54-68 82-68 46 0 56 58 56 62s-2 8-2 12c-12 46-24 92-36 138z">
              <text:p/>
            </draw:path>
            <draw:path draw:style-name="gr3" draw:text-style-name="P7" draw:layer="layout" svg:width="0.215cm" svg:height="0.444cm" svg:x="11.403cm" svg:y="7.717cm" svg:viewBox="0 0 216 445" svg:d="M128 158c22 0 44 0 66 0 14 0 22 0 22-14 0-8-8-8-20-8-21 0-41 0-62 0 26-100 28-114 28-118 0-12-8-18-20-18-2 0-22 0-28 24-9 37-19 75-28 112-22 0-44 0-66 0-14 0-20 0-20 14 0 8 6 8 20 8 21 0 41 0 62 0-52 200-54 212-54 224 0 37 26 63 64 63 72 0 112-101 112-107s-6-6-8-6c-6 0-8 2-10 10-30 71-68 87-92 87-14 0-22-8-22-31 0-16 2-22 4-34 17-69 35-138 52-206z">
              <text:p/>
            </draw:path>
            <draw:path draw:style-name="gr3" draw:text-style-name="P7" draw:layer="layout" svg:width="0.467cm" svg:height="0.165cm" svg:x="11.875cm" svg:y="7.897cm" svg:viewBox="0 0 468 166" svg:d="M444 30c10 0 24 1 24-14s-14-16-24-16c-140 0-280 0-420 0-10 0-24 1-24 16s14 14 24 14c140 0 280 0 420 0zM444 166c10 0 24 0 24-14s-14-14-24-14c-140 0-280 0-420 0-10 0-24 0-24 14s14 14 24 14c140 0 280 0 420 0z">
              <text:p/>
            </draw:path>
            <draw:path draw:style-name="gr3" draw:text-style-name="P7" draw:layer="layout" svg:width="0.231cm" svg:height="0.466cm" svg:x="12.753cm" svg:y="7.214cm" svg:viewBox="0 0 232 467" svg:d="M144 18c0-16 0-18-16-18-44 46-104 46-128 46 0 7 0 13 0 20 14 0 56 0 92-18 0 121 0 242 0 364 0 25-2 33-64 33-8 0-16 0-24 0 0 8 0 15 0 22 26-2 86-2 114-2s90 0 114 2c0-7 0-14 0-22-7 0-15 0-22 0-64 0-66-8-66-33 0-132 0-263 0-394z">
              <text:p/>
            </draw:path>
            <draw:path draw:style-name="gr3" draw:text-style-name="P7" draw:layer="layout" svg:width="0.409cm" svg:height="0.027cm" svg:x="12.661cm" svg:y="7.967cm" svg:viewBox="0 0 410 28" svg:d="M0 0c137 0 273 0 410 0 0 9 0 19 0 28-137 0-273 0-410 0 0-9 0-19 0-28z">
              <text:p/>
            </draw:path>
            <draw:path draw:style-name="gr3" draw:text-style-name="P7" draw:layer="layout" svg:width="0.347cm" svg:height="0.496cm" svg:x="12.699cm" svg:y="8.149cm" svg:viewBox="0 0 348 497" svg:d="M214 284c28 72 62 179 74 195 10 16 18 16 36 16 5 0 11 0 16 0 8 0 8-6 8-8s-2-2-4-6c-6-8-10-18-16-32-48-133-96-266-144-399-14-40-52-50-84-50-4 0-14 0-14 8 0 6 4 5 6 8 24 4 28 8 46 56 23 63 45 126 68 190-65 64-129 129-194 193-8 8-12 12-12 20 0 12 11 22 22 22s16-8 22-16c57-66 113-131 170-197z">
              <text:p/>
            </draw:path>
            <draw:path draw:style-name="gr3" draw:text-style-name="P7" draw:layer="layout" svg:width="0.073cm" svg:height="0.073cm" svg:x="13.217cm" svg:y="8.081cm" svg:viewBox="0 0 74 74" svg:d="M74 38c0-20-17-38-38-38s-36 18-36 38 15 36 36 36 38-16 38-36z">
              <text:p/>
            </draw:path>
          </draw:g>
        </draw:g>
        <draw:frame draw:style-name="gr17" draw:text-style-name="P19" draw:layer="layout" svg:width="6.7cm" svg:height="1.3cm" svg:x="13.9cm" svg:y="7.4cm">
          <draw:text-box>
            <text:p><text:span text:style-name="T33">(Integration by parts)</text:span></text:p>
          </draw:text-box>
        </draw:frame>
        <draw:g>
          <svg:title>TexMaths</svg:title>
          <svg:desc>20§display§\mathbb{E}[X^2] = \int_0^{\infty} t^2\lambda e^{-\lambda t} dt = \frac{2}{\lambda^2}.§svg§600§TRUE§</svg:desc>
          <draw:g>
            <draw:path draw:style-name="gr3" draw:text-style-name="P7" draw:layer="layout" svg:width="0.439cm" svg:height="0.478cm" svg:x="5.173cm" svg:y="10.075cm" svg:viewBox="0 0 440 479" svg:d="M172 244c18 0 52 0 76 16 34 22 36 60 36 64 2 10 2 18 14 18s12-10 12-22c0-64 0-127 0-190 0-12 0-22-12-22s-14 10-14 16c-4 90-76 94-112 96 0-50 0-99 0-148 0-48 14-48 30-48 11 0 23 0 34 0 94 0 142 48 146 98 0 4 2 16 12 16 12 0 12-12 12-24 0-31 0-61 0-92 0-20 0-22-22-22-120 0-240 0-360 0-12 0-24 0-24 12s14 12 18 12c40 0 44 6 44 40 0 117 0 234 0 351 0 34-2 40-40 40-10 0-22 0-22 12s12 12 24 12c124 0 248 0 372 0 14 0 20 0 22-10 2 0 22-117 22-119 0-8-8-14-12-14-10 0-9 6-14 10-4 18-10 48-62 77-36 22-72 32-112 32-13 0-25 0-38 0-16 0-30 0-30-45 0-56 0-111 0-166zM382 24c0 11 0 23 0 34-12-14-26-24-40-34 13 0 27 0 40 0zM246 230c10-4 26-16 38-30 0 19 0 38 0 58-16-18-25-19-38-28zM86 62c0-8 0-26-6-38 25 0 51 0 76 0-8 16-8 40-8 46 0 113 0 226 0 340 0 25 4 39 8 45-25 0-51 0-76 0 6-12 6-30 6-38 0-118 0-237 0-355zM348 455c22-12 42-26 56-40-2 4-6 34-8 40-16 0-32 0-48 0z">
              <text:p/>
            </draw:path>
            <draw:path draw:style-name="gr3" draw:text-style-name="P7" draw:layer="layout" svg:width="0.095cm" svg:height="0.7cm" svg:x="5.715cm" svg:y="10.029cm" svg:viewBox="0 0 96 701" svg:d="M96 701c0-9 0-18 0-28-23 0-45 0-68 0 0-215 0-430 0-645 23 0 45 0 68 0 0-9 0-19 0-28-32 0-64 0-96 0 0 234 0 467 0 701 32 0 64 0 96 0z">
              <text:p/>
            </draw:path>
            <draw:path draw:style-name="gr3" draw:text-style-name="P7" draw:layer="layout" svg:width="0.579cm" svg:height="0.476cm" svg:x="5.845cm" svg:y="10.077cm" svg:viewBox="0 0 580 477" svg:d="M322 190c-19-47-39-93-58-140-2-6-3-5-4-8 0-4 12-18 42-22 6 0 14 0 14-12 0-8-8-8-10-8-30 0-60 2-90 2-18 0-60-2-78-2-4 0-12 0-12 14 0 6 6 6 16 6 42 0 46 8 52 24 27 65 55 130 82 196-49 52-99 105-148 158-3 2-5 5-8 8-34 37-68 47-104 49-8 2-16 2-16 14 0 2 0 8 10 8 20 0 44-2 66-2 26 0 54 2 78 2 4 0 14 0 14-14 0-6-8-8-10-8-6 0-28-2-28-20 0-12 12-23 20-31 24-26 48-51 72-76 21-24 41-47 62-70 24 56 48 112 72 167 2 8 3 7 4 10 0 6-14 18-42 20-8 2-14 2-14 14 0 8 8 8 10 8 20 0 70-2 90-2 18 0 60 2 78 2 4 0 12 0 12-12 0-10-6-10-12-10-46 0-48-2-60-30-28-65-74-173-90-215 46-50 120-134 144-154 20-16 46-32 88-36 10 0 16 0 16-14-3-2 0-6-10-6-20 0-44 2-66 2-26 0-52-2-78-2-4 0-12 0-12 14 0 4 2 6 8 6 6 2 28 4 28 22 0 10-8 20-14 26-38 41-76 81-114 122z">
              <text:p/>
            </draw:path>
            <draw:path draw:style-name="gr3" draw:text-style-name="P7" draw:layer="layout" svg:width="0.217cm" svg:height="0.325cm" svg:x="6.495cm" svg:y="9.94cm" svg:viewBox="0 0 218 326" svg:d="M218 238c-6 0-12 0-18 0 0 10-6 40-12 44-4 4-42 4-48 4-31 0-61 0-92 0 52-46 70-60 100-84 36-28 70-58 70-106 0-60-52-96-116-96-60 0-102 44-102 88 0 26 22 28 26 28 12 0 26-8 26-26 0-8-4-26-28-26 14-34 48-46 72-46 48 0 74 38 74 78 0 44-30 76-46 94-39 39-79 78-118 118-6 4-6 6-6 18 67 0 135 0 202 0 5-30 11-59 16-88z">
              <text:p/>
            </draw:path>
            <draw:path draw:style-name="gr3" draw:text-style-name="P7" draw:layer="layout" svg:width="0.095cm" svg:height="0.7cm" svg:x="6.795cm" svg:y="10.029cm" svg:viewBox="0 0 96 701" svg:d="M96 0c-32 0-64 0-96 0 0 9 0 19 0 28 23 0 45 0 68 0 0 215 0 430 0 645-23 0-45 0-68 0 0 10 0 19 0 28 32 0 64 0 96 0 0-234 0-467 0-701z">
              <text:p/>
            </draw:path>
            <draw:path draw:style-name="gr3" draw:text-style-name="P7" draw:layer="layout" svg:width="0.467cm" svg:height="0.165cm" svg:x="7.209cm" svg:y="10.297cm" svg:viewBox="0 0 468 166" svg:d="M444 30c10 0 24 1 24-14s-14-16-24-16c-140 0-280 0-420 0-10 0-24 1-24 16s14 14 24 14c140 0 280 0 420 0zM444 166c10 0 24 0 24-14s-14-14-24-14c-140 0-280 0-420 0-10 0-24 0-24 14s14 14 24 14c140 0 280 0 420 0z">
              <text:p/>
            </draw:path>
            <draw:path draw:style-name="gr3" draw:text-style-name="P7" draw:layer="layout" svg:width="0.623cm" svg:height="1.555cm" svg:x="7.95cm" svg:y="9.602cm" svg:viewBox="0 0 624 1556" svg:d="M34 1526c22-2 34-18 34-36 0-22-18-34-34-34s-34 12-34 36c0 36 36 64 78 64 106 0 148-164 196-365 56-222 100-446 138-672 26-149 52-289 76-379 8-34 32-126 60-126 22 0 40 14 42 16-22 2-34 18-34 36 0 22 16 34 34 34 16 0 34-10 34-36 0-38-38-64-78-64-52 0-92 76-130 218-2 8-98 359-176 819-18 108-38 223-62 321-12 52-44 184-102 184-24 0-28-11-42-16z">
              <text:p/>
            </draw:path>
            <draw:path draw:style-name="gr3" draw:text-style-name="P7" draw:layer="layout" svg:width="0.483cm" svg:height="0.221cm" svg:x="8.652cm" svg:y="9.558cm" svg:viewBox="0 0 484 222" svg:d="M246 82c-26-30-34-38-52-52-30-22-62-30-90-30-60 0-104 52-104 112 0 56 42 110 104 110 68 0 116-56 134-82 26 30 34 38 52 52 30 22 62 30 88 30 62 0 106-52 106-112 0-56-42-110-104-110-68 0-116 56-134 82zM262 100c20-32 62-82 122-82 50 0 86 45 86 92s-38 84-84 84-78-36-124-94zM222 122c-20 32-64 80-124 80-50 0-84-43-84-90s38-84 82-84c46 0 78 36 126 94z">
              <text:p/>
            </draw:path>
            <draw:path draw:style-name="gr3" draw:text-style-name="P7" draw:layer="layout" svg:width="0.229cm" svg:height="0.335cm" svg:x="8.326cm" svg:y="10.868cm" svg:viewBox="0 0 230 336" svg:d="M230 170c0-54-8-94-30-128-16-22-46-42-86-42-114 0-114 135-114 170s-1 166 114 166 116-132 116-166zM114 322c-22 0-52-14-62-54-6-28-6-68-6-104s0-74 6-102c12-38 42-48 62-48 28 0 54 16 62 44 8 26 8 62 8 106 0 36 0 72-6 102-10 46-44 56-64 56z">
              <text:p/>
            </draw:path>
            <draw:path draw:style-name="gr3" draw:text-style-name="P7" draw:layer="layout" svg:width="0.215cm" svg:height="0.444cm" svg:x="9.342cm" svg:y="10.117cm" svg:viewBox="0 0 216 445" svg:d="M128 158c22 0 44 0 66 0 16 0 22 0 22-14 0-8-6-8-20-8-21 0-41 0-62 0 26-100 30-114 30-118 0-12-10-18-22-18-2 0-20 0-28 24-9 37-17 75-26 112-22 0-44 0-66 0-14 0-22 0-22 14 0 8 6 8 20 8 21 0 41 0 62 0-50 200-54 212-54 224 0 37 28 63 66 63 70 0 110-101 110-107s-4-6-8-6c-6 0-6 2-10 10-30 71-68 87-92 87-14 0-22-8-22-31 0-16 2-22 4-34 17-69 35-138 52-206z">
              <text:p/>
            </draw:path>
            <draw:path draw:style-name="gr3" draw:text-style-name="P7" draw:layer="layout" svg:width="0.217cm" svg:height="0.325cm" svg:x="9.61cm" svg:y="9.94cm" svg:viewBox="0 0 218 326" svg:d="M218 238c-5 0-11 0-16 0-2 10-6 40-14 44-4 4-40 4-48 4-30 0-60 0-90 0 52-46 68-60 98-84 36-28 70-58 70-106 0-60-52-96-114-96s-104 44-104 88c0 26 22 28 26 28 12 0 28-8 28-26 0-8-4-26-30-26 16-34 48-46 72-46 50 0 74 38 74 78 0 44-30 76-46 94-39 39-79 78-118 118-6 4-6 6-6 18 68 0 136 0 204 0 5-30 9-59 14-88z">
              <text:p/>
            </draw:path>
            <draw:path draw:style-name="gr3" draw:text-style-name="P7" draw:layer="layout" svg:width="0.347cm" svg:height="0.494cm" svg:x="9.932cm" svg:y="10.069cm" svg:viewBox="0 0 348 495" svg:d="M214 282c28 74 62 179 74 195s18 16 38 16c5 0 9 0 14 0 8 0 8-4 8-6s-2-4-4-8c-6-6-10-18-16-32-47-132-95-265-142-397-16-42-54-50-86-50-4 0-14 0-14 8 0 4 6 6 8 6 22 4 28 8 44 56 23 64 47 128 70 192-65 64-129 128-194 191-10 8-14 12-14 22 0 12 11 20 22 20s18-8 22-16c57-66 113-131 170-197z">
              <text:p/>
            </draw:path>
            <draw:path draw:style-name="gr3" draw:text-style-name="P7" draw:layer="layout" svg:width="0.269cm" svg:height="0.317cm" svg:x="10.338cm" svg:y="10.245cm" svg:viewBox="0 0 270 318" svg:d="M98 148c20 0 72 0 108-16 50-20 52-62 52-72 0-30-26-60-74-60-78 0-184 68-184 192 0 70 40 126 110 126 100 0 160-74 160-82 0-4-4-10-10-10-2 0-4 2-8 8-56 68-132 68-140 68-56 0-62-58-62-80 0-8 0-30 12-74 12 0 24 0 36 0zM66 134c26-108 100-118 118-118 32 0 52 20 52 44 0 74-112 74-142 74-9 0-19 0-28 0z">
              <text:p/>
            </draw:path>
            <draw:path draw:style-name="gr3" draw:text-style-name="P7" draw:layer="layout" svg:width="0.331cm" svg:height="0.023cm" svg:x="10.686cm" svg:y="10.131cm" svg:viewBox="0 0 332 24" svg:d="M312 24c8 0 20 0 20-12s-12-12-20-12c-97 0-195 0-292 0-8 0-20 0-20 12s10 12 20 12c97 0 195 0 292 0z">
              <text:p/>
            </draw:path>
            <draw:path draw:style-name="gr3" draw:text-style-name="P7" draw:layer="layout" svg:width="0.269cm" svg:height="0.345cm" svg:x="11.108cm" svg:y="9.926cm" svg:viewBox="0 0 270 346" svg:d="M162 200c26 56 54 128 58 134 10 12 18 12 26 12 3 0 7 0 10 0 10 0 14 0 14-6 0-2 0-4-2-6-6-4-10-16-12-20-40-95-80-189-120-284-4-8-14-30-66-30-6 0-12 0-12 6s4 8 6 8c10 0 20 2 32 30 20 46 40 92 60 138-49 43-97 86-146 130-6 6-10 10-10 18 0 12 10 16 16 16 10 0 16-6 18-8 43-46 85-92 128-138z">
              <text:p/>
            </draw:path>
            <draw:path draw:style-name="gr3" draw:text-style-name="P7" draw:layer="layout" svg:width="0.165cm" svg:height="0.311cm" svg:x="11.426cm" svg:y="9.96cm" svg:viewBox="0 0 166 312" svg:d="M100 112c17 0 33 0 50 0 10 0 16 0 16-10 0-8-6-8-14-8-16 0-32 0-48 0 6-24 12-48 18-72 2-2 2-4 2-6 0-10-6-16-16-16-12 0-20 8-24 20-4 14 4-10-18 74-17 0-33 0-50 0-10 0-16 0-16 12 0 6 6 6 14 6 16 0 32 0 48 0-10 38-20 77-30 116-2 12-8 30-8 38 0 28 26 46 54 46 54 0 86-70 86-76s-5-4-8-6c-6 0-8 2-12 10-12 30-38 58-66 58-10 0-16-6-16-24 0-6 2-16 2-20 12-48 24-95 36-142z">
              <text:p/>
            </draw:path>
            <draw:path draw:style-name="gr3" draw:text-style-name="P7" draw:layer="layout" svg:width="0.335cm" svg:height="0.492cm" svg:x="11.68cm" svg:y="10.069cm" svg:viewBox="0 0 336 493" svg:d="M336 8c0-2 0-8-10-8s-78 6-90 8c-4 0-10 4-10 12s8 8 18 8c34 0 34 6 34 12-1 5-1 9-2 14-14 56-28 112-42 168-12-26-32-46-64-46-82 0-170 104-170 206 0 65 40 111 94 111 14 0 50-2 92-52 6 30 30 52 64 52 24 0 40-16 52-38 12-26 20-67 20-69 0-6-6-6-8-6-6 0-8 2-10 12-12 45-24 85-54 85-18 0-20-18-20-32 0-16 2-22 4-33 34-135 68-270 102-404zM188 404c-2 11-2 13-14 25-30 38-58 48-78 48-36 0-46-38-46-65 0-34 22-120 40-152 20-42 52-68 80-68 46 0 56 58 56 62s-2 8-2 12c-12 46-24 92-36 138z">
              <text:p/>
            </draw:path>
            <draw:path draw:style-name="gr3" draw:text-style-name="P7" draw:layer="layout" svg:width="0.215cm" svg:height="0.444cm" svg:x="12.033cm" svg:y="10.117cm" svg:viewBox="0 0 216 445" svg:d="M130 158c22 0 44 0 66 0 14 0 20 0 20-14 0-8-6-8-20-8-21 0-41 0-62 0 26-100 30-114 30-118 0-12-8-18-20-18-4 0-22 0-30 24-9 37-17 75-26 112-22 0-44 0-66 0-14 0-22 0-22 14 0 8 6 8 20 8 21 0 41 0 62 0-50 200-54 212-54 224 0 37 28 63 66 63 70 0 110-101 110-107s-4-6-8-6c-6 0-6 2-10 10-30 71-68 87-92 87-14 0-22-8-22-31 0-16 2-22 6-34 17-69 35-138 52-206z">
              <text:p/>
            </draw:path>
            <draw:path draw:style-name="gr3" draw:text-style-name="P7" draw:layer="layout" svg:width="0.467cm" svg:height="0.165cm" svg:x="12.505cm" svg:y="10.297cm" svg:viewBox="0 0 468 166" svg:d="M444 30c10 0 24 1 24-14s-14-16-24-16c-140 0-280 0-420 0-10 0-24 1-24 16s14 14 24 14c140 0 280 0 420 0zM444 166c10 0 24 0 24-14s-14-14-24-14c-140 0-280 0-420 0-10 0-24 0-24 14s14 14 24 14c140 0 280 0 420 0z">
              <text:p/>
            </draw:path>
            <draw:path draw:style-name="gr3" draw:text-style-name="P7" draw:layer="layout" svg:width="0.279cm" svg:height="0.466cm" svg:x="13.515cm" svg:y="9.614cm" svg:viewBox="0 0 280 467" svg:d="M54 413c25-23 49-47 74-71 110-98 152-136 152-206 0-80-64-136-150-136-78 0-130 64-130 128 0 38 34 38 36 38 12 0 38-8 38-36 0-18-14-38-38-38-6 0-6 0-10 2 18-46 56-72 96-72 64 0 94 56 94 114 0 56-36 112-74 156-45 50-89 100-134 149-8 8-8 8-8 26 87 0 173 0 260 0 7-40 13-81 20-121-6 0-12 0-18 0-4 20-8 52-16 62-4 5-50 5-66 5-42 0-84 0-126 0z">
              <text:p/>
            </draw:path>
            <draw:path draw:style-name="gr3" draw:text-style-name="P7" draw:layer="layout" svg:width="0.723cm" svg:height="0.027cm" svg:x="13.293cm" svg:y="10.367cm" svg:viewBox="0 0 724 28" svg:d="M0 0c241 0 483 0 724 0 0 9 0 19 0 28-241 0-483 0-724 0 0-9 0-19 0-28z">
              <text:p/>
            </draw:path>
            <draw:path draw:style-name="gr3" draw:text-style-name="P7" draw:layer="layout" svg:width="0.347cm" svg:height="0.496cm" svg:x="13.329cm" svg:y="10.549cm" svg:viewBox="0 0 348 497" svg:d="M214 284c30 72 62 179 74 195s18 16 38 16c5 0 9 0 14 0 8 0 8-6 8-8s0-2-2-6c-8-8-12-18-18-32-47-133-95-266-142-399-16-40-54-50-86-50-4 0-12 0-12 8 0 6 4 8 6 8 22 4 28 8 46 56 23 63 45 126 68 190-65 64-129 129-194 193-10 8-14 12-14 20 0 12 10 22 22 22s18-8 22-16c57-66 113-131 170-197z">
              <text:p/>
            </draw:path>
            <draw:path draw:style-name="gr3" draw:text-style-name="P7" draw:layer="layout" svg:width="0.217cm" svg:height="0.325cm" svg:x="13.733cm" svg:y="10.509cm" svg:viewBox="0 0 218 326" svg:d="M218 236c-5 0-11 0-16 0-2 10-8 40-14 44-4 4-42 4-48 4-30 0-60 0-90 0 50-46 68-60 98-82 36-30 70-60 70-108 0-58-52-94-116-94-60 0-102 42-102 88 0 24 22 26 26 26 12 0 26-8 26-26 0-8-2-26-28-26 14-34 48-46 72-46 48 0 74 40 74 78 0 44-30 78-46 96-39 38-79 77-118 116-6 4-6 6-6 20 68 0 136 0 204 0 5-30 9-60 14-90z">
              <text:p/>
            </draw:path>
            <draw:path draw:style-name="gr3" draw:text-style-name="P7" draw:layer="layout" svg:width="0.073cm" svg:height="0.073cm" svg:x="14.163cm" svg:y="10.481cm" svg:viewBox="0 0 74 74" svg:d="M74 38c0-20-17-38-38-38s-36 18-36 38 15 36 36 36 38-16 38-36z">
              <text:p/>
            </draw:path>
          </draw:g>
        </draw:g>
        <draw:g>
          <svg:title>TexMaths</svg:title>
          <svg:desc>20§display§\mathbf{Var}[X] = \mathbb{E}[X^2] - (\mathbb{E}[X])^2 = \frac{1}{\lambda^2}.§svg§600§TRUE§</svg:desc>
          <draw:g>
            <draw:path draw:style-name="gr3" draw:text-style-name="P7" draw:layer="layout" svg:width="0.573cm" svg:height="0.485cm" svg:x="5.189cm" svg:y="12.5cm" svg:viewBox="0 0 574 486" svg:d="M502 48c4-10 8-16 58-16 5 0 9 0 14 0 0-11 0-21 0-32-26 0-60 2-80 2-28 0-64 0-92-2 0 11 0 21 0 32 8 0 62 0 62 8 0 4-2 8-2 10-47 106-95 212-142 318-50-112-100-224-150-336 22 0 44 0 66 0 0-11 0-21 0-32-26 2-94 2-124 2-28 0-86 0-112-2 0 11 0 21 0 32 22 0 44 0 66 0 65 145 129 291 194 436 4 12 8 18 28 18 10 0 20 0 28-16 62-141 124-281 186-422z">
              <text:p/>
            </draw:path>
            <draw:path draw:style-name="gr3" draw:text-style-name="P7" draw:layer="layout" svg:width="0.369cm" svg:height="0.323cm" svg:x="5.737cm" svg:y="12.662cm" svg:viewBox="0 0 370 324" svg:d="M240 264c0 22 0 54 74 54 11 0 23 0 34 0 14 0 22 0 22-16s-8-16-18-16c-42 0-42-10-42-26 0-51 0-101 0-152 0-62-50-108-156-108-40 0-126 4-126 66 0 30 26 44 44 44 22 0 44-16 44-44 0-22-12-34-14-34 18-6 42-6 50-6 52 0 78 30 78 82 0 8 0 16 0 24-50 2-230 10-230 112 0 66 88 80 136 80 56 0 90-30 104-60zM230 154c0 23 0 45 0 68 0 66-66 76-84 76-36 0-64-24-64-56 0-76 112-86 148-88z">
              <text:p/>
            </draw:path>
            <draw:path draw:style-name="gr3" draw:text-style-name="P7" draw:layer="layout" svg:width="0.283cm" svg:height="0.315cm" svg:x="6.135cm" svg:y="12.664cm" svg:viewBox="0 0 284 316" svg:d="M116 80c0-27 0-53 0-80-39 2-77 4-116 6 0 11 0 23 0 34 42 0 48 0 48 26 0 73 0 145 0 218-16 0-32 0-48 0 0 11 0 21 0 32 24 0 56-2 88-2 26 0 72 0 96 2 0-11 0-21 0-32-20 0-40 0-60 0 0-41 0-81 0-122 0-50 16-136 88-136-2 0-14 12-14 32 0 30 21 44 42 44s44-16 44-44c0-36-38-58-74-58-50 0-78 36-94 80z">
              <text:p/>
            </draw:path>
            <draw:path draw:style-name="gr3" draw:text-style-name="P7" draw:layer="layout" svg:width="0.097cm" svg:height="0.701cm" svg:x="6.523cm" svg:y="12.454cm" svg:viewBox="0 0 98 702" svg:d="M98 702c0-9 0-19 0-28-23 0-47 0-70 0 0-215 0-431 0-646 23 0 47 0 70 0 0-9 0-19 0-28-33 0-65 0-98 0 0 234 0 468 0 702 33 0 65 0 98 0z">
              <text:p/>
            </draw:path>
            <draw:path draw:style-name="gr3" draw:text-style-name="P7" draw:layer="layout" svg:width="0.579cm" svg:height="0.477cm" svg:x="6.655cm" svg:y="12.502cm" svg:viewBox="0 0 580 478" svg:d="M322 190c-20-47-40-93-60-140-2-4-1-5-2-8 0-4 12-18 40-20 8-2 14-2 14-14 0-8-8-8-10-8-28 0-58 2-88 2-18 0-62-2-78-2-6 0-14 0-14 14 0 8 8 8 16 8 42 0 48 6 54 22 27 65 55 131 82 196-49 53-99 105-148 158-3 3-7 5-10 8-34 38-66 50-102 52-10 0-16 0-16 14 3 2 0 6 10 6 20 0 44-2 66-2 26 0 52 2 78 2 4 0 12 0 12-14 0-6-6-6-8-6-6-2-28-2-28-22 0-12 10-24 20-32 23-25 47-51 70-76 21-23 43-45 64-68 23 55 47 111 70 166 4 8 3 7 4 10 0 6-12 18-40 22-8 0-14 0-14 12 0 8 8 8 10 8 20 0 70-2 88-2s62 2 78 2c6 0 14 0 14-12 0-8-6-8-12-8-48-2-50-4-60-32-28-66-76-174-92-216 48-50 122-134 144-154 20-16 48-32 90-34 8-2 16-2 16-14 0-2 0-8-10-8-22 0-44 2-66 2-26 0-52-2-78-2-4 0-14 0-14 14 0 4 4 6 10 8 6 0 28 2 28 20 0 10-8 20-14 26-38 41-76 81-114 122z">
              <text:p/>
            </draw:path>
            <draw:path draw:style-name="gr3" draw:text-style-name="P7" draw:layer="layout" svg:width="0.095cm" svg:height="0.701cm" svg:x="7.289cm" svg:y="12.454cm" svg:viewBox="0 0 96 702" svg:d="M96 0c-32 0-64 0-96 0 0 9 0 19 0 28 23 0 45 0 68 0 0 215 0 431 0 646-23 0-45 0-68 0 0 9 0 19 0 28 32 0 64 0 96 0 0-234 0-468 0-702z">
              <text:p/>
            </draw:path>
            <draw:path draw:style-name="gr3" draw:text-style-name="P7" draw:layer="layout" svg:width="0.467cm" svg:height="0.163cm" svg:x="7.703cm" svg:y="12.724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439cm" svg:height="0.479cm" svg:x="8.415cm" svg:y="12.5cm" svg:viewBox="0 0 440 480" svg:d="M172 246c18 0 52 0 76 14 34 22 38 60 38 64 0 10 0 18 12 18s12-10 12-22c0-63 0-127 0-190 0-12 0-22-12-22s-12 10-12 16c-4 90-76 96-114 96 0-49 0-99 0-148 0-48 14-48 30-48 11 0 23 0 34 0 96 0 142 50 146 98 2 6 2 16 14 16s12-12 12-24c0-30 0-60 0-90 0-22-2-24-24-24-120 0-240 0-360 0-12 0-24 0-24 12s14 12 20 12c40 0 42 6 42 40 0 117 0 235 0 352 0 34-2 40-38 40-12 0-24 0-24 12s12 12 24 12c124 0 248 0 372 0 14 0 22 0 24-8 0-2 20-118 20-122 0-8-6-14-12-14-10 0-8 7-12 10-4 20-12 48-64 78-36 22-72 32-110 32-13 0-27 0-40 0-16 0-30 0-30-46 0-55 0-109 0-164zM382 24c0 11 0 23 0 34-12-14-24-24-40-34 13 0 27 0 40 0zM246 230c12-4 26-16 40-30 0 20 0 40 0 60-18-20-27-20-40-30zM88 64c0-10 0-26-6-40 25 0 49 0 74 0-8 16-8 40-8 46 0 113 0 227 0 340 0 26 6 40 8 46-25 0-49 0-74 0 6-12 6-30 6-38 0-118 0-236 0-354zM348 456c22-12 42-26 56-38 0 2-6 32-6 38-17 0-33 0-50 0z">
              <text:p/>
            </draw:path>
            <draw:path draw:style-name="gr3" draw:text-style-name="P7" draw:layer="layout" svg:width="0.095cm" svg:height="0.701cm" svg:x="8.957cm" svg:y="12.454cm" svg:viewBox="0 0 96 702" svg:d="M96 702c0-9 0-19 0-28-23 0-45 0-68 0 0-215 0-431 0-646 23 0 45 0 68 0 0-9 0-19 0-28-32 0-64 0-96 0 0 234 0 468 0 702 32 0 64 0 96 0z">
              <text:p/>
            </draw:path>
            <draw:path draw:style-name="gr3" draw:text-style-name="P7" draw:layer="layout" svg:width="0.577cm" svg:height="0.477cm" svg:x="9.089cm" svg:y="12.502cm" svg:viewBox="0 0 578 478" svg:d="M322 190c-20-47-40-93-60-140-2-4-3-5-4-8 0-4 12-18 42-20 8-2 14-2 14-14 0-8-8-8-10-8-30 0-60 2-88 2-18 0-62-2-80-2-4 0-12 0-12 14 0 8 6 8 16 8 42 0 46 6 52 22 28 65 56 131 84 196-49 53-99 105-148 158-3 3-7 5-10 8-34 38-68 50-104 52-8 0-14 0-14 14 3 2 0 6 8 6 22 0 44-2 66-2 26 0 54 2 80 2 4 0 12 0 12-14 0-6-6-6-8-6-6-2-28-2-28-22 0-12 10-24 18-32 24-25 48-51 72-76 21-23 43-45 64-68 23 55 47 111 70 166 4 8 3 7 4 10 0 6-14 18-40 22-8 0-14 0-14 12 0 8 6 8 10 8 20 0 68-2 88-2 18 0 60 2 78 2 6 0 14 0 14-12 0-8-8-8-14-8-46-2-48-4-60-32-26-66-74-174-90-216 48-50 122-134 144-154 20-16 46-32 90-34 8-2 14-2 14-14 0-2 0-8-8-8-22 0-44 2-66 2-26 0-54-2-78-2-4 0-14 0-14 14 0 4 4 6 8 8 6 0 28 2 28 20 0 10-8 20-12 26-38 41-76 81-114 122z">
              <text:p/>
            </draw:path>
            <draw:path draw:style-name="gr3" draw:text-style-name="P7" draw:layer="layout" svg:width="0.217cm" svg:height="0.327cm" svg:x="9.737cm" svg:y="12.364cm" svg:viewBox="0 0 218 328" svg:d="M218 238c-5 0-11 0-16 0-2 10-6 40-14 44-4 4-40 4-48 4-30 0-60 0-90 0 52-46 68-60 98-84 36-28 70-58 70-106 0-58-52-96-114-96s-104 44-104 88c0 26 22 28 26 28 12 0 28-8 28-26 0-8-4-26-30-26 16-34 48-46 72-46 50 0 74 38 74 78 0 44-30 78-46 94-39 39-79 79-118 118-6 4-6 6-6 20 68 0 136 0 204 0 5-30 9-60 14-90z">
              <text:p/>
            </draw:path>
            <draw:path draw:style-name="gr3" draw:text-style-name="P7" draw:layer="layout" svg:width="0.095cm" svg:height="0.701cm" svg:x="10.037cm" svg:y="12.454cm" svg:viewBox="0 0 96 702" svg:d="M96 0c-32 0-64 0-96 0 0 9 0 19 0 28 23 0 45 0 68 0 0 215 0 431 0 646-23 0-45 0-68 0 0 9 0 19 0 28 32 0 64 0 96 0 0-234 0-468 0-702z">
              <text:p/>
            </draw:path>
            <draw:path draw:style-name="gr3" draw:text-style-name="P7" draw:layer="layout" svg:width="0.429cm" svg:height="0.027cm" svg:x="10.431cm" svg:y="12.792cm" svg:viewBox="0 0 430 28" svg:d="M406 28c12 0 24 0 24-14s-12-14-24-14c-127 0-253 0-380 0-12 0-26 0-26 14s14 14 26 14c127 0 253 0 380 0z">
              <text:p/>
            </draw:path>
            <draw:path draw:style-name="gr3" draw:text-style-name="P7" draw:layer="layout" svg:width="0.163cm" svg:height="0.701cm" svg:x="11.145cm" svg:y="12.454cm" svg:viewBox="0 0 164 702" svg:d="M164 696c0-2 0-4-12-16-88-88-110-222-110-328 0-122 26-244 112-332 10-10 10-10 10-12 0-6-2-8-8-8s-70 48-110 138c-36 76-46 154-46 214 0 54 8 140 48 218 42 86 102 132 108 132s8-2 8-6z">
              <text:p/>
            </draw:path>
            <draw:path draw:style-name="gr3" draw:text-style-name="P7" draw:layer="layout" svg:width="0.439cm" svg:height="0.479cm" svg:x="11.359cm" svg:y="12.5cm" svg:viewBox="0 0 440 480" svg:d="M172 246c18 0 52 0 76 14 34 22 38 60 38 64 0 10 0 18 12 18s12-10 12-22c0-63 0-127 0-190 0-12 0-22-12-22s-12 10-12 16c-6 90-76 96-114 96 0-49 0-99 0-148 0-48 14-48 30-48 11 0 23 0 34 0 96 0 142 50 146 98 2 6 2 16 14 16s12-12 12-24c0-30 0-60 0-90 0-22-2-24-24-24-120 0-240 0-360 0-12 0-24 0-24 12s14 12 20 12c40 0 42 6 42 40 0 117 0 235 0 352 0 34-2 40-38 40-12 0-24 0-24 12s12 12 24 12c124 0 248 0 372 0 14 0 22 0 24-8 0-2 20-118 20-122 0-8-6-14-12-14-10 0-8 7-12 10-6 20-12 48-64 78-36 22-72 32-110 32-13 0-27 0-40 0-16 0-30 0-30-46 0-55 0-109 0-164zM382 24c0 11 0 23 0 34-12-14-24-24-40-34 13 0 27 0 40 0zM246 230c12-4 26-16 40-30 0 20 0 40 0 60-18-20-27-20-40-30zM86 64c0-10 0-26-4-40 25 0 49 0 74 0-8 16-8 40-8 46 0 113 0 227 0 340 0 26 6 40 8 46-25 0-49 0-74 0 4-12 4-30 4-38 0-118 0-236 0-354zM348 456c22-12 42-26 56-38 0 2-6 32-6 38-17 0-33 0-50 0z">
              <text:p/>
            </draw:path>
            <draw:path draw:style-name="gr3" draw:text-style-name="P7" draw:layer="layout" svg:width="0.095cm" svg:height="0.701cm" svg:x="11.901cm" svg:y="12.454cm" svg:viewBox="0 0 96 702" svg:d="M96 702c0-9 0-19 0-28-23 0-45 0-68 0 0-215 0-431 0-646 23 0 45 0 68 0 0-9 0-19 0-28-32 0-64 0-96 0 0 234 0 468 0 702 32 0 64 0 96 0z">
              <text:p/>
            </draw:path>
            <draw:path draw:style-name="gr3" draw:text-style-name="P7" draw:layer="layout" svg:width="0.577cm" svg:height="0.477cm" svg:x="12.033cm" svg:y="12.502cm" svg:viewBox="0 0 578 478" svg:d="M322 190c-20-47-40-93-60-140-2-4-3-5-4-8 0-4 12-18 42-20 8-2 14-2 14-14 0-8-8-8-10-8-30 0-60 2-88 2-18 0-62-2-80-2-4 0-12 0-12 14 0 8 6 8 16 8 42 0 46 6 52 22 28 65 56 131 84 196-49 53-99 105-148 158-3 3-7 5-10 8-34 38-68 50-104 52-8 0-14 0-14 14 3 2 0 6 8 6 22 0 44-2 66-2 26 0 54 2 80 2 4 0 12 0 12-14 0-6-5-4-8-6-6-2-28-2-28-22 0-12 10-24 18-32 24-25 48-51 72-76 21-23 43-45 64-68 23 55 47 111 70 166 4 8 3 7 4 10 0 6-14 18-40 22-8 0-14 0-14 12 0 8 6 8 10 8 20 0 68-2 88-2 18 0 60 2 78 2 6 0 14 0 14-12 0-8-8-8-14-8-46-2-48-4-60-32-28-66-74-174-90-216 48-50 122-134 144-154 20-16 46-32 90-34 8-2 14-2 14-14 0-2 0-8-8-8-22 0-44 2-66 2-26 0-54-2-78-2-4 0-14 0-14 14 0 4 4 6 8 8 6 0 28 2 28 20 0 10-8 20-12 26-38 41-76 81-114 122z">
              <text:p/>
            </draw:path>
            <draw:path draw:style-name="gr3" draw:text-style-name="P7" draw:layer="layout" svg:width="0.095cm" svg:height="0.701cm" svg:x="12.667cm" svg:y="12.454cm" svg:viewBox="0 0 96 702" svg:d="M96 0c-32 0-64 0-96 0 0 9 0 19 0 28 23 0 45 0 68 0 0 215 0 431 0 646-23 0-45 0-68 0 0 9 0 19 0 28 32 0 64 0 96 0 0-234 0-468 0-702z">
              <text:p/>
            </draw:path>
            <draw:path draw:style-name="gr3" draw:text-style-name="P7" draw:layer="layout" svg:width="0.161cm" svg:height="0.701cm" svg:x="12.887cm" svg:y="12.454cm" svg:viewBox="0 0 162 702" svg:d="M162 352c0-56-8-140-46-220-42-86-102-132-110-132-4 0-6 4-6 8 0 2 0 2 12 16 70 70 110 180 110 328 0 120-26 242-114 332-8 8-8 10-8 12 0 4 2 6 6 6 8 0 70-48 112-136 36-78 44-156 44-214z">
              <text:p/>
            </draw:path>
            <draw:path draw:style-name="gr3" draw:text-style-name="P7" draw:layer="layout" svg:width="0.215cm" svg:height="0.327cm" svg:x="13.151cm" svg:y="12.364cm" svg:viewBox="0 0 216 328" svg:d="M216 238c-5 0-11 0-16 0-2 10-6 40-12 44-4 4-42 4-50 4-30 0-60 0-90 0 52-46 68-60 98-84 36-28 70-58 70-106 0-58-52-96-114-96s-102 44-102 88c0 26 20 28 26 28 12 0 26-8 26-26 0-8-4-26-30-26 16-34 50-46 72-46 50 0 76 38 76 78 0 44-32 78-48 94-39 39-79 79-118 118-4 4-4 6-4 20 67 0 135 0 202 0 5-30 9-60 14-90z">
              <text:p/>
            </draw:path>
            <draw:path draw:style-name="gr3" draw:text-style-name="P7" draw:layer="layout" svg:width="0.467cm" svg:height="0.163cm" svg:x="13.669cm" svg:y="12.724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231cm" svg:height="0.467cm" svg:x="14.705cm" svg:y="12.038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3" draw:text-style-name="P7" draw:layer="layout" svg:width="0.723cm" svg:height="0.027cm" svg:x="14.457cm" svg:y="12.792cm" svg:viewBox="0 0 724 28" svg:d="M362 28c-121 0-241 0-362 0 0-9 0-19 0-28 241 0 483 0 724 0 0 9 0 19 0 28-121 0-241 0-362 0z">
              <text:p/>
            </draw:path>
            <draw:path draw:style-name="gr3" draw:text-style-name="P7" draw:layer="layout" svg:width="0.347cm" svg:height="0.495cm" svg:x="14.493cm" svg:y="12.976cm" svg:viewBox="0 0 348 496" svg:d="M214 282c28 74 62 180 74 196 10 16 18 16 36 16 5 0 11 0 16 0 8 0 8-4 8-6s-2-4-4-8c-6-6-10-18-16-32-47-133-95-265-142-398-16-42-54-50-86-50-4 0-14 0-14 6s6 8 8 8c22 4 28 8 44 56 23 64 45 128 68 192-65 64-129 128-194 192-8 8-12 12-12 22 0 12 11 20 22 20s16-8 22-16c57-66 113-132 170-198z">
              <text:p/>
            </draw:path>
            <draw:path draw:style-name="gr3" draw:text-style-name="P7" draw:layer="layout" svg:width="0.217cm" svg:height="0.325cm" svg:x="14.897cm" svg:y="12.934cm" svg:viewBox="0 0 218 326" svg:d="M218 236c-6 0-12 0-18 0 0 12-6 40-12 44-4 4-42 4-48 4-31 0-61 0-92 0 52-46 70-60 100-82 36-30 70-60 70-106 0-60-52-96-116-96-60 0-102 42-102 88 0 24 22 26 26 26 12 0 26-8 26-26 0-8-4-26-28-26 14-34 48-44 70-44 50 0 76 38 76 78 0 42-30 76-46 94-40 39-80 77-120 116-4 4-4 6-4 20 67 0 135 0 202 0 5-30 11-60 16-90z">
              <text:p/>
            </draw:path>
            <draw:path draw:style-name="gr3" draw:text-style-name="P7" draw:layer="layout" svg:width="0.073cm" svg:height="0.073cm" svg:x="15.327cm" svg:y="12.906cm" svg:viewBox="0 0 74 74" svg:d="M74 38c0-20-18-38-38-38s-36 18-36 38 16 36 36 36 38-16 38-36z">
              <text:p/>
            </draw:path>
          </draw:g>
        </draw:g>
        <draw:g>
          <svg:title>TexMaths</svg:title>
          <svg:desc>24§display§\textbf{Note:}\;\; \Pr[X &gt; t] = 1 - F(t) = e^{-\lambda t}.§svg§600§FALSE§</svg:desc>
          <draw:g>
            <draw:path draw:style-name="gr6" draw:text-style-name="P12" draw:layer="layout" svg:width="13.523cm" svg:height="0.88cm" svg:x="2.705cm" svg:y="4.443cm" svg:viewBox="0 0 13524 881" svg:d="M0 0c4508 0 9016 0 13524 0 0 294 0 587 0 881-4508 0-9016 0-13524 0 0-294 0-587 0-881z">
              <text:p/>
            </draw:path>
            <draw:path draw:style-name="gr3" draw:text-style-name="P7" draw:layer="layout" svg:width="0.69cm" svg:height="0.575cm" svg:x="2.695cm" svg:y="4.58cm" svg:viewBox="0 0 691 576" svg:d="M221 10c-10-10-10-10-29-10-64 0-128 0-192 0 0 13 0 26 0 38 30 0 61 0 91 0 0 159 0 317 0 475 0 17-2 20-26 22-19 2-22 2-46 2-6 0-13 0-19 0 0 13 0 26 0 39 31-3 79-3 113-3 36 0 79 0 113 3 0-13 0-26 0-39-8 0-15 0-22 0-14 0-29-2-43-2-24-2-27-5-27-22 0-147 0-294 0-441 140 165 280 330 420 494 10 10 10 10 24 10 22 0 22-7 22-27 0-162 0-324 0-487 0-16 2-19 24-21 22-3 24-3 46-3 7 0 14 0 21 0 0-12 0-25 0-38-31 2-79 2-113 2-36 0-79 0-112-2 0 13 0 26 0 38 6 0 12 0 19 0 17 0 31 0 45 3 24 2 27 5 27 21 0 114 0 228 0 341-112-131-224-262-336-393z">
              <text:p/>
            </draw:path>
            <draw:path draw:style-name="gr3" draw:text-style-name="P7" draw:layer="layout" svg:width="0.431cm" svg:height="0.385cm" svg:x="3.446cm" svg:y="4.774cm" svg:viewBox="0 0 432 386" svg:d="M432 199c0-113-79-199-216-199-139 0-216 86-216 199 0 103 74 187 216 187s216-84 216-187zM216 353c-108 0-108-91-108-163 0-39 0-82 14-111 17-31 53-48 94-48 36 0 72 15 89 43 19 29 19 75 19 116 0 72 0 163-108 163z">
              <text:p/>
            </draw:path>
            <draw:path draw:style-name="gr3" draw:text-style-name="P7" draw:layer="layout" svg:width="0.304cm" svg:height="0.536cm" svg:x="3.924cm" svg:y="4.623cm" svg:viewBox="0 0 305 537" svg:d="M67 199c0 77 0 154 0 231 0 91 75 107 135 107 64 0 103-48 103-107 0-16 0-31 0-46-14 0-27 0-41 0 0 14 0 29 0 43 0 58-26 77-50 77-48 0-48-53-48-72 0-78 0-155 0-233 40 0 81 0 122 0 0-13 0-25 0-38-41 0-82 0-122 0 0-54 0-107 0-161-14 0-28 0-41 0 0 84-43 166-125 168 0 10 0 21 0 31 22 0 45 0 67 0z">
              <text:p/>
            </draw:path>
            <draw:path draw:style-name="gr3" draw:text-style-name="P7" draw:layer="layout" svg:width="0.388cm" svg:height="0.385cm" svg:x="4.31cm" svg:y="4.774cm" svg:viewBox="0 0 389 386" svg:d="M362 199c20 0 27 0 27-24 0-26-5-86-48-129-31-29-75-46-135-46-134 0-206 86-206 192 0 113 84 194 218 194 135 0 171-88 171-103 0-14-17-14-19-14-15 0-17 5-22 17-19 40-67 67-120 67-120 0-120-111-120-154 85 0 170 0 254 0zM108 170c0-31 2-67 19-96 22-33 55-43 79-43 101 0 101 111 104 139-68 0-135 0-202 0z">
              <text:p/>
            </draw:path>
            <draw:path draw:style-name="gr3" draw:text-style-name="P7" draw:layer="layout" svg:width="0.131cm" svg:height="0.371cm" svg:x="4.795cm" svg:y="4.784cm" svg:viewBox="0 0 132 372" svg:d="M132 65c0-36-28-65-65-65s-67 29-67 65 30 65 67 65 65-29 65-65zM132 307c0-36-28-65-65-65s-67 29-67 65 30 65 67 65 65-29 65-65z">
              <text:p/>
            </draw:path>
            <draw:path draw:style-name="gr3" draw:text-style-name="P7" draw:layer="layout" svg:width="0.496cm" svg:height="0.572cm" svg:x="5.635cm" svg:y="4.582cm" svg:viewBox="0 0 497 573" svg:d="M161 307c48 0 96 0 144 0 101 0 192-67 192-151 0-82-84-156-199-156-100 0-199 0-298 0 0 9 0 18 0 26 6 0 13 0 19 0 65 0 67 8 67 39 0 148 0 296 0 444 0 31-2 38-67 38-6 0-13 0-19 0 0 9 0 18 0 26 29-2 92-2 125-2 32 0 93 0 125 2 0-8 0-17 0-26-8 0-15 0-22 0-65 0-67-7-67-38 0-67 0-135 0-202zM158 286c0-76 0-151 0-226 0-29 3-34 44-34 24 0 49 0 74 0 134 0 134 89 134 130 0 38 0 130-134 130-39 0-78 0-118 0z">
              <text:p/>
            </draw:path>
            <draw:path draw:style-name="gr3" draw:text-style-name="P7" draw:layer="layout" svg:width="0.282cm" svg:height="0.371cm" svg:x="6.204cm" svg:y="4.784cm" svg:viewBox="0 0 283 372" svg:d="M115 94c0-32 0-63 0-94-38 3-77 6-115 10 0 8 0 17 0 26 58 0 65 5 65 48 0 75 0 150 0 226 0 36-10 36-65 36 0 8 0 17 0 26 31 0 72-2 96-2 34 0 72 0 106 2 0-9 0-18 0-26-6 0-12 0-17 0-63 0-65-8-65-39 0-43 0-86 0-129 0-84 36-159 101-159 5 0 7 0 9 0-2 3-19 12-19 34 0 24 17 36 36 36 15 0 36-9 36-36 0-28-26-53-62-53-63 0-94 58-106 94z">
              <text:p/>
            </draw:path>
            <draw:path draw:style-name="gr3" draw:text-style-name="P7" draw:layer="layout" svg:width="0.114cm" svg:height="0.841cm" svg:x="6.609cm" svg:y="4.525cm" svg:viewBox="0 0 115 842" svg:d="M115 842c0-11 0-22 0-33-27 0-54 0-81 0 0-259 0-517 0-775 27 0 54 0 81 0 0-12 0-23 0-34-38 0-77 0-115 0 0 281 0 561 0 842 38 0 77 0 115 0z">
              <text:p/>
            </draw:path>
            <draw:path draw:style-name="gr3" draw:text-style-name="P7" draw:layer="layout" svg:width="0.693cm" svg:height="0.572cm" svg:x="6.768cm" svg:y="4.582cm" svg:viewBox="0 0 694 573" svg:d="M384 228c-23-56-46-112-70-168-2-7-3-6-4-10 0-4 14-21 50-24 7-2 17-2 17-16 0-10-10-10-12-10-36 0-72 2-108 2-19 0-72-2-94-2-5 0-14 0-14 17 0 9 7 9 19 9 50 0 55 8 62 27 34 78 68 157 101 235-60 63-120 126-180 190-3 3-6 6-9 9-41 46-82 58-125 60-10 2-17 2-17 17 0 2 0 9 10 9 26 0 52-2 79-2 31 0 65 2 93 2 8 0 17 0 17-16 0-8-6-7-9-10-10 0-34-2-34-24 0-14 12-29 22-38 28-31 57-61 86-91 26-28 51-56 77-84 28 67 56 134 84 201 2 10 3 8 5 12 0 7-17 22-51 24-7 2-17 2-17 17 0 9 10 9 15 9 21 0 81-2 105-2 22 0 72 2 94 2 5 0 17 0 17-14 0-12-10-12-17-12-55 0-58-2-72-36-34-79-89-209-108-259 58-60 144-161 173-185 24-19 55-38 105-41 12-2 20-2 20-16 0-3 0-10-10-10-26 0-55 2-82 2-31 0-62-2-93-2-5 0-15 0-15 17 0 5 5 7 10 9 7 0 34 3 34 24 0 12-10 24-17 32-46 48-91 97-137 146z">
              <text:p/>
            </draw:path>
            <draw:path draw:style-name="gr3" draw:text-style-name="P7" draw:layer="layout" svg:width="0.513cm" svg:height="0.486cm" svg:x="7.814cm" svg:y="4.702cm" svg:viewBox="0 0 514 487" svg:d="M499 262c7-3 15-6 15-17s-8-15-15-19c-156-74-312-148-468-221-12-5-12-5-14-5-10 0-17 7-17 17 0 7 2 12 14 19 148 70 296 139 444 209-148 69-296 139-444 209-12 4-14 9-14 16 0 10 7 17 17 17 2 0 2 0 14-5 156-73 312-147 468-220z">
              <text:p/>
            </draw:path>
            <draw:path draw:style-name="gr3" draw:text-style-name="P7" draw:layer="layout" svg:width="0.258cm" svg:height="0.534cm" svg:x="8.652cm" svg:y="4.63cm" svg:viewBox="0 0 259 535" svg:d="M156 190c26 0 53 0 79 0 17 0 24 0 24-17 0-10-7-10-24-10-25 0-49 0-74 0 31-120 36-137 36-141 0-15-10-22-24-22-3 0-27 0-34 29-11 45-22 89-33 134-27 0-53 0-80 0-16 0-26 0-26 17 0 10 7 10 24 10 25 0 50 0 74 0-60 240-64 254-64 268 0 46 33 77 79 77 86 0 134-122 134-129 0-8-7-8-12-8-7 0-7 3-12 12-36 87-81 106-110 106-17 0-24-10-24-38 0-20 0-27 5-41 20-83 41-165 62-247z">
              <text:p/>
            </draw:path>
            <draw:path draw:style-name="gr3" draw:text-style-name="P7" draw:layer="layout" svg:width="0.114cm" svg:height="0.841cm" svg:x="8.957cm" svg:y="4.525cm" svg:viewBox="0 0 115 842" svg:d="M115 0c-38 0-77 0-115 0 0 11 0 22 0 34 27 0 54 0 82 0 0 258 0 516 0 775-28 0-55 0-82 0 0 11 0 22 0 33 38 0 77 0 115 0 0-281 0-561 0-842z">
              <text:p/>
            </draw:path>
            <draw:path draw:style-name="gr3" draw:text-style-name="P7" draw:layer="layout" svg:width="0.561cm" svg:height="0.196cm" svg:x="9.453cm" svg:y="4.849cm" svg:viewBox="0 0 562 197" svg:d="M533 34c12 0 29 0 29-17s-17-17-29-17c-168 0-336 0-504 0-12 0-29 0-29 17s17 17 29 17c168 0 336 0 504 0zM533 197c12 0 29 0 29-17s-17-17-29-17c-168 0-336 0-504 0-12 0-29 0-29 17s17 17 29 17c168 0 336 0 504 0z">
              <text:p/>
            </draw:path>
            <draw:path draw:style-name="gr3" draw:text-style-name="P7" draw:layer="layout" svg:width="0.277cm" svg:height="0.558cm" svg:x="10.373cm" svg:y="4.597cm" svg:viewBox="0 0 278 559" svg:d="M173 22c0-22 0-22-22-22-50 53-125 53-151 53 0 9 0 17 0 26 17 0 65 0 110-21 0 145 0 291 0 436 0 29-2 39-79 39-9 0-17 0-26 0 0 8 0 17 0 26 29-2 103-2 137-2 33 0 105 0 136 2 0-9 0-18 0-26-9 0-19 0-28 0-75 0-77-8-77-39 0-157 0-315 0-472z">
              <text:p/>
            </draw:path>
            <draw:path draw:style-name="gr3" draw:text-style-name="P7" draw:layer="layout" svg:width="0.515cm" svg:height="0.033cm" svg:x="10.975cm" svg:y="4.93cm" svg:viewBox="0 0 516 34" svg:d="M487 34c15 0 29 0 29-17s-14-17-29-17c-152 0-304 0-456 0-14 0-31 0-31 17s17 17 31 17c152 0 304 0 456 0z">
              <text:p/>
            </draw:path>
            <draw:path draw:style-name="gr3" draw:text-style-name="P7" draw:layer="layout" svg:width="0.598cm" svg:height="0.57cm" svg:x="11.782cm" svg:y="4.585cm" svg:viewBox="0 0 599 571" svg:d="M223 298c27 0 55 0 82 0 62 0 69 14 69 38 0 7 0 17-4 41-3 5-3 7-3 9 0 8 5 10 10 10 7 0 7-2 12-17 15-61 30-121 45-182 5-10 5-12 5-15-4-3-3-9-12-9-8 0-9 5-12 19-17 65-36 79-108 79-25 0-51 0-77 0 18-71 36-142 53-213 7-29 10-32 46-32 37 0 75 0 113 0 103 0 122 27 122 92 0 19 0 24-2 45-3 12-3 12-3 15 0 4 3 12 10 12 9 0 12-5 12-22 5-49 11-98 17-146 2-22 0-22-22-22-138 0-275 0-413 0-17 0-26 0-26 17 0 9 7 9 24 9 31 0 55 0 55 15 0 2 0 5-5 19-37 149-73 298-110 446-10 34-12 39-77 39-14 0-24 0-24 16 0 10 10 10 12 10 24 0 86-2 110-2 29 0 99 2 128 2 7 0 16 0 16-14 0-8-3-7-4-10-3-2-5-2-24-2-17 0-22 0-44 0-24-3-26-8-26-17 0-3 0-7 2-19 18-71 36-141 53-211z">
              <text:p/>
            </draw:path>
            <draw:path draw:style-name="gr3" draw:text-style-name="P7" draw:layer="layout" svg:width="0.196cm" svg:height="0.841cm" svg:x="12.492cm" svg:y="4.525cm" svg:viewBox="0 0 197 842" svg:d="M197 833c0-3 0-3-15-17-105-106-134-267-134-394 0-146 34-295 137-398 12-12 12-12 12-14 0-8-5-10-10-10-9 0-84 58-134 166-43 91-53 184-53 256 0 65 10 166 55 262 51 103 123 158 132 158 5 0 10-2 10-9z">
              <text:p/>
            </draw:path>
            <draw:path draw:style-name="gr3" draw:text-style-name="P7" draw:layer="layout" svg:width="0.258cm" svg:height="0.534cm" svg:x="12.756cm" svg:y="4.63cm" svg:viewBox="0 0 259 535" svg:d="M154 190c26 0 52 0 79 0 17 0 26 0 26-17 0-10-9-10-24-10-25 0-49 0-74 0 31-120 33-137 33-141 0-15-9-22-24-22-2 0-26 0-33 29-11 45-21 89-31 134-28 0-55 0-82 0-17 0-24 0-24 17 0 10 7 10 24 10 25 0 50 0 74 0-62 240-64 254-64 268 0 46 31 77 76 77 87 0 135-122 135-129 0-8-7-8-10-8-7 0-9 3-12 12-36 87-81 106-110 106-17 0-27-10-27-38 0-20 3-27 5-41 21-83 42-165 63-247z">
              <text:p/>
            </draw:path>
            <draw:path draw:style-name="gr3" draw:text-style-name="P7" draw:layer="layout" svg:width="0.193cm" svg:height="0.841cm" svg:x="13.09cm" svg:y="4.525cm" svg:viewBox="0 0 194 842" svg:d="M194 422c0-67-9-168-55-264-50-103-122-158-132-158-5 0-7 5-7 10 0 2 0 2 14 19 84 81 132 216 132 393 0 144-31 291-136 399-10 9-10 9-10 12 0 7 2 9 7 9 10 0 84-57 135-163 43-94 52-187 52-257z">
              <text:p/>
            </draw:path>
            <draw:path draw:style-name="gr3" draw:text-style-name="P7" draw:layer="layout" svg:width="0.558cm" svg:height="0.196cm" svg:x="13.651cm" svg:y="4.849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3" draw:text-style-name="P7" draw:layer="layout" svg:width="0.323cm" svg:height="0.381cm" svg:x="14.532cm" svg:y="4.784cm" svg:viewBox="0 0 324 382" svg:d="M120 178c24 0 86 0 127-20 60-24 65-74 65-86 0-36-34-72-91-72-94 0-221 82-221 230 0 84 50 152 132 152 120 0 192-89 192-99 0-5-5-12-10-12-4 0-7 3-12 10-67 81-158 81-168 81-64 0-74-69-74-96 0-9 2-36 14-88 16 0 31 0 46 0zM79 161c34-130 120-142 142-142 41 0 62 24 62 53 0 89-134 89-168 89-12 0-24 0-36 0z">
              <text:p/>
            </draw:path>
            <draw:path draw:style-name="gr3" draw:text-style-name="P7" draw:layer="layout" svg:width="0.397cm" svg:height="0.028cm" svg:x="14.95cm" svg:y="4.647cm" svg:viewBox="0 0 398 29" svg:d="M377 29c7 0 21 0 21-15 0-14-12-14-21-14-118 0-235 0-353 0-10 0-24 0-24 14 0 15 14 15 24 15 118 0 235 0 353 0z">
              <text:p/>
            </draw:path>
            <draw:path draw:style-name="gr3" draw:text-style-name="P7" draw:layer="layout" svg:width="0.325cm" svg:height="0.414cm" svg:x="15.456cm" svg:y="4.4cm" svg:viewBox="0 0 326 415" svg:d="M197 240c29 67 62 154 69 161 10 14 22 14 32 14 4 0 8 0 12 0 9 0 16 0 16-7 0-2-2-5-4-7-8-5-12-19-15-24-48-114-96-227-144-341-5-10-17-36-79-36-7 0-14 0-14 7s4 10 9 10c12 2 22 2 39 36 23 55 46 110 69 165-58 52-117 104-175 156-7 8-12 12-12 22 0 14 12 19 22 19 9 0 16-7 19-9 52-56 104-111 156-166z">
              <text:p/>
            </draw:path>
            <draw:path draw:style-name="gr3" draw:text-style-name="P7" draw:layer="layout" svg:width="0.198cm" svg:height="0.373cm" svg:x="15.838cm" svg:y="4.441cm" svg:viewBox="0 0 199 374" svg:d="M120 134c20 0 40 0 60 0 12 0 19 0 19-12 0-7-7-7-17-7-18 0-36 0-55 0 7-29 15-59 22-89 0-2 0-4 0-7 0-12-7-19-19-19-15 0-24 10-29 26-3 15 5-14-22 89-20 0-40 0-60 0-12 0-19 0-19 12 0 7 7 7 19 7 19 0 37 0 55 0-12 47-24 93-36 140-2 16-7 36-7 45 0 34 29 55 63 55 64 0 103-82 103-91 0-8-7-7-10-7-7 0-7 2-12 12-17 36-48 70-79 70-12 0-22-8-22-29 0-5 3-19 5-24 14-57 27-114 41-171z">
              <text:p/>
            </draw:path>
            <draw:path draw:style-name="gr3" draw:text-style-name="P7" draw:layer="layout" svg:width="0.088cm" svg:height="0.088cm" svg:x="16.183cm" svg:y="5.067cm" svg:viewBox="0 0 89 89" svg:d="M89 46c0-24-21-46-46-46s-43 22-43 46 18 43 43 43 46-19 46-43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0.6cm" svg:height="2.6cm" svg:x="0.5cm" svg:y="0.6cm" presentation:class="title" presentation:user-transformed="true">
          <draw:text-box>
            <text:p text:style-name="P9"><text:span text:style-name="T34">Exponential Distribution (</text:span><text:span text:style-name="T35">memoryless</text:span><text:span text:style-name="T34">)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4">For an exponential random variable </text:span><text:span text:style-name="T16">X</text:span><text:span text:style-name="T14"> with parameter </text:span><text:span text:style-name="T31">λ</text:span><text:span text:style-name="T29">, </text:span></text:p>
              </text:list-item>
            </text:list>
          </draw:text-box>
        </draw:frame>
        <draw:g>
          <svg:title>TexMaths</svg:title>
          <svg:desc>22§display§\Pr[X&gt;s+t\mid X&gt;t] = \Pr[X&gt;s].§svg§600§FALSE§</svg:desc>
          <draw:frame draw:style-name="gr2" draw:text-style-name="P6" draw:layer="layout" svg:width="11.763cm" svg:height="0.77cm" svg:x="5.703cm" svg:y="5.261cm">
            <draw:image xlink:href="Pictures/10004C01000014E40000015FBE12EC57F83BB9F3.svg" xlink:type="simple" xlink:show="embed" xlink:actuate="onLoad" draw:mime-type="image/svg+xml">
              <text:p/>
            </draw:image>
            <draw:image xlink:href="Pictures/10000001000000CA0000000D0D2B1B1C963D044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text-style-name="P10" draw:layer="layout" svg:width="20.6cm" svg:height="2.6cm" svg:x="0.5cm" svg:y="0.6cm" presentation:class="title" presentation:user-transformed="true">
          <draw:text-box>
            <text:p text:style-name="P9"><text:span text:style-name="T34">Exponential Distribution (</text:span><text:span text:style-name="T35">memoryless</text:span><text:span text:style-name="T34">)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4">For an exponential random variable </text:span><text:span text:style-name="T16">X</text:span><text:span text:style-name="T14"> with parameter </text:span><text:span text:style-name="T31">λ</text:span><text:span text:style-name="T29">, </text:span></text:p>
              </text:list-item>
            </text:list>
          </draw:text-box>
        </draw:frame>
        <draw:g>
          <svg:title>TexMaths</svg:title>
          <svg:desc>22§display§\Pr[X&gt;s+t\mid X&gt;t] = \Pr[X&gt;s].§svg§600§FALSE§</svg:desc>
          <draw:frame draw:style-name="gr2" draw:text-style-name="P6" draw:layer="layout" svg:width="11.763cm" svg:height="0.77cm" svg:x="5.703cm" svg:y="5.261cm">
            <draw:image xlink:href="Pictures/10004C01000014E40000015FBE12EC57F83BB9F3.svg" xlink:type="simple" xlink:show="embed" xlink:actuate="onLoad" draw:mime-type="image/svg+xml">
              <text:p/>
            </draw:image>
            <draw:image xlink:href="Pictures/10000001000000CA0000000D0D2B1B1C963D044B.png" xlink:type="simple" xlink:show="embed" xlink:actuate="onLoad" draw:mime-type="image/png"/>
          </draw:frame>
        </draw:g>
        <draw:g>
          <svg:title>TexMaths</svg:title>
          <svg:desc>18§latex§\textcolor{MidnightBlue}{
\begin{eqnarray*}
\Pr[X&gt;s+t\mid X&gt;t] &amp;=&amp; \frac{\Pr[X&gt;s+t]}{\Pr[X&gt;t]}\\
&amp;=&amp; \frac{1-\Pr[X\leq s+t]}{1-\Pr[X\leq t]}\\
&amp;=&amp; \frac{e^{-\lambda (s+t)}}{e^{-\lambda t}}\\
&amp;=&amp; e^{-\lambda s} = \Pr[X&gt;s].
\end{eqnarray*}}§svg§600§FALSE§</svg:desc>
          <draw:frame draw:style-name="gr2" draw:text-style-name="P6" draw:layer="layout" svg:width="12.69cm" svg:height="5.945cm" svg:x="5.767cm" svg:y="7.182cm">
            <draw:image xlink:href="Pictures/100105E300001B8B00000CE8116C5C0162C527C5.svg" xlink:type="simple" xlink:show="embed" xlink:actuate="onLoad" draw:mime-type="image/svg+xml">
              <text:p/>
            </draw:image>
            <draw:image xlink:href="Pictures/100000010000010A0000007D33467B1099A5EA3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in (exponential random variables)</text:p>
          </draw:text-box>
        </draw:frame>
        <draw:frame presentation:style-name="pr5" draw:text-style-name="P1" draw:layer="layout" svg:width="26.6cm" svg:height="9.134cm" svg:x="0.4cm" svg:y="3.8cm" presentation:class="outline" presentation:user-transformed="true">
          <draw:text-box>
            <text:list text:style-name="L3">
              <text:list-item>
                <text:p text:style-name="P20"><text:span text:style-name="T36">Lemma</text:span><text:span text:style-name="T37">. If </text:span><text:span text:style-name="T38">X</text:span><text:span text:style-name="T39">1</text:span><text:span text:style-name="T37">, </text:span><text:span text:style-name="T38">X</text:span><text:span text:style-name="T39">2</text:span><text:span text:style-name="T37">, …, </text:span><text:span text:style-name="T38">X</text:span><text:span text:style-name="T40">n</text:span><text:span text:style-name="T37"> are independent exponential random variables with parameters </text:span><text:span text:style-name="T41">λ</text:span><text:span text:style-name="T39">1</text:span><text:span text:style-name="T41">, λ</text:span><text:span text:style-name="T39">2</text:span><text:span text:style-name="T41">, …, λ</text:span><text:span text:style-name="T40">n</text:span><text:span text:style-name="T42">, respectively, then </text:span><text:span text:style-name="T43">min(</text:span><text:span text:style-name="T44">X</text:span><text:span text:style-name="T45">1</text:span><text:span text:style-name="T46">, </text:span><text:span text:style-name="T44">X</text:span><text:span text:style-name="T45">2</text:span><text:span text:style-name="T46">, …, </text:span><text:span text:style-name="T44">X</text:span><text:span text:style-name="T47">n</text:span><text:span text:style-name="T48">)</text:span><text:span text:style-name="T49"> is exponential random variable with parameter </text:span></text:p>
              </text:list-item>
            </text:list>
          </draw:text-box>
        </draw:frame>
        <draw:g>
          <svg:title>TexMaths</svg:title>
          <svg:desc>20§inline§\sum_{i=1}^n \lambda_i§svg§600§FALSE§</svg:desc>
          <draw:frame draw:style-name="gr2" draw:text-style-name="P6" draw:layer="layout" svg:width="2.438cm" svg:height="0.838cm" svg:x="16.998cm" svg:y="5.901cm">
            <draw:image xlink:href="Pictures/10001D77000004C4000001A43A55212582C90589.svg" xlink:type="simple" xlink:show="embed" xlink:actuate="onLoad" draw:mime-type="image/svg+xml">
              <text:p/>
            </draw:image>
            <draw:image xlink:href="Pictures/100000010000002E00000010F597C0C2C946844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in (exponential random variables)</text:p>
          </draw:text-box>
        </draw:frame>
        <draw:frame presentation:style-name="pr5" draw:text-style-name="P1" draw:layer="layout" svg:width="26.6cm" svg:height="9.134cm" svg:x="0.4cm" svg:y="3.8cm" presentation:class="outline" presentation:user-transformed="true">
          <draw:text-box>
            <text:list text:style-name="L3">
              <text:list-item>
                <text:p text:style-name="P20"><text:span text:style-name="T36">Lemma</text:span><text:span text:style-name="T37">. If </text:span><text:span text:style-name="T38">X</text:span><text:span text:style-name="T39">1</text:span><text:span text:style-name="T37">, </text:span><text:span text:style-name="T38">X</text:span><text:span text:style-name="T39">2</text:span><text:span text:style-name="T37">, …, </text:span><text:span text:style-name="T38">X</text:span><text:span text:style-name="T40">n</text:span><text:span text:style-name="T37"> are independent exponential random variables with parameters </text:span><text:span text:style-name="T41">λ</text:span><text:span text:style-name="T39">1</text:span><text:span text:style-name="T41">, λ</text:span><text:span text:style-name="T39">2</text:span><text:span text:style-name="T41">, …, λ</text:span><text:span text:style-name="T40">n</text:span><text:span text:style-name="T42">, respectively, then </text:span><text:span text:style-name="T43">min(</text:span><text:span text:style-name="T44">X</text:span><text:span text:style-name="T45">1</text:span><text:span text:style-name="T46">, </text:span><text:span text:style-name="T44">X</text:span><text:span text:style-name="T45">2</text:span><text:span text:style-name="T46">, …, </text:span><text:span text:style-name="T44">X</text:span><text:span text:style-name="T47">n</text:span><text:span text:style-name="T48">)</text:span><text:span text:style-name="T49"> is exponential random variable with parameter </text:span></text:p>
              </text:list-item>
            </text:list>
          </draw:text-box>
        </draw:frame>
        <draw:g>
          <svg:title>TexMaths</svg:title>
          <svg:desc>20§inline§\sum_{i=1}^n \lambda_i§svg§600§FALSE§</svg:desc>
          <draw:frame draw:style-name="gr2" draw:text-style-name="P6" draw:layer="layout" svg:width="2.438cm" svg:height="0.838cm" svg:x="16.998cm" svg:y="5.901cm">
            <draw:image xlink:href="Pictures/10001D77000004C4000001A43A55212582C90589.svg" xlink:type="simple" xlink:show="embed" xlink:actuate="onLoad" draw:mime-type="image/svg+xml">
              <text:p/>
            </draw:image>
            <draw:image xlink:href="Pictures/100000010000002E00000010F597C0C2C946844A.png" xlink:type="simple" xlink:show="embed" xlink:actuate="onLoad" draw:mime-type="image/png"/>
          </draw:frame>
        </draw:g>
        <draw:g>
          <svg:title>TexMaths</svg:title>
          <svg:desc>20§latex§\begin{textcolor}{MidnightBlue}{
\begin{eqnarray*}
\Pr[\min(X_1,X_2,\ldots,X_n)&gt;x] &amp;=&amp; \Pr[(X_1&gt;x)\cap (X_2&gt;x)\cap \cdots\cap (X_n &gt; x)]\\
&amp;=&amp; \Pr[X_1&gt;x] \cdot \Pr[X_2&gt;x] \cdots \Pr[X_n&gt;x]\\
&amp;=&amp; e^{-\lambda_1 x}\cdot  e^{-\lambda_2 x}\cdots e^{-\lambda_n x}\\
&amp;=&amp; e^{-\sum_{i=1}^n\lambda_i}.
\end{eqnarray*}}§svg§600§FALSE§</svg:desc>
          <draw:g>
            <draw:path draw:style-name="gr6" draw:text-style-name="P12" draw:layer="layout" svg:width="23.353cm" svg:height="3.621cm" svg:x="2.327cm" svg:y="8.667cm" svg:viewBox="0 0 23354 3622" svg:d="M0 0c7785 0 15569 0 23354 0 0 1207 0 2415 0 3622-7785 0-15569 0-23354 0 0-1207 0-2415 0-3622z">
              <text:p/>
            </draw:path>
            <draw:path draw:style-name="gr18" draw:text-style-name="P21" draw:layer="layout" svg:width="0.413cm" svg:height="0.477cm" svg:x="2.315cm" svg:y="8.679cm" svg:viewBox="0 0 414 478" svg:d="M136 256c39 0 79 0 118 0 84 0 160-56 160-126s-68-130-166-130c-83 0-165 0-248 0 0 7 0 13 0 20 6 0 12 0 18 0 54 0 54 8 54 34 0 123 0 247 0 370 0 26 0 34-54 34-6 0-12 0-18 0 0 6 0 13 0 20 26-2 78-2 104-2s80 0 104 2c0-7 0-14 0-20-5 0-11 0-16 0-56 0-56-8-56-34 0-56 0-112 0-168zM134 238c0-63 0-127 0-190 0-22 0-28 34-28 21 0 41 0 62 0 112 0 112 76 112 110 0 32 0 108-112 108-32 0-64 0-96 0z">
              <text:p/>
            </draw:path>
            <draw:path draw:style-name="gr18" draw:text-style-name="P21" draw:layer="layout" svg:width="0.235cm" svg:height="0.309cm" svg:x="2.789cm" svg:y="8.847cm" svg:viewBox="0 0 236 310" svg:d="M98 78c0-26 0-52 0-78-33 3-65 5-98 8 0 7 0 15 0 22 50 0 54 4 54 40 0 63 0 125 0 188 0 32-6 32-54 32 0 7 0 13 0 20 28 0 60-2 80-2 28 0 62 0 90 2 0-7 0-13 0-20-5 0-11 0-16 0-52 0-52-8-52-34 0-36 0-72 0-108 0-70 28-132 82-132 6 0 6 0 8 0-2 2-16 10-16 28 0 20 14 30 30 30 12 0 30-7 30-30s-22-44-52-44c-52 0-76 48-86 78z">
              <text:p/>
            </draw:path>
            <draw:path draw:style-name="gr18" draw:text-style-name="P21" draw:layer="layout" svg:width="0.095cm" svg:height="0.701cm" svg:x="3.127cm" svg:y="8.631cm" svg:viewBox="0 0 96 702" svg:d="M96 702c0-10 0-19 0-28-23 0-45 0-68 0 0-216 0-431 0-646 23 0 45 0 68 0 0-9 0-19 0-28-32 0-64 0-96 0 0 234 0 468 0 702 32 0 64 0 96 0z">
              <text:p/>
            </draw:path>
            <draw:path draw:style-name="gr18" draw:text-style-name="P21" draw:layer="layout" svg:width="0.547cm" svg:height="0.309cm" svg:x="3.263cm" svg:y="8.847cm" svg:viewBox="0 0 548 310" svg:d="M54 70c0 63 0 125 0 188 0 32-8 32-54 32 0 7 0 13 0 20 24 0 60-2 78-2 20 0 56 2 80 2 0-7 0-13 0-20-48 0-56 0-56-32 0-43 0-87 0-130 0-72 50-112 96-112 44 0 52 38 52 78 0 55 0 109 0 164 0 32-8 32-56 32 0 7 0 13 0 20 26 0 62-2 80-2s54 2 78 2c0-7 0-13 0-20-46 0-54 0-54-32 0-43 0-87 0-130 0-72 50-112 94-112 46 0 52 38 52 78 0 55 0 109 0 164 0 32-6 32-54 32 0 7 0 13 0 20 24 0 60-2 80-2 18 0 54 2 78 2 0-7 0-13 0-20-36 0-54 0-54-22 0-45 0-89 0-134 0-60 0-82-22-108-10-12-34-26-74-26-60 0-90 42-102 70-10-62-62-70-94-70-50 0-84 30-104 74 0-25 0-49 0-74-33 3-65 5-98 8 0 7 0 15 0 22 48 0 54 4 54 40z">
              <text:p/>
            </draw:path>
            <draw:path draw:style-name="gr18" draw:text-style-name="P21" draw:layer="layout" svg:width="0.149cm" svg:height="0.469cm" svg:x="3.849cm" svg:y="8.687cm" svg:viewBox="0 0 150 470" svg:d="M100 160c-33 3-65 5-98 8 0 7 0 15 0 22 46 0 52 4 52 38 0 63 0 126 0 190 0 32-8 32-54 32 0 6 0 13 0 20 22 0 60-2 78-2 24 0 48 2 72 2 0-7 0-14 0-20-46 0-50-4-50-32 0-86 0-172 0-258zM104 38c0-22-18-38-38-38-22 0-36 20-36 38 0 20 14 38 36 38 20 0 38-16 38-38z">
              <text:p/>
            </draw:path>
            <draw:path draw:style-name="gr18" draw:text-style-name="P21" draw:layer="layout" svg:width="0.353cm" svg:height="0.309cm" svg:x="4.043cm" svg:y="8.847cm" svg:viewBox="0 0 354 310" svg:d="M56 70c0 63 0 125 0 188 0 32-8 32-56 32 0 7 0 13 0 20 24 0 60-2 80-2 18 0 54 2 78 2 0-7 0-13 0-20-46 0-54 0-54-32 0-43 0-87 0-130 0-72 50-112 94-112s52 38 52 78c0 55 0 109 0 164 0 32-8 32-54 32 0 7 0 13 0 20 24 0 60-2 80-2 18 0 54 2 78 2 0-7 0-13 0-20-36 0-54 0-54-22 0-45 0-89 0-134 0-60 0-82-22-108-10-12-34-26-74-26-52 0-84 30-104 74 0-25 0-49 0-74-33 3-67 5-100 8 0 7 0 15 0 22 50 0 56 4 56 40z">
              <text:p/>
            </draw:path>
            <draw:path draw:style-name="gr18" draw:text-style-name="P21" draw:layer="layout" svg:width="0.161cm" svg:height="0.701cm" svg:x="4.481cm" svg:y="8.631cm" svg:viewBox="0 0 162 702" svg:d="M162 696c0-2 0-4-10-16-88-88-112-222-112-328 0-122 28-246 114-334 8-8 8-8 8-10 0-6-2-8-6-8-8 0-70 48-112 136-36 78-44 156-44 216 0 54 8 140 46 218 42 86 102 132 110 132 4 0 6-2 6-6z">
              <text:p/>
            </draw:path>
            <draw:path draw:style-name="gr18" draw:text-style-name="P21" draw:layer="layout" svg:width="0.579cm" svg:height="0.477cm" svg:x="4.703cm" svg:y="8.679cm" svg:viewBox="0 0 580 478" svg:d="M322 190c-19-47-39-93-58-140-2-6-3-5-4-8 0-4 12-18 42-22 6 0 14 0 14-12 0-8-8-8-12-8-28 0-58 2-88 2-18 0-60-2-78-2-4 0-12 0-12 14 0 6 6 6 16 6 42 0 46 8 52 24 27 65 55 131 82 196-49 53-99 105-148 158-3 2-5 5-8 8-36 38-68 50-104 52-10 0-16 0-16 14 3 2 0 6 10 6 20 0 44-2 66-2 26 0 54 2 78 2 4 0 14 0 14-14 0-6-8-6-10-6-6-2-28-2-28-22 0-12 12-24 20-32 24-26 48-51 72-76 21-23 41-45 62-68 24 55 48 110 72 166 2 8 3 6 4 10 0 6-14 18-42 22-8 0-14 0-14 12 0 8 8 8 10 8 20 0 70-2 90-2 16 0 60 2 78 2 4 0 12 0 12-12 0-8-6-8-12-8-48-2-48-4-60-32-28-66-74-174-92-216 48-50 122-134 146-154 20-16 46-34 88-36 10 0 16 0 16-14-3-2 0-6-10-6-20 0-44 2-66 2-26 0-52-2-78-2-4 0-12 0-12 14 0 4 2 6 8 6 6 2 28 2 28 22 0 10-8 20-14 26-38 41-76 81-114 122z">
              <text:p/>
            </draw:path>
            <draw:path draw:style-name="gr18" draw:text-style-name="P21" draw:layer="layout" svg:width="0.177cm" svg:height="0.325cm" svg:x="5.321cm" svg:y="8.937cm" svg:viewBox="0 0 178 326" svg:d="M110 14c0-14 0-14-14-14-32 30-76 32-96 32 0 5 0 11 0 16 12 0 44 0 70-12 0 83 0 167 0 250 0 16 0 22-48 22-6 0-12 0-18 0 0 6 0 12 0 18 8 0 68-2 86-2 16 0 78 2 88 2 0-6 0-12 0-18-6 0-12 0-18 0-50 0-50-6-50-22 0-91 0-181 0-272z">
              <text:p/>
            </draw:path>
            <draw:path draw:style-name="gr18" draw:text-style-name="P21" draw:layer="layout" svg:width="0.081cm" svg:height="0.209cm" svg:x="5.643cm" svg:y="9.083cm" svg:viewBox="0 0 82 210" svg:d="M82 74c0-46-18-74-46-74-22 0-36 18-36 38 0 18 14 36 36 36 10 0 18-2 26-8 2-2 2-2 4-2 0 3 0 0 0 10 0 52-24 94-48 118-8 8-8 8-8 10 0 6 4 8 8 8 8 0 64-54 64-136z">
              <text:p/>
            </draw:path>
            <draw:path draw:style-name="gr18" draw:text-style-name="P21" draw:layer="layout" svg:width="0.579cm" svg:height="0.477cm" svg:x="5.913cm" svg:y="8.679cm" svg:viewBox="0 0 580 478" svg:d="M322 190c-19-47-39-93-58-140-2-6-3-5-4-8 0-4 12-18 42-22 6 0 14 0 14-12 0-8-8-8-12-8-28 0-58 2-88 2-18 0-60-2-78-2-4 0-12 0-12 14 0 6 6 6 16 6 42 0 46 8 52 24 27 65 55 131 82 196-49 53-99 105-148 158-3 2-5 5-8 8-36 38-68 50-104 52-10 0-16 0-16 14 3 2 0 6 10 6 20 0 44-2 66-2 26 0 54 2 78 2 4 0 14 0 14-14 0-6-8-6-10-6-6-2-28-2-28-22 0-12 12-24 20-32 24-26 48-51 72-76 21-23 41-45 62-68 24 55 48 110 72 166 2 8 3 6 4 10 0 6-14 18-42 22-8 0-14 0-14 12 0 8 8 8 10 8 20 0 70-2 90-2 16 0 60 2 78 2 4 0 12 0 12-12 0-8-6-8-12-8-48-2-48-4-60-32-28-66-74-174-92-216 48-50 122-134 146-154 20-16 46-34 88-36 10 0 16 0 16-14-3-2 0-6-10-6-20 0-44 2-66 2-26 0-52-2-78-2-4 0-12 0-12 14 0 4 2 6 8 6 6 2 28 2 28 22 0 10-8 20-14 26-38 41-76 81-114 122z">
              <text:p/>
            </draw:path>
            <draw:path draw:style-name="gr18" draw:text-style-name="P21" draw:layer="layout" svg:width="0.217cm" svg:height="0.325cm" svg:x="6.507cm" svg:y="8.937cm" svg:viewBox="0 0 218 326" svg:d="M218 236c-5 0-11 0-16 0-2 12-6 40-14 46-4 2-40 2-48 2-30 0-60 0-90 0 52-46 68-60 98-82 36-30 70-60 70-106 0-60-52-96-114-96s-104 42-104 88c0 24 22 28 28 28 10 0 26-10 26-26 0-10-4-26-30-26 16-36 48-46 72-46 50 0 74 38 74 78 0 42-30 76-46 94-39 39-79 79-118 118-6 4-6 4-6 18 68 0 136 0 204 0 5-30 9-60 14-90z">
              <text:p/>
            </draw:path>
            <draw:path draw:style-name="gr18" draw:text-style-name="P21" draw:layer="layout" svg:width="0.081cm" svg:height="0.209cm" svg:x="6.853cm" svg:y="9.083cm" svg:viewBox="0 0 82 210" svg:d="M82 74c0-46-18-74-46-74-22 0-36 18-36 38 0 18 14 36 36 36 10 0 18-2 26-8 2-2 2-2 4-2 0 3 0 0 0 10 0 52-24 94-48 118-8 8-8 8-8 10 0 6 4 8 8 8 8 0 64-54 64-136z">
              <text:p/>
            </draw:path>
            <draw:path draw:style-name="gr18" draw:text-style-name="P21" draw:layer="layout" svg:width="0.073cm" svg:height="0.073cm" svg:x="7.165cm" svg:y="9.083cm" svg:viewBox="0 0 74 74" svg:d="M74 38c0-20-15-38-36-38s-38 18-38 38 17 36 38 36 36-16 36-36z">
              <text:p/>
            </draw:path>
            <draw:path draw:style-name="gr18" draw:text-style-name="P21" draw:layer="layout" svg:width="0.073cm" svg:height="0.073cm" svg:x="7.477cm" svg:y="9.083cm" svg:viewBox="0 0 74 74" svg:d="M74 38c0-20-16-38-36-38s-38 18-38 38 18 36 38 36 36-16 36-36z">
              <text:p/>
            </draw:path>
            <draw:path draw:style-name="gr18" draw:text-style-name="P21" draw:layer="layout" svg:width="0.075cm" svg:height="0.073cm" svg:x="7.789cm" svg:y="9.083cm" svg:viewBox="0 0 76 74" svg:d="M76 38c0-20-18-38-38-38s-38 18-38 38 18 36 38 36 38-16 38-36z">
              <text:p/>
            </draw:path>
            <draw:path draw:style-name="gr18" draw:text-style-name="P21" draw:layer="layout" svg:width="0.081cm" svg:height="0.209cm" svg:x="8.103cm" svg:y="9.083cm" svg:viewBox="0 0 82 210" svg:d="M82 74c0-46-18-74-46-74-22 0-36 18-36 38 0 18 14 36 36 36 8 0 18-2 26-8 2-2 1-1 2-2 2 0 2 0 2 10 0 52-24 94-48 118-8 8-8 8-8 10 0 6 4 8 8 8 8 0 64-54 64-136z">
              <text:p/>
            </draw:path>
            <draw:path draw:style-name="gr18" draw:text-style-name="P21" draw:layer="layout" svg:width="0.579cm" svg:height="0.477cm" svg:x="8.372cm" svg:y="8.679cm" svg:viewBox="0 0 580 478" svg:d="M322 190c-20-47-40-93-60-140-2-6-1-5-2-8 0-4 12-18 40-22 8 0 16 0 16-12 0-8-10-8-12-8-28 0-58 2-88 2-18 0-62-2-78-2-6 0-14 0-14 14 0 6 8 6 16 6 42 0 48 8 54 24 27 65 55 131 82 196-49 53-99 105-148 158-3 2-7 5-10 8-34 38-66 50-102 52-10 0-16 0-16 14 3 2 0 6 10 6 20 0 44-2 66-2 26 0 52 2 78 2 4 0 12 0 12-14 0-6-6-6-8-6-6-2-28-2-28-22 0-12 10-24 20-32 23-26 47-51 70-76 21-23 43-45 64-68 24 55 48 110 72 166 2 8 1 6 2 10 0 6-12 18-40 22-8 0-14 0-14 12 0 8 8 8 10 8 20 0 70-2 88-2s62 2 78 2c6 0 14 0 14-12 0-8-6-8-12-8-48-2-48-4-60-32-28-66-76-174-92-216 48-50 122-134 144-154 20-16 48-34 90-36 8 0 16 0 16-14-3-2 0-6-10-6-20 0-44 2-66 2-26 0-52-2-78-2-4 0-14 0-14 14 0 4 4 6 10 6 6 2 28 2 28 22 0 10-8 20-14 26-38 41-76 81-114 122z">
              <text:p/>
            </draw:path>
            <draw:path draw:style-name="gr18" draw:text-style-name="P21" draw:layer="layout" svg:width="0.301cm" svg:height="0.221cm" svg:x="8.958cm" svg:y="9.047cm" svg:viewBox="0 0 302 222" svg:d="M38 186c-2 6-6 18-6 20 0 10 10 16 18 16s16-8 18-12 6-20 10-30c2-10 8-32 10-44 4-12 6-22 8-34 6-20 6-24 22-44 12-20 36-44 72-44 30 0 30 24 30 34 0 30-22 84-30 104-4 14-6 18-6 26 0 26 22 44 46 44 50 0 72-68 72-76 0-6-5-4-8-6-8 0-8 2-10 8-12 40-32 60-52 60-10 0-12-8-12-18 0-12 2-18 10-40 6-14 26-66 26-94 0-48-36-56-64-56-40 0-68 24-82 44-4-34-32-44-52-44-22 0-34 14-40 26-10 18-18 46-18 48 0 8 5 5 8 8 8 0 8-2 12-16 8-28 16-52 36-52 12 0 16 10 16 24 0 8-4 26-8 40s-8 34-10 44c-5 21-11 43-16 64z">
              <text:p/>
            </draw:path>
            <draw:path draw:style-name="gr18" draw:text-style-name="P21" draw:layer="layout" svg:width="0.163cm" svg:height="0.701cm" svg:x="9.358cm" svg:y="8.631cm" svg:viewBox="0 0 164 702" svg:d="M164 352c0-56-8-140-48-220-42-86-102-132-108-132s-8 2-8 8c0 2 0 2 14 16 68 68 108 180 108 328 0 120-26 244-112 332-10 8-10 10-10 12 0 4 2 6 8 6s70-48 110-136c36-78 46-156 46-214z">
              <text:p/>
            </draw:path>
            <draw:path draw:style-name="gr18" draw:text-style-name="P21" draw:layer="layout" svg:width="0.429cm" svg:height="0.405cm" svg:x="9.844cm" svg:y="8.779cm" svg:viewBox="0 0 430 406" svg:d="M418 218c6-2 12-5 12-14s-6-12-12-16c-130-61-260-123-390-184-10-4-10-4-12-4-8 0-16 6-16 14 0 6 4 10 14 16 123 58 247 116 370 174-123 58-247 116-370 174-10 4-14 8-14 14 0 8 8 14 16 14 2 0 2 0 12-4 130-62 260-123 390-184z">
              <text:p/>
            </draw:path>
            <draw:path draw:style-name="gr18" draw:text-style-name="P21" draw:layer="layout" svg:width="0.349cm" svg:height="0.317cm" svg:x="10.548cm" svg:y="8.847cm" svg:viewBox="0 0 350 318" svg:d="M216 98c4-18 20-82 68-82 4 0 22 0 36 8-20 4-34 22-34 38 0 12 8 26 26 26 16 0 38-14 38-42 0-36-40-46-64-46-42 0-66 38-74 54-18-46-56-54-76-54-74 0-114 92-114 108 0 8 8 8 10 8 4 0 6-2 8-8 24-74 70-92 94-92 14 0 38 6 38 46 0 22-12 70-38 168-10 44-36 74-66 74-4 0-20 0-36-10 18-4 34-18 34-38 0-18-16-24-26-24-22 0-40 18-40 40 0 32 36 46 66 46 48 0 72-48 74-52 10 26 34 52 76 52 74 0 114-90 114-108 0-6-8-6-10-6-6 0-8 2-8 8-24 74-72 92-94 92-28 0-38-24-38-48 0-14 4-30 12-62s16-64 24-96z">
              <text:p/>
            </draw:path>
            <draw:path draw:style-name="gr18" draw:text-style-name="P21" draw:layer="layout" svg:width="0.095cm" svg:height="0.701cm" svg:x="10.946cm" svg:y="8.631cm" svg:viewBox="0 0 96 702" svg:d="M96 0c-32 0-64 0-96 0 0 9 0 19 0 28 23 0 45 0 68 0 0 215 0 430 0 646-23 0-45 0-68 0 0 9 0 18 0 28 32 0 64 0 96 0 0-234 0-468 0-702z">
              <text:p/>
            </draw:path>
            <draw:path draw:style-name="gr18" draw:text-style-name="P21" draw:layer="layout" svg:width="0.467cm" svg:height="0.163cm" svg:x="11.868cm" svg:y="8.901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18" draw:text-style-name="P21" draw:layer="layout" svg:width="0.413cm" svg:height="0.477cm" svg:x="13.102cm" svg:y="8.679cm" svg:viewBox="0 0 414 478" svg:d="M136 256c39 0 79 0 118 0 84 0 160-56 160-126s-70-130-166-130c-83 0-165 0-248 0 0 7 0 13 0 20 6 0 12 0 18 0 54 0 54 8 54 34 0 123 0 247 0 370 0 26 0 34-54 34-6 0-12 0-18 0 0 6 0 13 0 20 26-2 78-2 104-2s80 0 104 2c0-7 0-14 0-20-6 0-12 0-18 0-54 0-54-8-54-34 0-56 0-112 0-168zM134 238c0-63 0-127 0-190 0-22 0-28 34-28 21 0 41 0 62 0 112 0 112 76 112 110 0 32 0 108-112 108-32 0-64 0-96 0z">
              <text:p/>
            </draw:path>
            <draw:path draw:style-name="gr18" draw:text-style-name="P21" draw:layer="layout" svg:width="0.235cm" svg:height="0.309cm" svg:x="13.576cm" svg:y="8.847cm" svg:viewBox="0 0 236 310" svg:d="M98 78c0-26 0-52 0-78-33 3-65 5-98 8 0 7 0 15 0 22 50 0 54 4 54 40 0 63 0 125 0 188 0 32-8 32-54 32 0 7 0 13 0 20 28 0 60-2 80-2 28 0 62 0 90 2 0-7 0-13 0-20-5 0-11 0-16 0-52 0-52-8-52-34 0-36 0-72 0-108 0-70 28-132 82-132 4 0 6 0 8 0-2 2-16 10-16 28 0 20 14 30 30 30 12 0 30-7 30-30s-22-44-52-44c-52 0-76 48-86 78z">
              <text:p/>
            </draw:path>
            <draw:path draw:style-name="gr18" draw:text-style-name="P21" draw:layer="layout" svg:width="0.095cm" svg:height="0.701cm" svg:x="13.914cm" svg:y="8.631cm" svg:viewBox="0 0 96 702" svg:d="M96 702c0-10 0-19 0-28-23 0-45 0-68 0 0-216 0-431 0-646 23 0 45 0 68 0 0-9 0-19 0-28-32 0-64 0-96 0 0 234 0 468 0 702 32 0 64 0 96 0z">
              <text:p/>
            </draw:path>
            <draw:path draw:style-name="gr18" draw:text-style-name="P21" draw:layer="layout" svg:width="0.163cm" svg:height="0.701cm" svg:x="14.096cm" svg:y="8.631cm" svg:viewBox="0 0 164 702" svg:d="M164 696c0-2 0-4-12-16-88-88-110-222-110-328 0-122 26-246 112-334 10-8 10-8 10-10 0-6-4-8-8-8-6 0-70 48-112 136-36 78-44 156-44 216 0 54 8 140 46 218 42 86 104 132 110 132 4 0 8-2 8-6z">
              <text:p/>
            </draw:path>
            <draw:path draw:style-name="gr18" draw:text-style-name="P21" draw:layer="layout" svg:width="0.577cm" svg:height="0.477cm" svg:x="14.32cm" svg:y="8.679cm" svg:viewBox="0 0 578 478" svg:d="M320 190c-19-47-39-93-58-140-2-6-3-5-4-8 0-4 12-18 42-22 6 0 14 0 14-12 0-8-8-8-10-8-30 0-60 2-90 2-16 0-60-2-78-2-4 0-12 0-12 14 0 6 6 6 16 6 42 0 46 8 52 24 28 65 56 131 84 196-50 53-100 105-150 158-3 2-5 5-8 8-34 38-68 50-104 52-8 0-14 0-14 14 3 2 0 6 8 6 22 0 44-2 66-2 26 0 54 2 78 2 6 0 14 0 14-14 0-6-5-4-8-6-8-2-28-2-28-22 0-12 10-24 18-32 24-26 48-51 72-76 21-23 41-45 62-68 24 55 48 110 72 166 2 8 3 6 4 10 0 6-14 18-42 22-8 0-14 0-14 12 0 8 8 8 12 8 18 0 68-2 88-2 18 0 60 2 78 2 4 0 14 0 14-12 0-8-8-8-14-8-46-2-48-4-60-32-28-66-74-174-90-216 48-50 120-134 144-154 20-16 46-34 88-36 10 0 16 0 16-14-3-2 0-6-8-6-22 0-46 2-68 2-26 0-52-2-78-2-4 0-12 0-12 14 0 4 4 6 8 6 6 2 28 2 28 22 0 10-8 20-14 26-38 41-76 81-114 122z">
              <text:p/>
            </draw:path>
            <draw:path draw:style-name="gr18" draw:text-style-name="P21" draw:layer="layout" svg:width="0.179cm" svg:height="0.325cm" svg:x="14.936cm" svg:y="8.937cm" svg:viewBox="0 0 180 326" svg:d="M112 14c0-14-2-14-16-14-32 30-76 32-96 32 0 5 0 11 0 16 12 0 44 0 72-12 0 83 0 167 0 250 0 16 0 22-50 22-6 0-12 0-18 0 0 6 0 12 0 18 8 0 68-2 88-2 14 0 76 2 88 2 0-6 0-12 0-18-7 0-13 0-20 0-48 0-48-6-48-22 0-91 0-181 0-272z">
              <text:p/>
            </draw:path>
            <draw:path draw:style-name="gr18" draw:text-style-name="P21" draw:layer="layout" svg:width="0.427cm" svg:height="0.405cm" svg:x="15.452cm" svg:y="8.779cm" svg:viewBox="0 0 428 406" svg:d="M416 218c8-2 12-5 12-14s-4-12-12-16c-130-61-260-123-390-184-10-4-10-4-12-4-8 0-14 6-14 14 0 6 2 10 12 16 123 58 247 116 370 174-123 58-247 116-370 174-10 4-12 8-12 14 0 8 6 14 14 14 2 0 2 0 12-4 130-62 260-123 390-184z">
              <text:p/>
            </draw:path>
            <draw:path draw:style-name="gr18" draw:text-style-name="P21" draw:layer="layout" svg:width="0.349cm" svg:height="0.317cm" svg:x="16.156cm" svg:y="8.847cm" svg:viewBox="0 0 350 318" svg:d="M214 98c4-18 20-82 70-82 2 0 20 0 34 8-20 4-34 22-34 38 0 12 8 26 28 26 14 0 38-14 38-42 0-36-42-46-66-46-40 0-66 38-74 54-18-46-56-54-76-54-72 0-114 92-114 108 0 8 8 8 10 8 6 0 8-2 8-8 24-74 70-92 94-92 14 0 38 6 38 46 0 22-12 70-38 168-10 44-36 74-66 74-4 0-20 0-36-10 18-4 34-18 34-38 0-18-16-24-26-24-22 0-38 18-38 40 0 32 34 46 66 46 46 0 70-48 74-52 8 26 32 52 74 52 74 0 114-90 114-108 0-6-6-6-10-6-6 0-6 2-8 8-24 74-72 92-94 92-28 0-38-24-38-48 0-14 4-30 12-62s16-64 24-96z">
              <text:p/>
            </draw:path>
            <draw:path draw:style-name="gr18" draw:text-style-name="P21" draw:layer="layout" svg:width="0.163cm" svg:height="0.701cm" svg:x="16.576cm" svg:y="8.631cm" svg:viewBox="0 0 164 702" svg:d="M164 352c0-56-8-140-46-220-42-86-104-132-110-132-4 0-8 2-8 8 0 2 0 2 14 16 68 68 108 180 108 328 0 120-26 244-112 332-10 8-10 10-10 12 0 4 4 6 8 6 6 0 70-48 112-136 36-78 44-156 44-214z">
              <text:p/>
            </draw:path>
            <draw:path draw:style-name="gr18" draw:text-style-name="P21" draw:layer="layout" svg:width="0.391cm" svg:height="0.435cm" svg:x="17.004cm" svg:y="8.737cm" svg:viewBox="0 0 392 436" svg:d="M392 154c0-106-108-154-196-154-92 0-196 50-196 154 0 86 0 172 0 258 0 12 0 24 14 24s14-12 14-24c0-86 0-171 0-256 0-104 116-128 168-128 32 0 76 8 114 32 54 34 54 78 54 98 0 85 0 169 0 254 0 12 0 24 14 24s14-12 14-24c0-86 0-172 0-258z">
              <text:p/>
            </draw:path>
            <draw:path draw:style-name="gr18" draw:text-style-name="P21" draw:layer="layout" svg:width="0.163cm" svg:height="0.701cm" svg:x="17.66cm" svg:y="8.631cm" svg:viewBox="0 0 164 702" svg:d="M164 696c0-2 0-4-12-16-88-88-110-222-110-328 0-122 26-246 112-334 10-8 10-8 10-10 0-6-4-8-8-8-6 0-70 48-112 136-36 78-44 156-44 216 0 54 8 140 46 218 42 86 104 132 110 132 4 0 8-2 8-6z">
              <text:p/>
            </draw:path>
            <draw:path draw:style-name="gr18" draw:text-style-name="P21" draw:layer="layout" svg:width="0.577cm" svg:height="0.477cm" svg:x="17.884cm" svg:y="8.679cm" svg:viewBox="0 0 578 478" svg:d="M322 190c-20-47-40-93-60-140-2-6-3-5-4-8 0-4 12-18 42-22 6 0 14 0 14-12 0-8-8-8-10-8-30 0-60 2-90 2-16 0-60-2-78-2-4 0-12 0-12 14 0 6 6 6 16 6 42 0 46 8 52 24 28 65 56 131 84 196-49 53-99 105-148 158-3 2-7 5-10 8-34 38-68 50-104 52-8 0-14 0-14 14 3 2 0 6 8 6 22 0 44-2 66-2 26 0 54 2 80 2 4 0 12 0 12-14 0-6-5-4-8-6-8-2-28-2-28-22 0-12 10-24 18-32 24-26 48-51 72-76 21-23 43-45 64-68 23 55 47 110 70 166 2 8 3 6 4 10 0 6-14 18-42 22-6 0-14 0-14 12 0 8 8 8 12 8 18 0 68-2 88-2 18 0 60 2 78 2 4 0 14 0 14-12 0-8-8-8-14-8-46-2-48-4-60-32-28-66-74-174-90-216 48-50 122-134 144-154 20-16 46-34 88-36 10 0 16 0 16-14-3-2 0-6-8-6-22 0-46 2-66 2-26 0-54-2-78-2-6 0-14 0-14 14 0 4 4 6 8 6 6 2 28 2 28 22 0 10-8 20-14 26-37 41-75 81-112 122z">
              <text:p/>
            </draw:path>
            <draw:path draw:style-name="gr18" draw:text-style-name="P21" draw:layer="layout" svg:width="0.215cm" svg:height="0.325cm" svg:x="18.478cm" svg:y="8.937cm" svg:viewBox="0 0 216 326" svg:d="M216 236c-5 0-11 0-16 0-2 12-6 40-12 46-4 2-42 2-50 2-30 0-60 0-90 0 52-46 70-60 98-82 36-30 70-60 70-106 0-60-52-96-114-96s-102 42-102 88c0 24 20 28 26 28 12 0 26-10 26-26 0-10-4-26-30-26 16-36 50-46 72-46 50 0 76 38 76 78 0 42-32 76-48 94-39 39-79 79-118 118-4 4-4 4-4 18 67 0 135 0 202 0 5-30 9-60 14-90z">
              <text:p/>
            </draw:path>
            <draw:path draw:style-name="gr18" draw:text-style-name="P21" draw:layer="layout" svg:width="0.427cm" svg:height="0.405cm" svg:x="19.016cm" svg:y="8.779cm" svg:viewBox="0 0 428 406" svg:d="M416 218c8-2 12-5 12-14s-4-12-12-16c-130-61-260-123-390-184-10-4-10-4-12-4-8 0-14 6-14 14 0 6 2 10 12 16 123 58 247 116 370 174-123 58-247 116-370 174-10 4-12 8-12 14 0 8 6 14 14 14 2 0 2 0 12-4 130-62 260-123 390-184z">
              <text:p/>
            </draw:path>
            <draw:path draw:style-name="gr18" draw:text-style-name="P21" draw:layer="layout" svg:width="0.349cm" svg:height="0.317cm" svg:x="19.72cm" svg:y="8.847cm" svg:viewBox="0 0 350 318" svg:d="M214 98c4-18 20-82 70-82 2 0 20 0 34 8-20 4-34 22-34 38 0 12 8 26 28 26 14 0 38-14 38-42 0-36-42-46-66-46-40 0-66 38-74 54-18-46-56-54-76-54-72 0-112 92-112 108 0 8 6 8 8 8 6 0 8-2 8-8 24-74 70-92 94-92 14 0 38 6 38 46 0 22-12 70-38 168-10 44-36 74-66 74-4 0-20 0-36-10 18-4 34-18 34-38 0-18-16-24-26-24-22 0-38 18-38 40 0 32 34 46 66 46 46 0 72-48 74-52 8 26 32 52 76 52 72 0 112-90 112-108 0-6-6-6-8-6-8 0-8 2-10 8-24 74-72 92-94 92-26 0-38-24-38-48 0-14 4-30 12-62s16-64 24-96z">
              <text:p/>
            </draw:path>
            <draw:path draw:style-name="gr18" draw:text-style-name="P21" draw:layer="layout" svg:width="0.163cm" svg:height="0.701cm" svg:x="20.139cm" svg:y="8.631cm" svg:viewBox="0 0 164 702" svg:d="M164 352c0-56-8-140-46-220-42-86-104-132-110-132-4 0-8 2-8 8 0 2 0 2 14 16 68 68 108 180 108 328 0 120-26 244-112 332-10 8-10 10-10 12 0 4 4 6 8 6 6 0 70-48 112-136 36-78 44-156 44-214z">
              <text:p/>
            </draw:path>
            <draw:path draw:style-name="gr18" draw:text-style-name="P21" draw:layer="layout" svg:width="0.391cm" svg:height="0.435cm" svg:x="20.567cm" svg:y="8.737cm" svg:viewBox="0 0 392 436" svg:d="M392 154c0-106-108-154-196-154-92 0-196 50-196 154 0 86 0 172 0 258 0 12 0 24 14 24s14-12 14-24c0-86 0-171 0-256 0-104 116-128 168-128 32 0 76 8 114 32 54 34 54 78 54 98 0 85 0 169 0 254 0 12 0 24 14 24s14-12 14-24c0-86 0-172 0-258z">
              <text:p/>
            </draw:path>
            <draw:path draw:style-name="gr18" draw:text-style-name="P21" draw:layer="layout" svg:width="0.073cm" svg:height="0.073cm" svg:x="21.215cm" svg:y="8.945cm" svg:viewBox="0 0 74 74" svg:d="M74 38c0-22-18-38-38-38s-36 17-36 38 16 36 36 36 38-16 38-36z">
              <text:p/>
            </draw:path>
            <draw:path draw:style-name="gr18" draw:text-style-name="P21" draw:layer="layout" svg:width="0.073cm" svg:height="0.073cm" svg:x="21.527cm" svg:y="8.945cm" svg:viewBox="0 0 74 74" svg:d="M74 38c0-22-17-38-38-38s-36 17-36 38 15 36 36 36 38-16 38-36z">
              <text:p/>
            </draw:path>
            <draw:path draw:style-name="gr18" draw:text-style-name="P21" draw:layer="layout" svg:width="0.073cm" svg:height="0.073cm" svg:x="21.839cm" svg:y="8.945cm" svg:viewBox="0 0 74 74" svg:d="M74 38c0-22-15-38-36-38s-38 17-38 38 17 36 38 36 36-16 36-36z">
              <text:p/>
            </draw:path>
            <draw:path draw:style-name="gr18" draw:text-style-name="P21" draw:layer="layout" svg:width="0.389cm" svg:height="0.435cm" svg:x="22.169cm" svg:y="8.737cm" svg:viewBox="0 0 390 436" svg:d="M390 154c0-106-108-154-194-154-92 0-196 50-196 154 0 86 0 172 0 258 0 12 0 24 14 24s14-12 14-24c0-86 0-171 0-256 0-104 114-128 168-128 30 0 76 8 112 32 54 34 54 78 54 98 0 85 0 169 0 254 0 12 0 24 14 24s14-12 14-24c0-86 0-172 0-258z">
              <text:p/>
            </draw:path>
            <draw:path draw:style-name="gr18" draw:text-style-name="P21" draw:layer="layout" svg:width="0.161cm" svg:height="0.701cm" svg:x="22.825cm" svg:y="8.631cm" svg:viewBox="0 0 162 702" svg:d="M162 696c0-2 0-4-12-16-88-88-110-222-110-328 0-122 26-246 114-334 8-8 8-8 8-10 0-6-2-8-6-8-8 0-70 48-112 136-36 78-44 156-44 216 0 54 8 140 46 218 42 86 102 132 110 132 4 0 6-2 6-6z">
              <text:p/>
            </draw:path>
            <draw:path draw:style-name="gr18" draw:text-style-name="P21" draw:layer="layout" svg:width="0.579cm" svg:height="0.477cm" svg:x="23.047cm" svg:y="8.679cm" svg:viewBox="0 0 580 478" svg:d="M322 190c-19-47-39-93-58-140-4-6-3-5-4-8 0-4 12-18 40-22 8 0 16 0 16-12 0-8-10-8-12-8-28 0-58 2-88 2-18 0-62-2-78-2-6 0-14 0-14 14 0 6 8 6 16 6 42 0 48 8 54 24 27 65 55 131 82 196-49 53-99 105-148 158-3 2-7 5-10 8-34 38-66 50-102 52-10 0-16 0-16 14 3 2 0 6 10 6 20 0 44-2 66-2 26 0 52 2 78 2 4 0 12 0 12-14 0-6-6-6-8-6-6-2-28-2-28-22 0-12 10-24 20-32 23-26 47-51 70-76 21-23 43-45 64-68 24 55 48 110 72 166 2 8 1 6 2 10 0 6-12 18-40 22-8 0-14 0-14 12 0 8 8 8 10 8 20 0 70-2 88-2s62 2 78 2c6 0 14 0 14-12 0-8-6-8-12-8-48-2-48-4-60-32-28-66-76-174-92-216 48-50 122-134 144-154 20-16 48-34 90-36 8 0 16 0 16-14-3-2 0-6-10-6-20 0-44 2-66 2-26 0-52-2-78-2-4 0-14 0-14 14 0 4 4 6 10 6 6 2 28 2 28 22 0 10-8 20-14 26-38 41-76 81-114 122z">
              <text:p/>
            </draw:path>
            <draw:path draw:style-name="gr18" draw:text-style-name="P21" draw:layer="layout" svg:width="0.301cm" svg:height="0.221cm" svg:x="23.633cm" svg:y="9.047cm" svg:viewBox="0 0 302 222" svg:d="M38 186c-2 6-6 18-6 20 0 10 10 16 18 16s16-8 18-12 6-20 10-30c2-10 8-32 10-44 4-12 6-22 8-34 6-20 6-24 22-44 12-20 36-44 74-44 28 0 28 24 28 34 0 30-22 84-28 104-6 14-8 18-8 26 0 26 22 44 46 44 50 0 72-68 72-76 0-6-5-4-8-6-8 0-8 2-10 8-12 40-32 60-52 60-10 0-12-8-12-18 0-12 2-18 10-40 6-14 26-66 26-94 0-48-36-56-64-56-40 0-68 24-82 44-4-34-32-44-52-44-22 0-34 14-40 26-10 18-18 46-18 48 0 8 5 5 8 8 8 0 8-2 12-16 8-28 16-52 36-52 12 0 16 10 16 24 0 8-4 26-8 40s-8 34-10 44c-5 21-11 43-16 64z">
              <text:p/>
            </draw:path>
            <draw:path draw:style-name="gr18" draw:text-style-name="P21" draw:layer="layout" svg:width="0.429cm" svg:height="0.405cm" svg:x="24.247cm" svg:y="8.779cm" svg:viewBox="0 0 430 406" svg:d="M416 218c8-2 14-5 14-14s-6-12-14-16c-130-61-260-123-390-184-8-4-10-4-12-4-8 0-14 6-14 14 0 6 4 10 12 16 123 58 247 116 370 174-123 58-247 116-370 174-8 4-12 8-12 14 0 8 6 14 14 14 2 0 4 0 12-4 130-62 260-123 390-184z">
              <text:p/>
            </draw:path>
            <draw:path draw:style-name="gr18" draw:text-style-name="P21" draw:layer="layout" svg:width="0.349cm" svg:height="0.317cm" svg:x="24.951cm" svg:y="8.847cm" svg:viewBox="0 0 350 318" svg:d="M214 98c4-18 20-82 70-82 4 0 20 0 34 8-18 4-34 22-34 38 0 12 8 26 28 26 16 0 38-14 38-42 0-36-42-46-66-46-40 0-66 38-74 54-18-46-56-54-76-54-72 0-112 92-112 108 0 8 6 8 8 8 6 0 8-2 8-8 24-74 72-92 96-92 12 0 38 6 38 46 0 22-12 70-38 168-12 44-36 74-68 74-4 0-20 0-34-10 16-4 32-18 32-38 0-18-16-24-26-24-20 0-38 18-38 40 0 32 34 46 66 46 46 0 72-48 74-52 8 26 34 52 76 52 72 0 112-90 112-108 0-6-6-6-8-6-6 0-8 2-10 8-22 74-70 92-94 92-26 0-38-24-38-48 0-14 4-30 12-62s16-64 24-96z">
              <text:p/>
            </draw:path>
            <draw:path draw:style-name="gr18" draw:text-style-name="P21" draw:layer="layout" svg:width="0.163cm" svg:height="0.701cm" svg:x="25.371cm" svg:y="8.631cm" svg:viewBox="0 0 164 702" svg:d="M164 352c0-56-8-140-46-220-42-86-102-132-110-132-4 0-8 2-8 8 0 2 0 2 14 16 70 68 110 180 110 328 0 120-26 244-114 332-10 8-10 10-10 12 0 4 4 6 8 6 8 0 70-48 112-136 36-78 44-156 44-214z">
              <text:p/>
            </draw:path>
            <draw:path draw:style-name="gr18" draw:text-style-name="P21" draw:layer="layout" svg:width="0.095cm" svg:height="0.701cm" svg:x="25.621cm" svg:y="8.631cm" svg:viewBox="0 0 96 702" svg:d="M96 0c-32 0-64 0-96 0 0 9 0 19 0 28 23 0 45 0 68 0 0 215 0 430 0 646-23 0-45 0-68 0 0 9 0 18 0 28 32 0 64 0 96 0 0-234 0-468 0-702z">
              <text:p/>
            </draw:path>
            <draw:path draw:style-name="gr18" draw:text-style-name="P21" draw:layer="layout" svg:width="0.467cm" svg:height="0.165cm" svg:x="11.868cm" svg:y="9.952cm" svg:viewBox="0 0 468 166" svg:d="M444 28c10 0 24 0 24-14s-14-14-24-14c-141 0-281 0-422 0-8 0-22 0-22 14s14 14 24 14c140 0 280 0 420 0zM444 166c10 0 24 0 24-14s-14-14-24-14c-140 0-280 0-420 0-10 0-24 0-24 14s14 14 22 14c141 0 281 0 422 0z">
              <text:p/>
            </draw:path>
            <draw:path draw:style-name="gr18" draw:text-style-name="P21" draw:layer="layout" svg:width="0.413cm" svg:height="0.479cm" svg:x="13.102cm" svg:y="9.73cm" svg:viewBox="0 0 414 480" svg:d="M136 258c39 0 79 0 118 0 84 0 160-56 160-126s-70-132-166-132c-83 0-165 0-248 0 0 7 0 15 0 22 6 0 12 0 18 0 54 0 54 8 54 34 0 123 0 247 0 370 0 26 0 32-54 32-6 0-12 0-18 0 0 7 0 14 0 22 26-2 78-2 104-2s80 0 104 2c0-8 0-15 0-22-6 0-12 0-18 0-54 0-54-6-54-32 0-56 0-112 0-168zM134 240c0-63 0-127 0-190 0-22 0-28 34-28 21 0 41 0 62 0 112 0 112 76 112 110 0 32 0 108-112 108-32 0-64 0-96 0z">
              <text:p/>
            </draw:path>
            <draw:path draw:style-name="gr18" draw:text-style-name="P21" draw:layer="layout" svg:width="0.235cm" svg:height="0.309cm" svg:x="13.576cm" svg:y="9.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  <text:p/>
            </draw:path>
            <draw:path draw:style-name="gr18" draw:text-style-name="P21" draw:layer="layout" svg:width="0.095cm" svg:height="0.701cm" svg:x="13.914cm" svg:y="9.684cm" svg:viewBox="0 0 96 702" svg:d="M96 702c0-10 0-19 0-28-23 0-45 0-68 0 0-216 0-431 0-646 23 0 45 0 68 0 0-9 0-19 0-28-32 0-64 0-96 0 0 234 0 468 0 702 32 0 64 0 96 0z">
              <text:p/>
            </draw:path>
            <draw:path draw:style-name="gr18" draw:text-style-name="P21" draw:layer="layout" svg:width="0.577cm" svg:height="0.479cm" svg:x="14.046cm" svg:y="9.73cm" svg:viewBox="0 0 578 480" svg:d="M322 192c-20-47-40-93-60-140-2-6-1-5-2-8 0-6 12-18 40-22 8 0 14 0 14-12 0-10-8-10-10-10-28 0-60 2-88 2-18 0-62-2-80-2-4 0-12 0-12 14 0 8 8 8 16 8 42 0 46 8 52 24 28 65 56 131 84 196-49 53-99 105-148 158-3 2-7 5-10 8-34 38-66 48-102 50-10 2-16 2-16 14 0 2 0 8 8 8 22 0 46-2 66-2 26 0 54 2 80 2 4 0 12 0 12-14 0-6-6-8-8-8-6 0-28-2-28-20 0-12 10-24 18-32 24-26 48-51 72-76 21-23 43-47 64-70 23 56 47 112 70 168 4 8 3 6 4 10 0 6-14 18-40 20-8 2-14 2-14 14 0 8 8 8 10 8 20 0 68-2 88-2 18 0 60 2 78 2 6 0 14 0 14-12 0-10-8-10-12-10-48 0-50-2-62-30-26-66-74-174-90-218 48-48 122-132 144-152 20-16 48-34 90-36 8 0 14 0 14-14-3-3 0-8-8-8-22 0-44 2-66 2-26 0-54-2-78-2-4 0-14 0-14 14 0 6 4 8 8 8 8 2 28 2 28 22 0 10-6 20-12 26-38 41-76 81-114 122z">
              <text:p/>
            </draw:path>
            <draw:path draw:style-name="gr18" draw:text-style-name="P21" draw:layer="layout" svg:width="0.179cm" svg:height="0.325cm" svg:x="14.662cm" svg:y="9.99cm" svg:viewBox="0 0 180 326" svg:d="M112 14c0-14-2-14-14-14-32 30-78 32-98 32 0 5 0 11 0 16 12 0 44 0 72-14 0 84 0 168 0 252 0 16 0 22-50 22-6 0-12 0-18 0 0 6 0 12 0 18 8 0 70-2 88-2 14 0 76 2 88 2 0-6 0-12 0-18-6 0-12 0-18 0-50 0-50-6-50-22 0-91 0-181 0-272z">
              <text:p/>
            </draw:path>
            <draw:path draw:style-name="gr18" draw:text-style-name="P21" draw:layer="layout" svg:width="0.429cm" svg:height="0.405cm" svg:x="15.178cm" svg:y="9.832cm" svg:viewBox="0 0 430 406" svg:d="M416 218c8-4 14-5 14-14s-6-12-14-16c-130-61-260-123-390-184-8-4-10-4-12-4-8 0-14 6-14 14 0 6 4 10 14 14 123 59 245 117 368 176-123 58-245 116-368 174-10 4-14 8-14 14 0 8 6 14 14 14 2 0 4 0 12-4 130-62 260-123 390-184z">
              <text:p/>
            </draw:path>
            <draw:path draw:style-name="gr18" draw:text-style-name="P21" draw:layer="layout" svg:width="0.349cm" svg:height="0.317cm" svg:x="15.882cm" svg:y="9.9cm" svg:viewBox="0 0 350 318" svg:d="M214 98c4-18 20-82 70-82 4 0 20 0 34 8-18 4-32 22-32 38 0 12 6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s16-64 24-96z">
              <text:p/>
            </draw:path>
            <draw:path draw:style-name="gr18" draw:text-style-name="P21" draw:layer="layout" svg:width="0.095cm" svg:height="0.701cm" svg:x="16.278cm" svg:y="9.684cm" svg:viewBox="0 0 96 702" svg:d="M96 0c-32 0-64 0-96 0 0 9 0 19 0 28 23 0 45 0 68 0 0 215 0 430 0 646-23 0-45 0-68 0 0 9 0 18 0 28 32 0 64 0 96 0 0-234 0-468 0-702z">
              <text:p/>
            </draw:path>
            <draw:path draw:style-name="gr18" draw:text-style-name="P21" draw:layer="layout" svg:width="0.073cm" svg:height="0.073cm" svg:x="16.676cm" svg:y="9.998cm" svg:viewBox="0 0 74 74" svg:d="M74 38c0-22-18-38-38-38s-36 17-36 38 16 36 36 36 38-16 38-36z">
              <text:p/>
            </draw:path>
            <draw:path draw:style-name="gr18" draw:text-style-name="P21" draw:layer="layout" svg:width="0.413cm" svg:height="0.479cm" svg:x="16.99cm" svg:y="9.73cm" svg:viewBox="0 0 414 480" svg:d="M136 258c39 0 79 0 118 0 84 0 160-56 160-126s-68-132-166-132c-83 0-165 0-248 0 0 7 0 15 0 22 6 0 12 0 18 0 54 0 56 8 56 34 0 123 0 247 0 370 0 26-2 32-56 32-6 0-12 0-18 0 0 7 0 14 0 22 26-2 78-2 104-2s80 0 104 2c0-8 0-15 0-22-5 0-11 0-16 0-56 0-56-6-56-32 0-56 0-112 0-168zM134 240c0-63 0-127 0-190 0-22 0-28 34-28 21 0 41 0 62 0 112 0 112 76 112 110 0 32 0 108-112 108-32 0-64 0-96 0z">
              <text:p/>
            </draw:path>
            <draw:path draw:style-name="gr18" draw:text-style-name="P21" draw:layer="layout" svg:width="0.235cm" svg:height="0.309cm" svg:x="17.464cm" svg:y="9.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  <text:p/>
            </draw:path>
            <draw:path draw:style-name="gr18" draw:text-style-name="P21" draw:layer="layout" svg:width="0.095cm" svg:height="0.701cm" svg:x="17.802cm" svg:y="9.684cm" svg:viewBox="0 0 96 702" svg:d="M96 702c0-10 0-19 0-28-23 0-45 0-68 0 0-216 0-431 0-646 23 0 45 0 68 0 0-9 0-19 0-28-32 0-64 0-96 0 0 234 0 468 0 702 32 0 64 0 96 0z">
              <text:p/>
            </draw:path>
            <draw:path draw:style-name="gr18" draw:text-style-name="P21" draw:layer="layout" svg:width="0.579cm" svg:height="0.479cm" svg:x="17.934cm" svg:y="9.73cm" svg:viewBox="0 0 580 480" svg:d="M322 192c-20-47-40-93-60-140-2-6-1-5-2-8 0-6 12-18 40-22 8 0 14 0 14-12 0-10-8-10-10-10-28 0-58 2-88 2-18 0-62-2-80-2-4 0-12 0-12 14 0 8 8 8 16 8 42 0 46 8 54 24 27 65 55 131 82 196-49 53-99 105-148 158-3 2-7 5-10 8-34 38-66 48-102 50-10 2-16 2-16 14 0 2 0 8 10 8 20 0 44-2 66-2 26 0 52 2 78 2 4 0 12 0 12-14 0-6-6-8-8-8-6 0-28-2-28-20 0-12 10-24 18-32 24-26 48-51 72-76 21-23 43-47 64-70 23 56 47 112 70 168 4 8 3 6 4 10 0 6-14 18-40 20-8 2-14 2-14 14 0 8 8 8 10 8 20 0 68-2 88-2 18 0 62 2 78 2 6 0 14 0 14-12 0-10-8-10-12-10-48 0-50-2-62-30-26-66-74-174-90-218 48-48 122-132 144-152 20-16 48-34 90-36 8 0 16 0 16-14-3-3 0-8-10-8-22 0-44 2-66 2-26 0-52-2-78-2-4 0-14 0-14 14 0 6 4 8 8 8 8 2 30 2 30 22 0 10-8 20-14 26-38 41-76 81-114 122z">
              <text:p/>
            </draw:path>
            <draw:path draw:style-name="gr18" draw:text-style-name="P21" draw:layer="layout" svg:width="0.217cm" svg:height="0.325cm" svg:x="18.528cm" svg:y="9.99cm" svg:viewBox="0 0 218 326" svg:d="M218 236c-6 0-12 0-18 0 0 12-6 40-12 46-4 2-42 2-48 2-31 0-61 0-92 0 52-46 70-60 100-82 36-30 70-60 70-106 0-60-52-96-116-96-60 0-102 42-102 88 0 24 22 28 26 28 12 0 26-10 26-26 0-10-4-28-28-28 14-34 48-44 72-44 48 0 74 38 74 78 0 42-30 76-46 94-39 39-79 77-118 116-6 6-6 6-6 20 67 0 135 0 202 0 5-30 11-60 16-90z">
              <text:p/>
            </draw:path>
            <draw:path draw:style-name="gr18" draw:text-style-name="P21" draw:layer="layout" svg:width="0.429cm" svg:height="0.405cm" svg:x="19.066cm" svg:y="9.832cm" svg:viewBox="0 0 430 406" svg:d="M416 218c8-4 14-5 14-14s-6-12-14-16c-130-61-260-123-390-184-8-4-10-4-12-4-8 0-14 6-14 14 0 6 4 10 14 14 123 59 245 117 368 176-123 58-245 116-368 174-10 4-14 8-14 14 0 8 6 14 14 14 2 0 4 0 12-4 130-62 260-123 390-184z">
              <text:p/>
            </draw:path>
            <draw:path draw:style-name="gr18" draw:text-style-name="P21" draw:layer="layout" svg:width="0.349cm" svg:height="0.317cm" svg:x="19.77cm" svg:y="9.9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s16-64 24-96z">
              <text:p/>
            </draw:path>
            <draw:path draw:style-name="gr18" draw:text-style-name="P21" draw:layer="layout" svg:width="0.097cm" svg:height="0.701cm" svg:x="20.165cm" svg:y="9.684cm" svg:viewBox="0 0 98 702" svg:d="M98 0c-33 0-65 0-98 0 0 9 0 19 0 28 23 0 45 0 68 0 0 215 0 430 0 646-23 0-45 0-68 0 0 9 0 18 0 28 33 0 65 0 98 0 0-234 0-468 0-702z">
              <text:p/>
            </draw:path>
            <draw:path draw:style-name="gr18" draw:text-style-name="P21" draw:layer="layout" svg:width="0.073cm" svg:height="0.073cm" svg:x="20.523cm" svg:y="9.998cm" svg:viewBox="0 0 74 74" svg:d="M74 38c0-22-16-38-36-38s-38 17-38 38 18 36 38 36 36-16 36-36z">
              <text:p/>
            </draw:path>
            <draw:path draw:style-name="gr18" draw:text-style-name="P21" draw:layer="layout" svg:width="0.075cm" svg:height="0.073cm" svg:x="20.835cm" svg:y="9.998cm" svg:viewBox="0 0 76 74" svg:d="M76 38c0-22-18-38-38-38s-38 17-38 38 18 36 38 36 38-16 38-36z">
              <text:p/>
            </draw:path>
            <draw:path draw:style-name="gr18" draw:text-style-name="P21" draw:layer="layout" svg:width="0.075cm" svg:height="0.073cm" svg:x="21.147cm" svg:y="9.998cm" svg:viewBox="0 0 76 74" svg:d="M76 38c0-22-18-38-38-38s-38 17-38 38 18 36 38 36 38-16 38-36z">
              <text:p/>
            </draw:path>
            <draw:path draw:style-name="gr18" draw:text-style-name="P21" draw:layer="layout" svg:width="0.413cm" svg:height="0.479cm" svg:x="21.425cm" svg:y="9.73cm" svg:viewBox="0 0 414 480" svg:d="M134 258c40 0 80 0 120 0 84 0 160-56 160-126s-70-132-166-132c-83 0-165 0-248 0 0 7 0 15 0 22 5 0 11 0 16 0 54 0 56 8 56 34 0 123 0 247 0 370 0 26-2 32-56 32-5 0-11 0-16 0 0 7 0 14 0 22 24-2 75-2 102-2s80 0 104 2c0-8 0-15 0-22-5 0-11 0-16 0-54 0-56-6-56-32 0-56 0-112 0-168zM132 240c0-63 0-127 0-190 0-22 2-28 34-28 21 0 43 0 64 0 112 0 112 76 112 110 0 32 0 108-112 108-33 0-65 0-98 0z">
              <text:p/>
            </draw:path>
            <draw:path draw:style-name="gr18" draw:text-style-name="P21" draw:layer="layout" svg:width="0.237cm" svg:height="0.309cm" svg:x="21.897cm" svg:y="9.9cm" svg:viewBox="0 0 238 310" svg:d="M98 78c0-26 0-52 0-78-33 3-65 5-98 8 0 7 0 15 0 22 50 0 56 4 56 40 0 63 0 125 0 188 0 30-8 30-56 30 0 7 0 15 0 22 28 0 62-2 82-2 28 0 60 0 88 2 0-7 0-15 0-22-5 0-9 0-14 0-52 0-54-6-54-32 0-36 0-72 0-108 0-70 30-132 84-132 4 0 4 0 6 0-2 2-16 10-16 28 0 20 16 30 30 30s32-7 32-30-22-44-52-44c-52 0-78 48-88 78z">
              <text:p/>
            </draw:path>
            <draw:path draw:style-name="gr18" draw:text-style-name="P21" draw:layer="layout" svg:width="0.095cm" svg:height="0.701cm" svg:x="22.237cm" svg:y="9.684cm" svg:viewBox="0 0 96 702" svg:d="M96 702c0-10 0-19 0-28-23 0-45 0-68 0 0-216 0-431 0-646 23 0 45 0 68 0 0-9 0-19 0-28-32 0-64 0-96 0 0 234 0 468 0 702 32 0 64 0 96 0z">
              <text:p/>
            </draw:path>
            <draw:path draw:style-name="gr18" draw:text-style-name="P21" draw:layer="layout" svg:width="0.579cm" svg:height="0.479cm" svg:x="22.367cm" svg:y="9.73cm" svg:viewBox="0 0 580 480" svg:d="M322 192c-19-47-39-93-58-140-2-6-3-5-4-8 0-6 12-18 42-22 6 0 14 0 14-12 0-10-8-10-10-10-30 0-60 2-90 2-18 0-60-2-78-2-4 0-12 0-12 14 0 8 6 8 16 8 42 0 46 8 52 24 27 65 55 131 82 196-49 53-99 105-148 158-3 2-5 5-8 8-34 38-68 48-104 50-8 2-16 2-16 14 0 2 0 8 10 8 20 0 44-2 66-2 26 0 54 2 78 2 4 0 14 0 14-14 0-6-8-8-10-8-6 0-28-2-28-20 0-12 12-24 20-32 24-26 48-51 72-76 21-23 41-47 62-70 24 56 48 112 72 168 2 8 3 6 4 10 0 6-14 18-42 20-8 2-14 2-14 14 0 8 8 8 10 8 20 0 70-2 90-2 18 0 60 2 78 2 4 0 12 0 12-12 0-10-6-10-12-10-46 0-48-2-60-30-28-66-74-174-90-218 46-48 120-132 144-152 20-16 46-34 88-36 10 0 16 0 16-14-3-3 0-8-10-8-20 0-44 2-66 2-26 0-52-2-78-2-4 0-12 0-12 14 0 6 2 8 8 8 6 2 28 2 28 22 0 10-8 20-14 26-38 41-76 81-114 122z">
              <text:p/>
            </draw:path>
            <draw:path draw:style-name="gr18" draw:text-style-name="P21" draw:layer="layout" svg:width="0.299cm" svg:height="0.219cm" svg:x="22.955cm" svg:y="10.1cm" svg:viewBox="0 0 300 220" svg:d="M36 186c-2 6-4 18-4 20 0 10 8 14 16 14s17-6 20-10 6-20 8-30 8-32 10-44c4-12 6-22 10-34 4-20 6-24 20-44s36-46 74-46c28 0 28 26 28 36 0 28-20 84-28 104-6 14-8 18-8 26 0 26 22 42 46 42 50 0 72-66 72-74 0-6-6-6-8-6-6 0-8 2-10 8-10 40-32 60-52 60-10 0-12-8-12-18 0-12 2-18 12-40 6-16 26-68 26-94 0-48-38-56-64-56-42 0-68 24-84 44-4-34-32-44-52-44-22 0-32 14-40 26-10 18-16 46-16 48 0 6 6 6 8 6 6 0 6 0 10-14 8-28 18-54 36-54 14 0 16 12 16 26 0 8-5 26-8 40s-8 34-10 44c-5 21-11 43-16 64z">
              <text:p/>
            </draw:path>
            <draw:path draw:style-name="gr18" draw:text-style-name="P21" draw:layer="layout" svg:width="0.429cm" svg:height="0.405cm" svg:x="23.567cm" svg:y="9.832cm" svg:viewBox="0 0 430 406" svg:d="M416 218c8-4 14-5 14-14s-6-12-14-16c-130-61-260-123-390-184-8-4-10-4-12-4-8 0-14 6-14 14 0 6 4 10 14 14 123 59 245 117 368 176-123 58-245 116-368 174-10 4-14 8-14 14 0 8 6 14 14 14 2 0 4 0 12-4 130-62 260-123 390-184z">
              <text:p/>
            </draw:path>
            <draw:path draw:style-name="gr18" draw:text-style-name="P21" draw:layer="layout" svg:width="0.349cm" svg:height="0.317cm" svg:x="24.271cm" svg:y="9.9cm" svg:viewBox="0 0 350 318" svg:d="M214 98c4-18 20-82 70-82 4 0 20 0 36 8-20 4-34 22-34 38 0 12 8 26 26 26 16 0 38-14 38-42 0-36-42-46-66-46-40 0-64 38-72 54-18-46-56-54-76-54-74 0-114 90-114 108 0 8 6 8 8 8 6 0 8-2 10-8 24-74 70-92 94-92 14 0 38 6 38 46 0 22-12 70-38 168-12 44-36 72-68 72-4 0-20 0-34-8 18-4 32-18 32-38s-14-24-26-24c-20 0-38 18-38 40 0 32 36 46 66 46 46 0 72-48 74-52 8 26 34 52 76 52 72 0 112-90 112-108 0-6-6-6-8-6-6 0-8 2-10 6-22 76-70 92-92 92-28 0-40-22-40-46 0-14 4-30 12-62s16-64 24-96z">
              <text:p/>
            </draw:path>
            <draw:path draw:style-name="gr18" draw:text-style-name="P21" draw:layer="layout" svg:width="0.097cm" svg:height="0.701cm" svg:x="24.667cm" svg:y="9.684cm" svg:viewBox="0 0 98 702" svg:d="M98 0c-33 0-65 0-98 0 0 9 0 19 0 28 23 0 47 0 70 0 0 215 0 430 0 646-23 0-47 0-70 0 0 9 0 18 0 28 33 0 65 0 98 0 0-234 0-468 0-702z">
              <text:p/>
            </draw:path>
            <draw:path draw:style-name="gr18" draw:text-style-name="P21" draw:layer="layout" svg:width="0.467cm" svg:height="0.165cm" svg:x="11.868cm" svg:y="11.006cm" svg:viewBox="0 0 468 166" svg:d="M444 28c10 0 24 0 24-14s-14-14-24-14c-141 0-281 0-422 0-8 0-22 0-22 14s14 14 24 14c140 0 280 0 420 0zM444 166c10 0 24-1 24-16s-14-14-24-14c-140 0-280 0-420 0-10 0-24-1-24 14s14 16 22 16c141 0 281 0 422 0z">
              <text:p/>
            </draw:path>
            <draw:path draw:style-name="gr18" draw:text-style-name="P21" draw:layer="layout" svg:width="0.269cm" svg:height="0.317cm" svg:x="13.11cm" svg:y="10.954cm" svg:viewBox="0 0 270 318" svg:d="M100 148c20 0 72-2 106-16 50-22 54-62 54-72 0-32-28-60-76-60-78 0-184 68-184 192 0 70 42 126 110 126 102 0 160-74 160-82 0-4-4-10-8-10s-6 2-10 8c-56 68-132 68-140 68-54 0-62-58-62-80 0-10 2-30 12-74 13 0 25 0 38 0zM66 132c28-106 100-116 118-116 34 0 52 20 52 44 0 72-112 72-140 72-10 0-20 0-30 0z">
              <text:p/>
            </draw:path>
            <draw:path draw:style-name="gr18" draw:text-style-name="P21" draw:layer="layout" svg:width="0.331cm" svg:height="0.023cm" svg:x="13.458cm" svg:y="10.84cm" svg:viewBox="0 0 332 24" svg:d="M314 24c8 0 18 0 18-12s-10-12-18-12c-98 0-196 0-294 0-8 0-20 0-20 10 0 14 12 14 20 14 98 0 196 0 294 0z">
              <text:p/>
            </draw:path>
            <draw:path draw:style-name="gr18" draw:text-style-name="P21" draw:layer="layout" svg:width="0.271cm" svg:height="0.345cm" svg:x="13.88cm" svg:y="10.634cm" svg:viewBox="0 0 272 346" svg:d="M164 200c24 56 52 128 58 134 8 12 18 12 26 12 3 0 7 0 10 0 8 0 14 0 14-6 0-4-2-4-4-6-4-4-10-16-12-20-40-95-80-189-120-284-4-8-14-30-66-30-6 0-12 0-12 6s4 6 8 6c10 2 18 4 32 32 19 46 39 92 58 138-49 43-97 87-146 130-6 6-10 10-10 18 0 12 10 16 18 16s14-6 16-8c43-46 87-92 130-138z">
              <text:p/>
            </draw:path>
            <draw:path draw:style-name="gr18" draw:text-style-name="P21" draw:layer="layout" svg:width="0.143cm" svg:height="0.233cm" svg:x="14.228cm" svg:y="10.81cm" svg:viewBox="0 0 144 234" svg:d="M90 12c0-12-2-12-12-12-26 24-64 24-72 24-2 0-4 0-6 0 0 5 0 9 0 14 2 0 4 0 6 0 8 0 30 0 52-10 0 59 0 117 0 176 0 12 0 16-38 16-6 0-12 0-18 0 0 5 0 9 0 14 20 0 52 0 72 0s52 0 70 0c0-5 0-9 0-14-6 0-12 0-18 0-36 0-36-4-36-16 0-64 0-128 0-192z">
              <text:p/>
            </draw:path>
            <draw:path draw:style-name="gr18" draw:text-style-name="P21" draw:layer="layout" svg:width="0.261cm" svg:height="0.221cm" svg:x="14.476cm" svg:y="10.758cm" svg:viewBox="0 0 262 222" svg:d="M98 164c-4 18-20 44-46 44-2 0-16 0-26-8 20-6 22-24 22-26 0-12-8-18-20-18-14 0-28 12-28 30 0 24 28 36 52 36 22 0 42-14 54-36 12 26 40 36 60 36 56 0 86-62 86-76 0-6-6-6-8-6-8 0-8 2-10 8-10 34-40 60-66 60-20 0-32-14-32-32 0-14 12-58 26-112 10-38 32-50 48-50 2 0 18 0 28 6-16 4-22 18-22 28s9 18 20 18 26-10 26-30c0-28-30-36-50-36-24 0-44 16-56 34-8-20-30-34-58-34-56 0-86 60-86 74 0 8 6 8 8 8 6 0 6-2 8-10 14-38 44-58 68-58 16 0 30 8 30 32 0 10-6 34-10 50-6 23-12 45-18 68z">
              <text:p/>
            </draw:path>
            <draw:path draw:style-name="gr18" draw:text-style-name="P21" draw:layer="layout" svg:width="0.075cm" svg:height="0.073cm" svg:x="15.022cm" svg:y="11.052cm" svg:viewBox="0 0 76 74" svg:d="M76 36c0-20-18-36-38-36s-38 15-38 36 18 38 38 38 38-16 38-38z">
              <text:p/>
            </draw:path>
            <draw:path draw:style-name="gr18" draw:text-style-name="P21" draw:layer="layout" svg:width="0.269cm" svg:height="0.317cm" svg:x="15.346cm" svg:y="10.954cm" svg:viewBox="0 0 270 318" svg:d="M100 148c20 0 72-2 106-16 50-22 54-62 54-72 0-32-28-60-76-60-78 0-184 68-184 192 0 70 42 126 110 126 100 0 160-74 160-82 0-4-4-10-8-10s-6 2-10 8c-56 68-132 68-140 68-56 0-62-58-62-80 0-10 2-30 12-74 13 0 25 0 38 0zM66 132c28-106 100-116 118-116 34 0 52 20 52 44 0 72-112 72-142 72-9 0-19 0-28 0z">
              <text:p/>
            </draw:path>
            <draw:path draw:style-name="gr18" draw:text-style-name="P21" draw:layer="layout" svg:width="0.331cm" svg:height="0.023cm" svg:x="15.694cm" svg:y="10.84cm" svg:viewBox="0 0 332 24" svg:d="M312 24c8 0 20 0 20-12s-10-12-20-12c-97 0-195 0-292 0-8 0-20 0-20 10 0 14 12 14 20 14 97 0 195 0 292 0z">
              <text:p/>
            </draw:path>
            <draw:path draw:style-name="gr18" draw:text-style-name="P21" draw:layer="layout" svg:width="0.271cm" svg:height="0.345cm" svg:x="16.116cm" svg:y="10.634cm" svg:viewBox="0 0 272 346" svg:d="M162 200c26 56 54 128 58 134 10 12 20 12 28 12 3 0 5 0 8 0 10 0 16 0 16-6 0-4-2-4-4-6-6-4-10-16-12-20-40-95-80-189-120-284-4-8-14-30-66-30-6 0-12 0-12 6s4 6 8 6c10 2 18 4 30 32 20 46 40 92 60 138-49 43-97 87-146 130-6 6-10 10-10 18 0 12 10 16 18 16s14-6 16-8c43-46 85-92 128-138z">
              <text:p/>
            </draw:path>
            <draw:path draw:style-name="gr18" draw:text-style-name="P21" draw:layer="layout" svg:width="0.173cm" svg:height="0.233cm" svg:x="16.446cm" svg:y="10.81cm" svg:viewBox="0 0 174 234" svg:d="M174 166c-5 0-9 0-14 0-2 8-4 30-10 32-4 2-32 2-38 2-23 0-45 0-68 0 22-16 48-36 70-50 30-22 60-42 60-80 0-44-42-70-92-70-48 0-82 28-82 62 0 18 14 22 20 22 10 0 20-6 20-20s-8-20-20-22c10-16 30-26 54-26 34 0 62 20 62 54 0 30-20 52-46 76-29 24-57 48-86 72-4 4-4 4-4 6 0 3 0 7 0 10 54 0 108 0 162 0 4-23 8-45 12-68z">
              <text:p/>
            </draw:path>
            <draw:path draw:style-name="gr18" draw:text-style-name="P21" draw:layer="layout" svg:width="0.261cm" svg:height="0.221cm" svg:x="16.712cm" svg:y="10.758cm" svg:viewBox="0 0 262 222" svg:d="M98 164c-4 18-20 44-46 44-2 0-16 0-26-8 20-6 22-24 22-26 0-12-10-18-20-18-14 0-28 12-28 30 0 24 28 36 52 36 22 0 42-14 54-36 12 26 40 36 58 36 58 0 88-62 88-76 0-6-5-4-8-6-8 0-8 2-10 8-10 34-40 60-68 60-18 0-30-14-30-32 0-14 12-58 26-112 10-38 32-50 48-50 2 0 16 0 28 6-16 4-22 18-22 28s9 18 20 18 26-10 26-30c0-28-30-36-50-36-26 0-44 16-56 34-8-20-32-34-58-34-56 0-88 60-88 74 0 8 8 8 10 8 6 0 6-2 8-10 12-38 44-58 68-58 16 0 30 8 30 32 0 10-6 34-10 50-6 23-12 45-18 68z">
              <text:p/>
            </draw:path>
            <draw:path draw:style-name="gr18" draw:text-style-name="P21" draw:layer="layout" svg:width="0.073cm" svg:height="0.073cm" svg:x="17.22cm" svg:y="11.052cm" svg:viewBox="0 0 74 74" svg:d="M74 36c0-20-18-36-38-36s-36 15-36 36 16 38 36 38 38-16 38-38z">
              <text:p/>
            </draw:path>
            <draw:path draw:style-name="gr18" draw:text-style-name="P21" draw:layer="layout" svg:width="0.073cm" svg:height="0.073cm" svg:x="17.532cm" svg:y="11.052cm" svg:viewBox="0 0 74 74" svg:d="M74 36c0-20-17-36-38-36s-36 15-36 36 15 38 36 38 38-16 38-38z">
              <text:p/>
            </draw:path>
            <draw:path draw:style-name="gr18" draw:text-style-name="P21" draw:layer="layout" svg:width="0.073cm" svg:height="0.073cm" svg:x="17.844cm" svg:y="11.052cm" svg:viewBox="0 0 74 74" svg:d="M74 36c0-20-15-36-36-36s-38 15-38 36 17 38 38 38 36-16 36-38z">
              <text:p/>
            </draw:path>
            <draw:path draw:style-name="gr18" draw:text-style-name="P21" draw:layer="layout" svg:width="0.269cm" svg:height="0.317cm" svg:x="18.128cm" svg:y="10.954cm" svg:viewBox="0 0 270 318" svg:d="M100 148c20 0 72-2 106-16 50-22 54-62 54-72 0-32-28-60-76-60-78 0-184 68-184 192 0 70 42 126 110 126 102 0 160-74 160-82 0-4-4-10-8-10s-6 2-10 8c-54 68-132 68-140 68-54 0-62-58-62-80 0-10 2-30 12-74 13 0 25 0 38 0zM66 132c28-106 100-116 118-116 34 0 52 20 52 44 0 72-112 72-140 72-10 0-20 0-30 0z">
              <text:p/>
            </draw:path>
            <draw:path draw:style-name="gr18" draw:text-style-name="P21" draw:layer="layout" svg:width="0.331cm" svg:height="0.023cm" svg:x="18.476cm" svg:y="10.84cm" svg:viewBox="0 0 332 24" svg:d="M314 24c8 0 18 0 18-12s-10-12-18-12c-98 0-196 0-294 0-8 0-20 0-20 10 0 14 12 14 20 14 98 0 196 0 294 0z">
              <text:p/>
            </draw:path>
            <draw:path draw:style-name="gr18" draw:text-style-name="P21" draw:layer="layout" svg:width="0.271cm" svg:height="0.345cm" svg:x="18.898cm" svg:y="10.634cm" svg:viewBox="0 0 272 346" svg:d="M164 200c24 56 52 128 58 134 8 12 18 12 26 12 3 0 7 0 10 0 8 0 14 0 14-6 0-4-2-4-2-6-6-4-12-16-14-20-40-95-80-189-120-284-4-8-14-30-66-30-6 0-12 0-12 6s4 6 8 6c10 2 20 4 32 32 19 46 39 92 58 138-49 43-97 87-146 130-6 6-10 10-10 18 0 12 10 16 18 16 10 0 14-6 16-8 43-46 87-92 130-138z">
              <text:p/>
            </draw:path>
            <draw:path draw:style-name="gr18" draw:text-style-name="P21" draw:layer="layout" svg:width="0.245cm" svg:height="0.157cm" svg:x="19.228cm" svg:y="10.89cm" svg:viewBox="0 0 246 158" svg:d="M36 120c-2 10-6 24-6 26 0 8 6 12 14 12 4 0 12-2 16-12 3-9 4-18 8-26 10-48 10-48 12-50 4-10 30-58 72-58 18 0 26 8 26 24 0 20-16 56-24 76-2 6-4 10-4 16 0 18 18 30 38 30 38 0 58-46 58-54 0-4-6-4-8-4-6 0-6 0-8 8-6 20-22 38-40 38-8 0-10-6-10-12 0-8 2-12 4-20 6-14 22-54 22-72 0-26-18-42-52-42-32 0-54 18-66 34-2-28-30-34-42-34-36 0-31 36-46 54 0 4 6 4 8 4 6 0 6-2 8-6 4-20 12-40 28-40 12 0 14 10 14 18 0 4-4 18-6 28-2 8-6 24-8 30-3 11-5 21-8 32z">
              <text:p/>
            </draw:path>
            <draw:path draw:style-name="gr18" draw:text-style-name="P21" draw:layer="layout" svg:width="0.263cm" svg:height="0.221cm" svg:x="19.564cm" svg:y="10.758cm" svg:viewBox="0 0 264 222" svg:d="M100 164c-6 18-22 44-48 44-9-3-16 0-26-8 20-6 22-24 22-26 0-12-8-18-20-18-14 0-28 12-28 30 0 24 28 36 52 36 22 0 42-14 54-36 12 26 40 36 60 36 56 0 86-62 86-76 0-6-6-6-8-6-6 0-8 2-10 8-10 34-38 60-66 60-20 0-30-14-30-32 0-14 12-58 26-112 8-38 32-50 48-50 9 2 16 0 26 6-16 4-22 18-22 28s8 18 20 18 28-10 28-30c0-28-32-36-52-36-24 0-44 16-54 34-10-20-32-34-60-34-54 0-86 60-86 74 0 8 6 8 8 8 6 0 6-2 10-10 12-38 42-58 66-58 16 0 30 8 30 32 0 10-6 34-10 50-5 23-11 45-16 68z">
              <text:p/>
            </draw:path>
            <draw:path draw:style-name="gr18" draw:text-style-name="P21" draw:layer="layout" svg:width="0.467cm" svg:height="0.163cm" svg:x="11.868cm" svg:y="12.059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18" draw:text-style-name="P21" draw:layer="layout" svg:width="0.269cm" svg:height="0.317cm" svg:x="13.11cm" svg:y="12.007cm" svg:viewBox="0 0 270 318" svg:d="M100 148c20 0 72-2 106-16 50-22 54-62 54-72 0-32-28-60-76-60-78 0-184 68-184 190 0 72 42 128 110 128 102 0 160-74 160-82 0-6-4-10-8-10s-6 2-10 6c-56 70-132 70-140 70-54 0-62-58-62-80 0-10 2-32 12-74 13 0 25 0 38 0zM66 132c28-106 100-116 118-116 34 0 52 20 52 44 0 72-112 72-140 72-10 0-20 0-30 0z">
              <text:p/>
            </draw:path>
            <draw:path draw:style-name="gr18" draw:text-style-name="P21" draw:layer="layout" svg:width="0.331cm" svg:height="0.025cm" svg:x="13.458cm" svg:y="11.891cm" svg:viewBox="0 0 332 26" svg:d="M314 26c8 0 18 0 18-12 0-14-10-14-18-14-98 0-196 0-294 0-8 0-20 0-20 12 0 14 12 14 20 14 98 0 196 0 294 0z">
              <text:p/>
            </draw:path>
            <draw:path draw:style-name="gr18" draw:text-style-name="P21" draw:layer="layout" svg:width="0.513cm" svg:height="0.491cm" svg:x="13.978cm" svg:y="11.659cm" svg:viewBox="0 0 514 492" svg:d="M234 254c6-6 6-6 6-8s0-4-4-8c-58-71-116-143-174-214 71 0 143 0 214 0 72 0 110 10 118 12 44 12 86 40 104 82 5 0 11 0 16 0-15-39-31-79-46-118-151 0-301 0-452 0-12 0-12 0-14 2s-2 2-2 16c66 81 132 161 198 242-64 72-128 144-192 216-6 6-6 6-6 8 0 8 6 8 16 8 151 0 301 0 452 0 15-43 31-86 46-128-5 0-11 0-16 0-18 46-60 72-96 82-10 2-46 14-122 14s-152 0-228 0c61-69 121-138 182-206z">
              <text:p/>
            </draw:path>
            <draw:path draw:style-name="gr18" draw:text-style-name="P21" draw:layer="layout" svg:width="0.245cm" svg:height="0.159cm" svg:x="14.562cm" svg:y="11.659cm" svg:viewBox="0 0 246 160" svg:d="M38 122c-2 8-6 24-6 26 0 8 6 12 12 12s14-2 18-12c0-2 4-18 6-26 12-48 8-33 12-50 6-10 30-60 74-60 16 0 24 10 24 26 0 20-14 56-22 76-2 4-4 10-4 16 0 18 18 30 38 30 38 0 56-46 56-54 0-6-4-6-6-6-6 0-6 2-8 8-8 22-24 40-40 40-8 0-12-6-12-14 0-6 2-10 6-18 6-14 22-54 22-74 0-26-18-42-52-42-32 0-54 20-66 36-2-30-30-36-44-36-34 0-46 54-46 56 0 4 6 4 8 4 6 0 8-2 8-6 6-20 14-42 28-42 12 0 14 12 14 20 0 4-2 18-4 26-4 10-6 24-8 32-3 11-5 21-8 32z">
              <text:p/>
            </draw:path>
            <draw:path draw:style-name="gr18" draw:text-style-name="P21" draw:layer="layout" svg:width="0.123cm" svg:height="0.237cm" svg:x="14.562cm" svg:y="11.951cm" svg:viewBox="0 0 124 238" svg:d="M108 16c0-10-6-16-16-16s-20 10-20 22c0 8 8 14 14 14 12 0 22-10 22-20zM124 184c0-6-4-4-6-6-6 0-8 2-10 8-6 20-20 40-38 40-8 0-12-6-12-14 0-6 2-10 6-18 2-6 6-14 6-18 2-4 16-36 20-48 4-8 6-12 6-18 0-16-16-30-38-30-38 0-58 44-58 54 0 4 6 4 8 4 6 0 6-2 8-6 8-26 26-42 40-42 6 0 10 4 10 14 0 2 0 6-2 12-2 8-18 44-22 56-4 6-4 8-8 20-2 4-4 10-4 16 0 18 18 30 38 30 38 0 56-46 56-54z">
              <text:p/>
            </draw:path>
            <draw:path draw:style-name="gr18" draw:text-style-name="P21" draw:layer="layout" svg:width="0.293cm" svg:height="0.103cm" svg:x="14.752cm" svg:y="12.045cm" svg:viewBox="0 0 294 104" svg:d="M280 20c4 0 14 0 14-10s-10-10-16-10c-87 0-175 0-262 0-6 0-16 0-16 10s10 10 14 10c89 0 177 0 266 0zM278 104c6 0 16 0 16-10s-10-10-14-10c-89 0-177 0-266 0-4 0-14 0-14 10s10 10 16 10c87 0 175 0 262 0z">
              <text:p/>
            </draw:path>
            <draw:path draw:style-name="gr18" draw:text-style-name="P21" draw:layer="layout" svg:width="0.143cm" svg:height="0.233cm" svg:x="15.13cm" svg:y="11.951cm" svg:viewBox="0 0 144 234" svg:d="M90 10c0-10-2-10-14-10-24 22-64 22-70 22-2 0-4 0-6 0 0 5 0 11 0 16 2 0 4 0 6 0 8 0 30 0 52-10 0 59 0 117 0 176 0 10 0 14-38 14-6 0-12 0-18 0 0 5 0 11 0 16 20-2 52-2 72-2s52 0 70 2c0-5 0-11 0-16-6 0-12 0-18 0-36 0-36-4-36-14 0-65 0-129 0-194z">
              <text:p/>
            </draw:path>
            <draw:path draw:style-name="gr18" draw:text-style-name="P21" draw:layer="layout" svg:width="0.271cm" svg:height="0.347cm" svg:x="15.486cm" svg:y="11.685cm" svg:viewBox="0 0 272 348" svg:d="M162 202c26 56 54 126 58 134 10 12 20 12 26 12 3 0 7 0 10 0 10 0 16 0 16-6 0-4-2-4-4-6-6-6-10-16-12-20-40-95-80-189-120-284-4-8-14-32-66-32-6 0-12 0-12 8 0 6 4 6 6 6 12 2 20 4 32 32 20 46 40 92 60 138-49 43-97 87-146 130-6 6-10 10-10 18 0 12 10 16 18 16s14-6 16-8c43-46 85-92 128-138z">
              <text:p/>
            </draw:path>
            <draw:path draw:style-name="gr18" draw:text-style-name="P21" draw:layer="layout" svg:width="0.123cm" svg:height="0.237cm" svg:x="15.816cm" svg:y="11.863cm" svg:viewBox="0 0 124 238" svg:d="M106 16c0-10-6-16-14-16-10 0-22 10-22 22 0 10 8 14 14 14 12 0 22-10 22-20zM124 184c0-6-6-6-8-6-6 0-6 2-8 10-6 18-22 38-40 38-8 0-10-6-10-12 0-8 2-12 4-18 2-8 6-14 8-20 0-4 14-36 20-48 2-8 4-12 4-18 0-16-16-30-38-30-36 0-56 44-56 54 0 4 4 3 6 4 6 0 8-2 8-6 8-26 26-40 40-40 8 0 12 4 12 12 0 2 0 6-4 14-2 6-18 44-22 54-2 6-2 8-8 20-2 4-4 10-4 16 0 18 18 30 38 30 38 0 58-46 58-54z">
              <text:p/>
            </draw:path>
            <draw:path draw:style-name="gr18" draw:text-style-name="P21" draw:layer="layout" svg:width="0.073cm" svg:height="0.073cm" svg:x="16.102cm" svg:y="12.243cm" svg:viewBox="0 0 74 74" svg:d="M74 38c0-22-17-38-38-38s-36 17-36 38 15 36 36 36 38-16 38-36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cenario</text:p>
          </draw:text-box>
        </draw:frame>
        <draw:frame presentation:style-name="pr5" draw:text-style-name="P1" draw:layer="layout" svg:width="15.3cm" svg:height="9.134cm" svg:x="0.3cm" svg:y="3.8cm" presentation:class="outline" presentation:user-transformed="true">
          <draw:text-box>
            <text:list text:style-name="L3">
              <text:list-item>
                <text:p><text:span text:style-name="T50">An airline ticket counter with </text:span><text:span text:style-name="T51">n</text:span><text:span text:style-name="T50"> service agents.</text:span></text:p>
              </text:list-item>
              <text:list-item>
                <text:p><text:span text:style-name="T50">The time agent </text:span><text:span text:style-name="T51">i</text:span><text:span text:style-name="T50"> takes per customer: </text:span><text:span text:style-name="T50"><text:tab/></text:span></text:p>
                <text:list>
                  <text:list-item>
                    <text:p><text:span text:style-name="T52">Exponential distribution, parameter </text:span><text:span text:style-name="T53">λ</text:span><text:span text:style-name="T54">i</text:span></text:p>
                  </text:list-item>
                </text:list>
              </text:list-item>
              <text:list-item>
                <text:p text:style-name="P20"><text:span text:style-name="T55">You are at the head of the line and wondering how long, in average, you wait for an agent to serve you...</text:span><text:span text:style-name="T56"> </text:span></text:p>
              </text:list-item>
            </text:list>
          </draw:text-box>
        </draw:frame>
        <draw:g>
          <draw:custom-shape draw:style-name="gr19" draw:text-style-name="P22" draw:layer="layout" svg:width="1cm" svg:height="1cm" svg:x="17.1cm" svg:y="4.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0" draw:text-style-name="P22" draw:layer="layout" svg:width="1cm" svg:height="1.4cm" svg:x="17.1cm" svg:y="5.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22" draw:layer="layout" svg:width="1cm" svg:height="1cm" svg:x="19.001cm" svg:y="4.1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0" draw:text-style-name="P22" draw:layer="layout" svg:width="1cm" svg:height="1.4cm" svg:x="19.001cm" svg:y="5.188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22" draw:layer="layout" svg:width="1cm" svg:height="1cm" svg:x="20.902cm" svg:y="4.17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0" draw:text-style-name="P22" draw:layer="layout" svg:width="1cm" svg:height="1.4cm" svg:x="20.902cm" svg:y="5.17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22" draw:layer="layout" svg:width="1cm" svg:height="1cm" svg:x="22.903cm" svg:y="4.16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0" draw:text-style-name="P22" draw:layer="layout" svg:width="1cm" svg:height="1.4cm" svg:x="22.903cm" svg:y="5.164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22" draw:layer="layout" svg:width="1cm" svg:height="1cm" svg:x="24.904cm" svg:y="4.15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0" draw:text-style-name="P22" draw:layer="layout" svg:width="1cm" svg:height="1.4cm" svg:x="24.904cm" svg:y="5.15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21" draw:text-style-name="P23" draw:layer="layout" svg:width="10.6cm" svg:height="1.4cm" svg:x="16.2cm" svg:y="6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2" draw:text-style-name="P24" draw:layer="layout" svg:width="0.8cm" svg:height="0.8cm" svg:x="21.6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4" draw:layer="layout" svg:width="0.8cm" svg:height="1.4cm" svg:x="2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5" draw:layer="layout" svg:width="2cm" svg:height="0.6cm" svg:x="22.8cm" svg:y="9.2cm">
            <text:p/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cenario</text:p>
          </draw:text-box>
        </draw:frame>
        <draw:frame presentation:style-name="pr5" draw:text-style-name="P1" draw:layer="layout" svg:width="15.3cm" svg:height="9.134cm" svg:x="0.3cm" svg:y="3.8cm" presentation:class="outline" presentation:user-transformed="true">
          <draw:text-box>
            <text:list text:style-name="L3">
              <text:list-item>
                <text:p><text:span text:style-name="T50">An airline ticket counter with </text:span><text:span text:style-name="T51">n</text:span><text:span text:style-name="T50"> service agents.</text:span></text:p>
              </text:list-item>
              <text:list-item>
                <text:p><text:span text:style-name="T50">The time agent </text:span><text:span text:style-name="T51">i</text:span><text:span text:style-name="T50"> takes per customer: </text:span><text:span text:style-name="T50"><text:tab/></text:span></text:p>
                <text:list>
                  <text:list-item>
                    <text:p><text:span text:style-name="T52">Exponential distribution, parameter </text:span><text:span text:style-name="T53">λ</text:span><text:span text:style-name="T54">i</text:span></text:p>
                  </text:list-item>
                </text:list>
              </text:list-item>
              <text:list-item>
                <text:p text:style-name="P20"><text:span text:style-name="T55">You are at the head of the line and wondering how long, in average, you wait for an agent to serve you...</text:span><text:span text:style-name="T56"> </text:span></text:p>
              </text:list-item>
            </text:list>
          </draw:text-box>
        </draw:frame>
        <draw:g>
          <draw:custom-shape draw:style-name="gr19" draw:text-style-name="P22" draw:layer="layout" svg:width="1cm" svg:height="1cm" svg:x="17.1cm" svg:y="4.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0" draw:text-style-name="P22" draw:layer="layout" svg:width="1cm" svg:height="1.4cm" svg:x="17.1cm" svg:y="5.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22" draw:layer="layout" svg:width="1cm" svg:height="1cm" svg:x="19.001cm" svg:y="4.1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0" draw:text-style-name="P22" draw:layer="layout" svg:width="1cm" svg:height="1.4cm" svg:x="19.001cm" svg:y="5.188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22" draw:layer="layout" svg:width="1cm" svg:height="1cm" svg:x="20.902cm" svg:y="4.17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0" draw:text-style-name="P22" draw:layer="layout" svg:width="1cm" svg:height="1.4cm" svg:x="20.902cm" svg:y="5.17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22" draw:layer="layout" svg:width="1cm" svg:height="1cm" svg:x="22.903cm" svg:y="4.16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0" draw:text-style-name="P22" draw:layer="layout" svg:width="1cm" svg:height="1.4cm" svg:x="22.903cm" svg:y="5.164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22" draw:layer="layout" svg:width="1cm" svg:height="1cm" svg:x="24.904cm" svg:y="4.15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0" draw:text-style-name="P22" draw:layer="layout" svg:width="1cm" svg:height="1.4cm" svg:x="24.904cm" svg:y="5.15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21" draw:text-style-name="P23" draw:layer="layout" svg:width="10.6cm" svg:height="1.4cm" svg:x="16.2cm" svg:y="6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2" draw:text-style-name="P24" draw:layer="layout" svg:width="0.8cm" svg:height="0.8cm" svg:x="21.6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4" draw:layer="layout" svg:width="0.8cm" svg:height="1.4cm" svg:x="2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5" draw:layer="layout" svg:width="2cm" svg:height="0.6cm" svg:x="22.8cm" svg:y="9.2cm">
            <text:p/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frame draw:style-name="gr25" draw:text-style-name="P26" draw:layer="layout" svg:width="14.4cm" svg:height="2.799cm" svg:x="2.6cm" svg:y="11.4cm">
            <draw:text-box>
              <text:p><text:span text:style-name="T57">The time until the first agent is free</text:span></text:p>
              <text:list text:style-name="L4">
                <text:list-item>
                  <text:p><text:span text:style-name="T57">Exponential distribution with parameter </text:span><text:span text:style-name="T57"><text:tab/></text:span></text:p>
                  <text:p><text:span text:style-name="T58"/></text:p>
                </text:list-item>
                <text:list-item>
                  <text:p><text:span text:style-name="T57">Expected waiting time: </text:span></text:p>
                </text:list-item>
              </text:list>
            </draw:text-box>
          </draw:frame>
          <draw:g>
            <svg:title>TexMaths</svg:title>
            <svg:desc>16§display§\textcolor{Orange}{\sum_{i=1}^n \lambda_i}§svg§600§FALSE§</svg:desc>
            <draw:frame draw:style-name="gr26" draw:text-style-name="P6" draw:layer="layout" svg:width="1.37cm" svg:height="1.542cm" svg:x="14cm" svg:y="11.865cm">
              <draw:image xlink:href="Pictures/10001E1A00000359000003C5AA4DA2E2AF4E6911.svg" xlink:type="simple" xlink:show="embed" xlink:actuate="onLoad" draw:mime-type="image/svg+xml">
                <text:p/>
              </draw:image>
              <draw:image xlink:href="Pictures/100000010000002000000024E83B994D1A3B2776.png" xlink:type="simple" xlink:show="embed" xlink:actuate="onLoad" draw:mime-type="image/png"/>
            </draw:frame>
          </draw:g>
          <draw:g>
            <svg:title>TexMaths</svg:title>
            <svg:desc>16§display§\textcolor{Red}{1/\sum_{i=1}^n \lambda_i}§svg§600§FALSE§</svg:desc>
            <draw:frame draw:style-name="gr26" draw:text-style-name="P6" draw:layer="layout" svg:width="2.026cm" svg:height="1.542cm" svg:x="9.7cm" svg:y="13cm">
              <draw:image xlink:href="Pictures/100021FE000004F3000003C5E420CDA2A74949F8.svg" xlink:type="simple" xlink:show="embed" xlink:actuate="onLoad" draw:mime-type="image/svg+xml">
                <text:p/>
              </draw:image>
              <draw:image xlink:href="Pictures/1000000100000030000000249F111F9AB9DCCB83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4">Counting process.</text:span></text:p>
                <text:list>
                  <text:list-item>
                    <text:p><text:span text:style-name="T59">E.g., arrivals of customers to a queue, emissions of radioactive particles, price surges in the stock markets, etc.</text:span></text:p>
                  </text:list-item>
                </text:list>
              </text:list-item>
              <text:list-item>
                <text:p><text:span text:style-name="T16">N</text:span><text:span text:style-name="T14">(</text:span><text:span text:style-name="T16">t</text:span><text:span text:style-name="T14">): the number of events in the interval (say [0, </text:span><text:span text:style-name="T16">t</text:span><text:span text:style-name="T14">]).</text:span></text:p>
              </text:list-item>
              <text:list-item>
                <text:p><text:span text:style-name="T37">A </text:span><text:span text:style-name="T60">stochastic counting process</text:span><text:span text:style-name="T37">: {</text:span><text:span text:style-name="T16">N</text:span><text:span text:style-name="T14">(</text:span><text:span text:style-name="T16">t</text:span><text:span text:style-name="T14">): <text:s/></text:span><text:span text:style-name="T16">t</text:span><text:span text:style-name="T14"> </text:span><text:span text:style-name="T29">≥</text:span><text:span text:style-name="T28"> 0</text:span><text:span text:style-name="T14">}</text:span></text:p>
              </text:list-item>
            </text:list>
          </draw:text-box>
        </draw:frame>
        <draw:frame draw:style-name="gr2" draw:text-style-name="P6" draw:layer="layout" svg:width="2.387cm" svg:height="2.8cm" svg:x="18.28cm" svg:y="0.4cm">
          <draw:image xlink:href="Pictures/10000000000003E8000004953964B5B584655374.png" xlink:type="simple" xlink:show="embed" xlink:actuate="onLoad" draw:mime-type="image/png">
            <text:p/>
          </draw:image>
        </draw:frame>
        <draw:frame draw:style-name="gr27" draw:text-style-name="P28" draw:layer="layout" svg:width="5.252cm" svg:height="2.132cm" svg:x="21.248cm" svg:y="1.582cm">
          <draw:text-box>
            <text:p text:style-name="P27"><text:span text:style-name="T61">Siméon Poisson (1781</text:span><text:span text:style-name="T62">−</text:span><text:span text:style-name="T61">1840)</text:span></text:p>
            <text:p text:style-name="P27"><text:span text:style-name="T61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8cm" svg:height="10.8cm" svg:x="0.6cm" svg:y="3.6cm" presentation:class="outline" presentation:user-transformed="true">
          <draw:text-box>
            <text:list text:style-name="L3">
              <text:list-item>
                <text:p><text:span text:style-name="T63">A </text:span><text:span text:style-name="T64">Poisson process</text:span><text:span text:style-name="T63"> {</text:span><text:span text:style-name="T65">N</text:span><text:span text:style-name="T59">(</text:span><text:span text:style-name="T65">t</text:span><text:span text:style-name="T59">): <text:s/></text:span><text:span text:style-name="T65">t</text:span><text:span text:style-name="T59"> </text:span><text:span text:style-name="T66">≥</text:span><text:span text:style-name="T67"> 0</text:span><text:span text:style-name="T59">} with parameter </text:span><text:span text:style-name="T68">λ</text:span><text:span text:style-name="T67"> </text:span><text:span text:style-name="T59">is a stochastic counting process such that the following conditions hold. </text:span></text:p>
              </text:list-item>
            </text:list>
            <text:list text:style-name="L5">
              <text:list-item>
                <text:list>
                  <text:list-item>
                    <text:p><text:span text:style-name="T69"><text:s/></text:span><text:span text:style-name="T65">N</text:span><text:span text:style-name="T59">(0) = 0.</text:span></text:p>
                  </text:list-item>
                  <text:list-item>
                    <text:p text:style-name="P29"><text:span text:style-name="T63">(Independent &amp; stationary increments) For any </text:span><text:span text:style-name="T70">t</text:span><text:span text:style-name="T63">, </text:span><text:span text:style-name="T70">s</text:span><text:span text:style-name="T63"> &gt; 0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3">the distribution of </text:span><text:span text:style-name="T70">N</text:span><text:span text:style-name="T63">(</text:span><text:span text:style-name="T70">t</text:span><text:span text:style-name="T63">+</text:span><text:span text:style-name="T70">s</text:span><text:span text:style-name="T63">) – </text:span><text:span text:style-name="T70">N</text:span><text:span text:style-name="T63">(</text:span><text:span text:style-name="T70">s</text:span><text:span text:style-name="T63">) is identical to the distribution of </text:span><text:span text:style-name="T70">N</text:span><text:span text:style-name="T63">(</text:span><text:span text:style-name="T70">t</text:span><text:span text:style-name="T63">);</text:span></text:p>
                      </text:list-item>
                      <text:list-item>
                        <text:p><text:span text:style-name="T63">for disjoint intervals [</text:span><text:span text:style-name="T70">t</text:span><text:span text:style-name="T71">1</text:span><text:span text:style-name="T63">, </text:span><text:span text:style-name="T70">t</text:span><text:span text:style-name="T71">2</text:span><text:span text:style-name="T63">] and [</text:span><text:span text:style-name="T70">t</text:span><text:span text:style-name="T71">3</text:span><text:span text:style-name="T63">, </text:span><text:span text:style-name="T70">t</text:span><text:span text:style-name="T71">4</text:span><text:span text:style-name="T63">], the distribution of </text:span><text:span text:style-name="T70">N</text:span><text:span text:style-name="T63">(</text:span><text:span text:style-name="T70">t</text:span><text:span text:style-name="T71">2</text:span><text:span text:style-name="T63">) – </text:span><text:span text:style-name="T70">N</text:span><text:span text:style-name="T63">(</text:span><text:span text:style-name="T70">t</text:span><text:span text:style-name="T71">1</text:span><text:span text:style-name="T63">) is independent of the </text:span><text:span text:style-name="T59">distribution of </text:span><text:span text:style-name="T65">N</text:span><text:span text:style-name="T59">(</text:span><text:span text:style-name="T65">t</text:span><text:span text:style-name="T72">4</text:span><text:span text:style-name="T59">) – </text:span><text:span text:style-name="T65">N</text:span><text:span text:style-name="T59">(</text:span><text:span text:style-name="T65">t</text:span><text:span text:style-name="T72">3</text:span><text:span text:style-name="T59">).</text:span></text:p>
                        <text:p><text:span text:style-name="T73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59"/></text:p>
                    <text:p><text:span text:style-name="T59"><text:s/></text:span></text:p>
                  </text:list-item>
                  <text:list-item>
                    <text:p><text:span text:style-name="T59"><text:s/>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387cm" svg:height="2.8cm" svg:x="18.28cm" svg:y="0.4cm">
          <draw:image xlink:href="Pictures/10000000000003E8000004953964B5B584655374.png" xlink:type="simple" xlink:show="embed" xlink:actuate="onLoad" draw:mime-type="image/png">
            <text:p/>
          </draw:image>
        </draw:frame>
        <draw:frame draw:style-name="gr27" draw:text-style-name="P28" draw:layer="layout" svg:width="5.252cm" svg:height="2.132cm" svg:x="21.248cm" svg:y="1.582cm">
          <draw:text-box>
            <text:p text:style-name="P27"><text:span text:style-name="T61">Siméon Poisson (1781</text:span><text:span text:style-name="T62">−</text:span><text:span text:style-name="T61">1840)</text:span></text:p>
            <text:p text:style-name="P27"><text:span text:style-name="T61">Wikipedia</text:span></text:p>
          </draw:text-box>
        </draw:frame>
        <draw:g>
          <svg:title>TexMaths</svg:title>
          <svg:desc>18§display§\lim_{t\rightarrow 0} \frac{\Pr[N(t) = 1]}{t} = \lambda.§svg§600§FALSE§</svg:desc>
          <draw:frame draw:style-name="gr2" draw:text-style-name="P6" draw:layer="layout" svg:width="6.071cm" svg:height="1.39cm" svg:x="3.046cm" svg:y="10.975cm">
            <draw:image xlink:href="Pictures/10003BAE00000D2E000003057153C13B800EAD50.svg" xlink:type="simple" xlink:show="embed" xlink:actuate="onLoad" draw:mime-type="image/svg+xml">
              <text:p/>
            </draw:image>
            <draw:image xlink:href="Pictures/10000001000000800000001D6FC7569F0A602EB6.png" xlink:type="simple" xlink:show="embed" xlink:actuate="onLoad" draw:mime-type="image/png"/>
          </draw:frame>
        </draw:g>
        <draw:g>
          <svg:title>TexMaths</svg:title>
          <svg:desc>18§display§\lim_{t\rightarrow 0} \frac{\Pr[N(t) \geq 2]}{t} = 0.§svg§600§FALSE§</svg:desc>
          <draw:frame draw:style-name="gr2" draw:text-style-name="P6" draw:layer="layout" svg:width="6.019cm" svg:height="1.39cm" svg:x="3.047cm" svg:y="13.177cm">
            <draw:image xlink:href="Pictures/10003F8500000D11000003055580C953249E5672.svg" xlink:type="simple" xlink:show="embed" xlink:actuate="onLoad" draw:mime-type="image/svg+xml">
              <text:p/>
            </draw:image>
            <draw:image xlink:href="Pictures/100000010000007E0000001DCB087369C21FF267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8cm" svg:height="10.8cm" svg:x="0.6cm" svg:y="3.6cm" presentation:class="outline" presentation:user-transformed="true">
          <draw:text-box>
            <text:list text:style-name="L3">
              <text:list-item>
                <text:p><text:span text:style-name="T63">A </text:span><text:span text:style-name="T64">Poisson process</text:span><text:span text:style-name="T63"> {</text:span><text:span text:style-name="T65">N</text:span><text:span text:style-name="T59">(</text:span><text:span text:style-name="T65">t</text:span><text:span text:style-name="T59">): <text:s/></text:span><text:span text:style-name="T65">t</text:span><text:span text:style-name="T59"> </text:span><text:span text:style-name="T66">≥</text:span><text:span text:style-name="T67"> 0</text:span><text:span text:style-name="T59">} with parameter </text:span><text:span text:style-name="T68">λ</text:span><text:span text:style-name="T67"> </text:span><text:span text:style-name="T59">is a stochastic counting process such that the following conditions hold. </text:span></text:p>
              </text:list-item>
            </text:list>
            <text:list text:style-name="L5">
              <text:list-item>
                <text:list>
                  <text:list-item>
                    <text:p><text:span text:style-name="T69"><text:s/></text:span><text:span text:style-name="T65">N</text:span><text:span text:style-name="T59">(0) = 0.</text:span></text:p>
                  </text:list-item>
                  <text:list-item>
                    <text:p text:style-name="P29"><text:span text:style-name="T63">(Independent &amp; stationary increments) For any </text:span><text:span text:style-name="T70">t</text:span><text:span text:style-name="T63">, </text:span><text:span text:style-name="T70">s</text:span><text:span text:style-name="T63"> &gt; 0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3">the distribution of </text:span><text:span text:style-name="T70">N</text:span><text:span text:style-name="T63">(</text:span><text:span text:style-name="T70">t</text:span><text:span text:style-name="T63">+</text:span><text:span text:style-name="T70">s</text:span><text:span text:style-name="T63">) – </text:span><text:span text:style-name="T70">N</text:span><text:span text:style-name="T63">(</text:span><text:span text:style-name="T70">s</text:span><text:span text:style-name="T63">) is identical to the distribution of </text:span><text:span text:style-name="T70">N</text:span><text:span text:style-name="T63">(</text:span><text:span text:style-name="T70">t</text:span><text:span text:style-name="T63">);</text:span></text:p>
                      </text:list-item>
                      <text:list-item>
                        <text:p><text:span text:style-name="T63">for disjoint intervals [</text:span><text:span text:style-name="T70">t</text:span><text:span text:style-name="T71">1</text:span><text:span text:style-name="T63">, </text:span><text:span text:style-name="T70">t</text:span><text:span text:style-name="T71">2</text:span><text:span text:style-name="T63">] and [</text:span><text:span text:style-name="T70">t</text:span><text:span text:style-name="T71">3</text:span><text:span text:style-name="T63">, </text:span><text:span text:style-name="T70">t</text:span><text:span text:style-name="T71">4</text:span><text:span text:style-name="T63">], the distribution of </text:span><text:span text:style-name="T70">N</text:span><text:span text:style-name="T63">(</text:span><text:span text:style-name="T70">t</text:span><text:span text:style-name="T71">2</text:span><text:span text:style-name="T63">) – </text:span><text:span text:style-name="T70">N</text:span><text:span text:style-name="T63">(</text:span><text:span text:style-name="T70">t</text:span><text:span text:style-name="T71">1</text:span><text:span text:style-name="T63">) is independent of the </text:span><text:span text:style-name="T59">distribution of </text:span><text:span text:style-name="T65">N</text:span><text:span text:style-name="T59">(</text:span><text:span text:style-name="T65">t</text:span><text:span text:style-name="T72">4</text:span><text:span text:style-name="T59">) – </text:span><text:span text:style-name="T65">N</text:span><text:span text:style-name="T59">(</text:span><text:span text:style-name="T65">t</text:span><text:span text:style-name="T72">3</text:span><text:span text:style-name="T59">).</text:span></text:p>
                        <text:p><text:span text:style-name="T73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59"/></text:p>
                    <text:p><text:span text:style-name="T59"><text:s/></text:span></text:p>
                  </text:list-item>
                  <text:list-item>
                    <text:p><text:span text:style-name="T59"><text:s/>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387cm" svg:height="2.8cm" svg:x="18.28cm" svg:y="0.4cm">
          <draw:image xlink:href="Pictures/10000000000003E8000004953964B5B584655374.png" xlink:type="simple" xlink:show="embed" xlink:actuate="onLoad" draw:mime-type="image/png">
            <text:p/>
          </draw:image>
        </draw:frame>
        <draw:frame draw:style-name="gr27" draw:text-style-name="P28" draw:layer="layout" svg:width="5.252cm" svg:height="2.132cm" svg:x="21.248cm" svg:y="1.582cm">
          <draw:text-box>
            <text:p text:style-name="P27"><text:span text:style-name="T61">Siméon Poisson (1781</text:span><text:span text:style-name="T62">−</text:span><text:span text:style-name="T61">1840)</text:span></text:p>
            <text:p text:style-name="P27"><text:span text:style-name="T61">Wikipedia</text:span></text:p>
          </draw:text-box>
        </draw:frame>
        <draw:g>
          <svg:title>TexMaths</svg:title>
          <svg:desc>18§display§\lim_{t\rightarrow 0} \frac{\Pr[N(t) = 1]}{t} = \lambda.§svg§600§FALSE§</svg:desc>
          <draw:frame draw:style-name="gr2" draw:text-style-name="P6" draw:layer="layout" svg:width="6.071cm" svg:height="1.39cm" svg:x="3.046cm" svg:y="10.975cm">
            <draw:image xlink:href="Pictures/10003BAE00000D2E000003057153C13B800EAD50.svg" xlink:type="simple" xlink:show="embed" xlink:actuate="onLoad" draw:mime-type="image/svg+xml">
              <text:p/>
            </draw:image>
            <draw:image xlink:href="Pictures/10000001000000800000001D6FC7569F0A602EB6.png" xlink:type="simple" xlink:show="embed" xlink:actuate="onLoad" draw:mime-type="image/png"/>
          </draw:frame>
        </draw:g>
        <draw:g>
          <svg:title>TexMaths</svg:title>
          <svg:desc>18§display§\lim_{t\rightarrow 0} \frac{\Pr[N(t) \geq 2]}{t} = 0.§svg§600§FALSE§</svg:desc>
          <draw:frame draw:style-name="gr2" draw:text-style-name="P6" draw:layer="layout" svg:width="6.019cm" svg:height="1.39cm" svg:x="3.047cm" svg:y="13.177cm">
            <draw:image xlink:href="Pictures/10003F8500000D11000003055580C953249E5672.svg" xlink:type="simple" xlink:show="embed" xlink:actuate="onLoad" draw:mime-type="image/svg+xml">
              <text:p/>
            </draw:image>
            <draw:image xlink:href="Pictures/100000010000007E0000001DCB087369C21FF267.png" xlink:type="simple" xlink:show="embed" xlink:actuate="onLoad" draw:mime-type="image/png"/>
          </draw:frame>
        </draw:g>
        <draw:frame draw:style-name="gr28" draw:text-style-name="P30" draw:layer="layout" svg:width="12.6cm" svg:height="1.757cm" svg:x="11.8cm" svg:y="11.046cm">
          <draw:text-box>
            <text:p><text:span text:style-name="T74">The number of events in a given time interval follows the </text:span><text:span text:style-name="T75">Poisson distribution</text:span><text:span text:style-name="T74">!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76">Poisson Process → Poisson Distribution</text:span></text:p>
          </draw:text-box>
        </draw:frame>
        <draw:frame presentation:style-name="pr5" draw:text-style-name="P31" draw:layer="layout" svg:width="26.1cm" svg:height="9.134cm" svg:x="0.3cm" svg:y="3.8cm" presentation:class="outline" presentation:user-transformed="true">
          <draw:text-box>
            <text:list text:style-name="L3">
              <text:list-item>
                <text:p text:style-name="P20"><text:span text:style-name="T77">Theorem</text:span><text:span text:style-name="T78">. Let {</text:span><text:span text:style-name="T79">N</text:span><text:span text:style-name="T80">(</text:span><text:span text:style-name="T79">t</text:span><text:span text:style-name="T80">): <text:s/></text:span><text:span text:style-name="T79">t</text:span><text:span text:style-name="T81"> </text:span><text:span text:style-name="T82">≥ 0</text:span><text:span text:style-name="T81">}</text:span><text:span text:style-name="T82"> be</text:span><text:span text:style-name="T78"> a Poisson process with</text:span><text:span text:style-name="T80"> with parameter </text:span><text:span text:style-name="T83">λ</text:span><text:span text:style-name="T84">. For any </text:span><text:span text:style-name="T83">t</text:span><text:span text:style-name="T84">, </text:span><text:span text:style-name="T83">s</text:span><text:span text:style-name="T84"> </text:span><text:span text:style-name="T85">≥</text:span><text:span text:style-name="T86"> 0 and any integer </text:span><text:span text:style-name="T87">n </text:span><text:span text:style-name="T85">≥</text:span><text:span text:style-name="T86"> 0, </text:span></text:p>
              </text:list-item>
            </text:list>
          </draw:text-box>
        </draw:frame>
        <draw:g>
          <svg:title>TexMaths</svg:title>
          <svg:desc>22§display§P_n(t) := \Pr[N(t+s) - N(s) = n] = e^{-\lambda t}\frac{(\lambda t)^n}{n!}.§svg§600§FALSE§</svg:desc>
          <draw:frame draw:style-name="gr2" draw:text-style-name="P6" draw:layer="layout" svg:width="15.904cm" svg:height="1.639cm" svg:x="5.365cm" svg:y="6.063cm">
            <draw:image xlink:href="Pictures/10007FDC00001C3E000002EAA11B16479CF41409.svg" xlink:type="simple" xlink:show="embed" xlink:actuate="onLoad" draw:mime-type="image/svg+xml">
              <text:p/>
            </draw:image>
            <draw:image xlink:href="Pictures/10000001000001110000001C7C8E2C8B9A8E526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76">Poisson Process → Poisson Distribution</text:span></text:p>
          </draw:text-box>
        </draw:frame>
        <draw:frame presentation:style-name="pr5" draw:text-style-name="P31" draw:layer="layout" svg:width="26.1cm" svg:height="9.134cm" svg:x="0.3cm" svg:y="3.8cm" presentation:class="outline" presentation:user-transformed="true">
          <draw:text-box>
            <text:list text:style-name="L3">
              <text:list-item>
                <text:p text:style-name="P20"><text:span text:style-name="T77">Theorem</text:span><text:span text:style-name="T78">. Let {</text:span><text:span text:style-name="T79">N</text:span><text:span text:style-name="T80">(</text:span><text:span text:style-name="T79">t</text:span><text:span text:style-name="T80">): <text:s/></text:span><text:span text:style-name="T79">t</text:span><text:span text:style-name="T81"> </text:span><text:span text:style-name="T82">≥ 0</text:span><text:span text:style-name="T81">}</text:span><text:span text:style-name="T82"> be</text:span><text:span text:style-name="T78"> a Poisson process with</text:span><text:span text:style-name="T80"> with parameter </text:span><text:span text:style-name="T83">λ</text:span><text:span text:style-name="T84">. For any </text:span><text:span text:style-name="T83">t</text:span><text:span text:style-name="T84">, </text:span><text:span text:style-name="T83">s</text:span><text:span text:style-name="T84"> </text:span><text:span text:style-name="T85">≥</text:span><text:span text:style-name="T86"> 0 and any integer </text:span><text:span text:style-name="T87">n </text:span><text:span text:style-name="T85">≥</text:span><text:span text:style-name="T86"> 0, </text:span></text:p>
              </text:list-item>
            </text:list>
          </draw:text-box>
        </draw:frame>
        <draw:g>
          <svg:title>TexMaths</svg:title>
          <svg:desc>22§display§P_n(t) := \Pr[N(t+s) - N(s) = n] = e^{-\lambda t}\frac{(\lambda t)^n}{n!}.§svg§600§FALSE§</svg:desc>
          <draw:frame draw:style-name="gr2" draw:text-style-name="P6" draw:layer="layout" svg:width="15.904cm" svg:height="1.639cm" svg:x="5.365cm" svg:y="6.063cm">
            <draw:image xlink:href="Pictures/10007FDC00001C3E000002EAA11B16479CF41409.svg" xlink:type="simple" xlink:show="embed" xlink:actuate="onLoad" draw:mime-type="image/svg+xml">
              <text:p/>
            </draw:image>
            <draw:image xlink:href="Pictures/10000001000001110000001C7C8E2C8B9A8E5263.png" xlink:type="simple" xlink:show="embed" xlink:actuate="onLoad" draw:mime-type="image/png"/>
          </draw:frame>
        </draw:g>
        <draw:custom-shape draw:style-name="gr29" draw:text-style-name="P6" draw:layer="layout" svg:width="8.6cm" svg:height="1.4cm" svg:x="8.2cm" svg:y="6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textcolor{Orange}{ =  \Pr[N(t) - N(0)] = \Pr[N(t) - 0]}§svg§600§FALSE§</svg:desc>
          <draw:frame draw:style-name="gr2" draw:text-style-name="P6" draw:layer="layout" svg:width="10.428cm" svg:height="0.754cm" svg:x="8.503cm" svg:y="8.204cm">
            <draw:image xlink:href="Pictures/10004A1A0000145F0000017A0CF4DCEAE070F040.svg" xlink:type="simple" xlink:show="embed" xlink:actuate="onLoad" draw:mime-type="image/svg+xml">
              <text:p/>
            </draw:image>
            <draw:image xlink:href="Pictures/10000001000000C50000000E91A6DA18FEF5F00E.png" xlink:type="simple" xlink:show="embed" xlink:actuate="onLoad" draw:mime-type="image/png"/>
          </draw:frame>
        </draw:g>
        <draw:frame draw:style-name="gr30" draw:text-style-name="P32" draw:layer="layout" svg:width="19.8cm" svg:height="1.2cm" svg:x="3.8cm" svg:y="10cm">
          <draw:text-box>
            <text:list text:style-name="L4">
              <text:list-item>
                <text:p><text:span text:style-name="T88"><text:s/></text:span><text:span text:style-name="T88">The probability that </text:span><text:span text:style-name="T89">n</text:span><text:span text:style-name="T88"> events happen during time interval of length </text:span><text:span text:style-name="T89">t</text:span><text:span text:style-name="T88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76">Stochastic Process + Poisson = ?</text:span></text:p>
          </draw:text-box>
        </draw:frame>
        <draw:frame presentation:style-name="pr5" draw:text-style-name="P1" draw:layer="layout" svg:width="26.2cm" svg:height="10.8cm" svg:x="0.3cm" svg:y="3.8cm" presentation:class="outline" presentation:user-transformed="true">
          <draw:text-box>
            <text:list text:style-name="L3">
              <text:list-item>
                <text:p><text:span text:style-name="T90">Theorem</text:span><text:span text:style-name="T91">. Let {</text:span><text:span text:style-name="T92">N</text:span><text:span text:style-name="T91">(</text:span><text:span text:style-name="T92">t</text:span><text:span text:style-name="T91">): <text:s/></text:span><text:span text:style-name="T92">t</text:span><text:span text:style-name="T91"> </text:span><text:span text:style-name="T93">≥</text:span><text:span text:style-name="T94"> 0</text:span><text:span text:style-name="T91">} be a </text:span><text:span text:style-name="T95">stochastic process</text:span><text:span text:style-name="T50"> such that <text:s/></text:span></text:p>
              </text:list-item>
            </text:list>
            <text:list text:style-name="L5">
              <text:list-item>
                <text:list>
                  <text:list-item>
                    <text:p><text:span text:style-name="T96"><text:s/></text:span><text:span text:style-name="T51">N</text:span><text:span text:style-name="T50">(0) = 0.</text:span></text:p>
                  </text:list-item>
                  <text:list-item>
                    <text:p text:style-name="P29"><text:span text:style-name="T91">(Independent increments) For disjoint intervals [</text:span><text:span text:style-name="T92">t</text:span><text:span text:style-name="T97">1</text:span><text:span text:style-name="T91">, </text:span><text:span text:style-name="T92">t</text:span><text:span text:style-name="T97">2</text:span><text:span text:style-name="T91">] and [</text:span><text:span text:style-name="T92">t</text:span><text:span text:style-name="T97">3</text:span><text:span text:style-name="T91">, </text:span><text:span text:style-name="T92">t</text:span><text:span text:style-name="T97">4</text:span><text:span text:style-name="T91">], the distribution of </text:span><text:span text:style-name="T92">N</text:span><text:span text:style-name="T91">(</text:span><text:span text:style-name="T92">t</text:span><text:span text:style-name="T97">2</text:span><text:span text:style-name="T91">) – </text:span><text:span text:style-name="T92">N</text:span><text:span text:style-name="T91">(</text:span><text:span text:style-name="T92">t</text:span><text:span text:style-name="T97">1</text:span><text:span text:style-name="T91">) is independent of the </text:span><text:span text:style-name="T50">distribution of </text:span><text:span text:style-name="T51">N</text:span><text:span text:style-name="T50">(</text:span><text:span text:style-name="T51">t</text:span><text:span text:style-name="T98">4</text:span><text:span text:style-name="T50">) – </text:span><text:span text:style-name="T51">N</text:span><text:span text:style-name="T50">(</text:span><text:span text:style-name="T51">t</text:span><text:span text:style-name="T98">3</text:span><text:span text:style-name="T50">).</text:span></text:p>
                  </text:list-item>
                  <text:list-item>
                    <text:p><text:span text:style-name="T50">For any </text:span><text:span text:style-name="T51">t</text:span><text:span text:style-name="T50">, </text:span><text:span text:style-name="T51">s</text:span><text:span text:style-name="T50"> </text:span><text:span text:style-name="T99">≥</text:span><text:span text:style-name="T100"> 0, </text:span><text:span text:style-name="T101">N</text:span><text:span text:style-name="T100">(</text:span><text:span text:style-name="T101">t</text:span><text:span text:style-name="T100">+</text:span><text:span text:style-name="T101">s</text:span><text:span text:style-name="T100">) – </text:span><text:span text:style-name="T101">N</text:span><text:span text:style-name="T100">(</text:span><text:span text:style-name="T101">s</text:span><text:span text:style-name="T100">) has a Poisson distribution with mean </text:span><text:span text:style-name="T102">λt</text:span><text:span text:style-name="T99">.</text:span></text:p>
                  </text:list-item>
                </text:list>
              </text:list-item>
            </text:list>
            <text:list text:style-name="L3">
              <text:list-header>
                <text:p text:style-name="P20"><text:span text:style-name="T91">Then {</text:span><text:span text:style-name="T92">N</text:span><text:span text:style-name="T91">(</text:span><text:span text:style-name="T92">t</text:span><text:span text:style-name="T91">): <text:s/></text:span><text:span text:style-name="T92">t</text:span><text:span text:style-name="T91"> </text:span><text:span text:style-name="T93">≥</text:span><text:span text:style-name="T94"> 0</text:span><text:span text:style-name="T91">} is a Poisson process with rate </text:span><text:span text:style-name="T103">λ</text:span><text:span text:style-name="T94">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76">Stochastic Process + Poisson = ?</text:span></text:p>
          </draw:text-box>
        </draw:frame>
        <draw:frame presentation:style-name="pr5" draw:text-style-name="P1" draw:layer="layout" svg:width="26.2cm" svg:height="10.8cm" svg:x="0.3cm" svg:y="3.8cm" presentation:class="outline" presentation:user-transformed="true">
          <draw:text-box>
            <text:list text:style-name="L3">
              <text:list-item>
                <text:p><text:span text:style-name="T90">Theorem</text:span><text:span text:style-name="T91">. Let {</text:span><text:span text:style-name="T92">N</text:span><text:span text:style-name="T91">(</text:span><text:span text:style-name="T92">t</text:span><text:span text:style-name="T91">): <text:s/></text:span><text:span text:style-name="T92">t</text:span><text:span text:style-name="T91"> </text:span><text:span text:style-name="T93">≥</text:span><text:span text:style-name="T94"> 0</text:span><text:span text:style-name="T91">} be a </text:span><text:span text:style-name="T95">stochastic process</text:span><text:span text:style-name="T50"> such that <text:s/></text:span></text:p>
              </text:list-item>
            </text:list>
            <text:list text:style-name="L5">
              <text:list-item>
                <text:list>
                  <text:list-item>
                    <text:p><text:span text:style-name="T96"><text:s/></text:span><text:span text:style-name="T51">N</text:span><text:span text:style-name="T50">(0) = 0.</text:span></text:p>
                  </text:list-item>
                  <text:list-item>
                    <text:p text:style-name="P29"><text:span text:style-name="T91">(Independent increments) For disjoint intervals [</text:span><text:span text:style-name="T92">t</text:span><text:span text:style-name="T97">1</text:span><text:span text:style-name="T91">, </text:span><text:span text:style-name="T92">t</text:span><text:span text:style-name="T97">2</text:span><text:span text:style-name="T91">] and [</text:span><text:span text:style-name="T92">t</text:span><text:span text:style-name="T97">3</text:span><text:span text:style-name="T91">, </text:span><text:span text:style-name="T92">t</text:span><text:span text:style-name="T97">4</text:span><text:span text:style-name="T91">], the distribution of </text:span><text:span text:style-name="T92">N</text:span><text:span text:style-name="T91">(</text:span><text:span text:style-name="T92">t</text:span><text:span text:style-name="T97">2</text:span><text:span text:style-name="T91">) – </text:span><text:span text:style-name="T92">N</text:span><text:span text:style-name="T91">(</text:span><text:span text:style-name="T92">t</text:span><text:span text:style-name="T97">1</text:span><text:span text:style-name="T91">) is independent of the </text:span><text:span text:style-name="T50">distribution of </text:span><text:span text:style-name="T51">N</text:span><text:span text:style-name="T50">(</text:span><text:span text:style-name="T51">t</text:span><text:span text:style-name="T98">4</text:span><text:span text:style-name="T50">) – </text:span><text:span text:style-name="T51">N</text:span><text:span text:style-name="T50">(</text:span><text:span text:style-name="T51">t</text:span><text:span text:style-name="T98">3</text:span><text:span text:style-name="T50">).</text:span></text:p>
                  </text:list-item>
                  <text:list-item>
                    <text:p><text:span text:style-name="T50">For any </text:span><text:span text:style-name="T51">t</text:span><text:span text:style-name="T50">, </text:span><text:span text:style-name="T51">s</text:span><text:span text:style-name="T50"> </text:span><text:span text:style-name="T99">≥</text:span><text:span text:style-name="T100"> 0, </text:span><text:span text:style-name="T101">N</text:span><text:span text:style-name="T100">(</text:span><text:span text:style-name="T104">t</text:span><text:span text:style-name="T100">+</text:span><text:span text:style-name="T101">s</text:span><text:span text:style-name="T100">) – </text:span><text:span text:style-name="T101">N</text:span><text:span text:style-name="T100">(</text:span><text:span text:style-name="T101">s</text:span><text:span text:style-name="T100">) has a Poisson distribution with mean </text:span><text:span text:style-name="T102">λ</text:span><text:span text:style-name="T105">t</text:span><text:span text:style-name="T99">.</text:span></text:p>
                  </text:list-item>
                </text:list>
              </text:list-item>
            </text:list>
            <text:list text:style-name="L3">
              <text:list-header>
                <text:p text:style-name="P20"><text:span text:style-name="T91">Then {</text:span><text:span text:style-name="T92">N</text:span><text:span text:style-name="T91">(</text:span><text:span text:style-name="T92">t</text:span><text:span text:style-name="T91">): <text:s/></text:span><text:span text:style-name="T92">t</text:span><text:span text:style-name="T91"> </text:span><text:span text:style-name="T93">≥</text:span><text:span text:style-name="T94"> 0</text:span><text:span text:style-name="T91">} is a Poisson process with rate </text:span><text:span text:style-name="T103">λ</text:span><text:span text:style-name="T94">.</text:span></text:p>
              </text:list-header>
            </text:list>
          </draw:text-box>
        </draw:frame>
        <draw:g>
          <svg:title>TexMaths</svg:title>
          <svg:desc>18§display§\textcolor{MidnightBlue}{\lim_{t\rightarrow 0}\frac{\Pr[N(t) = 1]}{t} = \lim_{t\rightarrow 0} \frac{e^{-\lambda t}\lambda t}{t} = \lambda.}§svg§600§FALSE§</svg:desc>
          <draw:frame draw:style-name="gr2" draw:text-style-name="P6" draw:layer="layout" svg:width="9.931cm" svg:height="1.451cm" svg:x="2.101cm" svg:y="11.676cm">
            <draw:image xlink:href="Pictures/10006C030000158E0000032737BEB43B54B9B990.svg" xlink:type="simple" xlink:show="embed" xlink:actuate="onLoad" draw:mime-type="image/svg+xml">
              <text:p/>
            </draw:image>
            <draw:image xlink:href="Pictures/10000001000000D10000001FAA64C6ACA2B818DE.png" xlink:type="simple" xlink:show="embed" xlink:actuate="onLoad" draw:mime-type="image/png"/>
          </draw:frame>
        </draw:g>
        <draw:g>
          <svg:title>TexMaths</svg:title>
          <svg:desc>18§display§\textcolor{MidnightBlue}{\lim_{t\rightarrow 0}\frac{\Pr[N(t) \geq 2]}{t} = \lim_{t\rightarrow 0} 
\sum_{k\geq 2}\frac{e^{-\lambda t}(\lambda \textcolor{red}{t})^k}{k!\textcolor{red}{t}} = 0.}§svg§600§FALSE§</svg:desc>
          <draw:frame draw:style-name="gr2" draw:text-style-name="P6" draw:layer="layout" svg:width="11.666cm" svg:height="1.807cm" svg:x="14.402cm" svg:y="11.678cm">
            <draw:image xlink:href="Pictures/10009AC400001952000003ED44C6A8BC0DC2EA8D.svg" xlink:type="simple" xlink:show="embed" xlink:actuate="onLoad" draw:mime-type="image/svg+xml">
              <text:p/>
            </draw:image>
            <draw:image xlink:href="Pictures/10000001000000F500000026578782454CC393E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n Intuitive Idea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Balls: events, bins: time slots</text:p>
                <text:p/>
                <text:p/>
                <text:p/>
              </text:list-item>
              <text:list-item>
                <text:p>A lot of balls into a lot of (infinitely small) bins...</text:p>
              </text:list-item>
            </text:list>
          </draw:text-box>
        </draw:frame>
        <draw:custom-shape draw:style-name="gr31" draw:text-style-name="P27" draw:layer="layout" svg:width="2cm" svg:height="2.4cm" svg:x="3.401cm" svg:y="5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7" draw:layer="layout" svg:width="2cm" svg:height="2.4cm" svg:x="6.702cm" svg:y="5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7" draw:layer="layout" svg:width="2cm" svg:height="2.4cm" svg:x="10.103cm" svg:y="5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7" draw:layer="layout" svg:width="2cm" svg:height="2.4cm" svg:x="18.804cm" svg:y="5.5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2cm" svg:height="1.195cm" svg:x="14.001cm" svg:y="5.801cm">
          <draw:text-box>
            <text:p text:style-name="P27"><text:span text:style-name="T106">…</text:span><text:span text:style-name="T106">...</text:span></text:p>
          </draw:text-box>
        </draw:frame>
        <draw:custom-shape draw:style-name="gr33" draw:text-style-name="P11" draw:layer="layout" svg:width="0.4cm" svg:height="0.4cm" svg:x="3.9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4.4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7.401cm" svg:y="7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19.0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19.5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20.0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6cm" svg:height="2.4cm" svg:x="9.3cm" svg:y="11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2cm" svg:height="1.195cm" svg:x="12.602cm" svg:y="11.602cm">
          <draw:text-box>
            <text:p text:style-name="P27"><text:span text:style-name="T106">…</text:span><text:span text:style-name="T106">...</text:span></text:p>
          </draw:text-box>
        </draw:frame>
        <draw:custom-shape draw:style-name="gr33" draw:text-style-name="P11" draw:layer="layout" svg:width="0.4cm" svg:height="0.4cm" svg:x="9.4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6cm" svg:height="2.4cm" svg:x="10.101cm" svg:y="11.3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27" draw:layer="layout" svg:width="0.6cm" svg:height="2.4cm" svg:x="10.902cm" svg:y="11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11" draw:layer="layout" svg:width="0.4cm" svg:height="0.4cm" svg:x="11.0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6cm" svg:height="2.4cm" svg:x="15.303cm" svg:y="11.3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11" draw:layer="layout" svg:width="0.4cm" svg:height="0.4cm" svg:x="15.4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nother Viewpoint: Interarrival</text:p>
          </draw:text-box>
        </draw:frame>
        <draw:frame presentation:style-name="pr5" draw:text-style-name="P34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96">Surprising fact: <text:s/>All of the </text:span><text:span text:style-name="T51">X</text:span><text:span text:style-name="T107">n</text:span><text:span text:style-name="T96"> have the same distribution and this distribution is </text:span><text:span text:style-name="T108">exponential</text:span><text:span text:style-name="T96">!</text:span></text:p>
              </text:list-item>
            </text:list>
          </draw:text-box>
        </draw:frame>
        <draw:line draw:style-name="gr35" draw:text-style-name="P6" draw:layer="layout" svg:x1="6.4cm" svg:y1="8.8cm" svg:x2="18.8cm" svg:y2="8.8cm">
          <text:p/>
        </draw:line>
        <draw:custom-shape draw:style-name="gr36" draw:text-style-name="P27" draw:layer="layout" svg:width="0.4cm" svg:height="0.4cm" svg:x="13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4cm" svg:height="0.4cm" svg:x="9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5" draw:layer="layout" svg:width="3.101cm" svg:height="1.505cm" svg:x="8.899cm" svg:y="8.88cm">
          <draw:text-box>
            <text:p text:style-name="P27"><text:span text:style-name="T109">(</text:span><text:span text:style-name="T110">n</text:span><text:span text:style-name="T109"> – 1)th event</text:span></text:p>
          </draw:text-box>
        </draw:frame>
        <draw:frame draw:style-name="gr37" draw:text-style-name="P35" draw:layer="layout" svg:width="3.101cm" svg:height="1.505cm" svg:x="12.7cm" svg:y="8.881cm">
          <draw:text-box>
            <text:p text:style-name="P27"><text:span text:style-name="T110">n</text:span><text:span text:style-name="T109">th event</text:span></text:p>
          </draw:text-box>
        </draw:frame>
        <draw:line draw:style-name="gr38" draw:text-style-name="P27" draw:layer="layout" svg:x1="10cm" svg:y1="7.8cm" svg:x2="14cm" svg:y2="7.8cm">
          <text:p/>
        </draw:line>
        <draw:frame draw:style-name="gr39" draw:text-style-name="P36" draw:layer="layout" svg:width="5.066cm" svg:height="0.931cm" svg:x="9.534cm" svg:y="6.7cm">
          <draw:text-box>
            <text:p><text:span text:style-name="T111">X</text:span><text:span text:style-name="T112">n</text:span><text:span text:style-name="T113">: the interval time</text:span></text:p>
          </draw:text-box>
        </draw:frame>
        <draw:custom-shape draw:style-name="gr36" draw:text-style-name="P27" draw:layer="layout" svg:width="0.4cm" svg:height="0.4cm" svg:x="7.1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4cm" svg:height="0.4cm" svg:x="7.903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27" draw:layer="layout" svg:width="0.4cm" svg:height="0.4cm" svg:x="7.203cm" svg:y="12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16" draw:layer="layout" svg:width="10cm" svg:height="1cm" svg:x="7.5cm" svg:y="12.374cm">
            <draw:text-box>
              <text:p><text:span text:style-name="T114">: <text:s/>events of Poisson process</text:span></text:p>
            </draw:text-box>
          </draw:frame>
        </draw:g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30">Theorem</text:span><text:span text:style-name="T14">. </text:span><text:span text:style-name="T16">X</text:span><text:span text:style-name="T115">1</text:span><text:span text:style-name="T14"> has an exponential distribution with parameter </text:span><text:span text:style-name="T31">λ</text:span><text:span text:style-name="T28">.</text:span></text:p>
              </text:list-item>
            </text:list>
          </draw:text-box>
        </draw:frame>
        <draw:g>
          <svg:title>TexMaths</svg:title>
          <svg:desc>20§display§\Pr[X_1&gt;t] = \textcolor{blue}{\Pr[N(t) = 0]} = e^{\lambda t}.§svg§600§FALSE§</svg:desc>
          <draw:frame draw:style-name="gr2" draw:text-style-name="P6" draw:layer="layout" svg:width="10.024cm" svg:height="0.806cm" svg:x="8.504cm" svg:y="7.439cm">
            <draw:image xlink:href="Pictures/100048990000139500000194B12DDDCA4F71A73B.svg" xlink:type="simple" xlink:show="embed" xlink:actuate="onLoad" draw:mime-type="image/svg+xml">
              <text:p/>
            </draw:image>
            <draw:image xlink:href="Pictures/10000001000000BD0000000FFC51D45FFE934447.png" xlink:type="simple" xlink:show="embed" xlink:actuate="onLoad" draw:mime-type="image/png"/>
          </draw:frame>
        </draw:g>
        <draw:g>
          <svg:title>TexMaths</svg:title>
          <svg:desc>20§display§F(X_1) = 1 - \Pr[X_1&gt;t] = 1- e^{\lambda t}.§svg§600§FALSE§</svg:desc>
          <draw:frame draw:style-name="gr2" draw:text-style-name="P6" draw:layer="layout" svg:width="10.564cm" svg:height="0.806cm" svg:x="8.404cm" svg:y="9.139cm">
            <draw:image xlink:href="Pictures/10004A51000014A300000194F9A28EAF4653EDAC.svg" xlink:type="simple" xlink:show="embed" xlink:actuate="onLoad" draw:mime-type="image/svg+xml">
              <text:p/>
            </draw:image>
            <draw:image xlink:href="Pictures/10000001000000C80000000F1A41CB85D500A48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30">Theorem</text:span><text:span text:style-name="T14">. </text:span><text:span text:style-name="T16">X</text:span><text:span text:style-name="T116">i</text:span><text:span text:style-name="T14"> , i = 1, 2, …, are i.i.d exponential random variables with parameter parameter </text:span><text:span text:style-name="T31">λ</text:span><text:span text:style-name="T28">.</text:span></text:p>
              </text:list-item>
            </text:list>
          </draw:text-box>
        </draw:frame>
        <draw:g>
          <svg:title>TexMaths</svg:title>
          <svg:desc>20§latex§\begin{eqnarray*}
&amp; &amp;\Pr[X_i&gt;t_i\mid (X_0 = t_0) \cap (X_1 = t_1)\cap\cdots \cap (X_{i-1} = t_{i-1})] \\
&amp;=&amp; \Pr\left[ N\left(\sum_{k=0}^i t_k\right) - N\left(\sum_{k=0}^{i-1} t_k\right) = 0\right]\\
&amp;=&amp;e^{-\lambda t_i}.
\end{eqnarray*}§svg§600§FALSE§</svg:desc>
          <draw:frame draw:style-name="gr2" draw:text-style-name="P6" draw:layer="layout" svg:width="18.48cm" svg:height="4.146cm" svg:x="3.004cm" svg:y="7.439cm">
            <draw:image xlink:href="Pictures/10011D92000024190000081ABD98C798B26ABB55.svg" xlink:type="simple" xlink:show="embed" xlink:actuate="onLoad" draw:mime-type="image/svg+xml">
              <text:p/>
            </draw:image>
            <draw:image xlink:href="Pictures/100000010000015D0000004ECFF340D60B8F643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30">Theorem</text:span><text:span text:style-name="T14">. </text:span><text:span text:style-name="T16">X</text:span><text:span text:style-name="T116">i</text:span><text:span text:style-name="T14"> , i = 1, 2, …, are i.i.d exponential random variables with parameter parameter </text:span><text:span text:style-name="T31">λ</text:span><text:span text:style-name="T28">.</text:span></text:p>
              </text:list-item>
            </text:list>
          </draw:text-box>
        </draw:frame>
        <draw:g>
          <svg:title>TexMaths</svg:title>
          <svg:desc>20§latex§\begin{eqnarray*}
&amp; &amp;\Pr[X_i&gt;t_i\mid (X_0 = t_0) \cap (X_1 = t_1)\cap\cdots \cap (X_{i-1} = t_{i-1})] \\
&amp;=&amp; \Pr\left[ N\left(\sum_{k=0}^i t_k\right) - N\left(\sum_{k=0}^{i-1} t_k\right) = 0\right]\\
&amp;=&amp;e^{-\lambda t_i}.
\end{eqnarray*}§svg§600§FALSE§</svg:desc>
          <draw:frame draw:style-name="gr2" draw:text-style-name="P6" draw:layer="layout" svg:width="18.48cm" svg:height="4.146cm" svg:x="3.004cm" svg:y="7.439cm">
            <draw:image xlink:href="Pictures/10011D92000024190000081ABD98C798B26ABB55.svg" xlink:type="simple" xlink:show="embed" xlink:actuate="onLoad" draw:mime-type="image/svg+xml">
              <text:p/>
            </draw:image>
            <draw:image xlink:href="Pictures/100000010000015D0000004ECFF340D60B8F643E.png" xlink:type="simple" xlink:show="embed" xlink:actuate="onLoad" draw:mime-type="image/png"/>
          </draw:frame>
        </draw:g>
        <draw:custom-shape draw:style-name="gr41" draw:text-style-name="P6" draw:layer="layout" svg:width="8.2cm" svg:height="3.4cm" svg:x="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6" draw:layer="layout" svg:x1="12.2cm" svg:y1="11cm" svg:x2="15.6cm" svg:y2="12.2cm">
          <text:p/>
        </draw:line>
        <draw:g>
          <svg:title>TexMaths</svg:title>
          <svg:desc>14§display§\textcolor{Orange}{\because \mbox{ Poisson process } \&amp;  \sim \mbox{distribution of } N(t_i) - N(0) = N(t_i)}§svg§600§FALSE§</svg:desc>
          <draw:frame draw:style-name="gr2" draw:text-style-name="P6" draw:layer="layout" svg:width="13.033cm" svg:height="0.49cm" svg:x="11.787cm" svg:y="12.791cm">
            <draw:image xlink:href="Pictures/1000B26B0000245E0000015F2A5417A430C8D1E8.svg" xlink:type="simple" xlink:show="embed" xlink:actuate="onLoad" draw:mime-type="image/svg+xml">
              <text:p/>
            </draw:image>
            <draw:image xlink:href="Pictures/10000001000001600000000DF2AFD1C2ECEBA45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7" draw:layer="layout" svg:width="21.2cm" svg:height="2.6cm" svg:x="0.3cm" svg:y="0.6cm" presentation:class="title" presentation:user-transformed="true">
          <draw:text-box>
            <text:p><text:span text:style-name="T117">So, why the Poisson process makes </text:span><text:span text:style-name="T118">P</text:span><text:span text:style-name="T119">n</text:span><text:span text:style-name="T117">(</text:span><text:span text:style-name="T118">t</text:span><text:span text:style-name="T117">) Poisson distributed?</text:span></text:p>
          </draw:text-box>
        </draw:frame>
        <draw:frame draw:style-name="gr43" draw:text-style-name="P6" draw:layer="layout" svg:width="13.6cm" svg:height="7.711cm" svg:x="0.4cm" svg:y="4.3cm">
          <draw:image xlink:href="Pictures/1000000100000831000004A579B0CE54A1BE1BB1.png" xlink:type="simple" xlink:show="embed" xlink:actuate="onLoad" draw:mime-type="image/png">
            <text:p/>
          </draw:image>
        </draw:frame>
        <draw:frame draw:style-name="gr43" draw:text-style-name="P6" draw:layer="layout" svg:width="14.034cm" svg:height="4.238cm" svg:x="13.4cm" svg:y="7.8cm">
          <draw:image xlink:href="Pictures/10000001000008350000027B9F6F2326200229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20">0</text:span>(<text:span text:style-name="T5">t</text:span>)</text:p>
          </draw:text-box>
        </draw:frame>
        <draw:frame presentation:style-name="pr5" draw:text-style-name="P1" draw:layer="layout" svg:width="25.2cm" svg:height="9.134cm" svg:x="0.2cm" svg:y="3.8cm" presentation:class="outline" presentation:user-transformed="true">
          <draw:text-box>
            <text:list text:style-name="L3">
              <text:list-item>
                <text:p><text:span text:style-name="T50">The number of events in [0, </text:span><text:span text:style-name="T51">t</text:span><text:span text:style-name="T50">] and (</text:span><text:span text:style-name="T51">t</text:span><text:span text:style-name="T50">, </text:span><text:span text:style-name="T51">t</text:span><text:span text:style-name="T50">+</text:span><text:span text:style-name="T51">h</text:span><text:span text:style-name="T50">] are </text:span><text:span text:style-name="T121">independent</text:span><text:span text:style-name="T50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6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0920000000E4F7C37C14CC96E6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20">0</text:span>(<text:span text:style-name="T5">t</text:span>)</text:p>
          </draw:text-box>
        </draw:frame>
        <draw:frame presentation:style-name="pr5" draw:text-style-name="P1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50">The number of events in [0, </text:span><text:span text:style-name="T51">t</text:span><text:span text:style-name="T50">] and (</text:span><text:span text:style-name="T51">t</text:span><text:span text:style-name="T50">, </text:span><text:span text:style-name="T51">t</text:span><text:span text:style-name="T50">+</text:span><text:span text:style-name="T51">h</text:span><text:span text:style-name="T50">] are </text:span><text:span text:style-name="T121">independent</text:span><text:span text:style-name="T50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6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0920000000E4F7C37C14CC96E65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2" draw:text-style-name="P6" draw:layer="layout" svg:width="11.427cm" svg:height="6.886cm" svg:x="0.979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0010000010E000000A32145FC3D45F72A0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20">0</text:span>(<text:span text:style-name="T5">t</text:span>)</text:p>
          </draw:text-box>
        </draw:frame>
        <draw:frame presentation:style-name="pr5" draw:text-style-name="P1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50">The number of events in [0, </text:span><text:span text:style-name="T51">t</text:span><text:span text:style-name="T50">] and (</text:span><text:span text:style-name="T51">t</text:span><text:span text:style-name="T50">, </text:span><text:span text:style-name="T51">t</text:span><text:span text:style-name="T50">+</text:span><text:span text:style-name="T51">h</text:span><text:span text:style-name="T50">] are </text:span><text:span text:style-name="T121">independent</text:span><text:span text:style-name="T50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6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0920000000E4F7C37C14CC96E65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2" draw:text-style-name="P6" draw:layer="layout" svg:width="11.427cm" svg:height="6.886cm" svg:x="0.978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0010000010E000000A32145FC3D45F72A0A.png" xlink:type="simple" xlink:show="embed" xlink:actuate="onLoad" draw:mime-type="image/png"/>
          </draw:frame>
        </draw:g>
        <draw:g>
          <svg:title>TexMaths</svg:title>
          <svg:desc>16§display§\mbox{Solve } P'_0(t) = -\lambda P_0(t)§svg§600§FALSE§</svg:desc>
          <draw:frame draw:style-name="gr2" draw:text-style-name="P6" draw:layer="layout" svg:width="5.434cm" svg:height="0.597cm" svg:x="14.2cm" svg:y="10.683cm">
            <draw:image xlink:href="Pictures/10003E9400000D450000017618DD219B699B0EE2.svg" xlink:type="simple" xlink:show="embed" xlink:actuate="onLoad" draw:mime-type="image/svg+xml">
              <text:p/>
            </draw:image>
            <draw:image xlink:href="Pictures/10000001000000800000000E290F770A031514BE.png" xlink:type="simple" xlink:show="embed" xlink:actuate="onLoad" draw:mime-type="image/png"/>
          </draw:frame>
        </draw:g>
        <draw:g>
          <svg:title>TexMaths</svg:title>
          <svg:desc>16§latex§\begin{eqnarray*}
\therefore P_0'(t) &amp;=&amp; \lim_{h\rightarrow 0}\frac{P_0(t+h)-P_0(t)}{h} \\
&amp;=&amp; \textcolor{red}{\lim_{h\rightarrow 0}}P_0(t)\frac{-\Pr[N(h)=1]-\textcolor{red}{\Pr[N(h)\geq 2]}}{\textcolor{red}{h}} \\
&amp;=&amp; -\lambda P_0(t).
\end{eqnarray*}§svg§600§FALSE§</svg:desc>
          <draw:g>
            <draw:path draw:style-name="gr6" draw:text-style-name="P12" draw:layer="layout" svg:width="13.202cm" svg:height="3.402cm" svg:x="13.913cm" svg:y="6.431cm" svg:viewBox="0 0 13203 3403" svg:d="M6601 3403c-2201 0-4401 0-6601 0 0-1134 0-2269 0-3403 4401 0 8802 0 13203 0 0 1134 0 2269 0 3403-2201 0-4402 0-6602 0z">
              <text:p/>
            </draw:path>
            <draw:path draw:style-name="gr3" draw:text-style-name="P7" draw:layer="layout" svg:width="0.34cm" svg:height="0.303cm" svg:x="13.902cm" svg:y="6.943cm" svg:viewBox="0 0 341 304" svg:d="M200 30c0-16-14-30-30-30s-29 14-29 30 13 31 29 31 30-13 30-31zM341 273c0-16-15-30-31-30s-30 14-30 30 14 31 30 31 31-15 31-31zM59 273c0-16-13-30-30-30s-29 14-29 30 12 31 29 31 30-15 30-31z">
              <text:p/>
            </draw:path>
            <draw:path draw:style-name="gr3" draw:text-style-name="P7" draw:layer="layout" svg:width="0.401cm" svg:height="0.383cm" svg:x="14.438cm" svg:y="6.819cm" svg:viewBox="0 0 402 384" svg:d="M149 206c31 0 63 0 94 0 80 0 159-57 159-121 0-43-37-85-111-85-61 0-121 0-182 0-11 0-18 0-18 11 0 7 7 7 18 7 6 0 17 1 24 1 8 2 11 3 11 10 0 1 0 3-2 9-25 101-50 202-75 303-6 22-6 25-51 25-10 0-16 0-16 11 0 7 6 7 8 7 16 0 56-2 72-2 11 0 24 2 37 2 11 0 24 0 35 0 5 0 11 0 11-11 0-7-5-7-14-7-21 0-37 0-37-9 0-4 0-7 2-10 11-47 23-94 35-141zM189 40c5-21 6-22 30-22 18 0 36 0 55 0 46 0 75 16 75 54 0 22-11 70-32 91-29 24-63 29-87 29-26 0-53 0-80 0 13-51 26-101 39-152z">
              <text:p/>
            </draw:path>
            <draw:path draw:style-name="gr3" draw:text-style-name="P7" draw:layer="layout" svg:width="0.098cm" svg:height="0.202cm" svg:x="14.873cm" svg:y="6.752cm" svg:viewBox="0 0 99 203" svg:d="M96 34c3-7 3-10 3-13 0-11-11-21-22-21-16 0-21 11-23 18-17 57-34 114-51 171-1 0-2 4-3 6 0 5 13 8 16 8s3 0 6-6c25-55 49-109 74-163z">
              <text:p/>
            </draw:path>
            <draw:path draw:style-name="gr3" draw:text-style-name="P7" draw:layer="layout" svg:width="0.181cm" svg:height="0.268cm" svg:x="14.798cm" svg:y="7.082cm" svg:viewBox="0 0 182 269" svg:d="M182 136c0-43-6-75-24-102-12-18-36-34-67-34-91 0-91 108-91 136s0 133 91 133 91-106 91-133zM91 257c-19 0-43-9-51-43-5-22-5-54-5-83s0-59 7-81c8-31 32-39 49-39 21 0 42 13 48 35 7 21 7 50 7 85 0 29 0 58-5 82-8 37-35 44-50 44z">
              <text:p/>
            </draw:path>
            <draw:path draw:style-name="gr3" draw:text-style-name="P7" draw:layer="layout" svg:width="0.13cm" svg:height="0.56cm" svg:x="15.084cm" svg:y="6.783cm" svg:viewBox="0 0 131 561" svg:d="M131 557c0-2 0-4-9-13-71-71-88-178-88-263 0-99 20-196 89-267 8-6 8-8 8-9 0-3-3-5-6-5-5 0-56 38-90 109-29 62-35 125-35 172 0 44 6 111 37 175 33 69 83 105 88 105 3 0 6-1 6-4z">
              <text:p/>
            </draw:path>
            <draw:path draw:style-name="gr3" draw:text-style-name="P7" draw:layer="layout" svg:width="0.172cm" svg:height="0.357cm" svg:x="15.26cm" svg:y="6.851cm" svg:viewBox="0 0 173 358" svg:d="M102 128c18 0 36 0 53 0 11 0 18 0 18-11 0-7-7-7-16-7-17 0-33 0-50 0 21-80 24-91 24-94 0-10-8-16-17-16-2 0-16 2-23 21-7 30-14 60-21 89-17 0-35 0-52 0-12 0-18 0-18 12 0 6 5 6 16 6 17 0 33 0 50 0-40 160-44 169-44 179 0 30 23 51 52 51 57 0 89-81 89-86s-3-5-6-5c-5 0-5 2-8 8-24 58-55 72-74 72-11 0-17-8-17-27 0-13 1-18 3-27 14-55 28-110 41-165z">
              <text:p/>
            </draw:path>
            <draw:path draw:style-name="gr3" draw:text-style-name="P7" draw:layer="layout" svg:width="0.129cm" svg:height="0.56cm" svg:x="15.483cm" svg:y="6.783cm" svg:viewBox="0 0 130 561" svg:d="M130 281c0-44-5-111-37-175-34-69-82-106-88-106-3 0-5 2-5 5 0 1 0 3 11 13 55 56 87 145 87 263 0 96-21 194-90 266-8 6-8 8-8 10 0 3 2 4 5 4 6 0 57-38 89-108 29-63 36-125 36-172z">
              <text:p/>
            </draw:path>
            <draw:path draw:style-name="gr3" draw:text-style-name="P7" draw:layer="layout" svg:width="0.372cm" svg:height="0.132cm" svg:x="16.263cm" svg:y="6.997cm" svg:viewBox="0 0 373 133" svg:d="M354 22c9 0 19 0 19-11s-10-11-18-11c-112 0-225 0-337 0-8 0-18 0-18 11s10 11 19 11c112 0 223 0 335 0zM355 133c8 0 18 0 18-11 0-12-10-12-19-12-112 0-223 0-335 0-9 0-19 0-19 12 0 11 10 11 18 11 112 0 225 0 337 0z">
              <text:p/>
            </draw:path>
            <draw:path draw:style-name="gr3" draw:text-style-name="P7" draw:layer="layout" svg:width="0.124cm" svg:height="0.388cm" svg:x="17.327cm" svg:y="6.815cm" svg:viewBox="0 0 125 389" svg:d="M80 0c-27 2-53 3-80 5 0 6 0 12 0 17 38 0 43 5 43 32 0 98 0 196 0 293 0 24-6 24-43 24 0 6 0 12 0 18 18 0 49-2 62-2 14 0 42 2 63 2 0-6 0-12 0-18-39 0-45 0-45-24 0-116 0-231 0-347z">
              <text:p/>
            </draw:path>
            <draw:path draw:style-name="gr3" draw:text-style-name="P7" draw:layer="layout" svg:width="0.119cm" svg:height="0.375cm" svg:x="17.482cm" svg:y="6.827cm" svg:viewBox="0 0 120 376" svg:d="M82 128c-27 2-53 4-79 6 0 6 0 12 0 18 35 0 42 3 42 30 0 51 0 102 0 152 0 24-7 24-45 24 0 6 0 12 0 18 18 0 48-2 62-2 20 0 39 2 58 2 0-6 0-12 0-18-37 0-38-1-38-24 0-69 0-137 0-206zM83 30c0-17-14-30-29-30-17 0-30 16-30 30 0 15 13 31 30 31 15 0 29-13 29-31z">
              <text:p/>
            </draw:path>
            <draw:path draw:style-name="gr3" draw:text-style-name="P7" draw:layer="layout" svg:width="0.439cm" svg:height="0.247cm" svg:x="17.637cm" svg:y="6.955cm" svg:viewBox="0 0 440 248" svg:d="M45 56c0 50 0 100 0 150 0 24-7 24-45 24 0 6 0 12 0 18 21 0 50-2 64-2s45 2 64 2c0-6 0-12 0-18-38 0-45 0-45-24 0-34 0-69 0-104 0-59 40-89 77-89 35 0 42 30 42 62 0 44 0 88 0 131 0 24-7 24-45 24 0 6 0 12 0 18 19 0 48-2 64-2 14 0 43 2 62 2 0-6 0-12 0-18-37 0-43 0-43-24 0-34 0-69 0-104 0-59 40-89 75-89s42 30 42 62c0 44 0 88 0 131 0 24-7 24-43 24 0 6 0 12 0 18 19 0 48-2 64-2 14 0 43 2 62 2 0-6 0-12 0-18-29 0-43 0-43-16 0-35 0-71 0-107 0-48 0-65-18-86-8-10-27-21-59-21-48 0-72 34-82 56-8-50-49-56-75-56-41 0-67 24-83 59 0-20 0-39 0-59-27 2-53 4-80 6 0 6 0 12 0 18 40 0 45 3 45 32z">
              <text:p/>
            </draw:path>
            <draw:path draw:style-name="gr3" draw:text-style-name="P7" draw:layer="layout" svg:width="0.213cm" svg:height="0.276cm" svg:x="17.26cm" svg:y="7.298cm" svg:viewBox="0 0 214 277" svg:d="M94 11c1-2 2-5 2-6 0-2-2-5-6-5-8 0-42 3-52 3-3 2-8 2-8 10 0 6 5 6 10 6 19 0 19 2 19 5s0 5-1 10c-19 74-38 148-56 222-2 6-1 5-2 8 0 6 5 13 13 13 5 0 13-2 17-10 0-3 5-17 7-25 2-12 5-24 8-36 1-4 6-20 6-25 5-16 5-16 13-29 13-19 32-42 62-42 23 0 24 18 24 28 0 24-17 67-24 84-4 12-6 15-6 21 0 21 18 34 38 34 39 0 56-55 56-59 0-7-4-7-6-7-5 0-5 3-6 8-10 31-28 46-42 46-10 0-11-4-11-12 0-10 3-15 9-32 5-13 21-55 21-77 0-6 0-22-14-34-7-4-18-11-37-11-29 0-50 16-64 34 10-41 20-81 30-122z">
              <text:p/>
            </draw:path>
            <draw:path draw:style-name="gr3" draw:text-style-name="P7" draw:layer="layout" svg:width="0.386cm" svg:height="0.207cm" svg:x="17.524cm" svg:y="7.368cm" svg:viewBox="0 0 387 208" svg:d="M333 114c-50 36-39 58-58 88 0 6 5 6 10 6 8 0 8 0 11-6 2-10 8-36 29-58 22-24 41-29 59-35 2 0 3-3 3-5 0-3-1-5-6-6-58-18-77-58-87-93-1-5-4-5-9-5-6 0-10 0-10 6 8 19 5 28 24 55 10 13 19 24 34 33-106 0-211 0-317 0-6 0-16 0-16 10s10 10 16 10c106 0 211 0 317 0z">
              <text:p/>
            </draw:path>
            <draw:path draw:style-name="gr3" draw:text-style-name="P7" draw:layer="layout" svg:width="0.181cm" svg:height="0.269cm" svg:x="17.962cm" svg:y="7.309cm" svg:viewBox="0 0 182 270" svg:d="M182 136c0-43-4-74-22-101-13-19-37-35-69-35-91 0-91 108-91 136s0 134 91 134 91-105 91-134zM91 259c-17 0-41-11-49-43-5-24-5-56-5-85s0-59 5-80c8-32 33-40 49-40 21 0 42 13 50 37 6 21 6 50 6 83 0 29 0 58-5 83-8 36-35 45-51 45z">
              <text:p/>
            </draw:path>
            <draw:path draw:style-name="gr3" draw:text-style-name="P7" draw:layer="layout" svg:width="0.401cm" svg:height="0.383cm" svg:x="18.349cm" svg:y="6.44cm" svg:viewBox="0 0 402 384" svg:d="M149 206c31 0 63 0 94 0 80 0 159-59 159-121 0-43-37-85-111-85-61 0-121 0-182 0-11 0-18 0-18 10 0 8 7 8 18 8 6 0 17 0 24 0 8 1 13 3 13 9 0 2-2 3-4 11-25 101-50 201-75 301-5 22-6 27-51 27-10 0-16 0-16 10 0 8 6 8 8 8 16 0 56-2 72-2 11 0 24 0 37 0 11 0 24 2 35 2 5 0 11 0 11-11 0-7-5-7-14-7-21 0-37 0-37-11 0-3 0-5 2-8 11-47 23-94 35-141zM189 38c5-19 6-20 30-20 18 0 36 0 55 0 46 0 75 14 75 52 0 23-11 71-32 92-29 25-63 30-87 30-26 0-53 0-80 0 13-51 26-102 39-154z">
              <text:p/>
            </draw:path>
            <draw:path draw:style-name="gr3" draw:text-style-name="P7" draw:layer="layout" svg:width="0.181cm" svg:height="0.268cm" svg:x="18.709cm" svg:y="6.647cm" svg:viewBox="0 0 182 269" svg:d="M182 136c0-43-6-75-24-102-11-18-36-34-67-34-91 0-91 107-91 136s0 133 91 133 91-104 91-133zM91 257c-19 0-43-9-51-41-5-24-5-56-5-85s0-59 7-80c8-32 33-40 49-40 21 0 42 13 48 35 7 23 7 50 7 85 0 29 0 58-5 83-8 36-35 43-50 43z">
              <text:p/>
            </draw:path>
            <draw:path draw:style-name="gr3" draw:text-style-name="P7" draw:layer="layout" svg:width="0.13cm" svg:height="0.562cm" svg:x="18.996cm" svg:y="6.402cm" svg:viewBox="0 0 131 563" svg:d="M131 557c0-2 0-4-9-13-71-71-88-176-88-263 0-97 20-195 89-265 8-8 8-8 8-10 0-4-3-6-6-6-5 0-56 38-90 110-29 61-35 124-35 171 0 44 6 112 37 175 33 70 83 107 88 107 3 0 6-3 6-6z">
              <text:p/>
            </draw:path>
            <draw:path draw:style-name="gr3" draw:text-style-name="P7" draw:layer="layout" svg:width="0.172cm" svg:height="0.357cm" svg:x="19.172cm" svg:y="6.472cm" svg:viewBox="0 0 173 358" svg:d="M102 126c18 0 36 0 53 0 13 0 18 0 18-11 0-6-5-6-16-6-17 0-33 0-50 0 21-80 24-91 24-95 0-9-8-14-17-14-2 0-16 0-23 19-7 30-14 60-21 90-17 0-35 0-52 0-12 0-18 0-18 11 0 6 5 6 16 6 17 0 33 0 50 0-40 160-44 170-44 179 0 31 23 53 53 53 56 0 88-83 88-88s-3-5-6-5c-5 0-5 2-8 8-24 58-55 72-74 72-11 0-17-8-17-25 0-15 1-18 3-27 14-56 28-111 41-167z">
              <text:p/>
            </draw:path>
            <draw:path draw:style-name="gr3" draw:text-style-name="P7" draw:layer="layout" svg:width="0.372cm" svg:height="0.373cm" svg:x="19.519cm" svg:y="6.496cm" svg:viewBox="0 0 373 374" svg:d="M198 198c53 0 105 0 157 0 8 0 18 0 18-11s-10-11-18-11c-52 0-104 0-157 0 0-53 0-106 0-158 0-7 0-18-11-18s-11 11-11 18c0 52 0 105 0 158-53 0-106 0-158 0-8 0-18 0-18 11s10 11 18 11c52 0 105 0 158 0 0 53 0 105 0 157 0 8 0 19 11 19s11-11 11-19c0-52 0-104 0-157z">
              <text:p/>
            </draw:path>
            <draw:path draw:style-name="gr3" draw:text-style-name="P7" draw:layer="layout" svg:width="0.274cm" svg:height="0.396cm" svg:x="20.08cm" svg:y="6.434cm" svg:viewBox="0 0 275 397" svg:d="M130 6c0-1 0-6-7-6-13 0-54 5-69 5-4 1-11 1-11 11 0 8 5 8 15 8 25 0 27 3 27 10-1 3-1 7-2 11-27 107-54 215-81 323-2 8-2 9-2 13 0 12 11 16 16 16 10 0 18-8 21-16 4-14 7-28 11-42 4-17 7-34 11-51 3-13 8-24 10-37 1-5 6-22 6-25 2-5 19-37 39-53 12-8 30-19 54-19s30 19 30 40c0 30-22 91-35 124-5 15-8 21-8 32 0 26 21 47 47 47 52 0 73-84 73-88 0-5-5-5-6-5-5 0-5 1-8 9-8 31-27 71-58 71-9 0-13-7-13-19 0-15 5-28 10-40 10-24 34-91 34-123 0-37-23-61-64-61-36 0-63 17-84 43 15-59 29-118 44-178z">
              <text:p/>
            </draw:path>
            <draw:path draw:style-name="gr3" draw:text-style-name="P7" draw:layer="layout" svg:width="0.129cm" svg:height="0.562cm" svg:x="20.405cm" svg:y="6.402cm" svg:viewBox="0 0 130 563" svg:d="M130 281c0-44-5-111-37-175-34-69-82-106-88-106-3 0-5 3-5 6 0 2 0 2 11 13 55 56 87 144 87 262 0 96-21 196-90 266-8 6-8 8-8 10 0 3 2 6 5 6 6 0 57-38 89-110 29-63 36-125 36-172z">
              <text:p/>
            </draw:path>
            <draw:path draw:style-name="gr3" draw:text-style-name="P7" draw:layer="layout" svg:width="0.343cm" svg:height="0.021cm" svg:x="20.763cm" svg:y="6.672cm" svg:viewBox="0 0 344 22" svg:d="M323 22c10 0 21 0 21-11s-11-11-21-11c-101 0-202 0-304 0-9 0-19 0-19 11s10 11 19 11c102 0 203 0 304 0z">
              <text:p/>
            </draw:path>
            <draw:path draw:style-name="gr3" draw:text-style-name="P7" draw:layer="layout" svg:width="0.401cm" svg:height="0.383cm" svg:x="21.301cm" svg:y="6.44cm" svg:viewBox="0 0 402 384" svg:d="M149 206c31 0 63 0 94 0 80 0 159-59 159-121 0-43-37-85-111-85-61 0-121 0-182 0-11 0-18 0-18 10 0 8 7 8 18 8 6 0 16 0 24 0 8 1 11 3 11 9 0 2 0 3-2 11-25 101-50 201-75 301-6 22-6 27-51 27-10 0-16 0-16 10 0 8 6 8 8 8 16 0 56-2 72-2 11 0 24 0 37 0 11 0 24 2 35 2 5 0 11 0 11-11 0-7-5-7-14-7-21 0-37 0-37-11 0-3 0-5 2-8 11-47 23-94 35-141zM189 38c5-19 6-20 30-20 18 0 36 0 55 0 46 0 75 14 75 52 0 23-11 71-32 92-29 25-63 30-88 30-26 0-52 0-79 0 13-51 26-102 39-154z">
              <text:p/>
            </draw:path>
            <draw:path draw:style-name="gr3" draw:text-style-name="P7" draw:layer="layout" svg:width="0.183cm" svg:height="0.268cm" svg:x="21.659cm" svg:y="6.647cm" svg:viewBox="0 0 184 269" svg:d="M184 136c0-43-6-75-24-102-13-18-37-34-67-34-93 0-93 107-93 136s1 133 93 133 91-104 91-133zM93 257c-19 0-43-9-51-41-5-24-5-56-5-85s0-59 6-80c8-32 32-40 50-40 21 0 41 13 48 35 6 23 6 50 6 85 0 29 0 58-5 83-8 36-35 43-49 43z">
              <text:p/>
            </draw:path>
            <draw:path draw:style-name="gr3" draw:text-style-name="P7" draw:layer="layout" svg:width="0.13cm" svg:height="0.562cm" svg:x="21.947cm" svg:y="6.402cm" svg:viewBox="0 0 131 563" svg:d="M131 557c0-2 0-4-9-13-71-71-90-176-90-263 0-97 22-195 91-265 8-8 8-8 8-10 0-4-3-6-6-6-5 0-56 38-90 110-29 61-35 124-35 171 0 44 6 112 37 175 33 70 83 107 88 107 3 0 6-3 6-6z">
              <text:p/>
            </draw:path>
            <draw:path draw:style-name="gr3" draw:text-style-name="P7" draw:layer="layout" svg:width="0.172cm" svg:height="0.357cm" svg:x="22.123cm" svg:y="6.472cm" svg:viewBox="0 0 173 358" svg:d="M102 126c18 0 36 0 53 0 11 0 18 0 18-11 0-6-7-6-16-6-17 0-33 0-50 0 21-80 24-91 24-95 0-9-8-14-17-14-2 0-18 0-23 19-7 30-14 60-21 90-17 0-35 0-52 0-12 0-18 0-18 11 0 6 5 6 16 6 17 0 33 0 50 0-40 160-44 170-44 179 0 31 21 53 52 53 57 0 89-83 89-88s-5-5-6-5c-5 0-5 2-8 8-24 58-55 72-74 72-11 0-17-8-17-25 0-15 1-18 3-27 14-56 28-111 41-167z">
              <text:p/>
            </draw:path>
            <draw:path draw:style-name="gr3" draw:text-style-name="P7" draw:layer="layout" svg:width="0.129cm" svg:height="0.562cm" svg:x="22.346cm" svg:y="6.402cm" svg:viewBox="0 0 130 563" svg:d="M130 281c0-44-5-111-37-175-34-69-82-106-88-106-3 0-5 3-5 6 0 2 0 2 11 13 55 56 87 144 87 262 0 96-21 196-92 266-6 6-6 8-6 10 0 3 2 6 5 6 6 0 57-38 89-110 29-63 36-125 36-172z">
              <text:p/>
            </draw:path>
            <draw:path draw:style-name="gr3" draw:text-style-name="P7" draw:layer="layout" svg:width="4.205cm" svg:height="0.021cm" svg:x="18.327cm" svg:y="7.053cm" svg:viewBox="0 0 4206 22" svg:d="M2102 22c-701 0-1401 0-2102 0 0-7 0-15 0-22 1402 0 2804 0 4206 0 0 7 0 15 0 22-701 0-1403 0-2104 0z">
              <text:p/>
            </draw:path>
            <draw:path draw:style-name="gr3" draw:text-style-name="P7" draw:layer="layout" svg:width="0.276cm" svg:height="0.394cm" svg:x="20.298cm" svg:y="7.2cm" svg:viewBox="0 0 277 395" svg:d="M131 5c-2-2 0-5-8-5-13 0-53 3-67 5-5 0-11 1-11 11 0 6 5 6 13 6 27 0 28 5 28 10 0 4-1 7-1 11-27 108-55 217-82 325-3 8-3 8-3 11 0 13 11 16 18 16 8 0 17-6 20-14 4-15 7-29 10-44 4-16 9-33 13-49 3-13 6-26 9-38 2-4 7-21 7-26 1-5 19-35 38-51 13-10 30-19 55-19 24 0 28 19 28 38 0 30-20 93-33 126-5 13-8 19-8 31 0 27 19 46 46 46 53 0 74-82 74-86 0-5-5-5-7-5-6 0-6 1-9 9-8 31-26 69-56 69-10 0-15-5-15-17 0-15 5-28 12-40 8-24 33-91 33-123 0-37-22-61-64-61-37 0-62 17-83 43 14-60 29-119 43-179z">
              <text:p/>
            </draw:path>
            <draw:path draw:style-name="gr3" draw:text-style-name="P7" draw:layer="layout" svg:width="0.372cm" svg:height="0.13cm" svg:x="16.263cm" svg:y="8.448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7" draw:text-style-name="P13" draw:layer="layout" svg:width="0.124cm" svg:height="0.388cm" svg:x="17.327cm" svg:y="8.264cm" svg:viewBox="0 0 125 389" svg:d="M80 0c-27 2-53 4-80 6 0 6 0 11 0 16 38 0 43 5 43 32 0 98 0 196 0 293 0 26-6 26-43 26 0 5 0 10 0 16 18 0 49-2 62-2 14 0 42 2 63 2 0-6 0-11 0-16-39 0-45 0-45-26 0-116 0-231 0-347z">
              <text:p/>
            </draw:path>
            <draw:path draw:style-name="gr7" draw:text-style-name="P13" draw:layer="layout" svg:width="0.119cm" svg:height="0.375cm" svg:x="17.482cm" svg:y="8.276cm" svg:viewBox="0 0 120 376" svg:d="M82 128c-27 2-53 4-79 6 0 6 0 12 0 18 35 0 42 3 42 30 0 51 0 102 0 152 0 26-7 26-45 26 0 5 0 11 0 16 18 0 48-2 62-2 20 0 39 2 58 2 0-5 0-11 0-16-37 0-38-3-38-26 0-69 0-137 0-206zM83 30c0-17-14-30-29-30-17 0-30 16-30 30 0 16 13 31 30 31 15 0 29-13 29-31z">
              <text:p/>
            </draw:path>
            <draw:path draw:style-name="gr7" draw:text-style-name="P13" draw:layer="layout" svg:width="0.439cm" svg:height="0.247cm" svg:x="17.637cm" svg:y="8.404cm" svg:viewBox="0 0 440 248" svg:d="M45 56c0 50 0 100 0 150 0 26-7 26-45 26 0 5 0 11 0 16 21 0 50-2 64-2s45 2 64 2c0-5 0-11 0-16-38 0-45 0-45-26 0-34 0-69 0-104 0-57 40-89 77-89 35 0 42 30 42 62 0 44 0 88 0 131 0 26-7 26-45 26 0 5 0 11 0 16 19 0 48-2 64-2 14 0 43 2 62 2 0-5 0-11 0-16-37 0-43 0-43-26 0-34 0-69 0-104 0-57 40-89 75-89s42 30 42 62c0 44 0 88 0 131 0 26-7 26-43 26 0 5 0 11 0 16 19 0 48-2 64-2 14 0 43 2 62 2 0-5 0-11 0-16-29 0-43 0-43-18 0-35 0-71 0-107 0-48 0-65-18-86-8-10-27-21-59-21-48 0-72 34-82 56-8-50-49-56-75-56-41 0-67 24-83 59 0-20 0-39 0-59-27 2-53 4-80 6 0 6 0 12 0 18 40 0 45 3 45 32z">
              <text:p/>
            </draw:path>
            <draw:path draw:style-name="gr7" draw:text-style-name="P13" draw:layer="layout" svg:width="0.213cm" svg:height="0.276cm" svg:x="17.26cm" svg:y="8.747cm" svg:viewBox="0 0 214 277" svg:d="M94 13c0-2 1-4 2-7 0-3-2-6-6-6-8 0-42 3-52 5-3 0-8 0-8 8 0 6 5 6 10 6 19 0 19 2 19 5s0 6-1 10c-19 74-38 148-56 222-2 6-1 5-2 8 0 6 5 13 13 13 5 0 13-2 17-10 0-3 5-16 7-25 2-12 5-23 8-34 1-6 6-22 6-27 5-16 5-16 13-29 13-19 32-42 62-42 23 0 24 20 24 28 0 24-17 68-24 84-4 12-6 15-6 21 0 21 18 34 38 34 39 0 56-55 56-59 0-7-4-7-6-7-5 0-5 3-6 8-10 31-28 46-42 46-10 0-11-4-11-12 0-10 3-15 9-32 5-13 21-55 21-77 0-6 0-22-14-34-7-4-18-11-37-11-29 0-50 16-64 34 10-40 20-80 30-120z">
              <text:p/>
            </draw:path>
            <draw:path draw:style-name="gr7" draw:text-style-name="P13" draw:layer="layout" svg:width="0.386cm" svg:height="0.207cm" svg:x="17.524cm" svg:y="8.817cm" svg:viewBox="0 0 387 208" svg:d="M333 114c-50 36-39 58-58 88 0 6 5 6 10 6 8 0 8 0 11-6 2-10 8-36 29-58 22-24 41-29 59-34 2-1 3-3 3-6s-1-5-6-6c-58-18-77-58-87-93-1-5-4-5-9-5-6 0-10 0-10 6 0 2 5 28 24 55 10 13 19 24 34 33-106 0-211 0-317 0-6 0-16 0-16 10s10 10 16 10c106 0 211 0 317 0z">
              <text:p/>
            </draw:path>
            <draw:path draw:style-name="gr7" draw:text-style-name="P13" draw:layer="layout" svg:width="0.181cm" svg:height="0.268cm" svg:x="17.962cm" svg:y="8.759cm" svg:viewBox="0 0 182 269" svg:d="M182 134c0-43-4-73-22-100-13-20-37-34-69-34-91 0-91 106-91 134s0 135 91 135 91-106 91-135zM91 257c-17 0-41-11-49-43-5-22-5-56-5-84 0-29 0-58 5-80 8-31 33-40 49-40 21 0 42 14 50 36 6 21 6 50 6 84 0 28 0 59-5 83-8 35-35 44-51 44z">
              <text:p/>
            </draw:path>
            <draw:path draw:style-name="gr3" draw:text-style-name="P7" draw:layer="layout" svg:width="0.401cm" svg:height="0.381cm" svg:x="18.188cm" svg:y="8.27cm" svg:viewBox="0 0 402 382" svg:d="M149 205c32 0 64 0 96 0 80 0 157-58 157-120 0-43-37-85-111-85-61 0-121 0-182 0-10 0-16 0-16 10 0 6 5 6 16 6 8 0 17 2 24 2 9 1 13 3 13 9 0 2-2 3-4 10-25 101-50 201-75 302-5 22-6 27-51 27-10 0-16 0-16 10 0 6 8 6 10 6 16 0 56-1 70-1 13 0 24 1 37 1s24 0 37 0c3 0 11 0 11-11 0-5-5-5-16-5-21 0-37 0-37-11 0-3 2-6 2-10 11-46 23-93 35-140zM189 38c5-20 6-22 30-22 18 0 36 0 55 0 46 0 76 16 76 54 0 23-11 71-33 92-29 25-63 28-87 28-26 0-53 0-80 0 13-50 26-101 39-152z">
              <text:p/>
            </draw:path>
            <draw:path draw:style-name="gr3" draw:text-style-name="P7" draw:layer="layout" svg:width="0.181cm" svg:height="0.268cm" svg:x="18.548cm" svg:y="8.476cm" svg:viewBox="0 0 182 269" svg:d="M182 136c0-43-4-75-24-102-11-18-35-34-67-34-91 0-91 108-91 136s0 133 91 133 91-106 91-133zM91 257c-17 0-41-9-49-43-7-22-7-54-7-83s0-59 7-81c8-31 33-39 49-39 21 0 42 13 48 35 7 21 8 50 8 85 0 29 0 58-6 82-8 37-34 44-50 44z">
              <text:p/>
            </draw:path>
            <draw:path draw:style-name="gr3" draw:text-style-name="P7" draw:layer="layout" svg:width="0.13cm" svg:height="0.56cm" svg:x="18.834cm" svg:y="8.232cm" svg:viewBox="0 0 131 561" svg:d="M131 557c0-2 0-4-9-13-71-71-88-178-88-263 0-97 20-196 89-267 8-6 8-6 8-8 0-4-1-6-6-6s-56 38-88 110c-29 61-37 124-37 171 0 44 6 112 38 175 34 69 82 105 87 105s6-1 6-4z">
              <text:p/>
            </draw:path>
            <draw:path draw:style-name="gr3" draw:text-style-name="P7" draw:layer="layout" svg:width="0.172cm" svg:height="0.356cm" svg:x="19.01cm" svg:y="8.302cm" svg:viewBox="0 0 173 357" svg:d="M104 126c18 0 35 0 53 0 11 0 16 0 16-11 0-6-5-6-16-6-16 0-32 0-48 0 19-80 22-91 22-95 0-9-6-14-16-14-1 0-17 0-22 19-8 30-15 60-23 90-17 0-35 0-52 0-12 0-18 0-18 11 0 6 5 6 16 6 17 0 33 0 50 0-40 160-44 170-44 179 0 31 23 52 53 52 58 0 90-82 90-87s-5-5-8-5c-5 0-5 2-8 8-24 58-55 72-72 72-13 0-18-8-18-27 0-13 0-16 3-25 14-56 28-111 42-167z">
              <text:p/>
            </draw:path>
            <draw:path draw:style-name="gr3" draw:text-style-name="P7" draw:layer="layout" svg:width="0.13cm" svg:height="0.56cm" svg:x="19.232cm" svg:y="8.232cm" svg:viewBox="0 0 131 561" svg:d="M131 281c0-44-6-111-37-175-33-69-83-106-88-106-3 0-6 2-6 6 0 2 0 2 11 13 55 55 87 144 87 262 0 96-21 196-90 266-8 6-8 8-8 10 0 3 3 4 6 4 5 0 56-38 90-108 29-63 35-125 35-172z">
              <text:p/>
            </draw:path>
            <draw:path draw:style-name="gr3" draw:text-style-name="P7" draw:layer="layout" svg:width="0.343cm" svg:height="0.021cm" svg:x="19.533cm" svg:y="8.121cm" svg:viewBox="0 0 344 22" svg:d="M325 22c9 0 19 0 19-11s-10-11-19-11c-102 0-203 0-304 0-10 0-21 0-21 11s11 11 21 11c101 0 202 0 304 0z">
              <text:p/>
            </draw:path>
            <draw:path draw:style-name="gr3" draw:text-style-name="P7" draw:layer="layout" svg:width="0.33cm" svg:height="0.383cm" svg:x="20.037cm" svg:y="7.889cm" svg:viewBox="0 0 331 384" svg:d="M109 206c31 0 63 0 94 0 67 0 128-46 128-102 0-54-56-104-133-104-66 0-132 0-198 0 0 6 0 12 0 18 5 0 10 0 14 0 44 0 44 6 44 25 0 99 0 197 0 296 0 21 0 27-44 27-4 0-9 0-14 0 0 6 0 12 0 18 21-2 62-2 83-2s64 0 83 2c0-6 0-12 0-18-4 0-9 0-14 0-43 0-43-6-43-27 0-44 0-88 0-133zM107 192c0-51 0-101 0-152 0-19 0-22 27-22 17 0 33 0 50 0 90 0 90 59 90 86s0 88-90 88c-26 0-51 0-77 0z">
              <text:p/>
            </draw:path>
            <draw:path draw:style-name="gr3" draw:text-style-name="P7" draw:layer="layout" svg:width="0.188cm" svg:height="0.247cm" svg:x="20.416cm" svg:y="8.025cm" svg:viewBox="0 0 189 248" svg:d="M78 61c0-20 0-41 0-61-26 2-52 3-78 5 0 6 0 12 0 17 40 0 43 5 43 32 0 50 0 101 0 151 0 25-6 25-43 25 0 6 0 12 0 18 22-2 48-2 64-2 22 0 50 0 72 2 0-6 0-12 0-18-4 0-9 0-13 0-41 0-41-6-41-27 0-29 0-57 0-86 0-55 22-106 65-106 3 0 5 0 7 2-2 0-13 6-13 21 0 16 11 24 24 24 9 0 24-7 24-24 0-18-18-34-42-34-41 0-61 37-69 61z">
              <text:p/>
            </draw:path>
            <draw:path draw:style-name="gr3" draw:text-style-name="P7" draw:layer="layout" svg:width="0.076cm" svg:height="0.562cm" svg:x="20.687cm" svg:y="7.851cm" svg:viewBox="0 0 77 563" svg:d="M77 563c0-7 0-15 0-22-18 0-36 0-55 0 0-173 0-346 0-519 19 0 37 0 55 0 0-7 0-15 0-22-26 0-51 0-77 0 0 188 0 375 0 563 26 0 51 0 77 0z">
              <text:p/>
            </draw:path>
            <draw:path draw:style-name="gr3" draw:text-style-name="P7" draw:layer="layout" svg:width="0.473cm" svg:height="0.383cm" svg:x="20.799cm" svg:y="7.889cm" svg:viewBox="0 0 474 384" svg:d="M403 59c7-22 16-40 61-41 3 0 10-2 10-12 0-1 0-6-8-6-18 0-39 2-56 2-20 0-39-2-58-2-3 0-10 0-10 11 0 7 5 7 10 7 32 0 38 12 38 24 0 1-1 11-1 12-22 84-43 167-64 250-41-98-82-195-123-293-5-11-5-11-18-11-25 0-50 0-75 0-13 0-18 0-18 11 0 7 5 7 16 7 3 0 39 0 39 4-25 101-51 202-76 303-6 22-16 40-60 41-4 0-10 0-10 11 0 4 3 7 8 7 18 0 37-2 56-2s38 2 58 2c3 0 9 0 9-11 0-7-5-7-11-7-32-1-37-13-37-25 0-4 0-7 2-13 25-99 50-197 75-296 2 3 2 5 5 10 46 110 93 220 139 331 5 9 6 11 11 11 7 0 7-2 10-13 26-104 52-208 78-312z">
              <text:p/>
            </draw:path>
            <draw:path draw:style-name="gr3" draw:text-style-name="P7" draw:layer="layout" svg:width="0.129cm" svg:height="0.562cm" svg:x="21.346cm" svg:y="7.851cm" svg:viewBox="0 0 130 563" svg:d="M130 557c0-2 0-4-10-13-70-71-88-176-88-263 0-97 22-195 91-265 7-6 7-8 7-10 0-4-2-6-5-6-7 0-56 38-90 110-29 61-35 124-35 171 0 44 6 112 37 176 33 69 81 106 88 106 3 0 5-2 5-6z">
              <text:p/>
            </draw:path>
            <draw:path draw:style-name="gr3" draw:text-style-name="P7" draw:layer="layout" svg:width="0.276cm" svg:height="0.396cm" svg:x="21.539cm" svg:y="7.883cm" svg:viewBox="0 0 277 397" svg:d="M130 6c-3-2 0-6-7-6-13 0-54 5-69 6-4 0-11 0-11 12 0 6 7 6 15 6 27 0 27 3 27 10-1 3-1 7-2 11-27 107-54 215-81 323-2 8-2 9-2 13 0 12 11 16 16 16 10 0 18-8 21-15 4-14 7-29 11-43 4-17 9-34 13-51 3-11 6-24 9-37 0-3 5-22 5-25 2-5 19-37 39-52 12-9 30-20 54-20s30 19 30 40c0 30-20 91-35 126-5 13-6 19-6 30 0 26 19 47 45 47 54 0 75-84 75-87 0-6-7-6-8-6-5 0-5 1-8 9-8 31-26 71-58 71-9 0-13-7-13-19 0-13 5-28 10-40 10-24 35-90 35-123 0-37-24-60-65-60-36 0-63 16-84 44 15-60 29-120 44-180z">
              <text:p/>
            </draw:path>
            <draw:path draw:style-name="gr3" draw:text-style-name="P7" draw:layer="layout" svg:width="0.13cm" svg:height="0.562cm" svg:x="21.864cm" svg:y="7.851cm" svg:viewBox="0 0 131 563" svg:d="M131 281c0-43-6-111-38-175-34-69-82-106-87-106-3 0-6 3-6 6 0 2 0 4 11 13 55 56 87 146 87 262 0 96-21 196-90 266-8 6-8 8-8 10 0 3 3 6 6 6 5 0 56-38 90-110 27-61 35-124 35-172z">
              <text:p/>
            </draw:path>
            <draw:path draw:style-name="gr3" draw:text-style-name="P7" draw:layer="layout" svg:width="0.373cm" svg:height="0.13cm" svg:x="22.238cm" svg:y="8.067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3" draw:text-style-name="P7" draw:layer="layout" svg:width="0.185cm" svg:height="0.373cm" svg:x="22.851cm" svg:y="7.899cm" svg:viewBox="0 0 186 374" svg:d="M115 14c0-12 0-14-13-14-35 35-84 35-102 35 0 6 0 12 0 18 11 0 43 0 74-15 0 97 0 194 0 291 0 21-2 28-53 28-6 0-12 0-18 0 0 6 0 11 0 17 19-1 69-1 91-1 23 0 71 0 92 1 0-6 0-11 0-17-7 0-13 0-20 0-49 0-51-7-51-28 0-105 0-210 0-315z">
              <text:p/>
            </draw:path>
            <draw:path draw:style-name="gr3" draw:text-style-name="P7" draw:layer="layout" svg:width="0.076cm" svg:height="0.562cm" svg:x="23.094cm" svg:y="7.851cm" svg:viewBox="0 0 77 563" svg:d="M77 0c-26 0-51 0-77 0 0 7 0 15 0 22 18 0 36 0 54 0 0 173 0 346 0 519-18 0-36 0-54 0 0 7 0 15 0 22 26 0 51 0 77 0 0-188 0-375 0-563z">
              <text:p/>
            </draw:path>
            <draw:path draw:style-name="gr3" draw:text-style-name="P7" draw:layer="layout" svg:width="0.343cm" svg:height="0.021cm" svg:x="23.41cm" svg:y="8.121cm" svg:viewBox="0 0 344 22" svg:d="M323 22c10 0 21 0 21-11s-11-11-21-11c-101 0-202 0-304 0-9 0-19 0-19 11s10 11 19 11c102 0 203 0 304 0z">
              <text:p/>
            </draw:path>
            <draw:path draw:style-name="gr7" draw:text-style-name="P13" draw:layer="layout" svg:width="0.33cm" svg:height="0.383cm" svg:x="23.944cm" svg:y="7.889cm" svg:viewBox="0 0 331 384" svg:d="M109 206c31 0 63 0 94 0 67 0 128-46 128-102 0-54-54-104-133-104-66 0-132 0-198 0 0 6 0 12 0 18 5 0 10 0 14 0 44 0 45 6 45 25 0 99 0 197 0 296 0 21-1 27-45 27-4 0-9 0-14 0 0 6 0 12 0 18 21-2 62-2 83-2s64 0 83 2c0-6 0-12 0-18-4 0-8 0-12 0-44 0-45-6-45-27 0-44 0-88 0-133zM107 192c0-51 0-101 0-152 0-19 2-22 27-22 17 0 33 0 50 0 90 0 90 59 90 86s0 88-90 88c-26 0-51 0-77 0z">
              <text:p/>
            </draw:path>
            <draw:path draw:style-name="gr7" draw:text-style-name="P13" draw:layer="layout" svg:width="0.188cm" svg:height="0.247cm" svg:x="24.323cm" svg:y="8.025cm" svg:viewBox="0 0 189 248" svg:d="M78 61c0-20 0-41 0-61-26 2-52 3-78 5 0 6 0 12 0 17 40 0 43 5 43 32 0 50 0 101 0 151 0 25-5 25-43 25 0 6 0 12 0 18 22-2 48-2 64-2 22 0 50 0 72 2 0-6 0-12 0-18-4 0-9 0-13 0-41 0-41-6-41-27 0-29 0-57 0-86 0-55 22-106 65-106 5 0 5 0 7 2-2 0-13 6-13 21 0 16 11 24 24 24 9 0 24-7 24-24 0-18-18-34-42-34-40 0-61 37-69 61z">
              <text:p/>
            </draw:path>
            <draw:path draw:style-name="gr7" draw:text-style-name="P13" draw:layer="layout" svg:width="0.076cm" svg:height="0.562cm" svg:x="24.593cm" svg:y="7.851cm" svg:viewBox="0 0 77 563" svg:d="M77 563c0-7 0-15 0-22-18 0-36 0-55 0 0-173 0-346 0-519 19 0 37 0 55 0 0-7 0-15 0-22-26 0-51 0-77 0 0 188 0 375 0 563 26 0 51 0 77 0z">
              <text:p/>
            </draw:path>
            <draw:path draw:style-name="gr7" draw:text-style-name="P13" draw:layer="layout" svg:width="0.473cm" svg:height="0.383cm" svg:x="24.705cm" svg:y="7.889cm" svg:viewBox="0 0 474 384" svg:d="M403 59c7-22 16-40 61-41 3 0 10-2 10-12 0-1 0-6-7-6-19 0-38 2-57 2-20 0-39-2-58-2-3 0-10 0-10 11 0 7 5 7 10 7 32 0 38 12 38 24 0 1-1 11-1 12-21 84-42 167-63 250-41-98-83-195-124-293-5-11-5-11-18-11-25 0-50 0-75 0-11 0-18 0-18 11 0 7 7 7 16 7 3 0 39 0 39 4-25 101-51 202-76 303-4 22-14 40-60 41-4 0-10 0-10 11 0 4 3 7 8 7 18 0 37-2 56-2s40 2 58 2c3 0 9 0 9-11 0-7-5-7-11-7-32-1-37-13-37-25 0-4 2-7 3-13 25-99 49-197 74-296 2 3 2 5 5 10 47 110 94 220 141 331 3 9 4 11 9 11 7 0 7-2 10-13 26-104 52-208 78-312z">
              <text:p/>
            </draw:path>
            <draw:path draw:style-name="gr7" draw:text-style-name="P13" draw:layer="layout" svg:width="0.129cm" svg:height="0.562cm" svg:x="25.252cm" svg:y="7.851cm" svg:viewBox="0 0 130 563" svg:d="M130 557c0-2 0-4-10-13-69-71-88-176-88-263 0-97 22-195 91-265 7-6 7-8 7-10 0-4-2-6-5-6-7 0-56 38-90 110-29 61-35 124-35 171 0 44 6 112 37 176 33 69 81 106 88 106 3 0 5-2 5-6z">
              <text:p/>
            </draw:path>
            <draw:path draw:style-name="gr7" draw:text-style-name="P13" draw:layer="layout" svg:width="0.276cm" svg:height="0.396cm" svg:x="25.446cm" svg:y="7.883cm" svg:viewBox="0 0 277 397" svg:d="M131 6c-2-2 0-6-8-6-13 0-54 5-69 6-4 0-9 0-9 12 0 6 5 6 13 6 27 0 28 3 28 10-1 3-2 7-3 11-26 107-53 215-80 323-3 8-3 9-3 13 0 12 11 16 16 16 10 0 19-8 21-15 4-14 7-29 11-43 4-17 9-34 13-51 3-11 6-24 9-37 0-3 5-22 7-25 1-5 19-37 37-52 12-9 30-20 54-20s30 19 30 40c0 30-20 91-35 126-3 13-6 19-6 30 0 26 19 47 46 47 53 0 74-84 74-87 0-6-5-6-8-6-5 0-5 1-8 9-8 31-26 71-58 71-9 0-13-7-13-19 0-13 5-28 10-40 10-24 35-90 35-123 0-37-22-60-65-60-36 0-63 16-84 44 15-60 30-120 45-180z">
              <text:p/>
            </draw:path>
            <draw:path draw:style-name="gr7" draw:text-style-name="P13" draw:layer="layout" svg:width="0.13cm" svg:height="0.562cm" svg:x="25.771cm" svg:y="7.851cm" svg:viewBox="0 0 131 563" svg:d="M131 281c0-43-6-111-37-175-33-69-83-106-88-106-3 0-6 3-6 6 0 2 0 4 11 13 55 56 87 146 87 262 0 96-21 196-90 266-8 6-8 8-8 10 0 3 3 6 6 6 5 0 56-38 90-110 29-61 35-124 35-172z">
              <text:p/>
            </draw:path>
            <draw:path draw:style-name="gr7" draw:text-style-name="P13" draw:layer="layout" svg:width="0.341cm" svg:height="0.434cm" svg:x="26.161cm" svg:y="7.915cm" svg:viewBox="0 0 342 435" svg:d="M331 176c8-3 11-8 11-13s-1-8-11-13c-103-48-206-97-309-145-8-5-7-3-11-5-6 0-11 6-11 11 0 8 5 10 10 13 98 46 197 93 296 139-99 47-197 93-295 139-11 5-11 10-11 13 0 6 5 11 11 11 2 0 2 0 10-5 103-48 207-97 310-145zM323 435c10 0 19 0 19-11s-11-11-19-11c-101 0-202 0-304 0-8 0-19 0-19 11s10 11 19 11c102 0 203 0 304 0z">
              <text:p/>
            </draw:path>
            <draw:path draw:style-name="gr7" draw:text-style-name="P13" draw:layer="layout" svg:width="0.223cm" svg:height="0.373cm" svg:x="26.735cm" svg:y="7.899cm" svg:viewBox="0 0 224 374" svg:d="M43 331c20-19 40-38 59-58 88-78 122-108 122-164 0-64-50-109-118-109-64 0-106 51-106 101 0 32 29 32 30 32 10 0 29-7 29-31 0-14-9-28-30-28-5 0-5 0-7 1 13-37 44-57 76-57 51 0 75 44 75 91 0 45-27 89-59 125-36 39-72 79-108 119-6 7-6 7-6 21 69 0 139 0 208 0 5-32 11-65 16-97-5 0-10 0-14 0-2 16-7 41-12 49-4 5-41 5-54 5-34 0-67 0-101 0z">
              <text:p/>
            </draw:path>
            <draw:path draw:style-name="gr7" draw:text-style-name="P13" draw:layer="layout" svg:width="0.076cm" svg:height="0.562cm" svg:x="27.001cm" svg:y="7.851cm" svg:viewBox="0 0 77 563" svg:d="M77 0c-26 0-51 0-77 0 0 7 0 15 0 22 18 0 36 0 54 0 0 173 0 346 0 519-18 0-36 0-54 0 0 7 0 15 0 22 26 0 51 0 77 0 0-188 0-375 0-563z">
              <text:p/>
            </draw:path>
            <draw:path draw:style-name="gr3" draw:text-style-name="P7" draw:layer="layout" svg:width="7.657cm" svg:height="0.021cm" svg:x="19.487cm" svg:y="8.502cm" svg:viewBox="0 0 7658 22" svg:d="M3828 22c-1276 0-2552 0-3828 0 0-7 0-15 0-22 2553 0 5105 0 7658 0 0 7 0 15 0 22-1276 0-2553 0-3830 0z">
              <text:p/>
            </draw:path>
            <draw:path draw:style-name="gr7" draw:text-style-name="P13" draw:layer="layout" svg:width="0.274cm" svg:height="0.394cm" svg:x="23.186cm" svg:y="8.649cm" svg:viewBox="0 0 275 395" svg:d="M130 6c0-1 0-6-8-6-13 0-53 3-68 5-4 1-11 1-11 11 0 6 5 6 13 6 27 0 29 5 29 10-1 4-1 7-2 11-27 108-54 217-81 325-2 8-2 8-2 11 0 14 11 16 16 16 8 0 18-6 21-14 3-14 6-28 9-42 5-17 9-34 13-51 3-13 7-26 10-38 1-4 6-21 6-24 2-7 19-37 39-53 12-8 29-19 54-19s30 19 30 40c0 28-22 91-35 124-5 13-8 21-8 32 0 26 19 45 47 45 52 0 73-82 73-86 0-5-5-5-6-5-7 0-7 1-8 9-10 31-27 71-58 71-9 0-14-7-14-19 0-15 5-28 11-40 8-24 34-91 34-123 0-37-23-61-64-61-37 0-63 17-84 43 15-59 29-118 44-178z">
              <text:p/>
            </draw:path>
            <draw:path draw:style-name="gr3" draw:text-style-name="P7" draw:layer="layout" svg:width="0.372cm" svg:height="0.13cm" svg:x="16.263cm" svg:y="9.516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3" draw:text-style-name="P7" draw:layer="layout" svg:width="0.343cm" svg:height="0.021cm" svg:x="17.278cm" svg:y="9.57cm" svg:viewBox="0 0 344 22" svg:d="M323 22c10 0 21 0 21-11s-11-11-21-11c-101 0-202 0-304 0-9 0-19 0-19 11s10 11 19 11c102 0 203 0 304 0z">
              <text:p/>
            </draw:path>
            <draw:path draw:style-name="gr3" draw:text-style-name="P7" draw:layer="layout" svg:width="0.277cm" svg:height="0.397cm" svg:x="17.698cm" svg:y="9.332cm" svg:viewBox="0 0 278 398" svg:d="M170 226c24 59 51 145 59 158 9 13 14 13 30 13 4 0 9 0 13 0 5-2 6-5 6-7 0-1-1-1-3-5-6-6-9-14-13-25-38-107-76-213-115-320-11-32-41-40-69-40-3 0-9 0-9 6 0 5 3 5 5 7 19 3 22 6 36 45 19 50 37 101 55 152-52 51-104 102-155 153-7 8-10 11-10 18 0 9 7 17 16 17s14-6 19-13c45-53 90-106 135-159z">
              <text:p/>
            </draw:path>
            <draw:path draw:style-name="gr3" draw:text-style-name="P7" draw:layer="layout" svg:width="0.401cm" svg:height="0.383cm" svg:x="18.018cm" svg:y="9.338cm" svg:viewBox="0 0 402 384" svg:d="M147 206c32 0 64 0 96 0 80 0 159-59 159-121 0-43-37-85-111-85-61 0-121 0-182 0-11 0-18 0-18 11 0 7 5 7 18 7 6 0 16 0 24 1 8 0 11 2 11 8 0 3 0 5-2 11-25 101-50 202-75 303-6 20-6 25-51 25-10 0-16 0-16 11 0 7 6 7 8 7 16 0 56-2 72-2 11 0 24 0 35 0 13 0 26 2 37 2 5 0 11 0 11-11 0-7-5-7-16-7-21 0-35 0-35-9 0-4 0-7 2-10 11-47 22-94 33-141zM189 38c5-19 6-20 30-20 18 0 35 0 53 0 48 0 77 14 77 54 0 21-11 70-32 90-29 25-63 30-88 30-26 0-52 0-79 0 13-51 26-102 39-154z">
              <text:p/>
            </draw:path>
            <draw:path draw:style-name="gr3" draw:text-style-name="P7" draw:layer="layout" svg:width="0.183cm" svg:height="0.269cm" svg:x="18.377cm" svg:y="9.545cm" svg:viewBox="0 0 184 270" svg:d="M184 136c0-43-6-74-24-101-13-19-37-35-69-35-91 0-91 107-91 136s-1 134 91 134 93-105 93-134zM91 259c-17 0-41-11-49-43-5-24-5-56-5-85s0-59 5-80c9-32 33-40 49-40 23 0 43 13 50 37 6 21 6 50 6 83 0 29 0 58-5 83-8 36-35 45-51 45z">
              <text:p/>
            </draw:path>
            <draw:path draw:style-name="gr3" draw:text-style-name="P7" draw:layer="layout" svg:width="0.13cm" svg:height="0.562cm" svg:x="18.665cm" svg:y="9.3cm" svg:viewBox="0 0 131 563" svg:d="M131 557c0-2 0-2-9-12-71-72-90-177-90-264 0-97 22-195 91-265 8-6 8-8 8-10 0-3-3-6-6-6-5 0-56 38-90 110-29 63-35 125-35 171 0 45 6 112 37 176 33 69 83 106 88 106 3 0 6-2 6-6z">
              <text:p/>
            </draw:path>
            <draw:path draw:style-name="gr3" draw:text-style-name="P7" draw:layer="layout" svg:width="0.172cm" svg:height="0.357cm" svg:x="18.841cm" svg:y="9.37cm" svg:viewBox="0 0 173 358" svg:d="M102 126c18 0 36 0 53 0 11 0 18 0 18-11 0-5-7-5-16-5-17 0-33 0-50 0 21-80 24-91 24-94 0-10-8-16-17-16-2 0-18 0-23 21-7 30-14 60-21 89-17 0-35 0-52 0-13 0-18 0-18 10 0 6 5 6 16 6 17 0 33 0 50 0-42 160-44 170-44 179 0 31 21 53 52 53 57 0 89-81 89-86 0-7-5-7-6-7-5 0-5 2-8 8-24 60-55 72-74 72-11 0-17-6-17-25 0-15 1-18 3-27 14-56 28-111 41-167z">
              <text:p/>
            </draw:path>
            <draw:path draw:style-name="gr3" draw:text-style-name="P7" draw:layer="layout" svg:width="0.129cm" svg:height="0.562cm" svg:x="19.063cm" svg:y="9.3cm" svg:viewBox="0 0 130 563" svg:d="M130 281c0-43-7-111-37-174-34-70-82-107-88-107-3 0-5 3-5 6 0 2 0 4 10 13 56 56 88 146 88 262 0 96-21 196-92 266-6 8-6 8-6 10 0 3 2 6 5 6 6 0 56-38 89-110 29-61 36-124 36-172z">
              <text:p/>
            </draw:path>
            <draw:path draw:style-name="gr3" draw:text-style-name="P7" draw:layer="layout" svg:width="0.058cm" svg:height="0.058cm" svg:x="19.298cm" svg:y="9.663cm" svg:viewBox="0 0 59 59" svg:d="M59 29c0-16-14-29-30-29s-29 12-29 29 13 30 29 30 30-13 30-30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20">0</text:span>(<text:span text:style-name="T5">t</text:span>)</text:p>
          </draw:text-box>
        </draw:frame>
        <draw:frame presentation:style-name="pr5" draw:text-style-name="P1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50">The number of events in [0, </text:span><text:span text:style-name="T51">t</text:span><text:span text:style-name="T50">] and (</text:span><text:span text:style-name="T51">t</text:span><text:span text:style-name="T50">, </text:span><text:span text:style-name="T51">t</text:span><text:span text:style-name="T50">+</text:span><text:span text:style-name="T51">h</text:span><text:span text:style-name="T50">] are </text:span><text:span text:style-name="T121">independent</text:span><text:span text:style-name="T50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6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0920000000E4F7C37C14CC96E65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2" draw:text-style-name="P6" draw:layer="layout" svg:width="11.427cm" svg:height="6.886cm" svg:x="0.978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0010000010E000000A32145FC3D45F72A0A.png" xlink:type="simple" xlink:show="embed" xlink:actuate="onLoad" draw:mime-type="image/png"/>
          </draw:frame>
        </draw:g>
        <draw:g>
          <svg:title>TexMaths</svg:title>
          <svg:desc>16§latex§\begin{eqnarray*}
\therefore P_0'(t) &amp;=&amp; \lim_{h\rightarrow 0}\frac{P_0(t+h)-P_0(t)}{h} \\
&amp;=&amp; \textcolor{red}{\lim_{h\rightarrow 0}}P_0(t)\frac{-\Pr[N(h)=1]-\textcolor{red}{\Pr[N(h)\geq 2]}}{\textcolor{red}{h}} \\
&amp;=&amp; -\lambda P_0(t).
\end{eqnarray*}§svg§600§FALSE§</svg:desc>
          <draw:g>
            <draw:path draw:style-name="gr6" draw:text-style-name="P12" draw:layer="layout" svg:width="13.202cm" svg:height="3.402cm" svg:x="13.912cm" svg:y="6.43cm" svg:viewBox="0 0 13203 3403" svg:d="M6601 3403c-2201 0-4401 0-6601 0 0-1134 0-2269 0-3403 4401 0 8802 0 13203 0 0 1134 0 2269 0 3403-2201 0-4402 0-6602 0z">
              <text:p/>
            </draw:path>
            <draw:path draw:style-name="gr3" draw:text-style-name="P7" draw:layer="layout" svg:width="0.34cm" svg:height="0.303cm" svg:x="13.901cm" svg:y="6.942cm" svg:viewBox="0 0 341 304" svg:d="M200 30c0-16-14-30-30-30s-29 14-29 30 13 31 29 31 30-13 30-31zM341 273c0-16-15-30-31-30s-30 14-30 30 14 31 30 31 31-15 31-31zM59 273c0-16-13-30-30-30s-29 14-29 30 12 31 29 31 30-15 30-31z">
              <text:p/>
            </draw:path>
            <draw:path draw:style-name="gr3" draw:text-style-name="P7" draw:layer="layout" svg:width="0.401cm" svg:height="0.383cm" svg:x="14.437cm" svg:y="6.818cm" svg:viewBox="0 0 402 384" svg:d="M149 206c31 0 63 0 94 0 80 0 159-57 159-121 0-43-37-85-111-85-61 0-121 0-182 0-11 0-18 0-18 11 0 7 7 7 18 7 6 0 17 1 24 1 8 2 11 3 11 10 0 1 0 3-2 9-25 101-50 202-75 303-6 22-6 25-51 25-10 0-16 0-16 11 0 7 6 7 8 7 16 0 56-2 72-2 11 0 24 2 37 2 11 0 24 0 35 0 5 0 11 0 11-11 0-7-5-7-14-7-21 0-37 0-37-9 0-4 0-7 2-10 11-47 23-94 35-141zM189 40c5-21 6-22 30-22 18 0 36 0 55 0 46 0 75 16 75 54 0 22-11 70-32 91-29 24-63 29-87 29-26 0-53 0-80 0 13-51 26-101 39-152z">
              <text:p/>
            </draw:path>
            <draw:path draw:style-name="gr3" draw:text-style-name="P7" draw:layer="layout" svg:width="0.098cm" svg:height="0.202cm" svg:x="14.872cm" svg:y="6.751cm" svg:viewBox="0 0 99 203" svg:d="M96 34c3-7 3-10 3-13 0-11-11-21-22-21-16 0-21 11-23 18-17 57-34 114-51 171-1 0-2 4-3 6 0 5 13 8 16 8s3 0 6-6c25-55 49-109 74-163z">
              <text:p/>
            </draw:path>
            <draw:path draw:style-name="gr3" draw:text-style-name="P7" draw:layer="layout" svg:width="0.181cm" svg:height="0.268cm" svg:x="14.797cm" svg:y="7.081cm" svg:viewBox="0 0 182 269" svg:d="M182 136c0-43-6-75-24-102-12-18-36-34-67-34-91 0-91 108-91 136s0 133 91 133 91-106 91-133zM91 257c-19 0-43-9-51-43-5-22-5-54-5-83s0-59 7-81c8-31 32-39 49-39 21 0 42 13 48 35 7 21 7 50 7 85 0 29 0 58-5 82-8 37-35 44-50 44z">
              <text:p/>
            </draw:path>
            <draw:path draw:style-name="gr3" draw:text-style-name="P7" draw:layer="layout" svg:width="0.13cm" svg:height="0.56cm" svg:x="15.083cm" svg:y="6.782cm" svg:viewBox="0 0 131 561" svg:d="M131 557c0-2 0-4-9-13-71-71-88-178-88-263 0-99 20-196 89-267 8-6 8-8 8-9 0-3-3-5-6-5-5 0-56 38-90 109-29 62-35 125-35 172 0 44 6 111 37 175 33 69 83 105 88 105 3 0 6-1 6-4z">
              <text:p/>
            </draw:path>
            <draw:path draw:style-name="gr3" draw:text-style-name="P7" draw:layer="layout" svg:width="0.172cm" svg:height="0.357cm" svg:x="15.259cm" svg:y="6.85cm" svg:viewBox="0 0 173 358" svg:d="M102 128c18 0 36 0 53 0 11 0 18 0 18-11 0-7-7-7-16-7-17 0-33 0-50 0 21-80 24-91 24-94 0-10-8-16-17-16-2 0-16 2-23 21-7 30-14 60-21 89-17 0-35 0-52 0-12 0-18 0-18 12 0 6 5 6 16 6 17 0 33 0 50 0-40 160-44 169-44 179 0 30 23 51 52 51 57 0 89-81 89-86s-3-5-6-5c-5 0-5 2-8 8-24 58-55 72-74 72-11 0-17-8-17-27 0-13 1-18 3-27 14-55 28-110 41-165z">
              <text:p/>
            </draw:path>
            <draw:path draw:style-name="gr3" draw:text-style-name="P7" draw:layer="layout" svg:width="0.129cm" svg:height="0.56cm" svg:x="15.482cm" svg:y="6.782cm" svg:viewBox="0 0 130 561" svg:d="M130 281c0-44-5-111-37-175-34-69-82-106-88-106-3 0-5 2-5 5 0 1 0 3 11 13 55 56 87 145 87 263 0 96-21 194-90 266-8 6-8 8-8 10 0 3 2 4 5 4 6 0 57-38 89-108 29-63 36-125 36-172z">
              <text:p/>
            </draw:path>
            <draw:path draw:style-name="gr3" draw:text-style-name="P7" draw:layer="layout" svg:width="0.372cm" svg:height="0.132cm" svg:x="16.262cm" svg:y="6.996cm" svg:viewBox="0 0 373 133" svg:d="M354 22c9 0 19 0 19-11s-10-11-18-11c-112 0-225 0-337 0-8 0-18 0-18 11s10 11 19 11c112 0 223 0 335 0zM355 133c8 0 18 0 18-11 0-12-10-12-19-12-112 0-223 0-335 0-9 0-19 0-19 12 0 11 10 11 18 11 112 0 225 0 337 0z">
              <text:p/>
            </draw:path>
            <draw:path draw:style-name="gr3" draw:text-style-name="P7" draw:layer="layout" svg:width="0.124cm" svg:height="0.388cm" svg:x="17.326cm" svg:y="6.814cm" svg:viewBox="0 0 125 389" svg:d="M80 0c-27 2-53 3-80 5 0 6 0 12 0 17 38 0 43 5 43 32 0 98 0 196 0 293 0 24-6 24-43 24 0 6 0 12 0 18 18 0 49-2 62-2 14 0 42 2 63 2 0-6 0-12 0-18-39 0-45 0-45-24 0-116 0-231 0-347z">
              <text:p/>
            </draw:path>
            <draw:path draw:style-name="gr3" draw:text-style-name="P7" draw:layer="layout" svg:width="0.119cm" svg:height="0.375cm" svg:x="17.481cm" svg:y="6.826cm" svg:viewBox="0 0 120 376" svg:d="M82 128c-27 2-53 4-79 6 0 6 0 12 0 18 35 0 42 3 42 30 0 51 0 102 0 152 0 24-7 24-45 24 0 6 0 12 0 18 18 0 48-2 62-2 20 0 39 2 58 2 0-6 0-12 0-18-37 0-38-1-38-24 0-69 0-137 0-206zM83 30c0-17-14-30-29-30-17 0-30 16-30 30 0 15 13 31 30 31 15 0 29-13 29-31z">
              <text:p/>
            </draw:path>
            <draw:path draw:style-name="gr3" draw:text-style-name="P7" draw:layer="layout" svg:width="0.439cm" svg:height="0.247cm" svg:x="17.636cm" svg:y="6.954cm" svg:viewBox="0 0 440 248" svg:d="M45 56c0 50 0 100 0 150 0 24-7 24-45 24 0 6 0 12 0 18 21 0 50-2 64-2s45 2 64 2c0-6 0-12 0-18-38 0-45 0-45-24 0-34 0-69 0-104 0-59 40-89 77-89 35 0 42 30 42 62 0 44 0 88 0 131 0 24-7 24-45 24 0 6 0 12 0 18 19 0 48-2 64-2 14 0 43 2 62 2 0-6 0-12 0-18-37 0-43 0-43-24 0-34 0-69 0-104 0-59 40-89 75-89s42 30 42 62c0 44 0 88 0 131 0 24-7 24-43 24 0 6 0 12 0 18 19 0 48-2 64-2 14 0 43 2 62 2 0-6 0-12 0-18-29 0-43 0-43-16 0-35 0-71 0-107 0-48 0-65-18-86-8-10-27-21-59-21-48 0-72 34-82 56-8-50-49-56-75-56-41 0-67 24-83 59 0-20 0-39 0-59-27 2-53 4-80 6 0 6 0 12 0 18 40 0 45 3 45 32z">
              <text:p/>
            </draw:path>
            <draw:path draw:style-name="gr3" draw:text-style-name="P7" draw:layer="layout" svg:width="0.213cm" svg:height="0.276cm" svg:x="17.259cm" svg:y="7.297cm" svg:viewBox="0 0 214 277" svg:d="M94 11c1-2 2-5 2-6 0-2-2-5-6-5-8 0-42 3-52 3-3 2-8 2-8 10 0 6 5 6 10 6 19 0 19 2 19 5s0 5-1 10c-19 74-38 148-56 222-2 6-1 5-2 8 0 6 5 13 13 13 5 0 13-2 17-10 0-3 5-17 7-25 2-12 5-24 8-36 1-4 6-20 6-25 5-16 5-16 13-29 13-19 32-42 62-42 23 0 24 18 24 28 0 24-17 67-24 84-4 12-6 15-6 21 0 21 18 34 38 34 39 0 56-55 56-59 0-7-4-7-6-7-5 0-5 3-6 8-10 31-28 46-42 46-10 0-11-4-11-12 0-10 3-15 9-32 5-13 21-55 21-77 0-6 0-22-14-34-7-4-18-11-37-11-29 0-50 16-64 34 10-41 20-81 30-122z">
              <text:p/>
            </draw:path>
            <draw:path draw:style-name="gr3" draw:text-style-name="P7" draw:layer="layout" svg:width="0.386cm" svg:height="0.207cm" svg:x="17.523cm" svg:y="7.367cm" svg:viewBox="0 0 387 208" svg:d="M333 114c-50 36-39 58-58 88 0 6 5 6 10 6 8 0 8 0 11-6 2-10 8-36 29-58 22-24 41-29 59-35 2 0 3-3 3-5 0-3-1-5-6-6-58-18-77-58-87-93-1-5-4-5-9-5-6 0-10 0-10 6 8 19 5 28 24 55 10 13 19 24 34 33-106 0-211 0-317 0-6 0-16 0-16 10s10 10 16 10c106 0 211 0 317 0z">
              <text:p/>
            </draw:path>
            <draw:path draw:style-name="gr3" draw:text-style-name="P7" draw:layer="layout" svg:width="0.181cm" svg:height="0.269cm" svg:x="17.961cm" svg:y="7.308cm" svg:viewBox="0 0 182 270" svg:d="M182 136c0-43-4-74-22-101-13-19-37-35-69-35-91 0-91 108-91 136s0 134 91 134 91-105 91-134zM91 259c-17 0-41-11-49-43-5-24-5-56-5-85s0-59 5-80c8-32 33-40 49-40 21 0 42 13 50 37 6 21 6 50 6 83 0 29 0 58-5 83-8 36-35 45-51 45z">
              <text:p/>
            </draw:path>
            <draw:path draw:style-name="gr3" draw:text-style-name="P7" draw:layer="layout" svg:width="0.401cm" svg:height="0.383cm" svg:x="18.348cm" svg:y="6.439cm" svg:viewBox="0 0 402 384" svg:d="M149 206c31 0 63 0 94 0 80 0 159-59 159-121 0-43-37-85-111-85-61 0-121 0-182 0-11 0-18 0-18 10 0 8 7 8 18 8 6 0 17 0 24 0 8 1 13 3 13 9 0 2-2 3-4 11-25 101-50 201-75 301-5 22-6 27-51 27-10 0-16 0-16 10 0 8 6 8 8 8 16 0 56-2 72-2 11 0 24 0 37 0 11 0 24 2 35 2 5 0 11 0 11-11 0-7-5-7-14-7-21 0-37 0-37-11 0-3 0-5 2-8 11-47 23-94 35-141zM189 38c5-19 6-20 30-20 18 0 36 0 55 0 46 0 75 14 75 52 0 23-11 71-32 92-29 25-63 30-87 30-26 0-53 0-80 0 13-51 26-102 39-154z">
              <text:p/>
            </draw:path>
            <draw:path draw:style-name="gr3" draw:text-style-name="P7" draw:layer="layout" svg:width="0.181cm" svg:height="0.268cm" svg:x="18.708cm" svg:y="6.646cm" svg:viewBox="0 0 182 269" svg:d="M182 136c0-43-6-75-24-102-11-18-36-34-67-34-91 0-91 107-91 136s0 133 91 133 91-104 91-133zM91 257c-19 0-43-9-51-41-5-24-5-56-5-85s0-59 7-80c8-32 33-40 49-40 21 0 42 13 48 35 7 23 7 50 7 85 0 29 0 58-5 83-8 36-35 43-50 43z">
              <text:p/>
            </draw:path>
            <draw:path draw:style-name="gr3" draw:text-style-name="P7" draw:layer="layout" svg:width="0.13cm" svg:height="0.562cm" svg:x="18.995cm" svg:y="6.401cm" svg:viewBox="0 0 131 563" svg:d="M131 557c0-2 0-4-9-13-71-71-88-176-88-263 0-97 20-195 89-265 8-8 8-8 8-10 0-4-3-6-6-6-5 0-56 38-90 110-29 61-35 124-35 171 0 44 6 112 37 175 33 70 83 107 88 107 3 0 6-3 6-6z">
              <text:p/>
            </draw:path>
            <draw:path draw:style-name="gr3" draw:text-style-name="P7" draw:layer="layout" svg:width="0.172cm" svg:height="0.357cm" svg:x="19.171cm" svg:y="6.471cm" svg:viewBox="0 0 173 358" svg:d="M102 126c18 0 36 0 53 0 13 0 18 0 18-11 0-6-5-6-16-6-17 0-33 0-50 0 21-80 24-91 24-95 0-9-8-14-17-14-2 0-16 0-23 19-7 30-14 60-21 90-17 0-35 0-52 0-12 0-18 0-18 11 0 6 5 6 16 6 17 0 33 0 50 0-40 160-44 170-44 179 0 31 23 53 53 53 56 0 88-83 88-88s-3-5-6-5c-5 0-5 2-8 8-24 58-55 72-74 72-11 0-17-8-17-25 0-15 1-18 3-27 14-56 28-111 41-167z">
              <text:p/>
            </draw:path>
            <draw:path draw:style-name="gr3" draw:text-style-name="P7" draw:layer="layout" svg:width="0.372cm" svg:height="0.373cm" svg:x="19.518cm" svg:y="6.495cm" svg:viewBox="0 0 373 374" svg:d="M198 198c53 0 105 0 157 0 8 0 18 0 18-11s-10-11-18-11c-52 0-104 0-157 0 0-53 0-106 0-158 0-7 0-18-11-18s-11 11-11 18c0 52 0 105 0 158-53 0-106 0-158 0-8 0-18 0-18 11s10 11 18 11c52 0 105 0 158 0 0 53 0 105 0 157 0 8 0 19 11 19s11-11 11-19c0-52 0-104 0-157z">
              <text:p/>
            </draw:path>
            <draw:path draw:style-name="gr3" draw:text-style-name="P7" draw:layer="layout" svg:width="0.274cm" svg:height="0.396cm" svg:x="20.079cm" svg:y="6.433cm" svg:viewBox="0 0 275 397" svg:d="M130 6c0-1 0-6-7-6-13 0-54 5-69 5-4 1-11 1-11 11 0 8 5 8 15 8 25 0 27 3 27 10-1 3-1 7-2 11-27 107-54 215-81 323-2 8-2 9-2 13 0 12 11 16 16 16 10 0 18-8 21-16 4-14 7-28 11-42 4-17 7-34 11-51 3-13 8-24 10-37 1-5 6-22 6-25 2-5 19-37 39-53 12-8 30-19 54-19s30 19 30 40c0 30-22 91-35 124-5 15-8 21-8 32 0 26 21 47 47 47 52 0 73-84 73-88 0-5-5-5-6-5-5 0-5 1-8 9-8 31-27 71-58 71-9 0-13-7-13-19 0-15 5-28 10-40 10-24 34-91 34-123 0-37-23-61-64-61-36 0-63 17-84 43 15-59 29-118 44-178z">
              <text:p/>
            </draw:path>
            <draw:path draw:style-name="gr3" draw:text-style-name="P7" draw:layer="layout" svg:width="0.129cm" svg:height="0.562cm" svg:x="20.404cm" svg:y="6.401cm" svg:viewBox="0 0 130 563" svg:d="M130 281c0-44-5-111-37-175-34-69-82-106-88-106-3 0-5 3-5 6 0 2 0 2 11 13 55 56 87 144 87 262 0 96-21 196-90 266-8 6-8 8-8 10 0 3 2 6 5 6 6 0 57-38 89-110 29-63 36-125 36-172z">
              <text:p/>
            </draw:path>
            <draw:path draw:style-name="gr3" draw:text-style-name="P7" draw:layer="layout" svg:width="0.343cm" svg:height="0.021cm" svg:x="20.762cm" svg:y="6.671cm" svg:viewBox="0 0 344 22" svg:d="M323 22c10 0 21 0 21-11s-11-11-21-11c-101 0-202 0-304 0-9 0-19 0-19 11s10 11 19 11c102 0 203 0 304 0z">
              <text:p/>
            </draw:path>
            <draw:path draw:style-name="gr3" draw:text-style-name="P7" draw:layer="layout" svg:width="0.401cm" svg:height="0.383cm" svg:x="21.3cm" svg:y="6.439cm" svg:viewBox="0 0 402 384" svg:d="M149 206c31 0 63 0 94 0 80 0 159-59 159-121 0-43-37-85-111-85-61 0-121 0-182 0-11 0-18 0-18 10 0 8 7 8 18 8 6 0 16 0 24 0 8 1 11 3 11 9 0 2 0 3-2 11-25 101-50 201-75 301-6 22-6 27-51 27-10 0-16 0-16 10 0 8 6 8 8 8 16 0 56-2 72-2 11 0 24 0 37 0 11 0 24 2 35 2 5 0 11 0 11-11 0-7-5-7-14-7-21 0-37 0-37-11 0-3 0-5 2-8 11-47 23-94 35-141zM189 38c5-19 6-20 30-20 18 0 36 0 55 0 46 0 75 14 75 52 0 23-11 71-32 92-29 25-63 30-88 30-26 0-52 0-79 0 13-51 26-102 39-154z">
              <text:p/>
            </draw:path>
            <draw:path draw:style-name="gr3" draw:text-style-name="P7" draw:layer="layout" svg:width="0.183cm" svg:height="0.268cm" svg:x="21.658cm" svg:y="6.646cm" svg:viewBox="0 0 184 269" svg:d="M184 136c0-43-6-75-24-102-13-18-37-34-67-34-93 0-93 107-93 136s1 133 93 133 91-104 91-133zM93 257c-19 0-43-9-51-41-5-24-5-56-5-85s0-59 6-80c8-32 32-40 50-40 21 0 41 13 48 35 6 23 6 50 6 85 0 29 0 58-5 83-8 36-35 43-49 43z">
              <text:p/>
            </draw:path>
            <draw:path draw:style-name="gr3" draw:text-style-name="P7" draw:layer="layout" svg:width="0.13cm" svg:height="0.562cm" svg:x="21.946cm" svg:y="6.401cm" svg:viewBox="0 0 131 563" svg:d="M131 557c0-2 0-4-9-13-71-71-90-176-90-263 0-97 22-195 91-265 8-8 8-8 8-10 0-4-3-6-6-6-5 0-56 38-90 110-29 61-35 124-35 171 0 44 6 112 37 175 33 70 83 107 88 107 3 0 6-3 6-6z">
              <text:p/>
            </draw:path>
            <draw:path draw:style-name="gr3" draw:text-style-name="P7" draw:layer="layout" svg:width="0.172cm" svg:height="0.357cm" svg:x="22.122cm" svg:y="6.471cm" svg:viewBox="0 0 173 358" svg:d="M102 126c18 0 36 0 53 0 11 0 18 0 18-11 0-6-7-6-16-6-17 0-33 0-50 0 21-80 24-91 24-95 0-9-8-14-17-14-2 0-18 0-23 19-7 30-14 60-21 90-17 0-35 0-52 0-12 0-18 0-18 11 0 6 5 6 16 6 17 0 33 0 50 0-40 160-44 170-44 179 0 31 21 53 52 53 57 0 89-83 89-88s-5-5-6-5c-5 0-5 2-8 8-24 58-55 72-74 72-11 0-17-8-17-25 0-15 1-18 3-27 14-56 28-111 41-167z">
              <text:p/>
            </draw:path>
            <draw:path draw:style-name="gr3" draw:text-style-name="P7" draw:layer="layout" svg:width="0.129cm" svg:height="0.562cm" svg:x="22.345cm" svg:y="6.401cm" svg:viewBox="0 0 130 563" svg:d="M130 281c0-44-5-111-37-175-34-69-82-106-88-106-3 0-5 3-5 6 0 2 0 2 11 13 55 56 87 144 87 262 0 96-21 196-92 266-6 6-6 8-6 10 0 3 2 6 5 6 6 0 57-38 89-110 29-63 36-125 36-172z">
              <text:p/>
            </draw:path>
            <draw:path draw:style-name="gr3" draw:text-style-name="P7" draw:layer="layout" svg:width="4.205cm" svg:height="0.021cm" svg:x="18.326cm" svg:y="7.052cm" svg:viewBox="0 0 4206 22" svg:d="M2102 22c-701 0-1401 0-2102 0 0-7 0-15 0-22 1402 0 2804 0 4206 0 0 7 0 15 0 22-701 0-1403 0-2104 0z">
              <text:p/>
            </draw:path>
            <draw:path draw:style-name="gr3" draw:text-style-name="P7" draw:layer="layout" svg:width="0.276cm" svg:height="0.394cm" svg:x="20.297cm" svg:y="7.199cm" svg:viewBox="0 0 277 395" svg:d="M131 5c-2-2 0-5-8-5-13 0-53 3-67 5-5 0-11 1-11 11 0 6 5 6 13 6 27 0 28 5 28 10 0 4-1 7-1 11-27 108-55 217-82 325-3 8-3 8-3 11 0 13 11 16 18 16 8 0 17-6 20-14 4-15 7-29 10-44 4-16 9-33 13-49 3-13 6-26 9-38 2-4 7-21 7-26 1-5 19-35 38-51 13-10 30-19 55-19 24 0 28 19 28 38 0 30-20 93-33 126-5 13-8 19-8 31 0 27 19 46 46 46 53 0 74-82 74-86 0-5-5-5-7-5-6 0-6 1-9 9-8 31-26 69-56 69-10 0-15-5-15-17 0-15 5-28 12-40 8-24 33-91 33-123 0-37-22-61-64-61-37 0-62 17-83 43 14-60 29-119 43-179z">
              <text:p/>
            </draw:path>
            <draw:path draw:style-name="gr3" draw:text-style-name="P7" draw:layer="layout" svg:width="0.372cm" svg:height="0.13cm" svg:x="16.262cm" svg:y="8.447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7" draw:text-style-name="P13" draw:layer="layout" svg:width="0.124cm" svg:height="0.388cm" svg:x="17.326cm" svg:y="8.263cm" svg:viewBox="0 0 125 389" svg:d="M80 0c-27 2-53 4-80 6 0 6 0 11 0 16 38 0 43 5 43 32 0 98 0 196 0 293 0 26-6 26-43 26 0 5 0 10 0 16 18 0 49-2 62-2 14 0 42 2 63 2 0-6 0-11 0-16-39 0-45 0-45-26 0-116 0-231 0-347z">
              <text:p/>
            </draw:path>
            <draw:path draw:style-name="gr7" draw:text-style-name="P13" draw:layer="layout" svg:width="0.119cm" svg:height="0.375cm" svg:x="17.481cm" svg:y="8.275cm" svg:viewBox="0 0 120 376" svg:d="M82 128c-27 2-53 4-79 6 0 6 0 12 0 18 35 0 42 3 42 30 0 51 0 102 0 152 0 26-7 26-45 26 0 5 0 11 0 16 18 0 48-2 62-2 20 0 39 2 58 2 0-5 0-11 0-16-37 0-38-3-38-26 0-69 0-137 0-206zM83 30c0-17-14-30-29-30-17 0-30 16-30 30 0 16 13 31 30 31 15 0 29-13 29-31z">
              <text:p/>
            </draw:path>
            <draw:path draw:style-name="gr7" draw:text-style-name="P13" draw:layer="layout" svg:width="0.439cm" svg:height="0.247cm" svg:x="17.636cm" svg:y="8.403cm" svg:viewBox="0 0 440 248" svg:d="M45 56c0 50 0 100 0 150 0 26-7 26-45 26 0 5 0 11 0 16 21 0 50-2 64-2s45 2 64 2c0-5 0-11 0-16-38 0-45 0-45-26 0-34 0-69 0-104 0-57 40-89 77-89 35 0 42 30 42 62 0 44 0 88 0 131 0 26-7 26-45 26 0 5 0 11 0 16 19 0 48-2 64-2 14 0 43 2 62 2 0-5 0-11 0-16-37 0-43 0-43-26 0-34 0-69 0-104 0-57 40-89 75-89s42 30 42 62c0 44 0 88 0 131 0 26-7 26-43 26 0 5 0 11 0 16 19 0 48-2 64-2 14 0 43 2 62 2 0-5 0-11 0-16-29 0-43 0-43-18 0-35 0-71 0-107 0-48 0-65-18-86-8-10-27-21-59-21-48 0-72 34-82 56-8-50-49-56-75-56-41 0-67 24-83 59 0-20 0-39 0-59-27 2-53 4-80 6 0 6 0 12 0 18 40 0 45 3 45 32z">
              <text:p/>
            </draw:path>
            <draw:path draw:style-name="gr7" draw:text-style-name="P13" draw:layer="layout" svg:width="0.213cm" svg:height="0.276cm" svg:x="17.259cm" svg:y="8.746cm" svg:viewBox="0 0 214 277" svg:d="M94 13c0-2 1-4 2-7 0-3-2-6-6-6-8 0-42 3-52 5-3 0-8 0-8 8 0 6 5 6 10 6 19 0 19 2 19 5s0 6-1 10c-19 74-38 148-56 222-2 6-1 5-2 8 0 6 5 13 13 13 5 0 13-2 17-10 0-3 5-16 7-25 2-12 5-23 8-34 1-6 6-22 6-27 5-16 5-16 13-29 13-19 32-42 62-42 23 0 24 20 24 28 0 24-17 68-24 84-4 12-6 15-6 21 0 21 18 34 38 34 39 0 56-55 56-59 0-7-4-7-6-7-5 0-5 3-6 8-10 31-28 46-42 46-10 0-11-4-11-12 0-10 3-15 9-32 5-13 21-55 21-77 0-6 0-22-14-34-7-4-18-11-37-11-29 0-50 16-64 34 10-40 20-80 30-120z">
              <text:p/>
            </draw:path>
            <draw:path draw:style-name="gr7" draw:text-style-name="P13" draw:layer="layout" svg:width="0.386cm" svg:height="0.207cm" svg:x="17.523cm" svg:y="8.816cm" svg:viewBox="0 0 387 208" svg:d="M333 114c-50 36-39 58-58 88 0 6 5 6 10 6 8 0 8 0 11-6 2-10 8-36 29-58 22-24 41-29 59-34 2-1 3-3 3-6s-1-5-6-6c-58-18-77-58-87-93-1-5-4-5-9-5-6 0-10 0-10 6 0 2 5 28 24 55 10 13 19 24 34 33-106 0-211 0-317 0-6 0-16 0-16 10s10 10 16 10c106 0 211 0 317 0z">
              <text:p/>
            </draw:path>
            <draw:path draw:style-name="gr7" draw:text-style-name="P13" draw:layer="layout" svg:width="0.181cm" svg:height="0.268cm" svg:x="17.961cm" svg:y="8.758cm" svg:viewBox="0 0 182 269" svg:d="M182 134c0-43-4-73-22-100-13-20-37-34-69-34-91 0-91 106-91 134s0 135 91 135 91-106 91-135zM91 257c-17 0-41-11-49-43-5-22-5-56-5-84 0-29 0-58 5-80 8-31 33-40 49-40 21 0 42 14 50 36 6 21 6 50 6 84 0 28 0 59-5 83-8 35-35 44-51 44z">
              <text:p/>
            </draw:path>
            <draw:path draw:style-name="gr3" draw:text-style-name="P7" draw:layer="layout" svg:width="0.401cm" svg:height="0.381cm" svg:x="18.187cm" svg:y="8.269cm" svg:viewBox="0 0 402 382" svg:d="M149 205c32 0 64 0 96 0 80 0 157-58 157-120 0-43-37-85-111-85-61 0-121 0-182 0-10 0-16 0-16 10 0 6 5 6 16 6 8 0 17 2 24 2 9 1 13 3 13 9 0 2-2 3-4 10-25 101-50 201-75 302-5 22-6 27-51 27-10 0-16 0-16 10 0 6 8 6 10 6 16 0 56-1 70-1 13 0 24 1 37 1s24 0 37 0c3 0 11 0 11-11 0-5-5-5-16-5-21 0-37 0-37-11 0-3 2-6 2-10 11-46 23-93 35-140zM189 38c5-20 6-22 30-22 18 0 36 0 55 0 46 0 76 16 76 54 0 23-11 71-33 92-29 25-63 28-87 28-26 0-53 0-80 0 13-50 26-101 39-152z">
              <text:p/>
            </draw:path>
            <draw:path draw:style-name="gr3" draw:text-style-name="P7" draw:layer="layout" svg:width="0.181cm" svg:height="0.268cm" svg:x="18.547cm" svg:y="8.475cm" svg:viewBox="0 0 182 269" svg:d="M182 136c0-43-4-75-24-102-11-18-35-34-67-34-91 0-91 108-91 136s0 133 91 133 91-106 91-133zM91 257c-17 0-41-9-49-43-7-22-7-54-7-83s0-59 7-81c8-31 33-39 49-39 21 0 42 13 48 35 7 21 8 50 8 85 0 29 0 58-6 82-8 37-34 44-50 44z">
              <text:p/>
            </draw:path>
            <draw:path draw:style-name="gr3" draw:text-style-name="P7" draw:layer="layout" svg:width="0.13cm" svg:height="0.56cm" svg:x="18.833cm" svg:y="8.231cm" svg:viewBox="0 0 131 561" svg:d="M131 557c0-2 0-4-9-13-71-71-88-178-88-263 0-97 20-196 89-267 8-6 8-6 8-8 0-4-1-6-6-6s-56 38-88 110c-29 61-37 124-37 171 0 44 6 112 38 175 34 69 82 105 87 105s6-1 6-4z">
              <text:p/>
            </draw:path>
            <draw:path draw:style-name="gr3" draw:text-style-name="P7" draw:layer="layout" svg:width="0.172cm" svg:height="0.356cm" svg:x="19.009cm" svg:y="8.301cm" svg:viewBox="0 0 173 357" svg:d="M104 126c18 0 35 0 53 0 11 0 16 0 16-11 0-6-5-6-16-6-16 0-32 0-48 0 19-80 22-91 22-95 0-9-6-14-16-14-1 0-17 0-22 19-8 30-15 60-23 90-17 0-35 0-52 0-12 0-18 0-18 11 0 6 5 6 16 6 17 0 33 0 50 0-40 160-44 170-44 179 0 31 23 52 53 52 58 0 90-82 90-87s-5-5-8-5c-5 0-5 2-8 8-24 58-55 72-72 72-13 0-18-8-18-27 0-13 0-16 3-25 14-56 28-111 42-167z">
              <text:p/>
            </draw:path>
            <draw:path draw:style-name="gr3" draw:text-style-name="P7" draw:layer="layout" svg:width="0.13cm" svg:height="0.56cm" svg:x="19.231cm" svg:y="8.231cm" svg:viewBox="0 0 131 561" svg:d="M131 281c0-44-6-111-37-175-33-69-83-106-88-106-3 0-6 2-6 6 0 2 0 2 11 13 55 55 87 144 87 262 0 96-21 196-90 266-8 6-8 8-8 10 0 3 3 4 6 4 5 0 56-38 90-108 29-63 35-125 35-172z">
              <text:p/>
            </draw:path>
            <draw:path draw:style-name="gr3" draw:text-style-name="P7" draw:layer="layout" svg:width="0.343cm" svg:height="0.021cm" svg:x="19.532cm" svg:y="8.12cm" svg:viewBox="0 0 344 22" svg:d="M325 22c9 0 19 0 19-11s-10-11-19-11c-102 0-203 0-304 0-10 0-21 0-21 11s11 11 21 11c101 0 202 0 304 0z">
              <text:p/>
            </draw:path>
            <draw:path draw:style-name="gr3" draw:text-style-name="P7" draw:layer="layout" svg:width="0.33cm" svg:height="0.383cm" svg:x="20.036cm" svg:y="7.888cm" svg:viewBox="0 0 331 384" svg:d="M109 206c31 0 63 0 94 0 67 0 128-46 128-102 0-54-56-104-133-104-66 0-132 0-198 0 0 6 0 12 0 18 5 0 10 0 14 0 44 0 44 6 44 25 0 99 0 197 0 296 0 21 0 27-44 27-4 0-9 0-14 0 0 6 0 12 0 18 21-2 62-2 83-2s64 0 83 2c0-6 0-12 0-18-4 0-9 0-14 0-43 0-43-6-43-27 0-44 0-88 0-133zM107 192c0-51 0-101 0-152 0-19 0-22 27-22 17 0 33 0 50 0 90 0 90 59 90 86s0 88-90 88c-26 0-51 0-77 0z">
              <text:p/>
            </draw:path>
            <draw:path draw:style-name="gr3" draw:text-style-name="P7" draw:layer="layout" svg:width="0.188cm" svg:height="0.247cm" svg:x="20.415cm" svg:y="8.024cm" svg:viewBox="0 0 189 248" svg:d="M78 61c0-20 0-41 0-61-26 2-52 3-78 5 0 6 0 12 0 17 40 0 43 5 43 32 0 50 0 101 0 151 0 25-6 25-43 25 0 6 0 12 0 18 22-2 48-2 64-2 22 0 50 0 72 2 0-6 0-12 0-18-4 0-9 0-13 0-41 0-41-6-41-27 0-29 0-57 0-86 0-55 22-106 65-106 3 0 5 0 7 2-2 0-13 6-13 21 0 16 11 24 24 24 9 0 24-7 24-24 0-18-18-34-42-34-41 0-61 37-69 61z">
              <text:p/>
            </draw:path>
            <draw:path draw:style-name="gr3" draw:text-style-name="P7" draw:layer="layout" svg:width="0.076cm" svg:height="0.562cm" svg:x="20.686cm" svg:y="7.85cm" svg:viewBox="0 0 77 563" svg:d="M77 563c0-7 0-15 0-22-18 0-36 0-55 0 0-173 0-346 0-519 19 0 37 0 55 0 0-7 0-15 0-22-26 0-51 0-77 0 0 188 0 375 0 563 26 0 51 0 77 0z">
              <text:p/>
            </draw:path>
            <draw:path draw:style-name="gr3" draw:text-style-name="P7" draw:layer="layout" svg:width="0.473cm" svg:height="0.383cm" svg:x="20.798cm" svg:y="7.888cm" svg:viewBox="0 0 474 384" svg:d="M403 59c7-22 16-40 61-41 3 0 10-2 10-12 0-1 0-6-8-6-18 0-39 2-56 2-20 0-39-2-58-2-3 0-10 0-10 11 0 7 5 7 10 7 32 0 38 12 38 24 0 1-1 11-1 12-22 84-43 167-64 250-41-98-82-195-123-293-5-11-5-11-18-11-25 0-50 0-75 0-13 0-18 0-18 11 0 7 5 7 16 7 3 0 39 0 39 4-25 101-51 202-76 303-6 22-16 40-60 41-4 0-10 0-10 11 0 4 3 7 8 7 18 0 37-2 56-2s38 2 58 2c3 0 9 0 9-11 0-7-5-7-11-7-32-1-37-13-37-25 0-4 0-7 2-13 25-99 50-197 75-296 2 3 2 5 5 10 46 110 93 220 139 331 5 9 6 11 11 11 7 0 7-2 10-13 26-104 52-208 78-312z">
              <text:p/>
            </draw:path>
            <draw:path draw:style-name="gr3" draw:text-style-name="P7" draw:layer="layout" svg:width="0.129cm" svg:height="0.562cm" svg:x="21.345cm" svg:y="7.85cm" svg:viewBox="0 0 130 563" svg:d="M130 557c0-2 0-4-10-13-70-71-88-176-88-263 0-97 22-195 91-265 7-6 7-8 7-10 0-4-2-6-5-6-7 0-56 38-90 110-29 61-35 124-35 171 0 44 6 112 37 176 33 69 81 106 88 106 3 0 5-2 5-6z">
              <text:p/>
            </draw:path>
            <draw:path draw:style-name="gr3" draw:text-style-name="P7" draw:layer="layout" svg:width="0.276cm" svg:height="0.396cm" svg:x="21.538cm" svg:y="7.882cm" svg:viewBox="0 0 277 397" svg:d="M130 6c-3-2 0-6-7-6-13 0-54 5-69 6-4 0-11 0-11 12 0 6 7 6 15 6 27 0 27 3 27 10-1 3-1 7-2 11-27 107-54 215-81 323-2 8-2 9-2 13 0 12 11 16 16 16 10 0 18-8 21-15 4-14 7-29 11-43 4-17 9-34 13-51 3-11 6-24 9-37 0-3 5-22 5-25 2-5 19-37 39-52 12-9 30-20 54-20s30 19 30 40c0 30-20 91-35 126-5 13-6 19-6 30 0 26 19 47 45 47 54 0 75-84 75-87 0-6-7-6-8-6-5 0-5 1-8 9-8 31-26 71-58 71-9 0-13-7-13-19 0-13 5-28 10-40 10-24 35-90 35-123 0-37-24-60-65-60-36 0-63 16-84 44 15-60 29-120 44-180z">
              <text:p/>
            </draw:path>
            <draw:path draw:style-name="gr3" draw:text-style-name="P7" draw:layer="layout" svg:width="0.13cm" svg:height="0.562cm" svg:x="21.863cm" svg:y="7.85cm" svg:viewBox="0 0 131 563" svg:d="M131 281c0-43-6-111-38-175-34-69-82-106-87-106-3 0-6 3-6 6 0 2 0 4 11 13 55 56 87 146 87 262 0 96-21 196-90 266-8 6-8 8-8 10 0 3 3 6 6 6 5 0 56-38 90-110 27-61 35-124 35-172z">
              <text:p/>
            </draw:path>
            <draw:path draw:style-name="gr3" draw:text-style-name="P7" draw:layer="layout" svg:width="0.373cm" svg:height="0.13cm" svg:x="22.237cm" svg:y="8.066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3" draw:text-style-name="P7" draw:layer="layout" svg:width="0.185cm" svg:height="0.373cm" svg:x="22.85cm" svg:y="7.898cm" svg:viewBox="0 0 186 374" svg:d="M115 14c0-12 0-14-13-14-35 35-84 35-102 35 0 6 0 12 0 18 11 0 43 0 74-15 0 97 0 194 0 291 0 21-2 28-53 28-6 0-12 0-18 0 0 6 0 11 0 17 19-1 69-1 91-1 23 0 71 0 92 1 0-6 0-11 0-17-7 0-13 0-20 0-49 0-51-7-51-28 0-105 0-210 0-315z">
              <text:p/>
            </draw:path>
            <draw:path draw:style-name="gr3" draw:text-style-name="P7" draw:layer="layout" svg:width="0.076cm" svg:height="0.562cm" svg:x="23.093cm" svg:y="7.85cm" svg:viewBox="0 0 77 563" svg:d="M77 0c-26 0-51 0-77 0 0 7 0 15 0 22 18 0 36 0 54 0 0 173 0 346 0 519-18 0-36 0-54 0 0 7 0 15 0 22 26 0 51 0 77 0 0-188 0-375 0-563z">
              <text:p/>
            </draw:path>
            <draw:path draw:style-name="gr3" draw:text-style-name="P7" draw:layer="layout" svg:width="0.343cm" svg:height="0.021cm" svg:x="23.409cm" svg:y="8.12cm" svg:viewBox="0 0 344 22" svg:d="M323 22c10 0 21 0 21-11s-11-11-21-11c-101 0-202 0-304 0-9 0-19 0-19 11s10 11 19 11c102 0 203 0 304 0z">
              <text:p/>
            </draw:path>
            <draw:path draw:style-name="gr7" draw:text-style-name="P13" draw:layer="layout" svg:width="0.33cm" svg:height="0.383cm" svg:x="23.943cm" svg:y="7.888cm" svg:viewBox="0 0 331 384" svg:d="M109 206c31 0 63 0 94 0 67 0 128-46 128-102 0-54-54-104-133-104-66 0-132 0-198 0 0 6 0 12 0 18 5 0 10 0 14 0 44 0 45 6 45 25 0 99 0 197 0 296 0 21-1 27-45 27-4 0-9 0-14 0 0 6 0 12 0 18 21-2 62-2 83-2s64 0 83 2c0-6 0-12 0-18-4 0-8 0-12 0-44 0-45-6-45-27 0-44 0-88 0-133zM107 192c0-51 0-101 0-152 0-19 2-22 27-22 17 0 33 0 50 0 90 0 90 59 90 86s0 88-90 88c-26 0-51 0-77 0z">
              <text:p/>
            </draw:path>
            <draw:path draw:style-name="gr7" draw:text-style-name="P13" draw:layer="layout" svg:width="0.188cm" svg:height="0.247cm" svg:x="24.322cm" svg:y="8.024cm" svg:viewBox="0 0 189 248" svg:d="M78 61c0-20 0-41 0-61-26 2-52 3-78 5 0 6 0 12 0 17 40 0 43 5 43 32 0 50 0 101 0 151 0 25-5 25-43 25 0 6 0 12 0 18 22-2 48-2 64-2 22 0 50 0 72 2 0-6 0-12 0-18-4 0-9 0-13 0-41 0-41-6-41-27 0-29 0-57 0-86 0-55 22-106 65-106 5 0 5 0 7 2-2 0-13 6-13 21 0 16 11 24 24 24 9 0 24-7 24-24 0-18-18-34-42-34-40 0-61 37-69 61z">
              <text:p/>
            </draw:path>
            <draw:path draw:style-name="gr7" draw:text-style-name="P13" draw:layer="layout" svg:width="0.076cm" svg:height="0.562cm" svg:x="24.592cm" svg:y="7.85cm" svg:viewBox="0 0 77 563" svg:d="M77 563c0-7 0-15 0-22-18 0-36 0-55 0 0-173 0-346 0-519 19 0 37 0 55 0 0-7 0-15 0-22-26 0-51 0-77 0 0 188 0 375 0 563 26 0 51 0 77 0z">
              <text:p/>
            </draw:path>
            <draw:path draw:style-name="gr7" draw:text-style-name="P13" draw:layer="layout" svg:width="0.473cm" svg:height="0.383cm" svg:x="24.704cm" svg:y="7.888cm" svg:viewBox="0 0 474 384" svg:d="M403 59c7-22 16-40 61-41 3 0 10-2 10-12 0-1 0-6-7-6-19 0-38 2-57 2-20 0-39-2-58-2-3 0-10 0-10 11 0 7 5 7 10 7 32 0 38 12 38 24 0 1-1 11-1 12-21 84-42 167-63 250-41-98-83-195-124-293-5-11-5-11-18-11-25 0-50 0-75 0-11 0-18 0-18 11 0 7 7 7 16 7 3 0 39 0 39 4-25 101-51 202-76 303-4 22-14 40-60 41-4 0-10 0-10 11 0 4 3 7 8 7 18 0 37-2 56-2s40 2 58 2c3 0 9 0 9-11 0-7-5-7-11-7-32-1-37-13-37-25 0-4 2-7 3-13 25-99 49-197 74-296 2 3 2 5 5 10 47 110 94 220 141 331 3 9 4 11 9 11 7 0 7-2 10-13 26-104 52-208 78-312z">
              <text:p/>
            </draw:path>
            <draw:path draw:style-name="gr7" draw:text-style-name="P13" draw:layer="layout" svg:width="0.129cm" svg:height="0.562cm" svg:x="25.251cm" svg:y="7.85cm" svg:viewBox="0 0 130 563" svg:d="M130 557c0-2 0-4-10-13-69-71-88-176-88-263 0-97 22-195 91-265 7-6 7-8 7-10 0-4-2-6-5-6-7 0-56 38-90 110-29 61-35 124-35 171 0 44 6 112 37 176 33 69 81 106 88 106 3 0 5-2 5-6z">
              <text:p/>
            </draw:path>
            <draw:path draw:style-name="gr7" draw:text-style-name="P13" draw:layer="layout" svg:width="0.276cm" svg:height="0.396cm" svg:x="25.445cm" svg:y="7.882cm" svg:viewBox="0 0 277 397" svg:d="M131 6c-2-2 0-6-8-6-13 0-54 5-69 6-4 0-9 0-9 12 0 6 5 6 13 6 27 0 28 3 28 10-1 3-2 7-3 11-26 107-53 215-80 323-3 8-3 9-3 13 0 12 11 16 16 16 10 0 19-8 21-15 4-14 7-29 11-43 4-17 9-34 13-51 3-11 6-24 9-37 0-3 5-22 7-25 1-5 19-37 37-52 12-9 30-20 54-20s30 19 30 40c0 30-20 91-35 126-3 13-6 19-6 30 0 26 19 47 46 47 53 0 74-84 74-87 0-6-5-6-8-6-5 0-5 1-8 9-8 31-26 71-58 71-9 0-13-7-13-19 0-13 5-28 10-40 10-24 35-90 35-123 0-37-22-60-65-60-36 0-63 16-84 44 15-60 30-120 45-180z">
              <text:p/>
            </draw:path>
            <draw:path draw:style-name="gr7" draw:text-style-name="P13" draw:layer="layout" svg:width="0.13cm" svg:height="0.562cm" svg:x="25.77cm" svg:y="7.85cm" svg:viewBox="0 0 131 563" svg:d="M131 281c0-43-6-111-37-175-33-69-83-106-88-106-3 0-6 3-6 6 0 2 0 4 11 13 55 56 87 146 87 262 0 96-21 196-90 266-8 6-8 8-8 10 0 3 3 6 6 6 5 0 56-38 90-110 29-61 35-124 35-172z">
              <text:p/>
            </draw:path>
            <draw:path draw:style-name="gr7" draw:text-style-name="P13" draw:layer="layout" svg:width="0.341cm" svg:height="0.434cm" svg:x="26.16cm" svg:y="7.914cm" svg:viewBox="0 0 342 435" svg:d="M331 176c8-3 11-8 11-13s-1-8-11-13c-103-48-206-97-309-145-8-5-7-3-11-5-6 0-11 6-11 11 0 8 5 10 10 13 98 46 197 93 296 139-99 47-197 93-295 139-11 5-11 10-11 13 0 6 5 11 11 11 2 0 2 0 10-5 103-48 207-97 310-145zM323 435c10 0 19 0 19-11s-11-11-19-11c-101 0-202 0-304 0-8 0-19 0-19 11s10 11 19 11c102 0 203 0 304 0z">
              <text:p/>
            </draw:path>
            <draw:path draw:style-name="gr7" draw:text-style-name="P13" draw:layer="layout" svg:width="0.223cm" svg:height="0.373cm" svg:x="26.734cm" svg:y="7.898cm" svg:viewBox="0 0 224 374" svg:d="M43 331c20-19 40-38 59-58 88-78 122-108 122-164 0-64-50-109-118-109-64 0-106 51-106 101 0 32 29 32 30 32 10 0 29-7 29-31 0-14-9-28-30-28-5 0-5 0-7 1 13-37 44-57 76-57 51 0 75 44 75 91 0 45-27 89-59 125-36 39-72 79-108 119-6 7-6 7-6 21 69 0 139 0 208 0 5-32 11-65 16-97-5 0-10 0-14 0-2 16-7 41-12 49-4 5-41 5-54 5-34 0-67 0-101 0z">
              <text:p/>
            </draw:path>
            <draw:path draw:style-name="gr7" draw:text-style-name="P13" draw:layer="layout" svg:width="0.076cm" svg:height="0.562cm" svg:x="27cm" svg:y="7.85cm" svg:viewBox="0 0 77 563" svg:d="M77 0c-26 0-51 0-77 0 0 7 0 15 0 22 18 0 36 0 54 0 0 173 0 346 0 519-18 0-36 0-54 0 0 7 0 15 0 22 26 0 51 0 77 0 0-188 0-375 0-563z">
              <text:p/>
            </draw:path>
            <draw:path draw:style-name="gr3" draw:text-style-name="P7" draw:layer="layout" svg:width="7.657cm" svg:height="0.021cm" svg:x="19.486cm" svg:y="8.501cm" svg:viewBox="0 0 7658 22" svg:d="M3828 22c-1276 0-2552 0-3828 0 0-7 0-15 0-22 2553 0 5105 0 7658 0 0 7 0 15 0 22-1276 0-2553 0-3830 0z">
              <text:p/>
            </draw:path>
            <draw:path draw:style-name="gr7" draw:text-style-name="P13" draw:layer="layout" svg:width="0.274cm" svg:height="0.394cm" svg:x="23.185cm" svg:y="8.648cm" svg:viewBox="0 0 275 395" svg:d="M130 6c0-1 0-6-8-6-13 0-53 3-68 5-4 1-11 1-11 11 0 6 5 6 13 6 27 0 29 5 29 10-1 4-1 7-2 11-27 108-54 217-81 325-2 8-2 8-2 11 0 14 11 16 16 16 8 0 18-6 21-14 3-14 6-28 9-42 5-17 9-34 13-51 3-13 7-26 10-38 1-4 6-21 6-24 2-7 19-37 39-53 12-8 29-19 54-19s30 19 30 40c0 28-22 91-35 124-5 13-8 21-8 32 0 26 19 45 47 45 52 0 73-82 73-86 0-5-5-5-6-5-7 0-7 1-8 9-10 31-27 71-58 71-9 0-14-7-14-19 0-15 5-28 11-40 8-24 34-91 34-123 0-37-23-61-64-61-37 0-63 17-84 43 15-59 29-118 44-178z">
              <text:p/>
            </draw:path>
            <draw:path draw:style-name="gr3" draw:text-style-name="P7" draw:layer="layout" svg:width="0.372cm" svg:height="0.13cm" svg:x="16.262cm" svg:y="9.515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3" draw:text-style-name="P7" draw:layer="layout" svg:width="0.343cm" svg:height="0.021cm" svg:x="17.277cm" svg:y="9.569cm" svg:viewBox="0 0 344 22" svg:d="M323 22c10 0 21 0 21-11s-11-11-21-11c-101 0-202 0-304 0-9 0-19 0-19 11s10 11 19 11c102 0 203 0 304 0z">
              <text:p/>
            </draw:path>
            <draw:path draw:style-name="gr3" draw:text-style-name="P7" draw:layer="layout" svg:width="0.277cm" svg:height="0.397cm" svg:x="17.697cm" svg:y="9.331cm" svg:viewBox="0 0 278 398" svg:d="M170 226c24 59 51 145 59 158 9 13 14 13 30 13 4 0 9 0 13 0 5-2 6-5 6-7 0-1-1-1-3-5-6-6-9-14-13-25-38-107-76-213-115-320-11-32-41-40-69-40-3 0-9 0-9 6 0 5 3 5 5 7 19 3 22 6 36 45 19 50 37 101 55 152-52 51-104 102-155 153-7 8-10 11-10 18 0 9 7 17 16 17s14-6 19-13c45-53 90-106 135-159z">
              <text:p/>
            </draw:path>
            <draw:path draw:style-name="gr3" draw:text-style-name="P7" draw:layer="layout" svg:width="0.401cm" svg:height="0.383cm" svg:x="18.017cm" svg:y="9.337cm" svg:viewBox="0 0 402 384" svg:d="M147 206c32 0 64 0 96 0 80 0 159-59 159-121 0-43-37-85-111-85-61 0-121 0-182 0-11 0-18 0-18 11 0 7 5 7 18 7 6 0 16 0 24 1 8 0 11 2 11 8 0 3 0 5-2 11-25 101-50 202-75 303-6 20-6 25-51 25-10 0-16 0-16 11 0 7 6 7 8 7 16 0 56-2 72-2 11 0 24 0 35 0 13 0 26 2 37 2 5 0 11 0 11-11 0-7-5-7-16-7-21 0-35 0-35-9 0-4 0-7 2-10 11-47 22-94 33-141zM189 38c5-19 6-20 30-20 18 0 35 0 53 0 48 0 77 14 77 54 0 21-11 70-32 90-29 25-63 30-88 30-26 0-52 0-79 0 13-51 26-102 39-154z">
              <text:p/>
            </draw:path>
            <draw:path draw:style-name="gr3" draw:text-style-name="P7" draw:layer="layout" svg:width="0.183cm" svg:height="0.269cm" svg:x="18.376cm" svg:y="9.544cm" svg:viewBox="0 0 184 270" svg:d="M184 136c0-43-6-74-24-101-13-19-37-35-69-35-91 0-91 107-91 136s-1 134 91 134 93-105 93-134zM91 259c-17 0-41-11-49-43-5-24-5-56-5-85s0-59 5-80c9-32 33-40 49-40 23 0 43 13 50 37 6 21 6 50 6 83 0 29 0 58-5 83-8 36-35 45-51 45z">
              <text:p/>
            </draw:path>
            <draw:path draw:style-name="gr3" draw:text-style-name="P7" draw:layer="layout" svg:width="0.13cm" svg:height="0.562cm" svg:x="18.664cm" svg:y="9.299cm" svg:viewBox="0 0 131 563" svg:d="M131 557c0-2 0-2-9-12-71-72-90-177-90-264 0-97 22-195 91-265 8-6 8-8 8-10 0-3-3-6-6-6-5 0-56 38-90 110-29 63-35 125-35 171 0 45 6 112 37 176 33 69 83 106 88 106 3 0 6-2 6-6z">
              <text:p/>
            </draw:path>
            <draw:path draw:style-name="gr3" draw:text-style-name="P7" draw:layer="layout" svg:width="0.172cm" svg:height="0.357cm" svg:x="18.84cm" svg:y="9.369cm" svg:viewBox="0 0 173 358" svg:d="M102 126c18 0 36 0 53 0 11 0 18 0 18-11 0-5-7-5-16-5-17 0-33 0-50 0 21-80 24-91 24-94 0-10-8-16-17-16-2 0-18 0-23 21-7 30-14 60-21 89-17 0-35 0-52 0-13 0-18 0-18 10 0 6 5 6 16 6 17 0 33 0 50 0-42 160-44 170-44 179 0 31 21 53 52 53 57 0 89-81 89-86 0-7-5-7-6-7-5 0-5 2-8 8-24 60-55 72-74 72-11 0-17-6-17-25 0-15 1-18 3-27 14-56 28-111 41-167z">
              <text:p/>
            </draw:path>
            <draw:path draw:style-name="gr3" draw:text-style-name="P7" draw:layer="layout" svg:width="0.129cm" svg:height="0.562cm" svg:x="19.062cm" svg:y="9.299cm" svg:viewBox="0 0 130 563" svg:d="M130 281c0-43-7-111-37-174-34-70-82-107-88-107-3 0-5 3-5 6 0 2 0 4 10 13 56 56 88 146 88 262 0 96-21 196-92 266-6 8-6 8-6 10 0 3 2 6 5 6 6 0 56-38 89-110 29-61 36-124 36-172z">
              <text:p/>
            </draw:path>
            <draw:path draw:style-name="gr3" draw:text-style-name="P7" draw:layer="layout" svg:width="0.058cm" svg:height="0.058cm" svg:x="19.297cm" svg:y="9.662cm" svg:viewBox="0 0 59 59" svg:d="M59 29c0-16-14-29-30-29s-29 12-29 29 13 30 29 30 30-13 30-30z">
              <text:p/>
            </draw:path>
          </draw:g>
        </draw:g>
        <draw:g>
          <svg:title>TexMaths</svg:title>
          <svg:desc>16§display§\mbox{Solve } P'_0(t) = -\lambda P_0(t)§svg§600§FALSE§</svg:desc>
          <draw:frame draw:style-name="gr2" draw:text-style-name="P6" draw:layer="layout" svg:width="5.434cm" svg:height="0.597cm" svg:x="14.2cm" svg:y="10.683cm">
            <draw:image xlink:href="Pictures/10003E9400000D450000017618DD219B699B0EE2.svg" xlink:type="simple" xlink:show="embed" xlink:actuate="onLoad" draw:mime-type="image/svg+xml">
              <text:p/>
            </draw:image>
            <draw:image xlink:href="Pictures/10000001000000800000000E290F770A031514BE.png" xlink:type="simple" xlink:show="embed" xlink:actuate="onLoad" draw:mime-type="image/png"/>
          </draw:frame>
        </draw:g>
        <draw:g>
          <svg:title>TexMaths</svg:title>
          <svg:desc>16§display§\frac{P'_0(t)}{P_0(t)} = -\lambda. \Rightarrow \int \frac{P'_0(t)}{P_0(t)} dt = \int -\lambda dt§svg§600§FALSE§</svg:desc>
          <draw:frame draw:style-name="gr2" draw:text-style-name="P6" draw:layer="layout" svg:width="9.056cm" svg:height="1.33cm" svg:x="14.089cm" svg:y="11.916cm">
            <draw:image xlink:href="Pictures/10007CA00000161D000003409C97119BCA70A1D8.svg" xlink:type="simple" xlink:show="embed" xlink:actuate="onLoad" draw:mime-type="image/svg+xml">
              <text:p/>
            </draw:image>
            <draw:image xlink:href="Pictures/10000001000000D60000001F45F514D99C8BC994.png" xlink:type="simple" xlink:show="embed" xlink:actuate="onLoad" draw:mime-type="image/png"/>
          </draw:frame>
        </draw:g>
        <draw:g>
          <svg:title>TexMaths</svg:title>
          <svg:desc>16§display§\ln P_0(t) = -\lambda t+C\;\; \therefore P_0(t) = e^{-\lambda t} \mbox{ (\because P_0(0) = 1)} §svg§600§FALSE§</svg:desc>
          <draw:g>
            <draw:path draw:style-name="gr6" draw:text-style-name="P12" draw:layer="layout" svg:width="12.147cm" svg:height="0.585cm" svg:x="14.102cm" svg:y="13.711cm" svg:viewBox="0 0 12148 586" svg:d="M0 0c4049 0 8098 0 12148 0 0 195 0 390 0 586-4050 0-8099 0-12148 0 0-196 0-391 0-586z">
              <text:p/>
            </draw:path>
            <draw:path draw:style-name="gr3" draw:text-style-name="P7" draw:layer="layout" svg:width="0.124cm" svg:height="0.387cm" svg:x="14.092cm" svg:y="13.797cm" svg:viewBox="0 0 125 388" svg:d="M80 0c-27 2-53 4-80 6 0 6 0 12 0 18 38 0 43 3 43 30 0 98 0 195 0 292 0 24-6 24-43 24 0 6 0 12 0 18 18 0 49-2 62-2 14 0 42 2 63 2 0-6 0-12 0-18-39 0-45 0-45-24 0-115 0-231 0-346z">
              <text:p/>
            </draw:path>
            <draw:path draw:style-name="gr3" draw:text-style-name="P7" draw:layer="layout" svg:width="0.282cm" svg:height="0.246cm" svg:x="14.247cm" svg:y="13.937cm" svg:viewBox="0 0 283 247" svg:d="M43 56c0 50 0 100 0 150 0 24-6 24-43 24 0 6 0 11 0 17 19 0 48-1 64-1 14 0 43 1 62 1 0-6 0-11 0-17-38 0-43 0-43-24 0-35 0-69 0-104 0-57 39-89 75-89s42 30 42 62c0 44 0 87 0 131 0 24-6 24-43 24 0 6 0 11 0 17 19 0 48-1 62-1 15 0 45 1 64 1 0-6 0-11 0-17-30 0-43 0-45-16 0-36 0-71 0-107 0-48 0-66-17-86-8-10-26-21-59-21-40 0-68 24-84 59 0-20 0-39 0-59-26 2-52 4-78 6 0 6 0 12 0 18 38 0 43 3 43 32z">
              <text:p/>
            </draw:path>
            <draw:path draw:style-name="gr3" draw:text-style-name="P7" draw:layer="layout" svg:width="0.401cm" svg:height="0.38cm" svg:x="14.657cm" svg:y="13.803cm" svg:viewBox="0 0 402 381" svg:d="M149 204c32 0 64 0 96 0 80 0 157-57 157-119 0-44-37-85-111-85-61 0-121 0-182 0-10 0-16 0-16 10 0 8 5 8 16 8 8 0 17 0 24 0 9 1 13 3 13 9 0 2-2 3-4 11-25 100-50 200-75 300-5 23-6 26-51 26-10 0-16 0-16 11 0 6 8 6 10 6 16 0 56-1 70-1 13 0 24 1 37 1s24 0 37 0c3 0 11 0 11-11 0-6-5-6-16-6-21 0-37 0-37-10 0-3 2-6 2-9 11-47 23-94 35-141zM189 38c5-19 6-20 30-20 18 0 36 0 55 0 46 0 76 14 76 52 0 23-11 70-33 91-29 24-63 29-87 29-26 0-53 0-80 0 13-51 26-101 39-152z">
              <text:p/>
            </draw:path>
            <draw:path draw:style-name="gr3" draw:text-style-name="P7" draw:layer="layout" svg:width="0.181cm" svg:height="0.267cm" svg:x="15.017cm" svg:y="14.009cm" svg:viewBox="0 0 182 268" svg:d="M182 136c0-43-4-75-24-102-11-18-35-34-67-34-91 0-91 108-91 136s0 132 91 132 91-105 91-132zM91 257c-17 0-41-11-49-43-7-23-7-54-7-85 0-28 0-57 7-80 8-30 33-38 49-38 21 0 42 13 48 35 7 21 8 50 8 83 0 31 0 59-6 83-8 37-34 45-50 45z">
              <text:p/>
            </draw:path>
            <draw:path draw:style-name="gr3" draw:text-style-name="P7" draw:layer="layout" svg:width="0.13cm" svg:height="0.559cm" svg:x="15.303cm" svg:y="13.765cm" svg:viewBox="0 0 131 560" svg:d="M131 554c0-2 0-2-9-12-71-70-88-177-88-261 0-98 20-196 89-265 8-8 8-8 8-10 0-4-1-6-5-6-6 0-57 38-89 110-29 61-37 123-37 171 0 43 6 110 38 174 34 68 82 105 88 105 4 0 5-2 5-6z">
              <text:p/>
            </draw:path>
            <draw:path draw:style-name="gr3" draw:text-style-name="P7" draw:layer="layout" svg:width="0.172cm" svg:height="0.355cm" svg:x="15.479cm" svg:y="13.835cm" svg:viewBox="0 0 173 356" svg:d="M104 126c18 0 35 0 53 0 11 0 16 0 16-11 0-7-5-7-15-7-16 0-33 0-49 0 19-79 22-90 22-94 0-9-6-14-16-14-1 0-17 0-22 19-8 30-15 60-23 89-17 0-35 0-52 0-12 0-18 0-18 12 0 6 5 6 16 6 17 0 33 0 50 0-40 160-42 169-42 179 0 30 21 51 51 51 58 0 90-82 90-86 0-5-5-5-7-5-6 0-6 1-9 8-24 57-55 70-72 70-13 0-18-6-18-25 0-13 0-18 3-28 14-54 28-109 42-164z">
              <text:p/>
            </draw:path>
            <draw:path draw:style-name="gr3" draw:text-style-name="P7" draw:layer="layout" svg:width="0.13cm" svg:height="0.559cm" svg:x="15.701cm" svg:y="13.765cm" svg:viewBox="0 0 131 560" svg:d="M131 281c0-45-6-112-37-176-33-68-83-105-88-105-3 0-6 3-6 6 0 2 0 2 11 13 55 54 87 144 87 262 0 96-21 193-90 265-8 6-8 6-8 8 0 4 3 6 6 6 5 0 56-38 90-108 29-63 35-125 35-171z">
              <text:p/>
            </draw:path>
            <draw:path draw:style-name="gr3" draw:text-style-name="P7" draw:layer="layout" svg:width="0.373cm" svg:height="0.13cm" svg:x="16.076cm" svg:y="13.98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3" draw:text-style-name="P7" draw:layer="layout" svg:width="0.341cm" svg:height="0.021cm" svg:x="16.685cm" svg:y="14.035cm" svg:viewBox="0 0 342 22" svg:d="M323 22c10 0 19 0 19-11s-9-11-19-11c-101 0-202 0-304 0-9 0-19 0-19 11s10 11 19 11c102 0 203 0 304 0z">
              <text:p/>
            </draw:path>
            <draw:path draw:style-name="gr3" draw:text-style-name="P7" draw:layer="layout" svg:width="0.277cm" svg:height="0.395cm" svg:x="17.105cm" svg:y="13.797cm" svg:viewBox="0 0 278 396" svg:d="M171 225c24 59 51 144 59 156 10 13 15 13 31 13 4 0 8 0 13 0 4 0 4-3 4-5 0-1 0-3-1-6-7-5-10-14-13-26-38-105-77-211-115-317-11-34-42-40-69-40-3 0-10 0-10 6 0 4 4 4 5 5 18 3 23 7 37 45 18 51 36 102 54 153-51 51-103 102-155 153-6 7-11 10-11 18 0 9 8 16 18 16 9 0 14-7 19-13 45-53 89-105 134-158z">
              <text:p/>
            </draw:path>
            <draw:path draw:style-name="gr3" draw:text-style-name="P7" draw:layer="layout" svg:width="0.172cm" svg:height="0.355cm" svg:x="17.416cm" svg:y="13.835cm" svg:viewBox="0 0 173 356" svg:d="M102 126c18 0 36 0 53 0 11 0 18 0 18-11 0-7-7-7-16-7-17 0-33 0-50 0 21-79 23-90 23-94 0-9-7-14-16-14-2 0-18 0-23 19-7 30-14 60-21 89-18 0-36 0-54 0-11 0-16 0-16 12 0 6 5 6 16 6 17 0 33 0 50 0-42 160-44 169-44 179 0 30 21 51 52 51 57 0 89-82 89-86 0-5-5-5-6-5-5 0-7 1-8 8-24 57-55 70-74 70-11 0-17-6-17-25 0-13 1-18 3-28 14-54 28-109 41-164z">
              <text:p/>
            </draw:path>
            <draw:path draw:style-name="gr3" draw:text-style-name="P7" draw:layer="layout" svg:width="0.372cm" svg:height="0.371cm" svg:x="17.764cm" svg:y="13.859cm" svg:viewBox="0 0 373 372" svg:d="M198 198c53 0 105 0 157 0 8 0 18 0 18-11s-10-11-18-11c-52 0-104 0-157 0 0-53 0-106 0-158 0-8 0-18-11-18s-11 10-11 18c0 52 0 105 0 158-53 0-106 0-158 0-8 0-18 0-18 11s10 11 18 11c52 0 105 0 158 0 0 52 0 104 0 156 0 8 0 18 11 18s11-10 11-18c0-52 0-104 0-156z">
              <text:p/>
            </draw:path>
            <draw:path draw:style-name="gr3" draw:text-style-name="P7" draw:layer="layout" svg:width="0.397cm" svg:height="0.406cm" svg:x="18.322cm" svg:y="13.79cm" svg:viewBox="0 0 398 407" svg:d="M398 5c0-2 0-5-6-5-2 0-2 0-8 6-13 15-26 29-38 43-7-8-32-49-95-49-125 0-251 123-251 254 0 92 66 153 152 153 50 0 91-22 122-48 52-46 62-97 62-99 0-5-6-5-8-5-3 0-5 0-6 5-5 16-18 56-58 89-38 31-74 40-102 40-52 0-111-28-111-116 0-32 11-123 67-188 36-40 88-67 138-67 58 0 91 43 91 108 0 22-1 22-1 27 0 6 4 7 8 7 6 0 6-2 9-12 12-47 24-95 35-143z">
              <text:p/>
            </draw:path>
            <draw:path draw:style-name="gr3" draw:text-style-name="P7" draw:layer="layout" svg:width="0.34cm" svg:height="0.301cm" svg:x="19.221cm" svg:y="13.926cm" svg:viewBox="0 0 341 302" svg:d="M200 29c0-16-14-29-30-29-17 0-29 13-29 29s13 30 29 30 30-13 30-30zM341 271c0-16-14-30-31-30-16 0-28 14-28 30s12 31 28 31c17 0 31-15 31-31zM59 271c0-16-12-30-29-30-16 0-30 14-30 30s14 31 30 31c17 0 29-15 29-31z">
              <text:p/>
            </draw:path>
            <draw:path draw:style-name="gr3" draw:text-style-name="P7" draw:layer="layout" svg:width="0.401cm" svg:height="0.38cm" svg:x="19.757cm" svg:y="13.803cm" svg:viewBox="0 0 402 381" svg:d="M149 204c32 0 64 0 96 0 78 0 157-57 157-119 0-44-37-85-111-85-61 0-121 0-182 0-10 0-16 0-16 10 0 8 5 8 16 8 6 0 17 0 24 0 9 1 13 3 13 9 0 2-2 3-4 11-25 100-50 200-75 300-5 23-6 26-51 26-10 0-16 0-16 11 0 6 8 6 10 6 16 0 54-1 70-1 13 0 24 1 37 1s24 0 37 0c3 0 11 0 11-11 0-6-7-6-16-6-21 0-37 0-37-10 0-3 2-6 2-9 11-47 23-94 35-141zM189 38c5-19 6-20 30-20 18 0 36 0 55 0 46 0 76 14 76 52 0 23-11 70-33 91-29 24-63 29-87 29-26 0-53 0-80 0 13-51 26-101 39-152z">
              <text:p/>
            </draw:path>
            <draw:path draw:style-name="gr3" draw:text-style-name="P7" draw:layer="layout" svg:width="0.181cm" svg:height="0.267cm" svg:x="20.117cm" svg:y="14.009cm" svg:viewBox="0 0 182 268" svg:d="M182 136c0-43-4-75-24-102-11-18-35-34-67-34-91 0-91 108-91 136s0 132 91 132 91-105 91-132zM91 257c-17 0-41-11-49-43-7-23-7-54-7-85 0-28 0-57 7-80 8-30 33-38 49-38 21 0 42 13 48 35 7 21 8 50 8 83 0 31 0 59-6 83-8 37-34 45-50 45z">
              <text:p/>
            </draw:path>
            <draw:path draw:style-name="gr3" draw:text-style-name="P7" draw:layer="layout" svg:width="0.13cm" svg:height="0.559cm" svg:x="20.403cm" svg:y="13.765cm" svg:viewBox="0 0 131 560" svg:d="M131 554c0-2 0-2-9-12-71-70-88-177-88-261 0-98 20-196 89-265 8-8 8-8 8-10 0-4-1-6-6-6s-56 38-88 110c-29 61-37 123-37 171 0 43 6 110 38 174 34 68 82 105 87 105s6-2 6-6z">
              <text:p/>
            </draw:path>
            <draw:path draw:style-name="gr3" draw:text-style-name="P7" draw:layer="layout" svg:width="0.172cm" svg:height="0.355cm" svg:x="20.579cm" svg:y="13.835cm" svg:viewBox="0 0 173 356" svg:d="M104 126c18 0 35 0 53 0 11 0 16 0 16-11 0-7-5-7-16-7-17 0-33 0-50 0 21-79 24-90 24-94 0-9-6-14-16-14-1 0-17 0-22 19-8 30-15 60-23 89-17 0-35 0-52 0-12 0-18 0-18 12 0 6 5 6 16 6 17 0 33 0 50 0-40 160-44 169-44 179 0 30 23 51 53 51 58 0 90-82 90-86 0-5-5-5-8-5-5 0-5 1-8 8-24 57-55 70-74 70-11 0-16-6-16-25 0-13 0-18 3-28 14-54 28-109 42-164z">
              <text:p/>
            </draw:path>
            <draw:path draw:style-name="gr3" draw:text-style-name="P7" draw:layer="layout" svg:width="0.13cm" svg:height="0.559cm" svg:x="20.802cm" svg:y="13.765cm" svg:viewBox="0 0 131 560" svg:d="M131 281c0-45-6-112-37-176-35-68-83-105-88-105-3 0-6 3-6 6 0 2 0 2 11 13 55 54 87 144 87 262 0 96-21 193-90 265-8 6-8 6-8 8 0 4 3 6 6 6 5 0 56-38 90-108 29-63 35-125 35-171z">
              <text:p/>
            </draw:path>
            <draw:path draw:style-name="gr3" draw:text-style-name="P7" draw:layer="layout" svg:width="0.373cm" svg:height="0.13cm" svg:x="21.176cm" svg:y="13.98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3" draw:text-style-name="P7" draw:layer="layout" svg:width="0.215cm" svg:height="0.253cm" svg:x="21.765cm" svg:y="13.937cm" svg:viewBox="0 0 216 254" svg:d="M78 118c16 0 58 0 87-13 40-16 41-49 41-57 0-24-20-48-59-48-62 0-147 54-147 153 0 56 32 101 88 101 80 0 128-59 128-66 0-3-5-8-8-8-2 0-3 2-6 7-45 54-106 54-114 54-43 0-48-46-48-64 0-6 0-24 10-59 9 0 19 0 28 0zM53 107c21-86 80-94 94-94 26 0 42 16 42 35 0 59-91 59-114 59-7 0-15 0-22 0z">
              <text:p/>
            </draw:path>
            <draw:path draw:style-name="gr3" draw:text-style-name="P7" draw:layer="layout" svg:width="0.265cm" svg:height="0.018cm" svg:x="22.043cm" svg:y="13.846cm" svg:viewBox="0 0 266 19" svg:d="M250 19c6 0 16 0 16-9 0-10-10-10-16-10-79 0-157 0-236 0-4 0-14 0-14 10 0 9 8 9 14 9 79 0 157 0 236 0z">
              <text:p/>
            </draw:path>
            <draw:path draw:style-name="gr3" draw:text-style-name="P7" draw:layer="layout" svg:width="0.215cm" svg:height="0.275cm" svg:x="22.381cm" svg:y="13.682cm" svg:viewBox="0 0 216 276" svg:d="M130 160c19 44 41 102 46 106 8 10 14 10 21 10 2 0 5 0 8 0 8 0 11 0 11-5 0-1-2-3-2-5-4-3-8-12-9-15-32-76-64-152-96-227-3-6-11-24-53-24-5 0-11 0-11 5s5 6 6 6c8 2 16 2 26 24 15 37 31 73 46 110-38 35-77 69-115 104-5 5-8 8-8 14 0 10 8 13 13 13 8 0 13-5 14-6 34-37 68-74 103-110z">
              <text:p/>
            </draw:path>
            <draw:path draw:style-name="gr3" draw:text-style-name="P7" draw:layer="layout" svg:width="0.132cm" svg:height="0.248cm" svg:x="22.635cm" svg:y="13.709cm" svg:viewBox="0 0 133 249" svg:d="M80 89c13 0 27 0 40 0 8 0 13 0 13-8 0-4-5-4-13-4-12 0-25 0-37 0 5-20 10-40 15-59 0-2 1-4 1-5 0-8-5-13-13-13-11 0-16 6-19 18-3 9 3-10-14 59-14 0-27 0-40 0-8 0-13 0-13 8 0 4 5 4 11 4 12 0 25 0 37 0-7 31-15 62-22 93-4 11-7 24-7 30 0 23 21 37 43 37 44 0 68-55 68-61 0-5-5-5-7-5-3 0-5 2-8 8-11 24-30 47-53 47-8 0-12-5-12-19 0-4 1-13 1-16 10-38 19-76 29-114z">
              <text:p/>
            </draw:path>
            <draw:path draw:style-name="gr3" draw:text-style-name="P7" draw:layer="layout" svg:width="0.13cm" svg:height="0.559cm" svg:x="23.059cm" svg:y="13.765cm" svg:viewBox="0 0 131 560" svg:d="M131 554c0-2 0-2-9-12-71-70-90-177-90-261 0-98 22-196 91-265 8-8 8-8 8-10 0-4-3-6-6-6-5 0-56 38-90 110-29 61-35 123-35 171 0 43 6 110 37 174 33 68 83 105 88 105 3 0 6-2 6-6z">
              <text:p/>
            </draw:path>
            <draw:path draw:style-name="gr3" draw:text-style-name="P7" draw:layer="layout" svg:width="0.34cm" svg:height="0.301cm" svg:x="23.238cm" svg:y="13.926cm" svg:viewBox="0 0 341 302" svg:d="M61 29c0-16-15-29-31-29s-30 13-30 29 14 30 30 30 31-13 31-30zM202 271c0-16-15-30-31-30s-30 14-30 30 14 31 30 31 31-15 31-31zM341 29c0-16-13-29-29-29s-30 13-30 29 14 30 30 30 29-13 29-30z">
              <text:p/>
            </draw:path>
            <draw:path draw:style-name="gr3" draw:text-style-name="P7" draw:layer="layout" svg:width="0.401cm" svg:height="0.38cm" svg:x="23.776cm" svg:y="13.803cm" svg:viewBox="0 0 402 381" svg:d="M147 204c32 0 64 0 96 0 80 0 159-57 159-119 0-44-37-85-111-85-61 0-121 0-182 0-11 0-18 0-18 10 0 8 5 8 16 8 8 0 18 0 24 0 10 1 13 3 13 9 0 2 0 3-2 11-25 100-50 200-75 300-6 23-8 26-51 26-10 0-16 0-16 11 0 6 6 6 8 6 16 0 56-1 72-1 11 0 24 1 35 1 13 0 26 0 37 0 5 0 11 0 11-11 0-6-5-6-16-6-21 0-37 0-37-10 0-3 2-6 4-9 11-47 22-94 33-141zM189 38c5-19 5-20 30-20 18 0 35 0 53 0 46 0 77 14 77 52 0 23-11 70-34 91-27 24-61 29-86 29-26 0-52 0-79 0 13-51 26-101 39-152z">
              <text:p/>
            </draw:path>
            <draw:path draw:style-name="gr3" draw:text-style-name="P7" draw:layer="layout" svg:width="0.181cm" svg:height="0.267cm" svg:x="24.134cm" svg:y="14.009cm" svg:viewBox="0 0 182 268" svg:d="M182 136c0-43-4-75-22-102-13-18-37-34-69-34-91 0-91 108-91 136s0 132 91 132 91-105 91-132zM91 257c-17 0-41-11-49-43-5-23-5-54-5-85 0-28 0-57 5-80 8-30 33-38 49-38 23 0 42 13 50 35 6 21 6 50 6 83 0 31 0 59-5 83-8 37-35 45-51 45z">
              <text:p/>
            </draw:path>
            <draw:path draw:style-name="gr3" draw:text-style-name="P7" draw:layer="layout" svg:width="0.129cm" svg:height="0.559cm" svg:x="24.422cm" svg:y="13.765cm" svg:viewBox="0 0 130 560" svg:d="M130 554c0-2 0-2-10-12-69-70-88-177-88-261 0-98 22-196 91-265 7-8 7-8 7-10 0-4-2-6-5-6-7 0-56 38-90 110-29 61-35 123-35 171 0 43 6 110 37 174 33 68 81 105 88 105 3 0 5-2 5-6z">
              <text:p/>
            </draw:path>
            <draw:path draw:style-name="gr3" draw:text-style-name="P7" draw:layer="layout" svg:width="0.236cm" svg:height="0.384cm" svg:x="24.606cm" svg:y="13.813cm" svg:viewBox="0 0 237 385" svg:d="M237 193c0-45-2-89-23-131-25-54-72-62-94-62-34 0-75 14-99 65-18 40-21 83-21 128 0 42 3 93 26 136 24 44 65 56 92 56 31 0 74-12 98-66 19-38 21-81 21-126zM118 372c-20 0-54-13-64-67-6-34-6-85-6-118 0-37 0-74 3-104 11-65 53-72 67-72 20 0 56 11 68 66 4 31 4 75 4 110 0 41 0 79-6 115-8 54-40 70-66 70z">
              <text:p/>
            </draw:path>
            <draw:path draw:style-name="gr3" draw:text-style-name="P7" draw:layer="layout" svg:width="0.129cm" svg:height="0.559cm" svg:x="24.899cm" svg:y="13.765cm" svg:viewBox="0 0 130 560" svg:d="M130 281c0-45-7-112-37-176-34-68-82-105-88-105-3 0-5 3-5 6 0 2 0 2 10 13 56 54 88 144 88 262 0 96-21 193-92 265-6 6-6 6-6 8 0 4 2 6 5 6 6 0 56-38 89-108 29-63 36-125 36-171z">
              <text:p/>
            </draw:path>
            <draw:path draw:style-name="gr3" draw:text-style-name="P7" draw:layer="layout" svg:width="0.373cm" svg:height="0.13cm" svg:x="25.272cm" svg:y="13.98cm" svg:viewBox="0 0 374 131" svg:d="M355 22c8 0 19 0 19-11s-11-11-17-11c-113 0-225 0-338 0-8 0-19 0-19 11s11 11 19 11c112 0 224 0 336 0zM357 131c6 0 17 0 17-11 0-12-11-12-19-12-112 0-224 0-336 0-8 0-19 0-19 12 0 11 11 11 19 11 113 0 225 0 338 0z">
              <text:p/>
            </draw:path>
            <draw:path draw:style-name="gr3" draw:text-style-name="P7" draw:layer="layout" svg:width="0.185cm" svg:height="0.371cm" svg:x="25.884cm" svg:y="13.813cm" svg:viewBox="0 0 186 372" svg:d="M115 14c0-14 0-14-13-14-35 35-84 35-102 35 0 6 0 12 0 18 11 0 45 0 74-15 0 97 0 194 0 291 0 19-2 25-53 25-6 0-12 0-18 0 0 6 0 12 0 18 19-2 69-2 91-2 23 0 72 0 92 2 0-6 0-12 0-18-6 0-12 0-18 0-51 0-53-5-53-25 0-105 0-210 0-315z">
              <text:p/>
            </draw:path>
            <draw:path draw:style-name="gr3" draw:text-style-name="P7" draw:layer="layout" svg:width="0.13cm" svg:height="0.559cm" svg:x="26.147cm" svg:y="13.765cm" svg:viewBox="0 0 131 560" svg:d="M131 281c0-45-6-112-37-176-33-68-83-105-88-105-3 0-6 3-6 6 0 2 0 2 11 13 56 54 88 144 88 262 0 96-21 193-91 265-8 6-8 6-8 8 0 4 3 6 6 6 5 0 56-38 90-108 29-63 35-125 35-171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9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P_n(t+h) &amp;=&amp; \textcolor{MidnightBlue}{\sum_{k=0}^n P_{n-k}(t)P_k(h)} \\
&amp;=&amp; P_n(t)P_0(h) + P_{n-1}(t)P_1(h) + \sum_{k=2}^n P_{n-k}(t)\cdot \Pr[\textcolor{red}{N(h) = k}]
\end{eqnarray*}§svg§600§FALSE§</svg:desc>
          <draw:frame draw:style-name="gr2" draw:text-style-name="P6" draw:layer="layout" svg:width="19.85cm" svg:height="3.919cm" svg:x="2.278cm" svg:y="4.034cm">
            <draw:image xlink:href="Pictures/100138DB00002B15000008828A41AD0ECA88929D.svg" xlink:type="simple" xlink:show="embed" xlink:actuate="onLoad" draw:mime-type="image/svg+xml">
              <text:p/>
            </draw:image>
            <draw:image xlink:href="Pictures/10000001000001A100000052EB204A23813F9C4D.png" xlink:type="simple" xlink:show="embed" xlink:actuate="onLoad" draw:mime-type="image/png"/>
          </draw:frame>
        </draw:g>
        <draw:g>
          <svg:title>TexMaths</svg:title>
          <svg:desc>16§latex§\begin{eqnarray*}
P'_n(t) &amp;=&amp; \lim_{h\rightarrow 0} \frac{P_n(t+h)-P_n(t)}{h}\\
&amp;=&amp; \textcolor{MidnightBlue}{\lim_{h\rightarrow 0}} \textcolor{MidnightBlue}{\frac{1}{h}}\left( P_n(t)\textcolor{MidnightBlue}{(P_0(h)-1)} + P_{n-1}(t)\textcolor{blue}{P_1(h)} + \sum_{\textcolor{red}{k=2}}^nP_{n-k}(t)\textcolor{red}{\Pr[N(h) = k]}\right)\\
&amp;=&amp; -\lambda P_n(t) + \lambda P_{n-1}(t).
\end{eqnarray*}§svg§600§FALSE§</svg:desc>
          <draw:frame draw:style-name="gr2" draw:text-style-name="P6" draw:layer="layout" svg:width="19.946cm" svg:height="3.995cm" svg:x="2.142cm" svg:y="8.327cm">
            <draw:image xlink:href="Pictures/1001A78A000030B3000009C2AFCACF0E83C8B536.svg" xlink:type="simple" xlink:show="embed" xlink:actuate="onLoad" draw:mime-type="image/svg+xml">
              <text:p/>
            </draw:image>
            <draw:image xlink:href="Pictures/10000001000001D70000005E9B1E6BB97A16047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9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P_n(t+h) &amp;=&amp; \textcolor{MidnightBlue}{\sum_{k=0}^n P_{n-k}(t)P_k(h)} \\
&amp;=&amp; P_n(t)P_0(h) + P_{n-1}(t)P_1(h) + \sum_{k=2}^n P_{n-k}(t)\cdot \Pr[\textcolor{red}{N(h) = k}]
\end{eqnarray*}§svg§600§FALSE§</svg:desc>
          <draw:frame draw:style-name="gr2" draw:text-style-name="P6" draw:layer="layout" svg:width="19.85cm" svg:height="3.919cm" svg:x="2.278cm" svg:y="4.034cm">
            <draw:image xlink:href="Pictures/100138DB00002B15000008828A41AD0ECA88929D.svg" xlink:type="simple" xlink:show="embed" xlink:actuate="onLoad" draw:mime-type="image/svg+xml">
              <text:p/>
            </draw:image>
            <draw:image xlink:href="Pictures/10000001000001A100000052EB204A23813F9C4D.png" xlink:type="simple" xlink:show="embed" xlink:actuate="onLoad" draw:mime-type="image/png"/>
          </draw:frame>
        </draw:g>
        <draw:g>
          <svg:title>TexMaths</svg:title>
          <svg:desc>16§latex§\begin{eqnarray*}
P'_n(t) &amp;=&amp; \lim_{h\rightarrow 0} \frac{P_n(t+h)-P_n(t)}{h}\\
&amp;=&amp; \textcolor{MidnightBlue}{\lim_{h\rightarrow 0}} \textcolor{MidnightBlue}{\frac{1}{h}}\left( P_n(t)\textcolor{MidnightBlue}{(P_0(h)-1)} + P_{n-1}(t)\textcolor{blue}{P_1(h)} + \sum_{\textcolor{red}{k=2}}^nP_{n-k}(t)\textcolor{red}{\Pr[N(h) = k]}\right)\\
&amp;=&amp; -\lambda P_n(t) + \lambda P_{n-1}(t).
\end{eqnarray*}§svg§600§FALSE§</svg:desc>
          <draw:frame draw:style-name="gr2" draw:text-style-name="P6" draw:layer="layout" svg:width="19.946cm" svg:height="3.995cm" svg:x="2.142cm" svg:y="8.327cm">
            <draw:image xlink:href="Pictures/1001A78A000030B3000009C2AFCACF0E83C8B536.svg" xlink:type="simple" xlink:show="embed" xlink:actuate="onLoad" draw:mime-type="image/svg+xml">
              <text:p/>
            </draw:image>
            <draw:image xlink:href="Pictures/10000001000001D70000005E9B1E6BB97A160471.png" xlink:type="simple" xlink:show="embed" xlink:actuate="onLoad" draw:mime-type="image/png"/>
          </draw:frame>
        </draw:g>
        <draw:g>
          <svg:title>TexMaths</svg:title>
          <svg:desc>18§display§\mbox{Solve }\;\;  P'_n(t) = -\lambda P_n(t) + \lambda P_{n-1}(t). \;\;
\Rightarrow\;\;  e^{\lambda t}(P'_n(t)+\lambda P_n(t)) = e^{\lambda t} (\lambda P_{n-1}(t).)§svg§600§FALSE§</svg:desc>
          <draw:frame draw:style-name="gr2" draw:text-style-name="P6" draw:layer="layout" svg:width="21.965cm" svg:height="0.776cm" svg:x="2.358cm" svg:y="13.346cm">
            <draw:image xlink:href="Pictures/1000E0F000002FAC000001B02785552BE982D74D.svg" xlink:type="simple" xlink:show="embed" xlink:actuate="onLoad" draw:mime-type="image/svg+xml">
              <text:p/>
            </draw:image>
            <draw:image xlink:href="Pictures/10000001000001CD00000010FE47F4E678B6A21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9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\mbox{Solve }\;\;  P'_n(t) = -\lambda P_n(t) + \lambda P_{n-1}(t). \;\;
&amp;\Rightarrow&amp;\;\;  e^{\lambda t}(P'_n(t)+\lambda P_n(t)) = e^{\lambda t} (\lambda P_{n-1}(t)).\\
&amp;\Rightarrow&amp; \frac{d}{dt}(e^{\lambda t}P_n(t)) = \lambda e^{\lambda t} P_{n-1}(t).
\end{eqnarray*}§svg§600§FALSE§</svg:desc>
          <draw:frame draw:style-name="gr2" draw:text-style-name="P6" draw:layer="layout" svg:width="22.842cm" svg:height="2.286cm" svg:x="1.559cm" svg:y="4.146cm">
            <draw:image xlink:href="Pictures/10014BCF00003193000004F7B3502ED36910DBDE.svg" xlink:type="simple" xlink:show="embed" xlink:actuate="onLoad" draw:mime-type="image/svg+xml">
              <text:p/>
            </draw:image>
            <draw:image xlink:href="Pictures/10000001000001E0000000303DD91AE8525D308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9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\mbox{Solve }\;\;  P'_n(t) = -\lambda P_n(t) + \lambda P_{n-1}(t). \;\;
&amp;\Rightarrow&amp;\;\;  e^{\lambda t}(P'_n(t)+\lambda P_n(t)) = e^{\lambda t} (\lambda P_{n-1}(t)).\\
&amp;\Rightarrow&amp; \frac{d}{dt}(e^{\lambda t}P_n(t)) = \lambda e^{\lambda t} P_{n-1}(t).
\end{eqnarray*}§svg§600§FALSE§</svg:desc>
          <draw:frame draw:style-name="gr2" draw:text-style-name="P6" draw:layer="layout" svg:width="22.842cm" svg:height="2.286cm" svg:x="1.559cm" svg:y="4.146cm">
            <draw:image xlink:href="Pictures/10014BCF00003193000004F7B3502ED36910DBDE.svg" xlink:type="simple" xlink:show="embed" xlink:actuate="onLoad" draw:mime-type="image/svg+xml">
              <text:p/>
            </draw:image>
            <draw:image xlink:href="Pictures/10000001000001E0000000303DD91AE8525D3081.png" xlink:type="simple" xlink:show="embed" xlink:actuate="onLoad" draw:mime-type="image/png"/>
          </draw:frame>
        </draw:g>
        <draw:g>
          <svg:title>TexMaths</svg:title>
          <svg:desc>18§latex§\begin{eqnarray*}
&amp; &amp; \therefore \frac{d}{dt}(e^{\lambda t} P_1(t)) = \lambda e^{\lambda t}P_0(t) = \lambda.\\
&amp;\Rightarrow&amp; \int d(e^{\lambda t} P_1(t)) = \int \lambda dt.\\
&amp;\Rightarrow&amp; e^{\lambda t} P_1(t) = \lambda t + C\\
&amp;\Rightarrow&amp; P_1(t) = e^{-\lambda t}(\lambda t + C) =  t\lambda e^{-\lambda t}.
\end{eqnarray*}§svg§600§FALSE§</svg:desc>
          <draw:frame draw:style-name="gr2" draw:text-style-name="P6" draw:layer="layout" svg:width="10.112cm" svg:height="4.934cm" svg:x="1.753cm" svg:y="7.245cm">
            <draw:image xlink:href="Pictures/1001300D000015F300000AB6A0093998112BF5C3.svg" xlink:type="simple" xlink:show="embed" xlink:actuate="onLoad" draw:mime-type="image/svg+xml">
              <text:p/>
            </draw:image>
            <draw:image xlink:href="Pictures/10000001000000D400000068F4E6FD9E408B7518.png" xlink:type="simple" xlink:show="embed" xlink:actuate="onLoad" draw:mime-type="image/png"/>
          </draw:frame>
        </draw:g>
        <draw:g>
          <svg:title>TexMaths</svg:title>
          <svg:desc>18§display§\textcolor{gray}{(P_0(t) = e^{-\lambda t} })§svg§600§FALSE§</svg:desc>
          <draw:frame draw:style-name="gr2" draw:text-style-name="P6" draw:layer="layout" svg:width="3.893cm" svg:height="0.725cm" svg:x="14cm" svg:y="7.475cm">
            <draw:image xlink:href="Pictures/100026750000087400000194D31375C18F8F5F6A.svg" xlink:type="simple" xlink:show="embed" xlink:actuate="onLoad" draw:mime-type="image/svg+xml">
              <text:p/>
            </draw:image>
            <draw:image xlink:href="Pictures/10000001000000520000000FEC0A4E22FD2AAE1D.png" xlink:type="simple" xlink:show="embed" xlink:actuate="onLoad" draw:mime-type="image/png"/>
          </draw:frame>
        </draw:g>
        <draw:g>
          <svg:title>TexMaths</svg:title>
          <svg:desc>18§display§\textcolor{red}{\mbox{Note: } P_1(0) = 0}§svg§600§FALSE§</svg:desc>
          <draw:frame draw:style-name="gr2" draw:text-style-name="P6" draw:layer="layout" svg:width="4.453cm" svg:height="0.679cm" svg:x="13.35cm" svg:y="11.481cm">
            <draw:image xlink:href="Pictures/100025D7000009AB0000017AC8E8B7151F8AA987.svg" xlink:type="simple" xlink:show="embed" xlink:actuate="onLoad" draw:mime-type="image/svg+xml">
              <text:p/>
            </draw:image>
            <draw:image xlink:href="Pictures/100000010000005E0000000E63912AF06B44053F.png" xlink:type="simple" xlink:show="embed" xlink:actuate="onLoad" draw:mime-type="image/png"/>
          </draw:frame>
        </draw:g>
        <draw:g>
          <svg:title>TexMaths</svg:title>
          <svg:desc>14§display§\textcolor{red}{\mbox{1 event occurs in zero time period}}§svg§600§FALSE§</svg:desc>
          <draw:g>
            <draw:path draw:style-name="gr6" draw:text-style-name="P12" draw:layer="layout" svg:width="7.265cm" svg:height="0.383cm" svg:x="13.4cm" svg:y="12.225cm" svg:viewBox="0 0 7266 384" svg:d="M0 0c2422 0 4844 0 7266 0 0 128 0 256 0 384-2422 0-4844 0-7266 0 0-128 0-256 0-384z">
              <text:p/>
            </draw:path>
            <draw:path draw:style-name="gr7" draw:text-style-name="P13" draw:layer="layout" svg:width="0.161cm" svg:height="0.324cm" svg:x="13.418cm" svg:y="12.214cm" svg:viewBox="0 0 162 325" svg:d="M101 13c0-12 0-13-11-13-31 31-73 31-90 31 0 5 0 10 0 15 10 0 39 0 64-13 0 85 0 169 0 253 0 18-1 24-44 24-6 0-12 0-17 0 0 5 0 10 0 15 18-1 60-1 80-1 19 0 63 0 79 1 0-5 0-10 0-15-5 0-10 0-15 0-45 0-46-6-46-24 0-91 0-182 0-273z">
              <text:p/>
            </draw:path>
            <draw:path draw:style-name="gr7" draw:text-style-name="P13" draw:layer="layout" svg:width="0.189cm" svg:height="0.224cm" svg:x="13.799cm" svg:y="12.32cm" svg:viewBox="0 0 190 225" svg:d="M41 96c2-72 44-85 61-85 51 0 55 66 55 85-39 0-78 0-116 0zM41 106c45 0 91 0 137 0 11 0 12 0 12-10 0-49-26-96-88-96-57 0-102 50-102 112 0 65 52 113 108 113 60 0 82-55 82-65 0-4-4-5-7-5-4 0-5 3-5 7-18 50-62 50-67 50-24 0-45-14-56-32-14-24-14-56-14-74z">
              <text:p/>
            </draw:path>
            <draw:path draw:style-name="gr7" draw:text-style-name="P13" draw:layer="layout" svg:width="0.24cm" svg:height="0.215cm" svg:x="14.013cm" svg:y="12.328cm" svg:viewBox="0 0 241 216" svg:d="M195 47c4-11 12-32 46-32 0-5 0-10 0-15-13 1-27 1-38 1s-34-1-42-1c0 5 0 10 0 15 18 0 22 12 22 21 0 4 0 7-2 11-17 42-33 84-49 126-19-46-38-91-56-137-3-7-3-7-3-8 0-13 19-13 28-13 0-5 0-10 0-15-14 0-42 1-53 1-14 0-34 0-48-1 0 5 0 10 0 15 31 0 32 3 39 18 24 58 47 116 70 174 4 7 5 9 11 9 7 0 9-4 10-9 22-53 43-107 65-160z">
              <text:p/>
            </draw:path>
            <draw:path draw:style-name="gr7" draw:text-style-name="P13" draw:layer="layout" svg:width="0.189cm" svg:height="0.224cm" svg:x="14.264cm" svg:y="12.32cm" svg:viewBox="0 0 190 225" svg:d="M41 96c2-72 44-85 61-85 51 0 55 66 55 85-39 0-78 0-116 0zM41 106c45 0 91 0 137 0 11 0 12 0 12-10 0-49-26-96-88-96-57 0-102 50-102 112 0 65 50 113 108 113 60 0 82-55 82-65 0-4-4-5-7-5-4 0-5 3-7 7-16 50-60 50-65 50-26 0-45-14-56-32-14-24-14-56-14-74z">
              <text:p/>
            </draw:path>
            <draw:path draw:style-name="gr7" draw:text-style-name="P13" draw:layer="layout" svg:width="0.247cm" svg:height="0.215cm" svg:x="14.483cm" svg:y="12.323cm" svg:viewBox="0 0 248 216" svg:d="M39 49c0 43 0 86 0 130 0 22-5 22-39 22 0 5 0 10 0 15 17 0 42-1 56-1 13 0 38 1 55 1 0-5 0-10 0-15-33 0-38 0-38-22 0-30 0-60 0-90 0-50 35-78 66-78 30 0 36 27 36 55 0 37 0 75 0 113 0 22-6 22-38 22 0 5 0 10 0 15 17 0 42-1 56-1 13 0 38 1 55 1 0-5 0-10 0-15-25 0-38 0-38-14 0-31 0-62 0-94 0-41 0-57-15-75-7-8-24-18-52-18-37 0-59 21-73 52 0-18 0-35 0-52-23 2-47 4-70 6 0 5 0 10 0 15 35 0 39 3 39 28z">
              <text:p/>
            </draw:path>
            <draw:path draw:style-name="gr7" draw:text-style-name="P13" draw:layer="layout" svg:width="0.153cm" svg:height="0.305cm" svg:x="14.737cm" svg:y="12.239cm" svg:viewBox="0 0 154 306" svg:d="M76 105c23 0 46 0 70 0 0-5 0-11 0-16-24 0-47 0-70 0 0-29 0-59 0-89-5 0-9 0-13 0 0 39-14 92-63 93 0 4 0 8 0 12 14 0 28 0 42 0 0 45 0 90 0 135 0 60 46 66 63 66 35 0 49-35 49-66 0-9 0-19 0-28-4 0-8 0-13 0 0 9 0 18 0 27 0 36-14 54-32 54-33 0-33-45-33-53 0-45 0-90 0-135z">
              <text:p/>
            </draw:path>
            <draw:path draw:style-name="gr7" draw:text-style-name="P13" draw:layer="layout" svg:width="0.217cm" svg:height="0.224cm" svg:x="15.096cm" svg:y="12.32cm" svg:viewBox="0 0 218 225" svg:d="M218 114c0-62-49-114-109-114-61 0-109 53-109 114 0 63 52 111 109 111 59 0 109-48 109-111zM109 212c-21 0-43-10-56-32-12-22-12-52-12-70s0-44 12-67c13-22 37-32 56-32 21 0 41 11 55 32 13 21 14 49 14 67s0 45-11 66c-12 22-33 36-58 36z">
              <text:p/>
            </draw:path>
            <draw:path draw:style-name="gr7" draw:text-style-name="P13" draw:layer="layout" svg:width="0.185cm" svg:height="0.224cm" svg:x="15.36cm" svg:y="12.32cm" svg:viewBox="0 0 186 225" svg:d="M41 113c0-80 40-100 65-100 5 0 37 0 54 18-21 1-24 15-24 22 0 13 10 22 22 22 14 0 24-8 24-22 0-33-38-53-76-53-61 0-106 53-106 113 0 63 48 112 105 112 66 0 81-60 81-65 0-4-4-4-5-4-5 0-6 2-7 4-14 47-47 52-65 52-25 0-68-21-68-99z">
              <text:p/>
            </draw:path>
            <draw:path draw:style-name="gr7" draw:text-style-name="P13" draw:layer="layout" svg:width="0.187cm" svg:height="0.224cm" svg:x="15.578cm" svg:y="12.32cm" svg:viewBox="0 0 188 225" svg:d="M41 113c0-80 40-100 65-100 6 0 37 0 54 18-20 1-24 15-24 22 0 13 10 22 24 22 12 0 22-8 22-22 0-33-38-53-76-53-61 0-106 53-106 113 0 63 49 112 105 112 66 0 83-60 83-65 0-4-6-4-7-4-5 0-6 2-6 4-15 47-46 52-64 52-27 0-70-21-70-99z">
              <text:p/>
            </draw:path>
            <draw:path draw:style-name="gr7" draw:text-style-name="P13" draw:layer="layout" svg:width="0.247cm" svg:height="0.221cm" svg:x="15.795cm" svg:y="12.323cm" svg:viewBox="0 0 248 222" svg:d="M176 177c0 15 0 30 0 45 24-2 48-4 72-6 0-5 0-10 0-15-35 0-38-3-38-27 0-58 0-116 0-174-24 2-49 4-73 6 0 5 0 10 0 15 35 0 38 3 38 28 0 29 0 58 0 86 0 42-22 76-59 76-42 0-43-23-43-48 0-54 0-109 0-163-24 2-49 4-73 6 0 5 0 10 0 15 39 0 39 1 39 45 0 24 0 49 0 74 0 37 0 82 74 82 28 0 49-14 63-45z">
              <text:p/>
            </draw:path>
            <draw:path draw:style-name="gr7" draw:text-style-name="P13" draw:layer="layout" svg:width="0.164cm" svg:height="0.215cm" svg:x="16.066cm" svg:y="12.323cm" svg:viewBox="0 0 165 216" svg:d="M69 54c0-18 0-36 0-54-23 2-46 4-69 6 0 5 0 10 0 15 35 0 39 3 39 28 0 43 0 86 0 130 0 22-5 22-39 22 0 5 0 10 0 15 20 0 42-1 56-1 20 0 43 0 63 1 0-5 0-10 0-15-4 0-7 0-11 0-37 0-37-6-37-22 0-25 0-51 0-76 0-49 20-92 58-92 4 0 4 0 5 0-1 2-11 7-11 20 0 14 10 21 21 21 9 0 21-5 21-21s-15-31-36-31c-35 0-53 33-60 54z">
              <text:p/>
            </draw:path>
            <draw:path draw:style-name="gr7" draw:text-style-name="P13" draw:layer="layout" svg:width="0.16cm" svg:height="0.224cm" svg:x="16.261cm" svg:y="12.32cm" svg:viewBox="0 0 161 225" svg:d="M87 124c11 3 52 10 52 45 0 25-19 45-56 45-42 0-59-28-69-70-1-6-1-7-7-7-7 0-7 3-7 11 0 22 0 44 0 66 0 6 0 11 6 11 2 0 2 0 12-10 2-1 2-1 10-11 22 21 43 21 55 21 56 0 78-34 78-69 0-25-14-40-20-46-16-15-36-19-56-23-28-6-61-12-61-41 0-17 12-36 56-36 53 0 56 43 57 58 0 5 4 5 6 5 7 0 7-2 7-12 0-16 0-32 0-48 0-9 0-13-6-13-3 0-4 0-10 6-1 2-7 7-8 8-20-14-39-14-46-14-60 0-80 33-80 60 0 17 8 31 22 42 16 12 30 15 65 22z">
              <text:p/>
            </draw:path>
            <draw:path draw:style-name="gr7" draw:text-style-name="P13" draw:layer="layout" svg:width="0.104cm" svg:height="0.326cm" svg:x="16.619cm" svg:y="12.213cm" svg:viewBox="0 0 105 327" svg:d="M71 110c-22 2-45 4-68 6 0 5 0 10 0 15 31 0 36 3 36 27 0 43 0 87 0 131 0 22-5 22-39 22 0 5 0 10 0 16 15 0 42-2 55-2 16 0 33 2 50 2 0-6 0-11 0-16-32 0-34-3-34-21 0-60 0-120 0-180zM73 25c0-15-13-25-25-25-16 0-27 13-27 25 0 14 11 27 27 27 12 0 25-10 25-27z">
              <text:p/>
            </draw:path>
            <draw:path draw:style-name="gr7" draw:text-style-name="P13" draw:layer="layout" svg:width="0.247cm" svg:height="0.215cm" svg:x="16.755cm" svg:y="12.323cm" svg:viewBox="0 0 248 216" svg:d="M39 49c0 43 0 86 0 130 0 22-5 22-39 22 0 5 0 10 0 15 18 0 43-1 56-1s39 1 56 1c0-5 0-10 0-15-34 0-39 0-39-22 0-30 0-60 0-90 0-50 35-78 67-78 31 0 36 27 36 55 0 37 0 75 0 113 0 22-5 22-39 22 0 5 0 10 0 15 17 0 42-1 56-1 13 0 38 1 55 1 0-5 0-10 0-15-25 0-38 0-38-14 0-31 0-62 0-94 0-41 0-57-15-75-7-8-24-18-52-18-37 0-59 21-73 52 0-18 0-35 0-52-23 2-47 4-70 6 0 5 0 10 0 15 35 0 39 3 39 28z">
              <text:p/>
            </draw:path>
            <draw:path draw:style-name="gr7" draw:text-style-name="P13" draw:layer="layout" svg:width="0.184cm" svg:height="0.21cm" svg:x="17.19cm" svg:y="12.328cm" svg:viewBox="0 0 185 211" svg:d="M179 15c4-5 4-7 4-8 0-7-4-7-12-7-53 0-106 0-158 0-2 26-4 52-6 78 4 0 8 0 13 0 2-49 12-67 67-67 18 0 37 0 56 0-46 62-92 123-137 184-6 6-6 6-6 9 0 7 4 7 14 7 54 0 108 0 162 0 3-31 6-61 9-91-4 0-9 0-13 0-4 57-15 78-73 78-19 0-38 0-57 0 46-61 91-122 137-183z">
              <text:p/>
            </draw:path>
            <draw:path draw:style-name="gr7" draw:text-style-name="P13" draw:layer="layout" svg:width="0.189cm" svg:height="0.224cm" svg:x="17.41cm" svg:y="12.32cm" svg:viewBox="0 0 190 225" svg:d="M41 96c2-72 44-85 61-85 51 0 55 66 55 85-39 0-78 0-116 0zM41 106c45 0 91 0 137 0 11 0 12 0 12-10 0-49-26-96-88-96-57 0-102 50-102 112 0 65 52 113 108 113 60 0 82-55 82-65 0-4-4-5-7-5-4 0-5 3-5 7-18 50-62 50-67 50-26 0-45-14-56-32-14-24-14-56-14-74z">
              <text:p/>
            </draw:path>
            <draw:path draw:style-name="gr7" draw:text-style-name="P13" draw:layer="layout" svg:width="0.164cm" svg:height="0.215cm" svg:x="17.628cm" svg:y="12.323cm" svg:viewBox="0 0 165 216" svg:d="M69 54c0-18 0-36 0-54-23 2-46 4-69 6 0 5 0 10 0 15 34 0 38 3 38 28 0 43 0 86 0 130 0 22-6 22-38 22 0 5 0 10 0 15 20 0 42-1 56-1 20 0 42 0 63 1 0-5 0-10 0-15-4 0-7 0-11 0-37 0-38-6-38-22 0-25 0-51 0-76 0-49 21-92 59-92 3 0 4 0 5 0-1 2-11 7-11 20 0 14 10 21 21 21 9 0 21-5 21-21s-15-31-36-31c-37 0-53 33-60 54z">
              <text:p/>
            </draw:path>
            <draw:path draw:style-name="gr7" draw:text-style-name="P13" draw:layer="layout" svg:width="0.217cm" svg:height="0.224cm" svg:x="17.82cm" svg:y="12.32cm" svg:viewBox="0 0 218 225" svg:d="M218 114c0-62-49-114-109-114s-109 53-109 114c0 63 52 111 109 111 60 0 109-48 109-111zM109 212c-21 0-42-10-56-32-11-22-11-52-11-70s0-44 11-67c14-22 37-32 56-32 23 0 44 11 56 32 13 21 13 49 13 67s0 45-11 66c-10 22-33 36-58 36z">
              <text:p/>
            </draw:path>
            <draw:path draw:style-name="gr7" draw:text-style-name="P13" draw:layer="layout" svg:width="0.153cm" svg:height="0.305cm" svg:x="18.226cm" svg:y="12.239cm" svg:viewBox="0 0 154 306" svg:d="M76 105c23 0 47 0 71 0 0-5 0-11 0-16-24 0-48 0-71 0 0-29 0-59 0-89-5 0-9 0-13 0 0 39-14 92-63 93 0 4 0 8 0 12 14 0 28 0 42 0 0 45 0 90 0 135 0 60 46 66 63 66 35 0 49-35 49-66 0-9 0-19 0-28-4 0-8 0-13 0 0 9 0 18 0 27 0 36-14 54-32 54-33 0-33-45-33-53 0-45 0-90 0-135z">
              <text:p/>
            </draw:path>
            <draw:path draw:style-name="gr7" draw:text-style-name="P13" draw:layer="layout" svg:width="0.104cm" svg:height="0.326cm" svg:x="18.425cm" svg:y="12.213cm" svg:viewBox="0 0 105 327" svg:d="M70 110c-23 2-46 4-69 6 0 5 0 10 0 15 33 0 37 3 37 27 0 43 0 87 0 131 0 22-6 22-38 22 0 5 0 10 0 16 15 0 42-2 53-2 18 0 35 2 52 2 0-6 0-11 0-16-32 0-35-3-35-21 0-60 0-120 0-180zM73 25c0-15-13-25-27-25-15 0-26 13-26 25 0 14 11 27 26 27 14 0 27-10 27-27z">
              <text:p/>
            </draw:path>
            <draw:path draw:style-name="gr7" draw:text-style-name="P13" draw:layer="layout" svg:width="0.383cm" svg:height="0.215cm" svg:x="18.561cm" svg:y="12.323cm" svg:viewBox="0 0 384 216" svg:d="M38 49c0 43 0 86 0 130 0 22-4 22-38 22 0 5 0 10 0 15 17 0 42-1 56-1 13 0 38 1 55 1 0-5 0-10 0-15-33 0-38 0-38-22 0-30 0-60 0-90 0-50 35-78 66-78 30 0 36 27 36 55 0 37 0 75 0 113 0 22-6 22-38 22 0 5 0 10 0 15 17 0 42-1 55-1 14 0 39 1 56 1 0-5 0-10 0-15-34 0-39 0-39-22 0-30 0-60 0-90 0-50 35-78 67-78 31 0 36 27 36 55 0 37 0 75 0 113 0 22-5 22-39 22 0 5 0 10 0 15 18 0 43-1 56-1s38 1 55 1c0-5 0-10 0-15-26 0-38 0-38-14 0-31 0-62 0-94 0-41 0-57-16-75-7-8-22-18-51-18-41 0-63 29-72 49-7-43-43-49-64-49-37 0-60 21-73 52 0-18 0-35 0-52-23 2-47 4-70 6 0 5 0 10 0 15 35 0 38 3 38 28z">
              <text:p/>
            </draw:path>
            <draw:path draw:style-name="gr7" draw:text-style-name="P13" draw:layer="layout" svg:width="0.189cm" svg:height="0.224cm" svg:x="18.968cm" svg:y="12.32cm" svg:viewBox="0 0 190 225" svg:d="M42 96c3-72 45-85 62-85 50 0 54 66 54 85-39 0-77 0-116 0zM42 106c46 0 91 0 137 0 10 0 11 0 11-10 0-49-26-96-86-96-58 0-104 50-104 112 0 65 52 113 109 113 60 0 81-55 81-65 0-4-2-5-5-5-4 0-6 3-7 7-17 50-62 50-66 50-25 0-45-14-56-32-14-24-14-56-14-74z">
              <text:p/>
            </draw:path>
            <draw:path draw:style-name="gr7" draw:text-style-name="P13" draw:layer="layout" svg:width="0.241cm" svg:height="0.31cm" svg:x="19.351cm" svg:y="12.323cm" svg:viewBox="0 0 242 311" svg:d="M70 32c0-11 0-21 0-32-23 2-47 4-70 6 0 5 0 10 0 15 35 0 38 3 38 24 0 76 0 152 0 229 0 22-6 22-38 22 0 5 0 10 0 15 17 0 42-1 55-1 14 0 39 1 56 1 0-5 0-10 0-15-34 0-40 0-40-22 0-27 0-54 0-81 0-2 0-4 0-6 3 8 24 35 62 35 57 0 109-48 109-112 0-61-47-110-102-110-39 0-60 22-70 32zM71 160c0-36 0-72 0-108 16-25 40-39 65-39 35 0 66 43 66 97 0 60-35 101-72 101-19 0-38-10-52-30-7-11-7-11-7-21z">
              <text:p/>
            </draw:path>
            <draw:path draw:style-name="gr7" draw:text-style-name="P13" draw:layer="layout" svg:width="0.189cm" svg:height="0.224cm" svg:x="19.638cm" svg:y="12.32cm" svg:viewBox="0 0 190 225" svg:d="M41 96c2-72 44-85 61-85 51 0 56 66 56 85-39 0-78 0-117 0zM41 106c45 0 91 0 137 0 11 0 12 0 12-10 0-49-26-96-88-96-57 0-102 50-102 112 0 65 52 113 108 113 60 0 82-55 82-65 0-4-4-5-7-5-4 0-5 3-5 7-18 50-62 50-67 50-24 0-44-14-56-32-14-24-14-56-14-74z">
              <text:p/>
            </draw:path>
            <draw:path draw:style-name="gr7" draw:text-style-name="P13" draw:layer="layout" svg:width="0.164cm" svg:height="0.215cm" svg:x="19.857cm" svg:y="12.323cm" svg:viewBox="0 0 165 216" svg:d="M69 54c0-18 0-36 0-54-23 2-46 4-69 6 0 5 0 10 0 15 35 0 38 3 38 28 0 43 0 86 0 130 0 22-6 22-38 22 0 5 0 10 0 15 20 0 42-1 56-1 20 0 43 0 63 1 0-5 0-10 0-15-4 0-7 0-11 0-37 0-37-6-37-22 0-25 0-51 0-76 0-49 20-92 58-92 3 0 4 0 5 0-1 2-11 7-11 20 0 14 10 21 21 21 9 0 21-5 21-21s-15-31-36-31c-37 0-53 33-60 54z">
              <text:p/>
            </draw:path>
            <draw:path draw:style-name="gr7" draw:text-style-name="P13" draw:layer="layout" svg:width="0.105cm" svg:height="0.326cm" svg:x="20.051cm" svg:y="12.213cm" svg:viewBox="0 0 106 327" svg:d="M71 110c-22 2-45 4-68 6 0 5 0 10 0 15 32 0 36 3 36 27 0 43 0 87 0 131 0 22-5 22-39 22 0 5 0 10 0 16 17 0 43-2 55-2 16 0 35 2 51 2 0-6 0-11 0-16-33 0-35-3-35-21 0-60 0-120 0-180zM73 25c0-15-11-25-25-25-16 0-27 13-27 25 0 14 11 27 27 27 14 0 25-10 25-27z">
              <text:p/>
            </draw:path>
            <draw:path draw:style-name="gr7" draw:text-style-name="P13" draw:layer="layout" svg:width="0.217cm" svg:height="0.224cm" svg:x="20.186cm" svg:y="12.32cm" svg:viewBox="0 0 218 225" svg:d="M218 114c0-62-49-114-109-114-61 0-109 53-109 114 0 63 52 111 109 111 59 0 109-48 109-111zM109 212c-21 0-42-10-56-32-12-22-12-52-12-70s0-44 12-67c13-22 37-32 56-32 21 0 43 11 56 32s13 49 13 67 0 45-11 66c-12 22-33 36-58 36z">
              <text:p/>
            </draw:path>
            <draw:path draw:style-name="gr7" draw:text-style-name="P13" draw:layer="layout" svg:width="0.241cm" svg:height="0.344cm" svg:x="20.449cm" svg:y="12.2cm" svg:viewBox="0 0 242 345" svg:d="M169 313c0 10 0 21 0 32 25-2 49-4 73-6 0-5 0-10 0-15-35 0-38-3-38-27 0-99 0-198 0-297-23 2-47 4-71 6 0 5 0 10 0 15 35 0 38 3 38 26 0 36 0 71 0 107-14-19-35-31-62-31-57 0-109 49-109 111s48 111 104 111c32 0 54-17 65-32zM169 181c0 34 0 67 0 101 0 8 0 10-5 18-14 22-37 34-58 34-22 0-39-13-51-31-13-21-14-49-14-69 0-18 1-47 15-69 10-14 29-31 56-31 17 0 38 7 52 29 5 9 5 10 5 18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9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0">Look back at what we want to have: </text:span></text:p>
                <text:p><text:span text:style-name="T50"/></text:p>
                <text:p><text:span text:style-name="T50"/></text:p>
              </text:list-item>
              <text:list-item>
                <text:p><text:span text:style-name="T123">We already have </text:span><text:span text:style-name="T92">P</text:span><text:span text:style-name="T124">0</text:span><text:span text:style-name="T50">(</text:span><text:span text:style-name="T51">t</text:span><text:span text:style-name="T50">) and </text:span><text:span text:style-name="T51">P</text:span><text:span text:style-name="T125">1</text:span><text:span text:style-name="T50">(</text:span><text:span text:style-name="T51">t</text:span><text:span text:style-name="T50">).</text:span></text:p>
              </text:list-item>
              <text:list-item>
                <text:p><text:span text:style-name="T50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6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6B0000001D136E6BC784F249C6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6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086000000203E00049EC7C1BE46.png" xlink:type="simple" xlink:show="embed" xlink:actuate="onLoad" draw:mime-type="image/png"/>
          </draw:frame>
        </draw:g>
        <draw:g>
          <svg:title>TexMaths</svg:title>
          <svg:desc>18§display§\textcolor{gray}{(P_0(t) = e^{-\lambda t} })§svg§600§FALSE§</svg:desc>
          <draw:frame draw:style-name="gr2" draw:text-style-name="P6" draw:layer="layout" svg:width="3.893cm" svg:height="0.725cm" svg:x="20.201cm" svg:y="7.776cm">
            <draw:image xlink:href="Pictures/100026750000087400000194D31375C18F8F5F6A.svg" xlink:type="simple" xlink:show="embed" xlink:actuate="onLoad" draw:mime-type="image/svg+xml">
              <text:p/>
            </draw:image>
            <draw:image xlink:href="Pictures/10000001000000520000000FEC0A4E22FD2AAE1D.png" xlink:type="simple" xlink:show="embed" xlink:actuate="onLoad" draw:mime-type="image/png"/>
          </draw:frame>
        </draw:g>
        <draw:g>
          <svg:title>TexMaths</svg:title>
          <svg:desc>18§display§(P_1(t) =  t\lambda e^{-\lambda t})§svg§600§FALSE§</svg:desc>
          <draw:g>
            <draw:path draw:style-name="gr6" draw:text-style-name="P12" draw:layer="layout" svg:width="4.424cm" svg:height="0.658cm" svg:x="20.25cm" svg:y="8.934cm" svg:viewBox="0 0 4425 659" svg:d="M0 0c1475 0 2950 0 4425 0 0 220 0 440 0 659-1475 0-2950 0-4425 0 0-219 0-439 0-659z">
              <text:p/>
            </draw:path>
            <draw:path draw:style-name="gr3" draw:text-style-name="P7" draw:layer="layout" svg:width="0.145cm" svg:height="0.63cm" svg:x="20.281cm" svg:y="8.995cm" svg:viewBox="0 0 146 631" svg:d="M146 623c0-1 0-1-11-12-79-79-99-200-99-295 0-109 25-221 103-298 7-9 7-9 7-11 0-5-2-7-6-7-7 0-63 43-100 124-33 68-40 138-40 192 0 49 7 124 41 196 38 77 92 119 99 119 4 0 6-2 6-8z">
              <text:p/>
            </draw:path>
            <draw:path draw:style-name="gr3" draw:text-style-name="P7" draw:layer="layout" svg:width="0.449cm" svg:height="0.428cm" svg:x="20.489cm" svg:y="9.039cm" svg:viewBox="0 0 450 429" svg:d="M166 230c36 0 72 0 108 0 89 0 176-65 176-135 0-48-42-95-124-95-69 0-137 0-205 0-11 0-18 0-18 11 0 9 5 9 18 9 9 0 19 0 27 0 10 2 14 3 14 11 0 1 0 3-2 12-29 113-57 225-86 338-6 25-7 29-56 29-11 0-18 0-18 12 0 7 7 7 9 7 18 0 63-1 81-1 13 0 27 1 40 1 14 0 27 0 41 0 4 0 13 0 13-12 0-7-6-7-18-7-24 0-42 0-42-11 0-4 2-7 2-11 13-53 26-105 40-158zM211 43c7-21 7-23 34-23 20 0 40 0 61 0 52 0 86 16 86 59 0 25-12 79-38 102-30 27-70 33-97 33-30 0-60 0-90 0 15-57 29-114 44-171z">
              <text:p/>
            </draw:path>
            <draw:path draw:style-name="gr3" draw:text-style-name="P7" draw:layer="layout" svg:width="0.159cm" svg:height="0.292cm" svg:x="20.918cm" svg:y="9.27cm" svg:viewBox="0 0 160 293" svg:d="M101 13c0-13-2-13-15-13-28 27-68 29-86 29 0 5 0 9 0 14 11 0 40 0 65-11 0 75 0 150 0 225 0 14 0 20-45 20-6 0-11 0-16 0 0 5 0 10 0 16 7 0 61-2 77-2 14 0 70 2 79 2 0-6 0-11 0-16-5 0-11 0-16 0-43 0-43-6-43-20 0-82 0-163 0-244z">
              <text:p/>
            </draw:path>
            <draw:path draw:style-name="gr3" draw:text-style-name="P7" draw:layer="layout" svg:width="0.145cm" svg:height="0.63cm" svg:x="21.216cm" svg:y="8.995cm" svg:viewBox="0 0 146 631" svg:d="M146 623c0-1 0-1-11-12-79-79-99-200-99-295 0-109 23-221 101-298 9-9 9-9 9-11 0-5-2-7-6-7-7 0-64 43-100 124-33 68-40 138-40 192 0 49 5 124 41 196 38 77 92 119 99 119 4 0 6-2 6-8z">
              <text:p/>
            </draw:path>
            <draw:path draw:style-name="gr3" draw:text-style-name="P7" draw:layer="layout" svg:width="0.193cm" svg:height="0.4cm" svg:x="21.412cm" svg:y="9.074cm" svg:viewBox="0 0 194 401" svg:d="M117 142c20 0 40 0 59 0 13 0 18 0 18-13 0-7-5-7-18-7-18 0-36 0-54 0 22-90 26-102 26-106 0-11-8-16-18-16-2 0-20 0-26 22-8 33-16 67-25 100-20 0-39 0-59 0-13 0-20 0-20 13 0 7 5 7 18 7 19 0 37 0 56 0-45 180-47 190-47 201 0 34 23 58 58 58 64 0 100-92 100-97 0-6-5-6-9-6-5 0-5 2-9 9-27 65-61 79-81 79-14 0-19-7-19-28 0-15 0-20 3-31 16-62 31-123 47-185z">
              <text:p/>
            </draw:path>
            <draw:path draw:style-name="gr3" draw:text-style-name="P7" draw:layer="layout" svg:width="0.147cm" svg:height="0.63cm" svg:x="21.662cm" svg:y="8.995cm" svg:viewBox="0 0 148 631" svg:d="M148 316c0-50-8-126-42-197-39-78-93-119-99-119-3 0-7 4-7 7 0 2 0 2 13 15 61 61 97 161 97 294 0 108-24 218-101 298-9 8-9 8-9 9 0 6 4 8 7 8 6 0 63-44 101-123 32-70 40-140 40-192z">
              <text:p/>
            </draw:path>
            <draw:path draw:style-name="gr3" draw:text-style-name="P7" draw:layer="layout" svg:width="0.42cm" svg:height="0.146cm" svg:x="22.084cm" svg:y="9.238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3" draw:text-style-name="P7" draw:layer="layout" svg:width="0.193cm" svg:height="0.4cm" svg:x="22.73cm" svg:y="9.074cm" svg:viewBox="0 0 194 401" svg:d="M117 142c20 0 40 0 59 0 13 0 18 0 18-13 0-7-5-7-18-7-18 0-37 0-55 0 23-90 27-102 27-106 0-11-8-16-18-16-2 0-20 0-26 22-8 33-16 67-25 100-20 0-39 0-59 0-13 0-20 0-20 13 0 7 5 7 18 7 19 0 37 0 56 0-45 180-49 190-49 201 0 34 25 58 60 58 64 0 100-92 100-97 0-6-5-6-9-6-5 0-5 2-9 9-27 65-61 79-82 79-13 0-18-7-18-28 0-15 0-20 3-31 16-62 31-123 47-185z">
              <text:p/>
            </draw:path>
            <draw:path draw:style-name="gr3" draw:text-style-name="P7" draw:layer="layout" svg:width="0.312cm" svg:height="0.445cm" svg:x="22.978cm" svg:y="9.031cm" svg:viewBox="0 0 313 446" svg:d="M193 253c25 67 55 162 64 176 11 15 18 15 34 15 5 0 10 0 15 0s7-4 7-6c0-1-2-3-4-7-7-5-10-16-14-29-43-119-86-238-129-357-13-38-47-45-78-45-3 0-11 0-11 7 0 4 4 4 6 6 21 3 25 7 41 50 21 57 41 115 61 172-58 58-116 115-174 173-7 7-11 11-11 20 0 10 8 18 18 18s16-8 22-15c51-59 102-118 153-178z">
              <text:p/>
            </draw:path>
            <draw:path draw:style-name="gr3" draw:text-style-name="P7" draw:layer="layout" svg:width="0.242cm" svg:height="0.285cm" svg:x="23.341cm" svg:y="9.189cm" svg:viewBox="0 0 243 286" svg:d="M90 133c18 0 65 0 95-14 45-18 49-56 49-65 0-27-25-54-68-54-71 0-166 61-166 172 0 63 38 114 99 114 92 0 144-67 144-74 0-4-4-9-7-9-4 0-6 2-9 7-49 61-119 61-126 61-49 0-56-52-56-72 0-7 2-27 11-66 11 0 23 0 34 0zM59 120c26-97 90-106 107-106 30 0 46 18 46 40 0 66-100 66-126 66-9 0-18 0-27 0z">
              <text:p/>
            </draw:path>
            <draw:path draw:style-name="gr3" draw:text-style-name="P7" draw:layer="layout" svg:width="0.298cm" svg:height="0.021cm" svg:x="23.654cm" svg:y="9.087cm" svg:viewBox="0 0 299 22" svg:d="M282 22c6 0 17 0 17-11s-9-11-17-11c-88 0-176 0-264 0-7 0-18 0-18 11s11 11 18 11c88 0 176 0 264 0z">
              <text:p/>
            </draw:path>
            <draw:path draw:style-name="gr3" draw:text-style-name="P7" draw:layer="layout" svg:width="0.244cm" svg:height="0.31cm" svg:x="24.034cm" svg:y="8.902cm" svg:viewBox="0 0 245 311" svg:d="M148 180c21 50 46 115 52 120 7 11 16 11 23 11 3 0 5 0 7 0 9 0 15 0 15-6 0-1-2-3-4-5-5-4-9-14-11-18-36-85-72-170-108-255-3-7-12-27-59-27-5 0-11 0-11 5 0 6 4 8 7 8 9 1 17 1 29 27 18 41 35 82 52 123-43 39-87 78-131 117-5 6-9 9-9 16 0 11 9 15 16 15s13-6 15-7c39-42 78-83 117-124z">
              <text:p/>
            </draw:path>
            <draw:path draw:style-name="gr3" draw:text-style-name="P7" draw:layer="layout" svg:width="0.148cm" svg:height="0.279cm" svg:x="24.32cm" svg:y="8.933cm" svg:viewBox="0 0 149 280" svg:d="M90 101c15 0 30 0 45 0 9 0 14 0 14-9 0-6-5-6-12-6-15 0-29 0-43 0 6-22 12-44 18-66 0-2 0-4 0-6 0-9-6-14-15-14-11 0-18 7-21 20-2 11 3-11-17 66-15 0-30 0-45 0-9 0-14 0-14 9 0 6 5 6 13 6 14 0 28 0 43 0-9 34-18 69-27 104-2 12-6 27-6 34 0 25 22 41 47 41 49 0 78-62 78-68s-6-5-8-5c-5 0-5 1-9 9-12 27-36 52-59 52-9 0-16-6-16-22 0-3 2-14 3-18 11-42 21-85 31-127z">
              <text:p/>
            </draw:path>
            <draw:path draw:style-name="gr3" draw:text-style-name="P7" draw:layer="layout" svg:width="0.147cm" svg:height="0.63cm" svg:x="24.559cm" svg:y="8.995cm" svg:viewBox="0 0 148 631" svg:d="M148 316c0-50-8-126-42-197-38-78-92-119-99-119-3 0-7 4-7 7 0 2 0 2 13 15 63 61 99 161 99 294 0 108-24 218-103 298-9 8-9 8-9 9 0 6 4 8 7 8 7 0 63-44 101-123 32-70 40-140 40-192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9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0">Look back at what we want to have: </text:span></text:p>
                <text:p><text:span text:style-name="T50"/></text:p>
                <text:p><text:span text:style-name="T50"/></text:p>
              </text:list-item>
              <text:list-item>
                <text:p><text:span text:style-name="T123">We already have </text:span><text:span text:style-name="T92">P</text:span><text:span text:style-name="T124">0</text:span><text:span text:style-name="T50">(</text:span><text:span text:style-name="T51">t</text:span><text:span text:style-name="T50">) and </text:span><text:span text:style-name="T51">P</text:span><text:span text:style-name="T125">1</text:span><text:span text:style-name="T50">(</text:span><text:span text:style-name="T51">t</text:span><text:span text:style-name="T50">).</text:span></text:p>
              </text:list-item>
              <text:list-item>
                <text:p><text:span text:style-name="T50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6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6B0000001D136E6BC784F249C6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6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086000000203E00049EC7C1BE46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.§svg§600§FALSE§</svg:desc>
          <draw:frame draw:style-name="gr2" draw:text-style-name="P6" draw:layer="layout" svg:width="9.373cm" svg:height="1.354cm" svg:x="1.76cm" svg:y="11.946cm">
            <draw:image xlink:href="Pictures/1000710D00001458000002F14CD9BD7B89E29585.svg" xlink:type="simple" xlink:show="embed" xlink:actuate="onLoad" draw:mime-type="image/svg+xml">
              <text:p/>
            </draw:image>
            <draw:image xlink:href="Pictures/10000001000000C50000001C41BA499F38AA4C9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9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0">Look back at what we want to have: </text:span></text:p>
                <text:p><text:span text:style-name="T50"/></text:p>
                <text:p><text:span text:style-name="T50"/></text:p>
              </text:list-item>
              <text:list-item>
                <text:p><text:span text:style-name="T123">We already have </text:span><text:span text:style-name="T92">P</text:span><text:span text:style-name="T124">0</text:span><text:span text:style-name="T50">(</text:span><text:span text:style-name="T51">t</text:span><text:span text:style-name="T50">) and </text:span><text:span text:style-name="T51">P</text:span><text:span text:style-name="T125">1</text:span><text:span text:style-name="T50">(</text:span><text:span text:style-name="T51">t</text:span><text:span text:style-name="T50">).</text:span></text:p>
              </text:list-item>
              <text:list-item>
                <text:p><text:span text:style-name="T50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6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6B0000001D136E6BC784F249C6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6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086000000203E00049EC7C1BE46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 = \frac{\lambda^n t^{n-1}}{(n-1)!}.§svg§600§FALSE§</svg:desc>
          <draw:frame draw:style-name="gr2" draw:text-style-name="P6" draw:layer="layout" svg:width="12.458cm" svg:height="1.543cm" svg:x="1.76cm" svg:y="11.947cm">
            <draw:image xlink:href="Pictures/10009DEF00001B0A0000035A70EE60369841B6E3.svg" xlink:type="simple" xlink:show="embed" xlink:actuate="onLoad" draw:mime-type="image/svg+xml">
              <text:p/>
            </draw:image>
            <draw:image xlink:href="Pictures/100000010000010600000020CDD763D521FC80A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9"><text:span text:style-name="T5">P</text:span><text:span text:style-name="T122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0">Look back at what we want to have: </text:span></text:p>
                <text:p><text:span text:style-name="T50"/></text:p>
                <text:p><text:span text:style-name="T50"/></text:p>
              </text:list-item>
              <text:list-item>
                <text:p><text:span text:style-name="T123">We already have </text:span><text:span text:style-name="T92">P</text:span><text:span text:style-name="T124">0</text:span><text:span text:style-name="T50">(</text:span><text:span text:style-name="T51">t</text:span><text:span text:style-name="T50">) and </text:span><text:span text:style-name="T51">P</text:span><text:span text:style-name="T125">1</text:span><text:span text:style-name="T50">(</text:span><text:span text:style-name="T51">t</text:span><text:span text:style-name="T50">).</text:span></text:p>
              </text:list-item>
              <text:list-item>
                <text:p><text:span text:style-name="T50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6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6B0000001D136E6BC784F249C6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6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086000000203E00049EC7C1BE46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 = \frac{\lambda^n t^{n-1}}{(n-1)!}.§svg§600§FALSE§</svg:desc>
          <draw:frame draw:style-name="gr2" draw:text-style-name="P6" draw:layer="layout" svg:width="12.458cm" svg:height="1.543cm" svg:x="1.76cm" svg:y="11.947cm">
            <draw:image xlink:href="Pictures/10009DEF00001B0A0000035A70EE60369841B6E3.svg" xlink:type="simple" xlink:show="embed" xlink:actuate="onLoad" draw:mime-type="image/svg+xml">
              <text:p/>
            </draw:image>
            <draw:image xlink:href="Pictures/100000010000010600000020CDD763D521FC80A6.png" xlink:type="simple" xlink:show="embed" xlink:actuate="onLoad" draw:mime-type="image/png"/>
          </draw:frame>
        </draw:g>
        <draw:g>
          <svg:title>TexMaths</svg:title>
          <svg:desc>18§latex§\begin{eqnarray*}
&amp;\Rightarrow&amp; \int d(e^{\lambda t}P_n(t)) = \int \frac{\lambda^n t^{n-1}}{(n-1)!} dt\\
&amp;\Rightarrow&amp; e^{\lambda t}P_n(t) = \frac{\lambda^n t^{n-1}}{(n-1)!}\cdot \frac{t^n}{n} + C\\
&amp;\Rightarrow&amp; P_n(t) = e^{-\lambda t} \frac{\lambda^n t^n}{n!}.
\end{eqnarray*}§svg§600§FALSE§</svg:desc>
          <draw:frame draw:style-name="gr2" draw:text-style-name="P6" draw:layer="layout" svg:width="9.52cm" svg:height="4.891cm" svg:x="16.357cm" svg:y="6.336cm">
            <draw:image xlink:href="Pictures/10013492000014AA00000A9E499832A90CD5D1C6.svg" xlink:type="simple" xlink:show="embed" xlink:actuate="onLoad" draw:mime-type="image/svg+xml">
              <text:p/>
            </draw:image>
            <draw:image xlink:href="Pictures/10000001000000C800000067299B63177FA58188.png" xlink:type="simple" xlink:show="embed" xlink:actuate="onLoad" draw:mime-type="image/png"/>
          </draw:frame>
        </draw:g>
        <draw:custom-shape draw:style-name="gr44" draw:text-style-name="P6" draw:layer="layout" svg:width="11.4cm" svg:height="5.8cm" svg:x="15.8cm" svg:y="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textcolor{blue}{\mbox{(use } P_n(0) = 0\mbox{)}}§svg§600§FALSE§</svg:desc>
          <draw:frame draw:style-name="gr2" draw:text-style-name="P6" draw:layer="layout" svg:width="3.81cm" svg:height="0.603cm" svg:x="23.074cm" svg:y="10.344cm">
            <draw:image xlink:href="Pictures/10002E040000094E0000017AA421B3FCADEA379C.svg" xlink:type="simple" xlink:show="embed" xlink:actuate="onLoad" draw:mime-type="image/svg+xml">
              <text:p/>
            </draw:image>
            <draw:image xlink:href="Pictures/100000010000005A0000000EF3E0BC7E9870550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Further related topic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Stochastic counting process: <text:span text:style-name="T126">point processes</text:span></text:p>
              </text:list-item>
              <text:list-item>
                <text:p>Hawkes (self-exciting) processes.</text:p>
                <text:list>
                  <text:list-item>
                    <text:p>Earthquake modeling, financial analysis.</text:p>
                  </text:list-item>
                  <text:list-item>
                    <text:p>A reference: <text:a xlink:href="https://arxiv.org/pdf/1507.02822.pdf" xlink:type="simple">https://arxiv.org/pdf/1507.02822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標準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TC" svg:font-family="'Noto Sans TC'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pitch="variable"/>
    <style:font-face style:name="思源黑體 TW2" svg:font-family="'思源黑體 TW'" style:font-family-generic="roman" style:font-pitch="variable"/>
    <style:font-face style:name="新細明體" svg:font-family="新細明體" style:font-family-generic="roman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Concave_20_short" draw:display-name="Concave short" svg:viewBox="0 0 1131 754" svg:d="M566 0l-566 754 114-85 136-68 148-46 161-17 161 13 153 46 140 68 118 89z"/>
    <draw:marker draw:name="線條箭頭_20_1" draw:display-name="線條箭頭 1" svg:viewBox="0 0 20 20" svg:d="M0 20l10-20 10 20z"/>
    <draw:stroke-dash draw:name="Dash" draw:style="rect" draw:dots1="1" draw:dots1-length="300%" draw:distance="300%"/>
    <draw:stroke-dash draw:name="Dash_20_4" draw:display-name="Dash 4" draw:style="rect" draw:dots1="1" draw:dots1-length="0.02cm" draw:dots2="1" draw:dots2-length="0.02cm" draw:distance="0.02cm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fo:background-color="#ffffff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cccccc" loext:opacity="100%" style:font-name="Liberation Serif" fo:font-size="11pt" fo:font-style="italic" style:font-name-asian="Liberation Serif" style:font-size-asian="11pt" style:font-style-asian="italic" style:font-size-complex="11pt" style:font-style-complex="italic"/>
    </style:style>
    <style:style style:name="MT3" style:family="text">
      <style:text-properties fo:color="#333333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093F928401AEAF2E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3.4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2.1cm" svg:y="14.7cm" presentation:class="page-number">
        <draw:text-box>
          <text:p text:style-name="MP3"><text:span text:style-name="MT3"><text:page-number>59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2DT21H44M51S</meta:editing-duration>
    <meta:editing-cycles>575</meta:editing-cycles>
    <meta:generator>LibreOffice/7.3.0.3$Windows_X86_64 LibreOffice_project/0f246aa12d0eee4a0f7adcefbf7c878fc2238db3</meta:generator>
    <dc:title>Randomized Algorithms</dc:title>
    <dc:date>2026-05-11T17:41:08.315000000</dc:date>
    <meta:print-date>2021-03-03T15:30:49.955288135</meta:print-date>
    <dc:subject> Continuous Distributions and the Poisson Process</dc:subject>
    <meta:document-statistic meta:object-count="1639"/>
  </office:meta>
</office:document-meta>
</file>